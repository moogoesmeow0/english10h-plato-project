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1.3091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py" table:style-name="ta1">
        <table:shapes>
          <draw:frame draw:z-index="0" draw:style-name="gr1" draw:text-style-name="P1" svg:width="19.2571in" svg:height="5.6417in" svg:x="3.5772in" svg:y="59.2217in">
            <draw:object draw:notify-on-update-of-ranges="copy.A1:copy.A1 copy.A2:copy.A324 copy.B1:copy.B1 copy.B2:copy.B324 copy.A1:copy.A1 copy.A2:copy.A324 copy.C1:copy.C1 copy.C2:copy.C324 copy.A1:copy.A1 copy.A2:copy.A324 copy.D1:copy.D1 copy.D2:copy.D324 copy.A1:copy.A1 copy.A2:copy.A324 copy.E1:copy.E1 copy.E2:copy.E3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z11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z12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z23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y24</text:p>
          </table:table-cell>
          <table:table-cell office:value-type="string" calcext:value-type="string">
            <text:p>z24</text:p>
          </table:table-cell>
          <table:table-cell office:value-type="string" calcext:value-type="string">
            <text:p>v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([.J2]-[.F2])^2+([.K2]-[.G2])^2)" office:value-type="float" office:value="0.503051073243394" calcext:value-type="float">
            <text:p>0.503051073243394</text:p>
          </table:table-cell>
          <table:table-cell table:formula="of:=SQRT(([.R2]-[.N2])^2+([.S2]-[.O2])^2)" office:value-type="float" office:value="0.299123326528294" calcext:value-type="float">
            <text:p>0.299123326528294</text:p>
          </table:table-cell>
          <table:table-cell table:formula="of:=SQRT(([.R2]-[.F2])^2+([.S2]-[.G2])^2)" office:value-type="float" office:value="0.93880539886549" calcext:value-type="float">
            <text:p>0.93880539886549</text:p>
          </table:table-cell>
          <table:table-cell table:formula="of:=SQRT(([.N2]-[.J2])^2+([.O2]-[.K2])^2)" office:value-type="float" office:value="0.933709336199209" calcext:value-type="float">
            <text:p>0.933709336199209</text:p>
          </table:table-cell>
          <table:table-cell office:value-type="float" office:value="0.828557372093201" calcext:value-type="float">
            <text:p>0.828557372093201</text:p>
          </table:table-cell>
          <table:table-cell office:value-type="float" office:value="0.306098997592926" calcext:value-type="float">
            <text:p>0.306098997592926</text:p>
          </table:table-cell>
          <table:table-cell office:value-type="float" office:value="-0.823800206184387" calcext:value-type="float">
            <text:p>-0.823800206184387</text:p>
          </table:table-cell>
          <table:table-cell office:value-type="float" office:value="0.999708831310272" calcext:value-type="float">
            <text:p>0.999708831310272</text:p>
          </table:table-cell>
          <table:table-cell office:value-type="float" office:value="0.326139748096466" calcext:value-type="float">
            <text:p>0.326139748096466</text:p>
          </table:table-cell>
          <table:table-cell office:value-type="float" office:value="0.331336140632629" calcext:value-type="float">
            <text:p>0.331336140632629</text:p>
          </table:table-cell>
          <table:table-cell office:value-type="float" office:value="-0.839429259300232" calcext:value-type="float">
            <text:p>-0.839429259300232</text:p>
          </table:table-cell>
          <table:table-cell office:value-type="float" office:value="0.999842405319214" calcext:value-type="float">
            <text:p>0.999842405319214</text:p>
          </table:table-cell>
          <table:table-cell office:value-type="float" office:value="0.73918354511261" calcext:value-type="float">
            <text:p>0.73918354511261</text:p>
          </table:table-cell>
          <table:table-cell office:value-type="float" office:value="1.16871774196625" calcext:value-type="float">
            <text:p>1.16871774196625</text:p>
          </table:table-cell>
          <table:table-cell office:value-type="float" office:value="0.0251932442188263" calcext:value-type="float">
            <text:p>0.0251932442188263</text:p>
          </table:table-cell>
          <table:table-cell office:value-type="float" office:value="0.148764908313751" calcext:value-type="float">
            <text:p>0.148764908313751</text:p>
          </table:table-cell>
          <table:table-cell office:value-type="float" office:value="0.440165132284164" calcext:value-type="float">
            <text:p>0.440165132284164</text:p>
          </table:table-cell>
          <table:table-cell office:value-type="float" office:value="1.16079604625702" calcext:value-type="float">
            <text:p>1.16079604625702</text:p>
          </table:table-cell>
          <table:table-cell office:value-type="float" office:value="-0.0179943200200796" calcext:value-type="float">
            <text:p>-0.0179943200200796</text:p>
          </table:table-cell>
          <table:table-cell office:value-type="float" office:value="0.184632912278175" calcext:value-type="float">
            <text:p>0.184632912278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([.J3]-[.F3])^2+([.K3]-[.G3])^2)" office:value-type="float" office:value="0.499395413592392" calcext:value-type="float">
            <text:p>0.499395413592392</text:p>
          </table:table-cell>
          <table:table-cell table:formula="of:=SQRT(([.R3]-[.N3])^2+([.S3]-[.O3])^2)" office:value-type="float" office:value="0.299266408221725" calcext:value-type="float">
            <text:p>0.299266408221725</text:p>
          </table:table-cell>
          <table:table-cell table:formula="of:=SQRT(([.R3]-[.F3])^2+([.S3]-[.G3])^2)" office:value-type="float" office:value="0.952250318501852" calcext:value-type="float">
            <text:p>0.952250318501852</text:p>
          </table:table-cell>
          <table:table-cell table:formula="of:=SQRT(([.N3]-[.J3])^2+([.O3]-[.K3])^2)" office:value-type="float" office:value="0.944825492626517" calcext:value-type="float">
            <text:p>0.944825492626517</text:p>
          </table:table-cell>
          <table:table-cell office:value-type="float" office:value="0.825609862804413" calcext:value-type="float">
            <text:p>0.825609862804413</text:p>
          </table:table-cell>
          <table:table-cell office:value-type="float" office:value="0.300701826810837" calcext:value-type="float">
            <text:p>0.300701826810837</text:p>
          </table:table-cell>
          <table:table-cell office:value-type="float" office:value="-0.583010792732239" calcext:value-type="float">
            <text:p>-0.583010792732239</text:p>
          </table:table-cell>
          <table:table-cell office:value-type="float" office:value="0.999660134315491" calcext:value-type="float">
            <text:p>0.999660134315491</text:p>
          </table:table-cell>
          <table:table-cell office:value-type="float" office:value="0.326853930950165" calcext:value-type="float">
            <text:p>0.326853930950165</text:p>
          </table:table-cell>
          <table:table-cell office:value-type="float" office:value="0.325966417789459" calcext:value-type="float">
            <text:p>0.325966417789459</text:p>
          </table:table-cell>
          <table:table-cell office:value-type="float" office:value="-0.549889385700226" calcext:value-type="float">
            <text:p>-0.549889385700226</text:p>
          </table:table-cell>
          <table:table-cell office:value-type="float" office:value="0.999809622764587" calcext:value-type="float">
            <text:p>0.999809622764587</text:p>
          </table:table-cell>
          <table:table-cell office:value-type="float" office:value="0.739587843418121" calcext:value-type="float">
            <text:p>0.739587843418121</text:p>
          </table:table-cell>
          <table:table-cell office:value-type="float" office:value="1.17587578296661" calcext:value-type="float">
            <text:p>1.17587578296661</text:p>
          </table:table-cell>
          <table:table-cell office:value-type="float" office:value="0.0170832145959139" calcext:value-type="float">
            <text:p>0.0170832145959139</text:p>
          </table:table-cell>
          <table:table-cell office:value-type="float" office:value="0.140067830681801" calcext:value-type="float">
            <text:p>0.140067830681801</text:p>
          </table:table-cell>
          <table:table-cell office:value-type="float" office:value="0.440352857112885" calcext:value-type="float">
            <text:p>0.440352857112885</text:p>
          </table:table-cell>
          <table:table-cell office:value-type="float" office:value="1.17153918743134" calcext:value-type="float">
            <text:p>1.17153918743134</text:p>
          </table:table-cell>
          <table:table-cell office:value-type="float" office:value="-0.00854329206049442" calcext:value-type="float">
            <text:p>-0.00854329206049442</text:p>
          </table:table-cell>
          <table:table-cell office:value-type="float" office:value="0.173502951860428" calcext:value-type="float">
            <text:p>0.173502951860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([.J4]-[.F4])^2+([.K4]-[.G4])^2)" office:value-type="float" office:value="0.494460191803665" calcext:value-type="float">
            <text:p>0.494460191803665</text:p>
          </table:table-cell>
          <table:table-cell table:formula="of:=SQRT(([.R4]-[.N4])^2+([.S4]-[.O4])^2)" office:value-type="float" office:value="0.305591035146584" calcext:value-type="float">
            <text:p>0.305591035146584</text:p>
          </table:table-cell>
          <table:table-cell table:formula="of:=SQRT(([.R4]-[.F4])^2+([.S4]-[.G4])^2)" office:value-type="float" office:value="0.966601028818153" calcext:value-type="float">
            <text:p>0.966601028818153</text:p>
          </table:table-cell>
          <table:table-cell table:formula="of:=SQRT(([.N4]-[.J4])^2+([.O4]-[.K4])^2)" office:value-type="float" office:value="0.962686939354287" calcext:value-type="float">
            <text:p>0.962686939354287</text:p>
          </table:table-cell>
          <table:table-cell office:value-type="float" office:value="0.820283770561218" calcext:value-type="float">
            <text:p>0.820283770561218</text:p>
          </table:table-cell>
          <table:table-cell office:value-type="float" office:value="0.299959123134613" calcext:value-type="float">
            <text:p>0.299959123134613</text:p>
          </table:table-cell>
          <table:table-cell office:value-type="float" office:value="-0.60651433467865" calcext:value-type="float">
            <text:p>-0.60651433467865</text:p>
          </table:table-cell>
          <table:table-cell office:value-type="float" office:value="0.999620854854584" calcext:value-type="float">
            <text:p>0.999620854854584</text:p>
          </table:table-cell>
          <table:table-cell office:value-type="float" office:value="0.326345354318619" calcext:value-type="float">
            <text:p>0.326345354318619</text:p>
          </table:table-cell>
          <table:table-cell office:value-type="float" office:value="0.322668641805649" calcext:value-type="float">
            <text:p>0.322668641805649</text:p>
          </table:table-cell>
          <table:table-cell office:value-type="float" office:value="-0.587579846382141" calcext:value-type="float">
            <text:p>-0.587579846382141</text:p>
          </table:table-cell>
          <table:table-cell office:value-type="float" office:value="0.999775826931" calcext:value-type="float">
            <text:p>0.999775826931</text:p>
          </table:table-cell>
          <table:table-cell office:value-type="float" office:value="0.737065434455872" calcext:value-type="float">
            <text:p>0.737065434455872</text:p>
          </table:table-cell>
          <table:table-cell office:value-type="float" office:value="1.19334375858307" calcext:value-type="float">
            <text:p>1.19334375858307</text:p>
          </table:table-cell>
          <table:table-cell office:value-type="float" office:value="0.0165714956820011" calcext:value-type="float">
            <text:p>0.0165714956820011</text:p>
          </table:table-cell>
          <table:table-cell office:value-type="float" office:value="0.130376070737839" calcext:value-type="float">
            <text:p>0.130376070737839</text:p>
          </table:table-cell>
          <table:table-cell office:value-type="float" office:value="0.431589305400848" calcext:value-type="float">
            <text:p>0.431589305400848</text:p>
          </table:table-cell>
          <table:table-cell office:value-type="float" office:value="1.18496429920197" calcext:value-type="float">
            <text:p>1.18496429920197</text:p>
          </table:table-cell>
          <table:table-cell office:value-type="float" office:value="-0.00755252176895738" calcext:value-type="float">
            <text:p>-0.00755252176895738</text:p>
          </table:table-cell>
          <table:table-cell office:value-type="float" office:value="0.161544144153595" calcext:value-type="float">
            <text:p>0.1615441441535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([.J5]-[.F5])^2+([.K5]-[.G5])^2)" office:value-type="float" office:value="0.491815502096662" calcext:value-type="float">
            <text:p>0.491815502096662</text:p>
          </table:table-cell>
          <table:table-cell table:formula="of:=SQRT(([.R5]-[.N5])^2+([.S5]-[.O5])^2)" office:value-type="float" office:value="0.30533957783167" calcext:value-type="float">
            <text:p>0.30533957783167</text:p>
          </table:table-cell>
          <table:table-cell table:formula="of:=SQRT(([.R5]-[.F5])^2+([.S5]-[.G5])^2)" office:value-type="float" office:value="0.966553747907598" calcext:value-type="float">
            <text:p>0.966553747907598</text:p>
          </table:table-cell>
          <table:table-cell table:formula="of:=SQRT(([.N5]-[.J5])^2+([.O5]-[.K5])^2)" office:value-type="float" office:value="0.965009544855415" calcext:value-type="float">
            <text:p>0.965009544855415</text:p>
          </table:table-cell>
          <table:table-cell office:value-type="float" office:value="0.814700245857239" calcext:value-type="float">
            <text:p>0.814700245857239</text:p>
          </table:table-cell>
          <table:table-cell office:value-type="float" office:value="0.299960553646088" calcext:value-type="float">
            <text:p>0.299960553646088</text:p>
          </table:table-cell>
          <table:table-cell office:value-type="float" office:value="-0.603692352771759" calcext:value-type="float">
            <text:p>-0.603692352771759</text:p>
          </table:table-cell>
          <table:table-cell office:value-type="float" office:value="0.999577403068543" calcext:value-type="float">
            <text:p>0.999577403068543</text:p>
          </table:table-cell>
          <table:table-cell office:value-type="float" office:value="0.323379665613174" calcext:value-type="float">
            <text:p>0.323379665613174</text:p>
          </table:table-cell>
          <table:table-cell office:value-type="float" office:value="0.322019010782242" calcext:value-type="float">
            <text:p>0.322019010782242</text:p>
          </table:table-cell>
          <table:table-cell office:value-type="float" office:value="-0.48884043097496" calcext:value-type="float">
            <text:p>-0.48884043097496</text:p>
          </table:table-cell>
          <table:table-cell office:value-type="float" office:value="0.999701261520386" calcext:value-type="float">
            <text:p>0.999701261520386</text:p>
          </table:table-cell>
          <table:table-cell office:value-type="float" office:value="0.735198736190796" calcext:value-type="float">
            <text:p>0.735198736190796</text:p>
          </table:table-cell>
          <table:table-cell office:value-type="float" office:value="1.19474375247955" calcext:value-type="float">
            <text:p>1.19474375247955</text:p>
          </table:table-cell>
          <table:table-cell office:value-type="float" office:value="-0.0058093098923564" calcext:value-type="float">
            <text:p>-0.0058093098923564</text:p>
          </table:table-cell>
          <table:table-cell office:value-type="float" office:value="0.122219018638134" calcext:value-type="float">
            <text:p>0.122219018638134</text:p>
          </table:table-cell>
          <table:table-cell office:value-type="float" office:value="0.429966628551483" calcext:value-type="float">
            <text:p>0.429966628551483</text:p>
          </table:table-cell>
          <table:table-cell office:value-type="float" office:value="1.186643242836" calcext:value-type="float">
            <text:p>1.186643242836</text:p>
          </table:table-cell>
          <table:table-cell office:value-type="float" office:value="0.0157768689095974" calcext:value-type="float">
            <text:p>0.0157768689095974</text:p>
          </table:table-cell>
          <table:table-cell office:value-type="float" office:value="0.150314539670944" calcext:value-type="float">
            <text:p>0.150314539670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([.J6]-[.F6])^2+([.K6]-[.G6])^2)" office:value-type="float" office:value="0.48980878621565" calcext:value-type="float">
            <text:p>0.48980878621565</text:p>
          </table:table-cell>
          <table:table-cell table:formula="of:=SQRT(([.R6]-[.N6])^2+([.S6]-[.O6])^2)" office:value-type="float" office:value="0.308666365600617" calcext:value-type="float">
            <text:p>0.308666365600617</text:p>
          </table:table-cell>
          <table:table-cell table:formula="of:=SQRT(([.R6]-[.F6])^2+([.S6]-[.G6])^2)" office:value-type="float" office:value="0.969052123792164" calcext:value-type="float">
            <text:p>0.969052123792164</text:p>
          </table:table-cell>
          <table:table-cell table:formula="of:=SQRT(([.N6]-[.J6])^2+([.O6]-[.K6])^2)" office:value-type="float" office:value="0.96649824292969" calcext:value-type="float">
            <text:p>0.96649824292969</text:p>
          </table:table-cell>
          <table:table-cell office:value-type="float" office:value="0.807450950145721" calcext:value-type="float">
            <text:p>0.807450950145721</text:p>
          </table:table-cell>
          <table:table-cell office:value-type="float" office:value="0.299241542816162" calcext:value-type="float">
            <text:p>0.299241542816162</text:p>
          </table:table-cell>
          <table:table-cell office:value-type="float" office:value="-0.547501921653748" calcext:value-type="float">
            <text:p>-0.547501921653748</text:p>
          </table:table-cell>
          <table:table-cell office:value-type="float" office:value="0.999499142169952" calcext:value-type="float">
            <text:p>0.999499142169952</text:p>
          </table:table-cell>
          <table:table-cell office:value-type="float" office:value="0.318149209022522" calcext:value-type="float">
            <text:p>0.318149209022522</text:p>
          </table:table-cell>
          <table:table-cell office:value-type="float" office:value="0.321522772312164" calcext:value-type="float">
            <text:p>0.321522772312164</text:p>
          </table:table-cell>
          <table:table-cell office:value-type="float" office:value="-0.486418008804321" calcext:value-type="float">
            <text:p>-0.486418008804321</text:p>
          </table:table-cell>
          <table:table-cell office:value-type="float" office:value="0.999634742736816" calcext:value-type="float">
            <text:p>0.999634742736816</text:p>
          </table:table-cell>
          <table:table-cell office:value-type="float" office:value="0.732739627361298" calcext:value-type="float">
            <text:p>0.732739627361298</text:p>
          </table:table-cell>
          <table:table-cell office:value-type="float" office:value="1.19458270072937" calcext:value-type="float">
            <text:p>1.19458270072937</text:p>
          </table:table-cell>
          <table:table-cell office:value-type="float" office:value="-0.00400987919420004" calcext:value-type="float">
            <text:p>-0.00400987919420004</text:p>
          </table:table-cell>
          <table:table-cell office:value-type="float" office:value="0.115158542990685" calcext:value-type="float">
            <text:p>0.115158542990685</text:p>
          </table:table-cell>
          <table:table-cell office:value-type="float" office:value="0.424119293689728" calcext:value-type="float">
            <text:p>0.424119293689728</text:p>
          </table:table-cell>
          <table:table-cell office:value-type="float" office:value="1.18925213813782" calcext:value-type="float">
            <text:p>1.18925213813782</text:p>
          </table:table-cell>
          <table:table-cell office:value-type="float" office:value="0.0137657495215535" calcext:value-type="float">
            <text:p>0.0137657495215535</text:p>
          </table:table-cell>
          <table:table-cell office:value-type="float" office:value="0.140965476632118" calcext:value-type="float">
            <text:p>0.140965476632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([.J7]-[.F7])^2+([.K7]-[.G7])^2)" office:value-type="float" office:value="0.492654327223115" calcext:value-type="float">
            <text:p>0.492654327223115</text:p>
          </table:table-cell>
          <table:table-cell table:formula="of:=SQRT(([.R7]-[.N7])^2+([.S7]-[.O7])^2)" office:value-type="float" office:value="0.309365894090145" calcext:value-type="float">
            <text:p>0.309365894090145</text:p>
          </table:table-cell>
          <table:table-cell table:formula="of:=SQRT(([.R7]-[.F7])^2+([.S7]-[.G7])^2)" office:value-type="float" office:value="0.968463879097594" calcext:value-type="float">
            <text:p>0.968463879097594</text:p>
          </table:table-cell>
          <table:table-cell table:formula="of:=SQRT(([.N7]-[.J7])^2+([.O7]-[.K7])^2)" office:value-type="float" office:value="0.971154193242718" calcext:value-type="float">
            <text:p>0.971154193242718</text:p>
          </table:table-cell>
          <table:table-cell office:value-type="float" office:value="0.803229689598084" calcext:value-type="float">
            <text:p>0.803229689598084</text:p>
          </table:table-cell>
          <table:table-cell office:value-type="float" office:value="0.299199163913727" calcext:value-type="float">
            <text:p>0.299199163913727</text:p>
          </table:table-cell>
          <table:table-cell office:value-type="float" office:value="-0.544368326663971" calcext:value-type="float">
            <text:p>-0.544368326663971</text:p>
          </table:table-cell>
          <table:table-cell office:value-type="float" office:value="0.99942022562027" calcext:value-type="float">
            <text:p>0.99942022562027</text:p>
          </table:table-cell>
          <table:table-cell office:value-type="float" office:value="0.310945630073547" calcext:value-type="float">
            <text:p>0.310945630073547</text:p>
          </table:table-cell>
          <table:table-cell office:value-type="float" office:value="0.318296045064926" calcext:value-type="float">
            <text:p>0.318296045064926</text:p>
          </table:table-cell>
          <table:table-cell office:value-type="float" office:value="-0.507884442806244" calcext:value-type="float">
            <text:p>-0.507884442806244</text:p>
          </table:table-cell>
          <table:table-cell office:value-type="float" office:value="0.999558687210083" calcext:value-type="float">
            <text:p>0.999558687210083</text:p>
          </table:table-cell>
          <table:table-cell office:value-type="float" office:value="0.730408072471619" calcext:value-type="float">
            <text:p>0.730408072471619</text:p>
          </table:table-cell>
          <table:table-cell office:value-type="float" office:value="1.19419085979462" calcext:value-type="float">
            <text:p>1.19419085979462</text:p>
          </table:table-cell>
          <table:table-cell office:value-type="float" office:value="-0.00338662718422711" calcext:value-type="float">
            <text:p>-0.00338662718422711</text:p>
          </table:table-cell>
          <table:table-cell office:value-type="float" office:value="0.107949741184711" calcext:value-type="float">
            <text:p>0.107949741184711</text:p>
          </table:table-cell>
          <table:table-cell office:value-type="float" office:value="0.421084403991699" calcext:value-type="float">
            <text:p>0.421084403991699</text:p>
          </table:table-cell>
          <table:table-cell office:value-type="float" office:value="1.18907964229584" calcext:value-type="float">
            <text:p>1.18907964229584</text:p>
          </table:table-cell>
          <table:table-cell office:value-type="float" office:value="0.0126075129956007" calcext:value-type="float">
            <text:p>0.0126075129956007</text:p>
          </table:table-cell>
          <table:table-cell office:value-type="float" office:value="0.131677478551865" calcext:value-type="float">
            <text:p>0.131677478551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([.J8]-[.F8])^2+([.K8]-[.G8])^2)" office:value-type="float" office:value="0.497509178007592" calcext:value-type="float">
            <text:p>0.497509178007592</text:p>
          </table:table-cell>
          <table:table-cell table:formula="of:=SQRT(([.R8]-[.N8])^2+([.S8]-[.O8])^2)" office:value-type="float" office:value="0.310393077891058" calcext:value-type="float">
            <text:p>0.310393077891058</text:p>
          </table:table-cell>
          <table:table-cell table:formula="of:=SQRT(([.R8]-[.F8])^2+([.S8]-[.G8])^2)" office:value-type="float" office:value="0.986989804752554" calcext:value-type="float">
            <text:p>0.986989804752554</text:p>
          </table:table-cell>
          <table:table-cell table:formula="of:=SQRT(([.N8]-[.J8])^2+([.O8]-[.K8])^2)" office:value-type="float" office:value="0.983562295588555" calcext:value-type="float">
            <text:p>0.983562295588555</text:p>
          </table:table-cell>
          <table:table-cell office:value-type="float" office:value="0.798098981380463" calcext:value-type="float">
            <text:p>0.798098981380463</text:p>
          </table:table-cell>
          <table:table-cell office:value-type="float" office:value="0.29667267203331" calcext:value-type="float">
            <text:p>0.29667267203331</text:p>
          </table:table-cell>
          <table:table-cell office:value-type="float" office:value="-0.480305969715118" calcext:value-type="float">
            <text:p>-0.480305969715118</text:p>
          </table:table-cell>
          <table:table-cell office:value-type="float" office:value="0.999397575855255" calcext:value-type="float">
            <text:p>0.999397575855255</text:p>
          </table:table-cell>
          <table:table-cell office:value-type="float" office:value="0.301061034202576" calcext:value-type="float">
            <text:p>0.301061034202576</text:p>
          </table:table-cell>
          <table:table-cell office:value-type="float" office:value="0.318321257829666" calcext:value-type="float">
            <text:p>0.318321257829666</text:p>
          </table:table-cell>
          <table:table-cell office:value-type="float" office:value="-0.450858354568481" calcext:value-type="float">
            <text:p>-0.450858354568481</text:p>
          </table:table-cell>
          <table:table-cell office:value-type="float" office:value="0.999534368515015" calcext:value-type="float">
            <text:p>0.999534368515015</text:p>
          </table:table-cell>
          <table:table-cell office:value-type="float" office:value="0.731767773628235" calcext:value-type="float">
            <text:p>0.731767773628235</text:p>
          </table:table-cell>
          <table:table-cell office:value-type="float" office:value="1.20256471633911" calcext:value-type="float">
            <text:p>1.20256471633911</text:p>
          </table:table-cell>
          <table:table-cell office:value-type="float" office:value="-0.0033387765288353" calcext:value-type="float">
            <text:p>-0.0033387765288353</text:p>
          </table:table-cell>
          <table:table-cell office:value-type="float" office:value="0.102689631283283" calcext:value-type="float">
            <text:p>0.102689631283283</text:p>
          </table:table-cell>
          <table:table-cell office:value-type="float" office:value="0.421440690755844" calcext:value-type="float">
            <text:p>0.421440690755844</text:p>
          </table:table-cell>
          <table:table-cell office:value-type="float" office:value="1.20896506309509" calcext:value-type="float">
            <text:p>1.20896506309509</text:p>
          </table:table-cell>
          <table:table-cell office:value-type="float" office:value="0.0127321733161807" calcext:value-type="float">
            <text:p>0.0127321733161807</text:p>
          </table:table-cell>
          <table:table-cell office:value-type="float" office:value="0.124091476202011" calcext:value-type="float">
            <text:p>0.124091476202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([.J9]-[.F9])^2+([.K9]-[.G9])^2)" office:value-type="float" office:value="0.497899362242071" calcext:value-type="float">
            <text:p>0.497899362242071</text:p>
          </table:table-cell>
          <table:table-cell table:formula="of:=SQRT(([.R9]-[.N9])^2+([.S9]-[.O9])^2)" office:value-type="float" office:value="0.317191531342454" calcext:value-type="float">
            <text:p>0.317191531342454</text:p>
          </table:table-cell>
          <table:table-cell table:formula="of:=SQRT(([.R9]-[.F9])^2+([.S9]-[.G9])^2)" office:value-type="float" office:value="0.990919023375494" calcext:value-type="float">
            <text:p>0.990919023375494</text:p>
          </table:table-cell>
          <table:table-cell table:formula="of:=SQRT(([.N9]-[.J9])^2+([.O9]-[.K9])^2)" office:value-type="float" office:value="0.99080210543639" calcext:value-type="float">
            <text:p>0.99080210543639</text:p>
          </table:table-cell>
          <table:table-cell office:value-type="float" office:value="0.795921683311462" calcext:value-type="float">
            <text:p>0.795921683311462</text:p>
          </table:table-cell>
          <table:table-cell office:value-type="float" office:value="0.296352595090866" calcext:value-type="float">
            <text:p>0.296352595090866</text:p>
          </table:table-cell>
          <table:table-cell office:value-type="float" office:value="-0.289686262607574" calcext:value-type="float">
            <text:p>-0.289686262607574</text:p>
          </table:table-cell>
          <table:table-cell office:value-type="float" office:value="0.999415516853333" calcext:value-type="float">
            <text:p>0.999415516853333</text:p>
          </table:table-cell>
          <table:table-cell office:value-type="float" office:value="0.298501670360565" calcext:value-type="float">
            <text:p>0.298501670360565</text:p>
          </table:table-cell>
          <table:table-cell office:value-type="float" office:value="0.318195343017578" calcext:value-type="float">
            <text:p>0.318195343017578</text:p>
          </table:table-cell>
          <table:table-cell office:value-type="float" office:value="-0.363008201122284" calcext:value-type="float">
            <text:p>-0.363008201122284</text:p>
          </table:table-cell>
          <table:table-cell office:value-type="float" office:value="0.999552249908447" calcext:value-type="float">
            <text:p>0.999552249908447</text:p>
          </table:table-cell>
          <table:table-cell office:value-type="float" office:value="0.731790661811829" calcext:value-type="float">
            <text:p>0.731790661811829</text:p>
          </table:table-cell>
          <table:table-cell office:value-type="float" office:value="1.20923376083374" calcext:value-type="float">
            <text:p>1.20923376083374</text:p>
          </table:table-cell>
          <table:table-cell office:value-type="float" office:value="0.0325076431035996" calcext:value-type="float">
            <text:p>0.0325076431035996</text:p>
          </table:table-cell>
          <table:table-cell office:value-type="float" office:value="0.102072916924953" calcext:value-type="float">
            <text:p>0.102072916924953</text:p>
          </table:table-cell>
          <table:table-cell office:value-type="float" office:value="0.414603859186173" calcext:value-type="float">
            <text:p>0.414603859186173</text:p>
          </table:table-cell>
          <table:table-cell office:value-type="float" office:value="1.21096575260162" calcext:value-type="float">
            <text:p>1.21096575260162</text:p>
          </table:table-cell>
          <table:table-cell office:value-type="float" office:value="-0.0226261019706726" calcext:value-type="float">
            <text:p>-0.0226261019706726</text:p>
          </table:table-cell>
          <table:table-cell office:value-type="float" office:value="0.123143829405308" calcext:value-type="float">
            <text:p>0.123143829405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([.J10]-[.F10])^2+([.K10]-[.G10])^2)" office:value-type="float" office:value="0.497379125824156" calcext:value-type="float">
            <text:p>0.497379125824156</text:p>
          </table:table-cell>
          <table:table-cell table:formula="of:=SQRT(([.R10]-[.N10])^2+([.S10]-[.O10])^2)" office:value-type="float" office:value="0.316765136284948" calcext:value-type="float">
            <text:p>0.316765136284948</text:p>
          </table:table-cell>
          <table:table-cell table:formula="of:=SQRT(([.R10]-[.F10])^2+([.S10]-[.G10])^2)" office:value-type="float" office:value="0.989249620920341" calcext:value-type="float">
            <text:p>0.989249620920341</text:p>
          </table:table-cell>
          <table:table-cell table:formula="of:=SQRT(([.N10]-[.J10])^2+([.O10]-[.K10])^2)" office:value-type="float" office:value="0.991589563716952" calcext:value-type="float">
            <text:p>0.991589563716952</text:p>
          </table:table-cell>
          <table:table-cell office:value-type="float" office:value="0.796278238296509" calcext:value-type="float">
            <text:p>0.796278238296509</text:p>
          </table:table-cell>
          <table:table-cell office:value-type="float" office:value="0.296440064907074" calcext:value-type="float">
            <text:p>0.296440064907074</text:p>
          </table:table-cell>
          <table:table-cell office:value-type="float" office:value="-0.425448030233383" calcext:value-type="float">
            <text:p>-0.425448030233383</text:p>
          </table:table-cell>
          <table:table-cell office:value-type="float" office:value="0.999341547489166" calcext:value-type="float">
            <text:p>0.999341547489166</text:p>
          </table:table-cell>
          <table:table-cell office:value-type="float" office:value="0.299289762973785" calcext:value-type="float">
            <text:p>0.299289762973785</text:p>
          </table:table-cell>
          <table:table-cell office:value-type="float" office:value="0.316149204969406" calcext:value-type="float">
            <text:p>0.316149204969406</text:p>
          </table:table-cell>
          <table:table-cell office:value-type="float" office:value="-0.455000013113022" calcext:value-type="float">
            <text:p>-0.455000013113022</text:p>
          </table:table-cell>
          <table:table-cell office:value-type="float" office:value="0.999517560005188" calcext:value-type="float">
            <text:p>0.999517560005188</text:p>
          </table:table-cell>
          <table:table-cell office:value-type="float" office:value="0.732016444206238" calcext:value-type="float">
            <text:p>0.732016444206238</text:p>
          </table:table-cell>
          <table:table-cell office:value-type="float" office:value="1.20833611488342" calcext:value-type="float">
            <text:p>1.20833611488342</text:p>
          </table:table-cell>
          <table:table-cell office:value-type="float" office:value="0.0362986177206039" calcext:value-type="float">
            <text:p>0.0362986177206039</text:p>
          </table:table-cell>
          <table:table-cell office:value-type="float" office:value="0.0944722816348076" calcext:value-type="float">
            <text:p>0.0944722816348076</text:p>
          </table:table-cell>
          <table:table-cell office:value-type="float" office:value="0.415252983570099" calcext:value-type="float">
            <text:p>0.415252983570099</text:p>
          </table:table-cell>
          <table:table-cell office:value-type="float" office:value="1.20936644077301" calcext:value-type="float">
            <text:p>1.20936644077301</text:p>
          </table:table-cell>
          <table:table-cell office:value-type="float" office:value="-0.0261599961668253" calcext:value-type="float">
            <text:p>-0.0261599961668253</text:p>
          </table:table-cell>
          <table:table-cell office:value-type="float" office:value="0.114050716161728" calcext:value-type="float">
            <text:p>0.1140507161617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([.J11]-[.F11])^2+([.K11]-[.G11])^2)" office:value-type="float" office:value="0.498134743976202" calcext:value-type="float">
            <text:p>0.498134743976202</text:p>
          </table:table-cell>
          <table:table-cell table:formula="of:=SQRT(([.R11]-[.N11])^2+([.S11]-[.O11])^2)" office:value-type="float" office:value="0.318297832112408" calcext:value-type="float">
            <text:p>0.318297832112408</text:p>
          </table:table-cell>
          <table:table-cell table:formula="of:=SQRT(([.R11]-[.F11])^2+([.S11]-[.G11])^2)" office:value-type="float" office:value="0.98928752632373" calcext:value-type="float">
            <text:p>0.98928752632373</text:p>
          </table:table-cell>
          <table:table-cell table:formula="of:=SQRT(([.N11]-[.J11])^2+([.O11]-[.K11])^2)" office:value-type="float" office:value="0.993505920081932" calcext:value-type="float">
            <text:p>0.993505920081932</text:p>
          </table:table-cell>
          <table:table-cell office:value-type="float" office:value="0.796594500541687" calcext:value-type="float">
            <text:p>0.796594500541687</text:p>
          </table:table-cell>
          <table:table-cell office:value-type="float" office:value="0.296461164951324" calcext:value-type="float">
            <text:p>0.296461164951324</text:p>
          </table:table-cell>
          <table:table-cell office:value-type="float" office:value="-0.427601486444473" calcext:value-type="float">
            <text:p>-0.427601486444473</text:p>
          </table:table-cell>
          <table:table-cell office:value-type="float" office:value="0.999317944049835" calcext:value-type="float">
            <text:p>0.999317944049835</text:p>
          </table:table-cell>
          <table:table-cell office:value-type="float" office:value="0.298775762319565" calcext:value-type="float">
            <text:p>0.298775762319565</text:p>
          </table:table-cell>
          <table:table-cell office:value-type="float" office:value="0.314201712608337" calcext:value-type="float">
            <text:p>0.314201712608337</text:p>
          </table:table-cell>
          <table:table-cell office:value-type="float" office:value="-0.4510218501091" calcext:value-type="float">
            <text:p>-0.4510218501091</text:p>
          </table:table-cell>
          <table:table-cell office:value-type="float" office:value="0.999502599239349" calcext:value-type="float">
            <text:p>0.999502599239349</text:p>
          </table:table-cell>
          <table:table-cell office:value-type="float" office:value="0.732395827770233" calcext:value-type="float">
            <text:p>0.732395827770233</text:p>
          </table:table-cell>
          <table:table-cell office:value-type="float" office:value="1.20808517932892" calcext:value-type="float">
            <text:p>1.20808517932892</text:p>
          </table:table-cell>
          <table:table-cell office:value-type="float" office:value="0.0367165878415108" calcext:value-type="float">
            <text:p>0.0367165878415108</text:p>
          </table:table-cell>
          <table:table-cell office:value-type="float" office:value="0.0891411304473877" calcext:value-type="float">
            <text:p>0.0891411304473877</text:p>
          </table:table-cell>
          <table:table-cell office:value-type="float" office:value="0.414098829030991" calcext:value-type="float">
            <text:p>0.414098829030991</text:p>
          </table:table-cell>
          <table:table-cell office:value-type="float" office:value="1.20881354808807" calcext:value-type="float">
            <text:p>1.20881354808807</text:p>
          </table:table-cell>
          <table:table-cell office:value-type="float" office:value="-0.0265242494642735" calcext:value-type="float">
            <text:p>-0.0265242494642735</text:p>
          </table:table-cell>
          <table:table-cell office:value-type="float" office:value="0.107346877455711" calcext:value-type="float">
            <text:p>0.107346877455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([.J12]-[.F12])^2+([.K12]-[.G12])^2)" office:value-type="float" office:value="0.498068803317344" calcext:value-type="float">
            <text:p>0.498068803317344</text:p>
          </table:table-cell>
          <table:table-cell table:formula="of:=SQRT(([.R12]-[.N12])^2+([.S12]-[.O12])^2)" office:value-type="float" office:value="0.318728422849553" calcext:value-type="float">
            <text:p>0.318728422849553</text:p>
          </table:table-cell>
          <table:table-cell table:formula="of:=SQRT(([.R12]-[.F12])^2+([.S12]-[.G12])^2)" office:value-type="float" office:value="0.984066695460163" calcext:value-type="float">
            <text:p>0.984066695460163</text:p>
          </table:table-cell>
          <table:table-cell table:formula="of:=SQRT(([.N12]-[.J12])^2+([.O12]-[.K12])^2)" office:value-type="float" office:value="0.986205977196285" calcext:value-type="float">
            <text:p>0.986205977196285</text:p>
          </table:table-cell>
          <table:table-cell office:value-type="float" office:value="0.796738147735596" calcext:value-type="float">
            <text:p>0.796738147735596</text:p>
          </table:table-cell>
          <table:table-cell office:value-type="float" office:value="0.29634216427803" calcext:value-type="float">
            <text:p>0.29634216427803</text:p>
          </table:table-cell>
          <table:table-cell office:value-type="float" office:value="-0.588953614234924" calcext:value-type="float">
            <text:p>-0.588953614234924</text:p>
          </table:table-cell>
          <table:table-cell office:value-type="float" office:value="0.999297678470612" calcext:value-type="float">
            <text:p>0.999297678470612</text:p>
          </table:table-cell>
          <table:table-cell office:value-type="float" office:value="0.298995524644852" calcext:value-type="float">
            <text:p>0.298995524644852</text:p>
          </table:table-cell>
          <table:table-cell office:value-type="float" office:value="0.314364761114121" calcext:value-type="float">
            <text:p>0.314364761114121</text:p>
          </table:table-cell>
          <table:table-cell office:value-type="float" office:value="-0.596180140972138" calcext:value-type="float">
            <text:p>-0.596180140972138</text:p>
          </table:table-cell>
          <table:table-cell office:value-type="float" office:value="0.999482214450836" calcext:value-type="float">
            <text:p>0.999482214450836</text:p>
          </table:table-cell>
          <table:table-cell office:value-type="float" office:value="0.732629537582398" calcext:value-type="float">
            <text:p>0.732629537582398</text:p>
          </table:table-cell>
          <table:table-cell office:value-type="float" office:value="1.20012080669403" calcext:value-type="float">
            <text:p>1.20012080669403</text:p>
          </table:table-cell>
          <table:table-cell office:value-type="float" office:value="0.0392765514552593" calcext:value-type="float">
            <text:p>0.0392765514552593</text:p>
          </table:table-cell>
          <table:table-cell office:value-type="float" office:value="0.0830841138958931" calcext:value-type="float">
            <text:p>0.0830841138958931</text:p>
          </table:table-cell>
          <table:table-cell office:value-type="float" office:value="0.413913160562515" calcext:value-type="float">
            <text:p>0.413913160562515</text:p>
          </table:table-cell>
          <table:table-cell office:value-type="float" office:value="1.20289182662964" calcext:value-type="float">
            <text:p>1.20289182662964</text:p>
          </table:table-cell>
          <table:table-cell office:value-type="float" office:value="-0.0290050767362118" calcext:value-type="float">
            <text:p>-0.0290050767362118</text:p>
          </table:table-cell>
          <table:table-cell office:value-type="float" office:value="0.099823608994484" calcext:value-type="float">
            <text:p>0.099823608994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([.J13]-[.F13])^2+([.K13]-[.G13])^2)" office:value-type="float" office:value="0.500229578444569" calcext:value-type="float">
            <text:p>0.500229578444569</text:p>
          </table:table-cell>
          <table:table-cell table:formula="of:=SQRT(([.R13]-[.N13])^2+([.S13]-[.O13])^2)" office:value-type="float" office:value="0.31803547710194" calcext:value-type="float">
            <text:p>0.31803547710194</text:p>
          </table:table-cell>
          <table:table-cell table:formula="of:=SQRT(([.R13]-[.F13])^2+([.S13]-[.G13])^2)" office:value-type="float" office:value="0.989412894605521" calcext:value-type="float">
            <text:p>0.989412894605521</text:p>
          </table:table-cell>
          <table:table-cell table:formula="of:=SQRT(([.N13]-[.J13])^2+([.O13]-[.K13])^2)" office:value-type="float" office:value="0.983436031916957" calcext:value-type="float">
            <text:p>0.983436031916957</text:p>
          </table:table-cell>
          <table:table-cell office:value-type="float" office:value="0.797365784645081" calcext:value-type="float">
            <text:p>0.797365784645081</text:p>
          </table:table-cell>
          <table:table-cell office:value-type="float" office:value="0.291440695524216" calcext:value-type="float">
            <text:p>0.291440695524216</text:p>
          </table:table-cell>
          <table:table-cell office:value-type="float" office:value="-0.656890690326691" calcext:value-type="float">
            <text:p>-0.656890690326691</text:p>
          </table:table-cell>
          <table:table-cell office:value-type="float" office:value="0.999300420284271" calcext:value-type="float">
            <text:p>0.999300420284271</text:p>
          </table:table-cell>
          <table:table-cell office:value-type="float" office:value="0.297858238220215" calcext:value-type="float">
            <text:p>0.297858238220215</text:p>
          </table:table-cell>
          <table:table-cell office:value-type="float" office:value="0.318307816982269" calcext:value-type="float">
            <text:p>0.318307816982269</text:p>
          </table:table-cell>
          <table:table-cell office:value-type="float" office:value="-0.764525592327118" calcext:value-type="float">
            <text:p>-0.764525592327118</text:p>
          </table:table-cell>
          <table:table-cell office:value-type="float" office:value="0.999490857124329" calcext:value-type="float">
            <text:p>0.999490857124329</text:p>
          </table:table-cell>
          <table:table-cell office:value-type="float" office:value="0.733718991279602" calcext:value-type="float">
            <text:p>0.733718991279602</text:p>
          </table:table-cell>
          <table:table-cell office:value-type="float" office:value="1.19988131523132" calcext:value-type="float">
            <text:p>1.19988131523132</text:p>
          </table:table-cell>
          <table:table-cell office:value-type="float" office:value="0.0549362525343895" calcext:value-type="float">
            <text:p>0.0549362525343895</text:p>
          </table:table-cell>
          <table:table-cell office:value-type="float" office:value="0.0811042785644531" calcext:value-type="float">
            <text:p>0.0811042785644531</text:p>
          </table:table-cell>
          <table:table-cell office:value-type="float" office:value="0.415713965892792" calcext:value-type="float">
            <text:p>0.415713965892792</text:p>
          </table:table-cell>
          <table:table-cell office:value-type="float" office:value="1.20428228378296" calcext:value-type="float">
            <text:p>1.20428228378296</text:p>
          </table:table-cell>
          <table:table-cell office:value-type="float" office:value="-0.0451003946363926" calcext:value-type="float">
            <text:p>-0.0451003946363926</text:p>
          </table:table-cell>
          <table:table-cell office:value-type="float" office:value="0.0967783555388451" calcext:value-type="float">
            <text:p>0.0967783555388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([.J14]-[.F14])^2+([.K14]-[.G14])^2)" office:value-type="float" office:value="0.502102256914509" calcext:value-type="float">
            <text:p>0.502102256914509</text:p>
          </table:table-cell>
          <table:table-cell table:formula="of:=SQRT(([.R14]-[.N14])^2+([.S14]-[.O14])^2)" office:value-type="float" office:value="0.318217735566205" calcext:value-type="float">
            <text:p>0.318217735566205</text:p>
          </table:table-cell>
          <table:table-cell table:formula="of:=SQRT(([.R14]-[.F14])^2+([.S14]-[.G14])^2)" office:value-type="float" office:value="0.99259056642063" calcext:value-type="float">
            <text:p>0.99259056642063</text:p>
          </table:table-cell>
          <table:table-cell table:formula="of:=SQRT(([.N14]-[.J14])^2+([.O14]-[.K14])^2)" office:value-type="float" office:value="0.992562349617105" calcext:value-type="float">
            <text:p>0.992562349617105</text:p>
          </table:table-cell>
          <table:table-cell office:value-type="float" office:value="0.799143016338348" calcext:value-type="float">
            <text:p>0.799143016338348</text:p>
          </table:table-cell>
          <table:table-cell office:value-type="float" office:value="0.297044456005096" calcext:value-type="float">
            <text:p>0.297044456005096</text:p>
          </table:table-cell>
          <table:table-cell office:value-type="float" office:value="-0.636145651340485" calcext:value-type="float">
            <text:p>-0.636145651340485</text:p>
          </table:table-cell>
          <table:table-cell office:value-type="float" office:value="0.999293327331543" calcext:value-type="float">
            <text:p>0.999293327331543</text:p>
          </table:table-cell>
          <table:table-cell office:value-type="float" office:value="0.297538042068481" calcext:value-type="float">
            <text:p>0.297538042068481</text:p>
          </table:table-cell>
          <table:table-cell office:value-type="float" office:value="0.319385588169098" calcext:value-type="float">
            <text:p>0.319385588169098</text:p>
          </table:table-cell>
          <table:table-cell office:value-type="float" office:value="-0.718470513820648" calcext:value-type="float">
            <text:p>-0.718470513820648</text:p>
          </table:table-cell>
          <table:table-cell office:value-type="float" office:value="0.999486029148102" calcext:value-type="float">
            <text:p>0.999486029148102</text:p>
          </table:table-cell>
          <table:table-cell office:value-type="float" office:value="0.733721375465393" calcext:value-type="float">
            <text:p>0.733721375465393</text:p>
          </table:table-cell>
          <table:table-cell office:value-type="float" office:value="1.21097075939178" calcext:value-type="float">
            <text:p>1.21097075939178</text:p>
          </table:table-cell>
          <table:table-cell office:value-type="float" office:value="0.0622416622936726" calcext:value-type="float">
            <text:p>0.0622416622936726</text:p>
          </table:table-cell>
          <table:table-cell office:value-type="float" office:value="0.079198569059372" calcext:value-type="float">
            <text:p>0.079198569059372</text:p>
          </table:table-cell>
          <table:table-cell office:value-type="float" office:value="0.415507316589355" calcext:value-type="float">
            <text:p>0.415507316589355</text:p>
          </table:table-cell>
          <table:table-cell office:value-type="float" office:value="1.2125004529953" calcext:value-type="float">
            <text:p>1.2125004529953</text:p>
          </table:table-cell>
          <table:table-cell office:value-type="float" office:value="-0.0527423545718193" calcext:value-type="float">
            <text:p>-0.0527423545718193</text:p>
          </table:table-cell>
          <table:table-cell office:value-type="float" office:value="0.0939552336931229" calcext:value-type="float">
            <text:p>0.0939552336931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([.J15]-[.F15])^2+([.K15]-[.G15])^2)" office:value-type="float" office:value="0.503920833408037" calcext:value-type="float">
            <text:p>0.503920833408037</text:p>
          </table:table-cell>
          <table:table-cell table:formula="of:=SQRT(([.R15]-[.N15])^2+([.S15]-[.O15])^2)" office:value-type="float" office:value="0.319941179117033" calcext:value-type="float">
            <text:p>0.319941179117033</text:p>
          </table:table-cell>
          <table:table-cell table:formula="of:=SQRT(([.R15]-[.F15])^2+([.S15]-[.G15])^2)" office:value-type="float" office:value="0.993413576804541" calcext:value-type="float">
            <text:p>0.993413576804541</text:p>
          </table:table-cell>
          <table:table-cell table:formula="of:=SQRT(([.N15]-[.J15])^2+([.O15]-[.K15])^2)" office:value-type="float" office:value="0.994785792695582" calcext:value-type="float">
            <text:p>0.994785792695582</text:p>
          </table:table-cell>
          <table:table-cell office:value-type="float" office:value="0.801190257072449" calcext:value-type="float">
            <text:p>0.801190257072449</text:p>
          </table:table-cell>
          <table:table-cell office:value-type="float" office:value="0.29719814658165" calcext:value-type="float">
            <text:p>0.29719814658165</text:p>
          </table:table-cell>
          <table:table-cell office:value-type="float" office:value="-0.606187522411346" calcext:value-type="float">
            <text:p>-0.606187522411346</text:p>
          </table:table-cell>
          <table:table-cell office:value-type="float" office:value="0.999216198921204" calcext:value-type="float">
            <text:p>0.999216198921204</text:p>
          </table:table-cell>
          <table:table-cell office:value-type="float" office:value="0.297713458538055" calcext:value-type="float">
            <text:p>0.297713458538055</text:p>
          </table:table-cell>
          <table:table-cell office:value-type="float" office:value="0.318348079919815" calcext:value-type="float">
            <text:p>0.318348079919815</text:p>
          </table:table-cell>
          <table:table-cell office:value-type="float" office:value="-0.586453974246979" calcext:value-type="float">
            <text:p>-0.586453974246979</text:p>
          </table:table-cell>
          <table:table-cell office:value-type="float" office:value="0.999413847923279" calcext:value-type="float">
            <text:p>0.999413847923279</text:p>
          </table:table-cell>
          <table:table-cell office:value-type="float" office:value="0.733731865882874" calcext:value-type="float">
            <text:p>0.733731865882874</text:p>
          </table:table-cell>
          <table:table-cell office:value-type="float" office:value="1.21248829364777" calcext:value-type="float">
            <text:p>1.21248829364777</text:p>
          </table:table-cell>
          <table:table-cell office:value-type="float" office:value="0.0411141440272331" calcext:value-type="float">
            <text:p>0.0411141440272331</text:p>
          </table:table-cell>
          <table:table-cell office:value-type="float" office:value="0.0754539668560028" calcext:value-type="float">
            <text:p>0.0754539668560028</text:p>
          </table:table-cell>
          <table:table-cell office:value-type="float" office:value="0.413791120052338" calcext:value-type="float">
            <text:p>0.413791120052338</text:p>
          </table:table-cell>
          <table:table-cell office:value-type="float" office:value="1.21196174621582" calcext:value-type="float">
            <text:p>1.21196174621582</text:p>
          </table:table-cell>
          <table:table-cell office:value-type="float" office:value="-0.0304833315312862" calcext:value-type="float">
            <text:p>-0.0304833315312862</text:p>
          </table:table-cell>
          <table:table-cell office:value-type="float" office:value="0.0892869904637337" calcext:value-type="float">
            <text:p>0.0892869904637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([.J16]-[.F16])^2+([.K16]-[.G16])^2)" office:value-type="float" office:value="0.507741418370162" calcext:value-type="float">
            <text:p>0.507741418370162</text:p>
          </table:table-cell>
          <table:table-cell table:formula="of:=SQRT(([.R16]-[.N16])^2+([.S16]-[.O16])^2)" office:value-type="float" office:value="0.321316782433347" calcext:value-type="float">
            <text:p>0.321316782433347</text:p>
          </table:table-cell>
          <table:table-cell table:formula="of:=SQRT(([.R16]-[.F16])^2+([.S16]-[.G16])^2)" office:value-type="float" office:value="0.996170967856658" calcext:value-type="float">
            <text:p>0.996170967856658</text:p>
          </table:table-cell>
          <table:table-cell table:formula="of:=SQRT(([.N16]-[.J16])^2+([.O16]-[.K16])^2)" office:value-type="float" office:value="0.995711316956033" calcext:value-type="float">
            <text:p>0.995711316956033</text:p>
          </table:table-cell>
          <table:table-cell office:value-type="float" office:value="0.80149382352829" calcext:value-type="float">
            <text:p>0.80149382352829</text:p>
          </table:table-cell>
          <table:table-cell office:value-type="float" office:value="0.297195822000504" calcext:value-type="float">
            <text:p>0.297195822000504</text:p>
          </table:table-cell>
          <table:table-cell office:value-type="float" office:value="-0.646432280540466" calcext:value-type="float">
            <text:p>-0.646432280540466</text:p>
          </table:table-cell>
          <table:table-cell office:value-type="float" office:value="0.999192893505096" calcext:value-type="float">
            <text:p>0.999192893505096</text:p>
          </table:table-cell>
          <table:table-cell office:value-type="float" office:value="0.29428306221962" calcext:value-type="float">
            <text:p>0.29428306221962</text:p>
          </table:table-cell>
          <table:table-cell office:value-type="float" office:value="0.320403397083282" calcext:value-type="float">
            <text:p>0.320403397083282</text:p>
          </table:table-cell>
          <table:table-cell office:value-type="float" office:value="-0.590034663677216" calcext:value-type="float">
            <text:p>-0.590034663677216</text:p>
          </table:table-cell>
          <table:table-cell office:value-type="float" office:value="0.999404609203339" calcext:value-type="float">
            <text:p>0.999404609203339</text:p>
          </table:table-cell>
          <table:table-cell office:value-type="float" office:value="0.735231041908264" calcext:value-type="float">
            <text:p>0.735231041908264</text:p>
          </table:table-cell>
          <table:table-cell office:value-type="float" office:value="1.2131552696228" calcext:value-type="float">
            <text:p>1.2131552696228</text:p>
          </table:table-cell>
          <table:table-cell office:value-type="float" office:value="0.0236664302647114" calcext:value-type="float">
            <text:p>0.0236664302647114</text:p>
          </table:table-cell>
          <table:table-cell office:value-type="float" office:value="0.0709520727396011" calcext:value-type="float">
            <text:p>0.0709520727396011</text:p>
          </table:table-cell>
          <table:table-cell office:value-type="float" office:value="0.413918882608414" calcext:value-type="float">
            <text:p>0.413918882608414</text:p>
          </table:table-cell>
          <table:table-cell office:value-type="float" office:value="1.21487891674042" calcext:value-type="float">
            <text:p>1.21487891674042</text:p>
          </table:table-cell>
          <table:table-cell office:value-type="float" office:value="-0.0133487107232213" calcext:value-type="float">
            <text:p>-0.0133487107232213</text:p>
          </table:table-cell>
          <table:table-cell office:value-type="float" office:value="0.083842821419239" calcext:value-type="float">
            <text:p>0.083842821419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([.J17]-[.F17])^2+([.K17]-[.G17])^2)" office:value-type="float" office:value="0.508516025145293" calcext:value-type="float">
            <text:p>0.508516025145293</text:p>
          </table:table-cell>
          <table:table-cell table:formula="of:=SQRT(([.R17]-[.N17])^2+([.S17]-[.O17])^2)" office:value-type="float" office:value="0.32118652225779" calcext:value-type="float">
            <text:p>0.32118652225779</text:p>
          </table:table-cell>
          <table:table-cell table:formula="of:=SQRT(([.R17]-[.F17])^2+([.S17]-[.G17])^2)" office:value-type="float" office:value="0.999401120620469" calcext:value-type="float">
            <text:p>0.999401120620469</text:p>
          </table:table-cell>
          <table:table-cell table:formula="of:=SQRT(([.N17]-[.J17])^2+([.O17]-[.K17])^2)" office:value-type="float" office:value="0.997835312101214" calcext:value-type="float">
            <text:p>0.997835312101214</text:p>
          </table:table-cell>
          <table:table-cell office:value-type="float" office:value="0.802350163459778" calcext:value-type="float">
            <text:p>0.802350163459778</text:p>
          </table:table-cell>
          <table:table-cell office:value-type="float" office:value="0.29720276594162" calcext:value-type="float">
            <text:p>0.29720276594162</text:p>
          </table:table-cell>
          <table:table-cell office:value-type="float" office:value="-0.648737370967865" calcext:value-type="float">
            <text:p>-0.648737370967865</text:p>
          </table:table-cell>
          <table:table-cell office:value-type="float" office:value="0.999161779880524" calcext:value-type="float">
            <text:p>0.999161779880524</text:p>
          </table:table-cell>
          <table:table-cell office:value-type="float" office:value="0.29439240694046" calcext:value-type="float">
            <text:p>0.29439240694046</text:p>
          </table:table-cell>
          <table:table-cell office:value-type="float" office:value="0.321024298667908" calcext:value-type="float">
            <text:p>0.321024298667908</text:p>
          </table:table-cell>
          <table:table-cell office:value-type="float" office:value="-0.738947451114655" calcext:value-type="float">
            <text:p>-0.738947451114655</text:p>
          </table:table-cell>
          <table:table-cell office:value-type="float" office:value="0.999369144439697" calcext:value-type="float">
            <text:p>0.999369144439697</text:p>
          </table:table-cell>
          <table:table-cell office:value-type="float" office:value="0.735210061073303" calcext:value-type="float">
            <text:p>0.735210061073303</text:p>
          </table:table-cell>
          <table:table-cell office:value-type="float" office:value="1.21620869636536" calcext:value-type="float">
            <text:p>1.21620869636536</text:p>
          </table:table-cell>
          <table:table-cell office:value-type="float" office:value="0.041750643402338" calcext:value-type="float">
            <text:p>0.041750643402338</text:p>
          </table:table-cell>
          <table:table-cell office:value-type="float" office:value="0.0664208456873894" calcext:value-type="float">
            <text:p>0.0664208456873894</text:p>
          </table:table-cell>
          <table:table-cell office:value-type="float" office:value="0.414028972387314" calcext:value-type="float">
            <text:p>0.414028972387314</text:p>
          </table:table-cell>
          <table:table-cell office:value-type="float" office:value="1.2180769443512" calcext:value-type="float">
            <text:p>1.2180769443512</text:p>
          </table:table-cell>
          <table:table-cell office:value-type="float" office:value="-0.0308887548744679" calcext:value-type="float">
            <text:p>-0.0308887548744679</text:p>
          </table:table-cell>
          <table:table-cell office:value-type="float" office:value="0.0782171934843063" calcext:value-type="float">
            <text:p>0.07821719348430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([.J18]-[.F18])^2+([.K18]-[.G18])^2)" office:value-type="float" office:value="0.51074105185916" calcext:value-type="float">
            <text:p>0.51074105185916</text:p>
          </table:table-cell>
          <table:table-cell table:formula="of:=SQRT(([.R18]-[.N18])^2+([.S18]-[.O18])^2)" office:value-type="float" office:value="0.326252462289436" calcext:value-type="float">
            <text:p>0.326252462289436</text:p>
          </table:table-cell>
          <table:table-cell table:formula="of:=SQRT(([.R18]-[.F18])^2+([.S18]-[.G18])^2)" office:value-type="float" office:value="1.00549234951755" calcext:value-type="float">
            <text:p>1.00549234951755</text:p>
          </table:table-cell>
          <table:table-cell table:formula="of:=SQRT(([.N18]-[.J18])^2+([.O18]-[.K18])^2)" office:value-type="float" office:value="1.0077628532328" calcext:value-type="float">
            <text:p>1.0077628532328</text:p>
          </table:table-cell>
          <table:table-cell office:value-type="float" office:value="0.803545594215393" calcext:value-type="float">
            <text:p>0.803545594215393</text:p>
          </table:table-cell>
          <table:table-cell office:value-type="float" office:value="0.299692779779434" calcext:value-type="float">
            <text:p>0.299692779779434</text:p>
          </table:table-cell>
          <table:table-cell office:value-type="float" office:value="-0.525648236274719" calcext:value-type="float">
            <text:p>-0.525648236274719</text:p>
          </table:table-cell>
          <table:table-cell office:value-type="float" office:value="0.999181509017944" calcext:value-type="float">
            <text:p>0.999181509017944</text:p>
          </table:table-cell>
          <table:table-cell office:value-type="float" office:value="0.293207854032517" calcext:value-type="float">
            <text:p>0.293207854032517</text:p>
          </table:table-cell>
          <table:table-cell office:value-type="float" office:value="0.319985955953598" calcext:value-type="float">
            <text:p>0.319985955953598</text:p>
          </table:table-cell>
          <table:table-cell office:value-type="float" office:value="-0.556156992912293" calcext:value-type="float">
            <text:p>-0.556156992912293</text:p>
          </table:table-cell>
          <table:table-cell office:value-type="float" office:value="0.999380767345429" calcext:value-type="float">
            <text:p>0.999380767345429</text:p>
          </table:table-cell>
          <table:table-cell office:value-type="float" office:value="0.735149085521698" calcext:value-type="float">
            <text:p>0.735149085521698</text:p>
          </table:table-cell>
          <table:table-cell office:value-type="float" office:value="1.22567570209503" calcext:value-type="float">
            <text:p>1.22567570209503</text:p>
          </table:table-cell>
          <table:table-cell office:value-type="float" office:value="0.0415550619363785" calcext:value-type="float">
            <text:p>0.0415550619363785</text:p>
          </table:table-cell>
          <table:table-cell office:value-type="float" office:value="0.0631143972277641" calcext:value-type="float">
            <text:p>0.0631143972277641</text:p>
          </table:table-cell>
          <table:table-cell office:value-type="float" office:value="0.408898741006851" calcext:value-type="float">
            <text:p>0.408898741006851</text:p>
          </table:table-cell>
          <table:table-cell office:value-type="float" office:value="1.22450017929077" calcext:value-type="float">
            <text:p>1.22450017929077</text:p>
          </table:table-cell>
          <table:table-cell office:value-type="float" office:value="-0.0307404100894928" calcext:value-type="float">
            <text:p>-0.0307404100894928</text:p>
          </table:table-cell>
          <table:table-cell office:value-type="float" office:value="0.0742098838090897" calcext:value-type="float">
            <text:p>0.07420988380908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([.J19]-[.F19])^2+([.K19]-[.G19])^2)" office:value-type="float" office:value="0.51791878415793" calcext:value-type="float">
            <text:p>0.51791878415793</text:p>
          </table:table-cell>
          <table:table-cell table:formula="of:=SQRT(([.R19]-[.N19])^2+([.S19]-[.O19])^2)" office:value-type="float" office:value="0.328300716246232" calcext:value-type="float">
            <text:p>0.328300716246232</text:p>
          </table:table-cell>
          <table:table-cell table:formula="of:=SQRT(([.R19]-[.F19])^2+([.S19]-[.G19])^2)" office:value-type="float" office:value="1.01457395342617" calcext:value-type="float">
            <text:p>1.01457395342617</text:p>
          </table:table-cell>
          <table:table-cell table:formula="of:=SQRT(([.N19]-[.J19])^2+([.O19]-[.K19])^2)" office:value-type="float" office:value="1.02992185841135" calcext:value-type="float">
            <text:p>1.02992185841135</text:p>
          </table:table-cell>
          <table:table-cell office:value-type="float" office:value="0.809741675853729" calcext:value-type="float">
            <text:p>0.809741675853729</text:p>
          </table:table-cell>
          <table:table-cell office:value-type="float" office:value="0.302216231822968" calcext:value-type="float">
            <text:p>0.302216231822968</text:p>
          </table:table-cell>
          <table:table-cell office:value-type="float" office:value="-0.537442088127136" calcext:value-type="float">
            <text:p>-0.537442088127136</text:p>
          </table:table-cell>
          <table:table-cell office:value-type="float" office:value="0.999198794364929" calcext:value-type="float">
            <text:p>0.999198794364929</text:p>
          </table:table-cell>
          <table:table-cell office:value-type="float" office:value="0.29195898771286" calcext:value-type="float">
            <text:p>0.29195898771286</text:p>
          </table:table-cell>
          <table:table-cell office:value-type="float" office:value="0.314088672399521" calcext:value-type="float">
            <text:p>0.314088672399521</text:p>
          </table:table-cell>
          <table:table-cell office:value-type="float" office:value="-0.542347133159638" calcext:value-type="float">
            <text:p>-0.542347133159638</text:p>
          </table:table-cell>
          <table:table-cell office:value-type="float" office:value="0.999397218227387" calcext:value-type="float">
            <text:p>0.999397218227387</text:p>
          </table:table-cell>
          <table:table-cell office:value-type="float" office:value="0.735245108604431" calcext:value-type="float">
            <text:p>0.735245108604431</text:p>
          </table:table-cell>
          <table:table-cell office:value-type="float" office:value="1.24373185634613" calcext:value-type="float">
            <text:p>1.24373185634613</text:p>
          </table:table-cell>
          <table:table-cell office:value-type="float" office:value="0.0334758050739765" calcext:value-type="float">
            <text:p>0.0334758050739765</text:p>
          </table:table-cell>
          <table:table-cell office:value-type="float" office:value="0.0614637322723866" calcext:value-type="float">
            <text:p>0.0614637322723866</text:p>
          </table:table-cell>
          <table:table-cell office:value-type="float" office:value="0.407104641199112" calcext:value-type="float">
            <text:p>0.407104641199112</text:p>
          </table:table-cell>
          <table:table-cell office:value-type="float" office:value="1.23347544670105" calcext:value-type="float">
            <text:p>1.23347544670105</text:p>
          </table:table-cell>
          <table:table-cell office:value-type="float" office:value="-0.0226441845297813" calcext:value-type="float">
            <text:p>-0.0226441845297813</text:p>
          </table:table-cell>
          <table:table-cell office:value-type="float" office:value="0.0723479986190796" calcext:value-type="float">
            <text:p>0.07234799861907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([.J20]-[.F20])^2+([.K20]-[.G20])^2)" office:value-type="float" office:value="0.520560788069154" calcext:value-type="float">
            <text:p>0.520560788069154</text:p>
          </table:table-cell>
          <table:table-cell table:formula="of:=SQRT(([.R20]-[.N20])^2+([.S20]-[.O20])^2)" office:value-type="float" office:value="0.329903052879029" calcext:value-type="float">
            <text:p>0.329903052879029</text:p>
          </table:table-cell>
          <table:table-cell table:formula="of:=SQRT(([.R20]-[.F20])^2+([.S20]-[.G20])^2)" office:value-type="float" office:value="1.01485525420071" calcext:value-type="float">
            <text:p>1.01485525420071</text:p>
          </table:table-cell>
          <table:table-cell table:formula="of:=SQRT(([.N20]-[.J20])^2+([.O20]-[.K20])^2)" office:value-type="float" office:value="1.03156488984647" calcext:value-type="float">
            <text:p>1.03156488984647</text:p>
          </table:table-cell>
          <table:table-cell office:value-type="float" office:value="0.811004161834717" calcext:value-type="float">
            <text:p>0.811004161834717</text:p>
          </table:table-cell>
          <table:table-cell office:value-type="float" office:value="0.302778601646423" calcext:value-type="float">
            <text:p>0.302778601646423</text:p>
          </table:table-cell>
          <table:table-cell office:value-type="float" office:value="-0.54294228553772" calcext:value-type="float">
            <text:p>-0.54294228553772</text:p>
          </table:table-cell>
          <table:table-cell office:value-type="float" office:value="0.999133944511414" calcext:value-type="float">
            <text:p>0.999133944511414</text:p>
          </table:table-cell>
          <table:table-cell office:value-type="float" office:value="0.290540933609009" calcext:value-type="float">
            <text:p>0.290540933609009</text:p>
          </table:table-cell>
          <table:table-cell office:value-type="float" office:value="0.312856405973434" calcext:value-type="float">
            <text:p>0.312856405973434</text:p>
          </table:table-cell>
          <table:table-cell office:value-type="float" office:value="-0.521672487258911" calcext:value-type="float">
            <text:p>-0.521672487258911</text:p>
          </table:table-cell>
          <table:table-cell office:value-type="float" office:value="0.999373197555542" calcext:value-type="float">
            <text:p>0.999373197555542</text:p>
          </table:table-cell>
          <table:table-cell office:value-type="float" office:value="0.735873699188232" calcext:value-type="float">
            <text:p>0.735873699188232</text:p>
          </table:table-cell>
          <table:table-cell office:value-type="float" office:value="1.24334275722504" calcext:value-type="float">
            <text:p>1.24334275722504</text:p>
          </table:table-cell>
          <table:table-cell office:value-type="float" office:value="0.0290762595832348" calcext:value-type="float">
            <text:p>0.0290762595832348</text:p>
          </table:table-cell>
          <table:table-cell office:value-type="float" office:value="0.0612038113176823" calcext:value-type="float">
            <text:p>0.0612038113176823</text:p>
          </table:table-cell>
          <table:table-cell office:value-type="float" office:value="0.406121402978897" calcext:value-type="float">
            <text:p>0.406121402978897</text:p>
          </table:table-cell>
          <table:table-cell office:value-type="float" office:value="1.23337042331696" calcext:value-type="float">
            <text:p>1.23337042331696</text:p>
          </table:table-cell>
          <table:table-cell office:value-type="float" office:value="-0.0183002091944218" calcext:value-type="float">
            <text:p>-0.0183002091944218</text:p>
          </table:table-cell>
          <table:table-cell office:value-type="float" office:value="0.0722244903445244" calcext:value-type="float">
            <text:p>0.0722244903445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([.J21]-[.F21])^2+([.K21]-[.G21])^2)" office:value-type="float" office:value="0.520893210054544" calcext:value-type="float">
            <text:p>0.520893210054544</text:p>
          </table:table-cell>
          <table:table-cell table:formula="of:=SQRT(([.R21]-[.N21])^2+([.S21]-[.O21])^2)" office:value-type="float" office:value="0.32975077160846" calcext:value-type="float">
            <text:p>0.32975077160846</text:p>
          </table:table-cell>
          <table:table-cell table:formula="of:=SQRT(([.R21]-[.F21])^2+([.S21]-[.G21])^2)" office:value-type="float" office:value="1.01600876077913" calcext:value-type="float">
            <text:p>1.01600876077913</text:p>
          </table:table-cell>
          <table:table-cell table:formula="of:=SQRT(([.N21]-[.J21])^2+([.O21]-[.K21])^2)" office:value-type="float" office:value="1.02569346968162" calcext:value-type="float">
            <text:p>1.02569346968162</text:p>
          </table:table-cell>
          <table:table-cell office:value-type="float" office:value="0.81092232465744" calcext:value-type="float">
            <text:p>0.81092232465744</text:p>
          </table:table-cell>
          <table:table-cell office:value-type="float" office:value="0.300784647464752" calcext:value-type="float">
            <text:p>0.300784647464752</text:p>
          </table:table-cell>
          <table:table-cell office:value-type="float" office:value="-0.639023840427399" calcext:value-type="float">
            <text:p>-0.639023840427399</text:p>
          </table:table-cell>
          <table:table-cell office:value-type="float" office:value="0.999129593372345" calcext:value-type="float">
            <text:p>0.999129593372345</text:p>
          </table:table-cell>
          <table:table-cell office:value-type="float" office:value="0.290255516767502" calcext:value-type="float">
            <text:p>0.290255516767502</text:p>
          </table:table-cell>
          <table:table-cell office:value-type="float" office:value="0.316140800714493" calcext:value-type="float">
            <text:p>0.316140800714493</text:p>
          </table:table-cell>
          <table:table-cell office:value-type="float" office:value="-0.57529091835022" calcext:value-type="float">
            <text:p>-0.57529091835022</text:p>
          </table:table-cell>
          <table:table-cell office:value-type="float" office:value="0.999335944652557" calcext:value-type="float">
            <text:p>0.999335944652557</text:p>
          </table:table-cell>
          <table:table-cell office:value-type="float" office:value="0.735891699790955" calcext:value-type="float">
            <text:p>0.735891699790955</text:p>
          </table:table-cell>
          <table:table-cell office:value-type="float" office:value="1.23996734619141" calcext:value-type="float">
            <text:p>1.23996734619141</text:p>
          </table:table-cell>
          <table:table-cell office:value-type="float" office:value="0.0136103183031082" calcext:value-type="float">
            <text:p>0.0136103183031082</text:p>
          </table:table-cell>
          <table:table-cell office:value-type="float" office:value="0.0584065951406956" calcext:value-type="float">
            <text:p>0.0584065951406956</text:p>
          </table:table-cell>
          <table:table-cell office:value-type="float" office:value="0.406220734119415" calcext:value-type="float">
            <text:p>0.406220734119415</text:p>
          </table:table-cell>
          <table:table-cell office:value-type="float" office:value="1.23271298408508" calcext:value-type="float">
            <text:p>1.23271298408508</text:p>
          </table:table-cell>
          <table:table-cell office:value-type="float" office:value="-0.00268359668552876" calcext:value-type="float">
            <text:p>-0.00268359668552876</text:p>
          </table:table-cell>
          <table:table-cell office:value-type="float" office:value="0.0683112964034081" calcext:value-type="float">
            <text:p>0.06831129640340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([.J22]-[.F22])^2+([.K22]-[.G22])^2)" office:value-type="float" office:value="0.522074125557114" calcext:value-type="float">
            <text:p>0.522074125557114</text:p>
          </table:table-cell>
          <table:table-cell table:formula="of:=SQRT(([.R22]-[.N22])^2+([.S22]-[.O22])^2)" office:value-type="float" office:value="0.332944891437065" calcext:value-type="float">
            <text:p>0.332944891437065</text:p>
          </table:table-cell>
          <table:table-cell table:formula="of:=SQRT(([.R22]-[.F22])^2+([.S22]-[.G22])^2)" office:value-type="float" office:value="1.01552993829354" calcext:value-type="float">
            <text:p>1.01552993829354</text:p>
          </table:table-cell>
          <table:table-cell table:formula="of:=SQRT(([.N22]-[.J22])^2+([.O22]-[.K22])^2)" office:value-type="float" office:value="1.02701677098693" calcext:value-type="float">
            <text:p>1.02701677098693</text:p>
          </table:table-cell>
          <table:table-cell office:value-type="float" office:value="0.812200903892517" calcext:value-type="float">
            <text:p>0.812200903892517</text:p>
          </table:table-cell>
          <table:table-cell office:value-type="float" office:value="0.300943672657013" calcext:value-type="float">
            <text:p>0.300943672657013</text:p>
          </table:table-cell>
          <table:table-cell office:value-type="float" office:value="-0.576615393161774" calcext:value-type="float">
            <text:p>-0.576615393161774</text:p>
          </table:table-cell>
          <table:table-cell office:value-type="float" office:value="0.999142050743103" calcext:value-type="float">
            <text:p>0.999142050743103</text:p>
          </table:table-cell>
          <table:table-cell office:value-type="float" office:value="0.290281116962433" calcext:value-type="float">
            <text:p>0.290281116962433</text:p>
          </table:table-cell>
          <table:table-cell office:value-type="float" office:value="0.313637316226959" calcext:value-type="float">
            <text:p>0.313637316226959</text:p>
          </table:table-cell>
          <table:table-cell office:value-type="float" office:value="-0.567706048488617" calcext:value-type="float">
            <text:p>-0.567706048488617</text:p>
          </table:table-cell>
          <table:table-cell office:value-type="float" office:value="0.99935120344162" calcext:value-type="float">
            <text:p>0.99935120344162</text:p>
          </table:table-cell>
          <table:table-cell office:value-type="float" office:value="0.735753178596497" calcext:value-type="float">
            <text:p>0.735753178596497</text:p>
          </table:table-cell>
          <table:table-cell office:value-type="float" office:value="1.23901188373566" calcext:value-type="float">
            <text:p>1.23901188373566</text:p>
          </table:table-cell>
          <table:table-cell office:value-type="float" office:value="0.0241218749433756" calcext:value-type="float">
            <text:p>0.0241218749433756</text:p>
          </table:table-cell>
          <table:table-cell office:value-type="float" office:value="0.0561432726681232" calcext:value-type="float">
            <text:p>0.0561432726681232</text:p>
          </table:table-cell>
          <table:table-cell office:value-type="float" office:value="0.402921050786972" calcext:value-type="float">
            <text:p>0.402921050786972</text:p>
          </table:table-cell>
          <table:table-cell office:value-type="float" office:value="1.23034727573395" calcext:value-type="float">
            <text:p>1.23034727573395</text:p>
          </table:table-cell>
          <table:table-cell office:value-type="float" office:value="-0.0129585713148117" calcext:value-type="float">
            <text:p>-0.0129585713148117</text:p>
          </table:table-cell>
          <table:table-cell office:value-type="float" office:value="0.065898098051548" calcext:value-type="float">
            <text:p>0.0658980980515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([.J23]-[.F23])^2+([.K23]-[.G23])^2)" office:value-type="float" office:value="0.521998585716661" calcext:value-type="float">
            <text:p>0.521998585716661</text:p>
          </table:table-cell>
          <table:table-cell table:formula="of:=SQRT(([.R23]-[.N23])^2+([.S23]-[.O23])^2)" office:value-type="float" office:value="0.332022788073569" calcext:value-type="float">
            <text:p>0.332022788073569</text:p>
          </table:table-cell>
          <table:table-cell table:formula="of:=SQRT(([.R23]-[.F23])^2+([.S23]-[.G23])^2)" office:value-type="float" office:value="1.01773817257858" calcext:value-type="float">
            <text:p>1.01773817257858</text:p>
          </table:table-cell>
          <table:table-cell table:formula="of:=SQRT(([.N23]-[.J23])^2+([.O23]-[.K23])^2)" office:value-type="float" office:value="1.02628823947017" calcext:value-type="float">
            <text:p>1.02628823947017</text:p>
          </table:table-cell>
          <table:table-cell office:value-type="float" office:value="0.812876224517822" calcext:value-type="float">
            <text:p>0.812876224517822</text:p>
          </table:table-cell>
          <table:table-cell office:value-type="float" office:value="0.297633826732636" calcext:value-type="float">
            <text:p>0.297633826732636</text:p>
          </table:table-cell>
          <table:table-cell office:value-type="float" office:value="-0.57667601108551" calcext:value-type="float">
            <text:p>-0.57667601108551</text:p>
          </table:table-cell>
          <table:table-cell office:value-type="float" office:value="0.999177157878876" calcext:value-type="float">
            <text:p>0.999177157878876</text:p>
          </table:table-cell>
          <table:table-cell office:value-type="float" office:value="0.29113119840622" calcext:value-type="float">
            <text:p>0.29113119840622</text:p>
          </table:table-cell>
          <table:table-cell office:value-type="float" office:value="0.31390193104744" calcext:value-type="float">
            <text:p>0.31390193104744</text:p>
          </table:table-cell>
          <table:table-cell office:value-type="float" office:value="-0.593613266944885" calcext:value-type="float">
            <text:p>-0.593613266944885</text:p>
          </table:table-cell>
          <table:table-cell office:value-type="float" office:value="0.99937379360199" calcext:value-type="float">
            <text:p>0.99937379360199</text:p>
          </table:table-cell>
          <table:table-cell office:value-type="float" office:value="0.736647188663483" calcext:value-type="float">
            <text:p>0.736647188663483</text:p>
          </table:table-cell>
          <table:table-cell office:value-type="float" office:value="1.2384467124939" calcext:value-type="float">
            <text:p>1.2384467124939</text:p>
          </table:table-cell>
          <table:table-cell office:value-type="float" office:value="0.0296180807054043" calcext:value-type="float">
            <text:p>0.0296180807054043</text:p>
          </table:table-cell>
          <table:table-cell office:value-type="float" office:value="0.0547582246363163" calcext:value-type="float">
            <text:p>0.0547582246363163</text:p>
          </table:table-cell>
          <table:table-cell office:value-type="float" office:value="0.404733180999756" calcext:value-type="float">
            <text:p>0.404733180999756</text:p>
          </table:table-cell>
          <table:table-cell office:value-type="float" office:value="1.22994828224182" calcext:value-type="float">
            <text:p>1.22994828224182</text:p>
          </table:table-cell>
          <table:table-cell office:value-type="float" office:value="-0.018841402605176" calcext:value-type="float">
            <text:p>-0.018841402605176</text:p>
          </table:table-cell>
          <table:table-cell office:value-type="float" office:value="0.0638360679149628" calcext:value-type="float">
            <text:p>0.0638360679149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([.J24]-[.F24])^2+([.K24]-[.G24])^2)" office:value-type="float" office:value="0.521067510126772" calcext:value-type="float">
            <text:p>0.521067510126772</text:p>
          </table:table-cell>
          <table:table-cell table:formula="of:=SQRT(([.R24]-[.N24])^2+([.S24]-[.O24])^2)" office:value-type="float" office:value="0.331663501943401" calcext:value-type="float">
            <text:p>0.331663501943401</text:p>
          </table:table-cell>
          <table:table-cell table:formula="of:=SQRT(([.R24]-[.F24])^2+([.S24]-[.G24])^2)" office:value-type="float" office:value="1.01558354699111" calcext:value-type="float">
            <text:p>1.01558354699111</text:p>
          </table:table-cell>
          <table:table-cell table:formula="of:=SQRT(([.N24]-[.J24])^2+([.O24]-[.K24])^2)" office:value-type="float" office:value="1.02171232188827" calcext:value-type="float">
            <text:p>1.02171232188827</text:p>
          </table:table-cell>
          <table:table-cell office:value-type="float" office:value="0.812900841236115" calcext:value-type="float">
            <text:p>0.812900841236115</text:p>
          </table:table-cell>
          <table:table-cell office:value-type="float" office:value="0.296531230211258" calcext:value-type="float">
            <text:p>0.296531230211258</text:p>
          </table:table-cell>
          <table:table-cell office:value-type="float" office:value="-0.553322911262512" calcext:value-type="float">
            <text:p>-0.553322911262512</text:p>
          </table:table-cell>
          <table:table-cell office:value-type="float" office:value="0.999183535575867" calcext:value-type="float">
            <text:p>0.999183535575867</text:p>
          </table:table-cell>
          <table:table-cell office:value-type="float" office:value="0.292123109102249" calcext:value-type="float">
            <text:p>0.292123109102249</text:p>
          </table:table-cell>
          <table:table-cell office:value-type="float" office:value="0.313906610012054" calcext:value-type="float">
            <text:p>0.313906610012054</text:p>
          </table:table-cell>
          <table:table-cell office:value-type="float" office:value="-0.578011393547058" calcext:value-type="float">
            <text:p>-0.578011393547058</text:p>
          </table:table-cell>
          <table:table-cell office:value-type="float" office:value="0.999368846416473" calcext:value-type="float">
            <text:p>0.999368846416473</text:p>
          </table:table-cell>
          <table:table-cell office:value-type="float" office:value="0.73620617389679" calcext:value-type="float">
            <text:p>0.73620617389679</text:p>
          </table:table-cell>
          <table:table-cell office:value-type="float" office:value="1.23406219482422" calcext:value-type="float">
            <text:p>1.23406219482422</text:p>
          </table:table-cell>
          <table:table-cell office:value-type="float" office:value="0.0343986339867115" calcext:value-type="float">
            <text:p>0.0343986339867115</text:p>
          </table:table-cell>
          <table:table-cell office:value-type="float" office:value="0.0538312643766403" calcext:value-type="float">
            <text:p>0.0538312643766403</text:p>
          </table:table-cell>
          <table:table-cell office:value-type="float" office:value="0.404630333185196" calcext:value-type="float">
            <text:p>0.404630333185196</text:p>
          </table:table-cell>
          <table:table-cell office:value-type="float" office:value="1.22643721103668" calcext:value-type="float">
            <text:p>1.22643721103668</text:p>
          </table:table-cell>
          <table:table-cell office:value-type="float" office:value="-0.0237331110984087" calcext:value-type="float">
            <text:p>-0.0237331110984087</text:p>
          </table:table-cell>
          <table:table-cell office:value-type="float" office:value="0.062516026198864" calcext:value-type="float">
            <text:p>0.062516026198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([.J25]-[.F25])^2+([.K25]-[.G25])^2)" office:value-type="float" office:value="0.521263885528841" calcext:value-type="float">
            <text:p>0.521263885528841</text:p>
          </table:table-cell>
          <table:table-cell table:formula="of:=SQRT(([.R25]-[.N25])^2+([.S25]-[.O25])^2)" office:value-type="float" office:value="0.329978200654671" calcext:value-type="float">
            <text:p>0.329978200654671</text:p>
          </table:table-cell>
          <table:table-cell table:formula="of:=SQRT(([.R25]-[.F25])^2+([.S25]-[.G25])^2)" office:value-type="float" office:value="1.00835915382772" calcext:value-type="float">
            <text:p>1.00835915382772</text:p>
          </table:table-cell>
          <table:table-cell table:formula="of:=SQRT(([.N25]-[.J25])^2+([.O25]-[.K25])^2)" office:value-type="float" office:value="1.00972963384578" calcext:value-type="float">
            <text:p>1.00972963384578</text:p>
          </table:table-cell>
          <table:table-cell office:value-type="float" office:value="0.813115417957306" calcext:value-type="float">
            <text:p>0.813115417957306</text:p>
          </table:table-cell>
          <table:table-cell office:value-type="float" office:value="0.296257048845291" calcext:value-type="float">
            <text:p>0.296257048845291</text:p>
          </table:table-cell>
          <table:table-cell office:value-type="float" office:value="-0.646239757537842" calcext:value-type="float">
            <text:p>-0.646239757537842</text:p>
          </table:table-cell>
          <table:table-cell office:value-type="float" office:value="0.999199986457825" calcext:value-type="float">
            <text:p>0.999199986457825</text:p>
          </table:table-cell>
          <table:table-cell office:value-type="float" office:value="0.292164891958237" calcext:value-type="float">
            <text:p>0.292164891958237</text:p>
          </table:table-cell>
          <table:table-cell office:value-type="float" office:value="0.314328789710999" calcext:value-type="float">
            <text:p>0.314328789710999</text:p>
          </table:table-cell>
          <table:table-cell office:value-type="float" office:value="-0.683291375637054" calcext:value-type="float">
            <text:p>-0.683291375637054</text:p>
          </table:table-cell>
          <table:table-cell office:value-type="float" office:value="0.999380111694336" calcext:value-type="float">
            <text:p>0.999380111694336</text:p>
          </table:table-cell>
          <table:table-cell office:value-type="float" office:value="0.734316170215607" calcext:value-type="float">
            <text:p>0.734316170215607</text:p>
          </table:table-cell>
          <table:table-cell office:value-type="float" office:value="1.22210419178009" calcext:value-type="float">
            <text:p>1.22210419178009</text:p>
          </table:table-cell>
          <table:table-cell office:value-type="float" office:value="0.0349700227379799" calcext:value-type="float">
            <text:p>0.0349700227379799</text:p>
          </table:table-cell>
          <table:table-cell office:value-type="float" office:value="0.0539557039737701" calcext:value-type="float">
            <text:p>0.0539557039737701</text:p>
          </table:table-cell>
          <table:table-cell office:value-type="float" office:value="0.404362827539444" calcext:value-type="float">
            <text:p>0.404362827539444</text:p>
          </table:table-cell>
          <table:table-cell office:value-type="float" office:value="1.21805393695831" calcext:value-type="float">
            <text:p>1.21805393695831</text:p>
          </table:table-cell>
          <table:table-cell office:value-type="float" office:value="-0.024415984749794" calcext:value-type="float">
            <text:p>-0.024415984749794</text:p>
          </table:table-cell>
          <table:table-cell office:value-type="float" office:value="0.0621501244604588" calcext:value-type="float">
            <text:p>0.06215012446045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([.J26]-[.F26])^2+([.K26]-[.G26])^2)" office:value-type="float" office:value="0.523521138436143" calcext:value-type="float">
            <text:p>0.523521138436143</text:p>
          </table:table-cell>
          <table:table-cell table:formula="of:=SQRT(([.R26]-[.N26])^2+([.S26]-[.O26])^2)" office:value-type="float" office:value="0.330357810035927" calcext:value-type="float">
            <text:p>0.330357810035927</text:p>
          </table:table-cell>
          <table:table-cell table:formula="of:=SQRT(([.R26]-[.F26])^2+([.S26]-[.G26])^2)" office:value-type="float" office:value="1.00939328482228" calcext:value-type="float">
            <text:p>1.00939328482228</text:p>
          </table:table-cell>
          <table:table-cell table:formula="of:=SQRT(([.N26]-[.J26])^2+([.O26]-[.K26])^2)" office:value-type="float" office:value="1.00988659164153" calcext:value-type="float">
            <text:p>1.00988659164153</text:p>
          </table:table-cell>
          <table:table-cell office:value-type="float" office:value="0.815309882164002" calcext:value-type="float">
            <text:p>0.815309882164002</text:p>
          </table:table-cell>
          <table:table-cell office:value-type="float" office:value="0.295829027891159" calcext:value-type="float">
            <text:p>0.295829027891159</text:p>
          </table:table-cell>
          <table:table-cell office:value-type="float" office:value="-0.722527801990509" calcext:value-type="float">
            <text:p>-0.722527801990509</text:p>
          </table:table-cell>
          <table:table-cell office:value-type="float" office:value="0.999227702617645" calcext:value-type="float">
            <text:p>0.999227702617645</text:p>
          </table:table-cell>
          <table:table-cell office:value-type="float" office:value="0.292115092277527" calcext:value-type="float">
            <text:p>0.292115092277527</text:p>
          </table:table-cell>
          <table:table-cell office:value-type="float" office:value="0.314311295747757" calcext:value-type="float">
            <text:p>0.314311295747757</text:p>
          </table:table-cell>
          <table:table-cell office:value-type="float" office:value="-0.744595944881439" calcext:value-type="float">
            <text:p>-0.744595944881439</text:p>
          </table:table-cell>
          <table:table-cell office:value-type="float" office:value="0.99939626455307" calcext:value-type="float">
            <text:p>0.99939626455307</text:p>
          </table:table-cell>
          <table:table-cell office:value-type="float" office:value="0.734914183616638" calcext:value-type="float">
            <text:p>0.734914183616638</text:p>
          </table:table-cell>
          <table:table-cell office:value-type="float" office:value="1.2219455242157" calcext:value-type="float">
            <text:p>1.2219455242157</text:p>
          </table:table-cell>
          <table:table-cell office:value-type="float" office:value="0.034927275031805" calcext:value-type="float">
            <text:p>0.034927275031805</text:p>
          </table:table-cell>
          <table:table-cell office:value-type="float" office:value="0.0531913377344608" calcext:value-type="float">
            <text:p>0.0531913377344608</text:p>
          </table:table-cell>
          <table:table-cell office:value-type="float" office:value="0.404581397771835" calcext:value-type="float">
            <text:p>0.404581397771835</text:p>
          </table:table-cell>
          <table:table-cell office:value-type="float" office:value="1.21787941455841" calcext:value-type="float">
            <text:p>1.21787941455841</text:p>
          </table:table-cell>
          <table:table-cell office:value-type="float" office:value="-0.0243852268904448" calcext:value-type="float">
            <text:p>-0.0243852268904448</text:p>
          </table:table-cell>
          <table:table-cell office:value-type="float" office:value="0.060852836817503" calcext:value-type="float">
            <text:p>0.0608528368175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([.J27]-[.F27])^2+([.K27]-[.G27])^2)" office:value-type="float" office:value="0.522577103630053" calcext:value-type="float">
            <text:p>0.522577103630053</text:p>
          </table:table-cell>
          <table:table-cell table:formula="of:=SQRT(([.R27]-[.N27])^2+([.S27]-[.O27])^2)" office:value-type="float" office:value="0.329861724238378" calcext:value-type="float">
            <text:p>0.329861724238378</text:p>
          </table:table-cell>
          <table:table-cell table:formula="of:=SQRT(([.R27]-[.F27])^2+([.S27]-[.G27])^2)" office:value-type="float" office:value="1.01151587188828" calcext:value-type="float">
            <text:p>1.01151587188828</text:p>
          </table:table-cell>
          <table:table-cell table:formula="of:=SQRT(([.N27]-[.J27])^2+([.O27]-[.K27])^2)" office:value-type="float" office:value="1.0116559856465" calcext:value-type="float">
            <text:p>1.0116559856465</text:p>
          </table:table-cell>
          <table:table-cell office:value-type="float" office:value="0.815362930297852" calcext:value-type="float">
            <text:p>0.815362930297852</text:p>
          </table:table-cell>
          <table:table-cell office:value-type="float" office:value="0.295831024646759" calcext:value-type="float">
            <text:p>0.295831024646759</text:p>
          </table:table-cell>
          <table:table-cell office:value-type="float" office:value="-0.560628831386566" calcext:value-type="float">
            <text:p>-0.560628831386566</text:p>
          </table:table-cell>
          <table:table-cell office:value-type="float" office:value="0.99923449754715" calcext:value-type="float">
            <text:p>0.99923449754715</text:p>
          </table:table-cell>
          <table:table-cell office:value-type="float" office:value="0.293149203062058" calcext:value-type="float">
            <text:p>0.293149203062058</text:p>
          </table:table-cell>
          <table:table-cell office:value-type="float" office:value="0.315315693616867" calcext:value-type="float">
            <text:p>0.315315693616867</text:p>
          </table:table-cell>
          <table:table-cell office:value-type="float" office:value="-0.566244423389435" calcext:value-type="float">
            <text:p>-0.566244423389435</text:p>
          </table:table-cell>
          <table:table-cell office:value-type="float" office:value="0.999412000179291" calcext:value-type="float">
            <text:p>0.999412000179291</text:p>
          </table:table-cell>
          <table:table-cell office:value-type="float" office:value="0.738359093666077" calcext:value-type="float">
            <text:p>0.738359093666077</text:p>
          </table:table-cell>
          <table:table-cell office:value-type="float" office:value="1.22374069690704" calcext:value-type="float">
            <text:p>1.22374069690704</text:p>
          </table:table-cell>
          <table:table-cell office:value-type="float" office:value="0.0321850590407848" calcext:value-type="float">
            <text:p>0.0321850590407848</text:p>
          </table:table-cell>
          <table:table-cell office:value-type="float" office:value="0.0533132515847683" calcext:value-type="float">
            <text:p>0.0533132515847683</text:p>
          </table:table-cell>
          <table:table-cell office:value-type="float" office:value="0.40850242972374" calcext:value-type="float">
            <text:p>0.40850242972374</text:p>
          </table:table-cell>
          <table:table-cell office:value-type="float" office:value="1.2219135761261" calcext:value-type="float">
            <text:p>1.2219135761261</text:p>
          </table:table-cell>
          <table:table-cell office:value-type="float" office:value="-0.0219290927052498" calcext:value-type="float">
            <text:p>-0.0219290927052498</text:p>
          </table:table-cell>
          <table:table-cell office:value-type="float" office:value="0.0611516647040844" calcext:value-type="float">
            <text:p>0.06115166470408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([.J28]-[.F28])^2+([.K28]-[.G28])^2)" office:value-type="float" office:value="0.52122929863135" calcext:value-type="float">
            <text:p>0.52122929863135</text:p>
          </table:table-cell>
          <table:table-cell table:formula="of:=SQRT(([.R28]-[.N28])^2+([.S28]-[.O28])^2)" office:value-type="float" office:value="0.328984459988995" calcext:value-type="float">
            <text:p>0.328984459988995</text:p>
          </table:table-cell>
          <table:table-cell table:formula="of:=SQRT(([.R28]-[.F28])^2+([.S28]-[.G28])^2)" office:value-type="float" office:value="1.01721691980135" calcext:value-type="float">
            <text:p>1.01721691980135</text:p>
          </table:table-cell>
          <table:table-cell table:formula="of:=SQRT(([.N28]-[.J28])^2+([.O28]-[.K28])^2)" office:value-type="float" office:value="1.01106343998626" calcext:value-type="float">
            <text:p>1.01106343998626</text:p>
          </table:table-cell>
          <table:table-cell office:value-type="float" office:value="0.813768744468689" calcext:value-type="float">
            <text:p>0.813768744468689</text:p>
          </table:table-cell>
          <table:table-cell office:value-type="float" office:value="0.290392190217972" calcext:value-type="float">
            <text:p>0.290392190217972</text:p>
          </table:table-cell>
          <table:table-cell office:value-type="float" office:value="-0.385762304067612" calcext:value-type="float">
            <text:p>-0.385762304067612</text:p>
          </table:table-cell>
          <table:table-cell office:value-type="float" office:value="0.999263465404511" calcext:value-type="float">
            <text:p>0.999263465404511</text:p>
          </table:table-cell>
          <table:table-cell office:value-type="float" office:value="0.293156921863556" calcext:value-type="float">
            <text:p>0.293156921863556</text:p>
          </table:table-cell>
          <table:table-cell office:value-type="float" office:value="0.315755784511566" calcext:value-type="float">
            <text:p>0.315755784511566</text:p>
          </table:table-cell>
          <table:table-cell office:value-type="float" office:value="-0.44879561662674" calcext:value-type="float">
            <text:p>-0.44879561662674</text:p>
          </table:table-cell>
          <table:table-cell office:value-type="float" office:value="0.999417841434479" calcext:value-type="float">
            <text:p>0.999417841434479</text:p>
          </table:table-cell>
          <table:table-cell office:value-type="float" office:value="0.737966477870941" calcext:value-type="float">
            <text:p>0.737966477870941</text:p>
          </table:table-cell>
          <table:table-cell office:value-type="float" office:value="1.22371709346771" calcext:value-type="float">
            <text:p>1.22371709346771</text:p>
          </table:table-cell>
          <table:table-cell office:value-type="float" office:value="0.0331512913107872" calcext:value-type="float">
            <text:p>0.0331512913107872</text:p>
          </table:table-cell>
          <table:table-cell office:value-type="float" office:value="0.052821721881628" calcext:value-type="float">
            <text:p>0.052821721881628</text:p>
          </table:table-cell>
          <table:table-cell office:value-type="float" office:value="0.408982038497925" calcext:value-type="float">
            <text:p>0.408982038497925</text:p>
          </table:table-cell>
          <table:table-cell office:value-type="float" office:value="1.22360062599182" calcext:value-type="float">
            <text:p>1.22360062599182</text:p>
          </table:table-cell>
          <table:table-cell office:value-type="float" office:value="-0.0228625349700451" calcext:value-type="float">
            <text:p>-0.0228625349700451</text:p>
          </table:table-cell>
          <table:table-cell office:value-type="float" office:value="0.0598894581198692" calcext:value-type="float">
            <text:p>0.05988945811986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([.J29]-[.F29])^2+([.K29]-[.G29])^2)" office:value-type="float" office:value="0.522680159721845" calcext:value-type="float">
            <text:p>0.522680159721845</text:p>
          </table:table-cell>
          <table:table-cell table:formula="of:=SQRT(([.R29]-[.N29])^2+([.S29]-[.O29])^2)" office:value-type="float" office:value="0.319878015170885" calcext:value-type="float">
            <text:p>0.319878015170885</text:p>
          </table:table-cell>
          <table:table-cell table:formula="of:=SQRT(([.R29]-[.F29])^2+([.S29]-[.G29])^2)" office:value-type="float" office:value="0.995857827120923" calcext:value-type="float">
            <text:p>0.995857827120923</text:p>
          </table:table-cell>
          <table:table-cell table:formula="of:=SQRT(([.N29]-[.J29])^2+([.O29]-[.K29])^2)" office:value-type="float" office:value="1.01307964933634" calcext:value-type="float">
            <text:p>1.01307964933634</text:p>
          </table:table-cell>
          <table:table-cell office:value-type="float" office:value="0.815291583538055" calcext:value-type="float">
            <text:p>0.815291583538055</text:p>
          </table:table-cell>
          <table:table-cell office:value-type="float" office:value="0.290430814027786" calcext:value-type="float">
            <text:p>0.290430814027786</text:p>
          </table:table-cell>
          <table:table-cell office:value-type="float" office:value="-0.4490807056427" calcext:value-type="float">
            <text:p>-0.4490807056427</text:p>
          </table:table-cell>
          <table:table-cell office:value-type="float" office:value="0.999304234981537" calcext:value-type="float">
            <text:p>0.999304234981537</text:p>
          </table:table-cell>
          <table:table-cell office:value-type="float" office:value="0.293172836303711" calcext:value-type="float">
            <text:p>0.293172836303711</text:p>
          </table:table-cell>
          <table:table-cell office:value-type="float" office:value="0.314649879932404" calcext:value-type="float">
            <text:p>0.314649879932404</text:p>
          </table:table-cell>
          <table:table-cell office:value-type="float" office:value="-0.507230460643768" calcext:value-type="float">
            <text:p>-0.507230460643768</text:p>
          </table:table-cell>
          <table:table-cell office:value-type="float" office:value="0.999449729919434" calcext:value-type="float">
            <text:p>0.999449729919434</text:p>
          </table:table-cell>
          <table:table-cell office:value-type="float" office:value="0.738085865974426" calcext:value-type="float">
            <text:p>0.738085865974426</text:p>
          </table:table-cell>
          <table:table-cell office:value-type="float" office:value="1.22480523586273" calcext:value-type="float">
            <text:p>1.22480523586273</text:p>
          </table:table-cell>
          <table:table-cell office:value-type="float" office:value="0.0523553974926472" calcext:value-type="float">
            <text:p>0.0523553974926472</text:p>
          </table:table-cell>
          <table:table-cell office:value-type="float" office:value="0.0527987293899059" calcext:value-type="float">
            <text:p>0.0527987293899059</text:p>
          </table:table-cell>
          <table:table-cell office:value-type="float" office:value="0.41888564825058" calcext:value-type="float">
            <text:p>0.41888564825058</text:p>
          </table:table-cell>
          <table:table-cell office:value-type="float" office:value="1.20399260520935" calcext:value-type="float">
            <text:p>1.20399260520935</text:p>
          </table:table-cell>
          <table:table-cell office:value-type="float" office:value="-0.0420530550181866" calcext:value-type="float">
            <text:p>-0.0420530550181866</text:p>
          </table:table-cell>
          <table:table-cell office:value-type="float" office:value="0.0600674711167812" calcext:value-type="float">
            <text:p>0.0600674711167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([.J30]-[.F30])^2+([.K30]-[.G30])^2)" office:value-type="float" office:value="0.526188016326328" calcext:value-type="float">
            <text:p>0.526188016326328</text:p>
          </table:table-cell>
          <table:table-cell table:formula="of:=SQRT(([.R30]-[.N30])^2+([.S30]-[.O30])^2)" office:value-type="float" office:value="0.321106932080122" calcext:value-type="float">
            <text:p>0.321106932080122</text:p>
          </table:table-cell>
          <table:table-cell table:formula="of:=SQRT(([.R30]-[.F30])^2+([.S30]-[.G30])^2)" office:value-type="float" office:value="0.997955589376117" calcext:value-type="float">
            <text:p>0.997955589376117</text:p>
          </table:table-cell>
          <table:table-cell table:formula="of:=SQRT(([.N30]-[.J30])^2+([.O30]-[.K30])^2)" office:value-type="float" office:value="1.02079084194564" calcext:value-type="float">
            <text:p>1.02079084194564</text:p>
          </table:table-cell>
          <table:table-cell office:value-type="float" office:value="0.819460034370422" calcext:value-type="float">
            <text:p>0.819460034370422</text:p>
          </table:table-cell>
          <table:table-cell office:value-type="float" office:value="0.293773651123047" calcext:value-type="float">
            <text:p>0.293773651123047</text:p>
          </table:table-cell>
          <table:table-cell office:value-type="float" office:value="-0.507762670516968" calcext:value-type="float">
            <text:p>-0.507762670516968</text:p>
          </table:table-cell>
          <table:table-cell office:value-type="float" office:value="0.999315500259399" calcext:value-type="float">
            <text:p>0.999315500259399</text:p>
          </table:table-cell>
          <table:table-cell office:value-type="float" office:value="0.293490469455719" calcext:value-type="float">
            <text:p>0.293490469455719</text:p>
          </table:table-cell>
          <table:table-cell office:value-type="float" office:value="0.308934301137924" calcext:value-type="float">
            <text:p>0.308934301137924</text:p>
          </table:table-cell>
          <table:table-cell office:value-type="float" office:value="-0.568663120269775" calcext:value-type="float">
            <text:p>-0.568663120269775</text:p>
          </table:table-cell>
          <table:table-cell office:value-type="float" office:value="0.999458372592926" calcext:value-type="float">
            <text:p>0.999458372592926</text:p>
          </table:table-cell>
          <table:table-cell office:value-type="float" office:value="0.73817241191864" calcext:value-type="float">
            <text:p>0.73817241191864</text:p>
          </table:table-cell>
          <table:table-cell office:value-type="float" office:value="1.22777700424194" calcext:value-type="float">
            <text:p>1.22777700424194</text:p>
          </table:table-cell>
          <table:table-cell office:value-type="float" office:value="0.0516799800097942" calcext:value-type="float">
            <text:p>0.0516799800097942</text:p>
          </table:table-cell>
          <table:table-cell office:value-type="float" office:value="0.051158994436264" calcext:value-type="float">
            <text:p>0.051158994436264</text:p>
          </table:table-cell>
          <table:table-cell office:value-type="float" office:value="0.417719423770905" calcext:value-type="float">
            <text:p>0.417719423770905</text:p>
          </table:table-cell>
          <table:table-cell office:value-type="float" office:value="1.20729422569275" calcext:value-type="float">
            <text:p>1.20729422569275</text:p>
          </table:table-cell>
          <table:table-cell office:value-type="float" office:value="-0.0413438156247139" calcext:value-type="float">
            <text:p>-0.0413438156247139</text:p>
          </table:table-cell>
          <table:table-cell office:value-type="float" office:value="0.0582817755639553" calcext:value-type="float">
            <text:p>0.0582817755639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([.J31]-[.F31])^2+([.K31]-[.G31])^2)" office:value-type="float" office:value="0.527346762829819" calcext:value-type="float">
            <text:p>0.527346762829819</text:p>
          </table:table-cell>
          <table:table-cell table:formula="of:=SQRT(([.R31]-[.N31])^2+([.S31]-[.O31])^2)" office:value-type="float" office:value="0.321739015933998" calcext:value-type="float">
            <text:p>0.321739015933998</text:p>
          </table:table-cell>
          <table:table-cell table:formula="of:=SQRT(([.R31]-[.F31])^2+([.S31]-[.G31])^2)" office:value-type="float" office:value="1.0060140964799" calcext:value-type="float">
            <text:p>1.0060140964799</text:p>
          </table:table-cell>
          <table:table-cell table:formula="of:=SQRT(([.N31]-[.J31])^2+([.O31]-[.K31])^2)" office:value-type="float" office:value="1.02652032412315" calcext:value-type="float">
            <text:p>1.02652032412315</text:p>
          </table:table-cell>
          <table:table-cell office:value-type="float" office:value="0.820680499076843" calcext:value-type="float">
            <text:p>0.820680499076843</text:p>
          </table:table-cell>
          <table:table-cell office:value-type="float" office:value="0.293362647294998" calcext:value-type="float">
            <text:p>0.293362647294998</text:p>
          </table:table-cell>
          <table:table-cell office:value-type="float" office:value="-0.513637125492096" calcext:value-type="float">
            <text:p>-0.513637125492096</text:p>
          </table:table-cell>
          <table:table-cell office:value-type="float" office:value="0.999325156211853" calcext:value-type="float">
            <text:p>0.999325156211853</text:p>
          </table:table-cell>
          <table:table-cell office:value-type="float" office:value="0.293526113033295" calcext:value-type="float">
            <text:p>0.293526113033295</text:p>
          </table:table-cell>
          <table:table-cell office:value-type="float" office:value="0.307605594396591" calcext:value-type="float">
            <text:p>0.307605594396591</text:p>
          </table:table-cell>
          <table:table-cell office:value-type="float" office:value="-0.565013766288757" calcext:value-type="float">
            <text:p>-0.565013766288757</text:p>
          </table:table-cell>
          <table:table-cell office:value-type="float" office:value="0.999456763267517" calcext:value-type="float">
            <text:p>0.999456763267517</text:p>
          </table:table-cell>
          <table:table-cell office:value-type="float" office:value="0.738211572170258" calcext:value-type="float">
            <text:p>0.738211572170258</text:p>
          </table:table-cell>
          <table:table-cell office:value-type="float" office:value="1.23280763626099" calcext:value-type="float">
            <text:p>1.23280763626099</text:p>
          </table:table-cell>
          <table:table-cell office:value-type="float" office:value="0.0494380593299866" calcext:value-type="float">
            <text:p>0.0494380593299866</text:p>
          </table:table-cell>
          <table:table-cell office:value-type="float" office:value="0.0498947761952877" calcext:value-type="float">
            <text:p>0.0498947761952877</text:p>
          </table:table-cell>
          <table:table-cell office:value-type="float" office:value="0.416975677013397" calcext:value-type="float">
            <text:p>0.416975677013397</text:p>
          </table:table-cell>
          <table:table-cell office:value-type="float" office:value="1.21482169628143" calcext:value-type="float">
            <text:p>1.21482169628143</text:p>
          </table:table-cell>
          <table:table-cell office:value-type="float" office:value="-0.038770891726017" calcext:value-type="float">
            <text:p>-0.038770891726017</text:p>
          </table:table-cell>
          <table:table-cell office:value-type="float" office:value="0.0565621927380562" calcext:value-type="float">
            <text:p>0.05656219273805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([.J32]-[.F32])^2+([.K32]-[.G32])^2)" office:value-type="float" office:value="0.524495170380728" calcext:value-type="float">
            <text:p>0.524495170380728</text:p>
          </table:table-cell>
          <table:table-cell table:formula="of:=SQRT(([.R32]-[.N32])^2+([.S32]-[.O32])^2)" office:value-type="float" office:value="0.322785829759752" calcext:value-type="float">
            <text:p>0.322785829759752</text:p>
          </table:table-cell>
          <table:table-cell table:formula="of:=SQRT(([.R32]-[.F32])^2+([.S32]-[.G32])^2)" office:value-type="float" office:value="1.01429401264241" calcext:value-type="float">
            <text:p>1.01429401264241</text:p>
          </table:table-cell>
          <table:table-cell table:formula="of:=SQRT(([.N32]-[.J32])^2+([.O32]-[.K32])^2)" office:value-type="float" office:value="1.02022361614655" calcext:value-type="float">
            <text:p>1.02022361614655</text:p>
          </table:table-cell>
          <table:table-cell office:value-type="float" office:value="0.818061530590057" calcext:value-type="float">
            <text:p>0.818061530590057</text:p>
          </table:table-cell>
          <table:table-cell office:value-type="float" office:value="0.28242102265358" calcext:value-type="float">
            <text:p>0.28242102265358</text:p>
          </table:table-cell>
          <table:table-cell office:value-type="float" office:value="-0.474489778280258" calcext:value-type="float">
            <text:p>-0.474489778280258</text:p>
          </table:table-cell>
          <table:table-cell office:value-type="float" office:value="0.999302506446838" calcext:value-type="float">
            <text:p>0.999302506446838</text:p>
          </table:table-cell>
          <table:table-cell office:value-type="float" office:value="0.294184237718582" calcext:value-type="float">
            <text:p>0.294184237718582</text:p>
          </table:table-cell>
          <table:table-cell office:value-type="float" office:value="0.307872265577316" calcext:value-type="float">
            <text:p>0.307872265577316</text:p>
          </table:table-cell>
          <table:table-cell office:value-type="float" office:value="-0.474959373474121" calcext:value-type="float">
            <text:p>-0.474959373474121</text:p>
          </table:table-cell>
          <table:table-cell office:value-type="float" office:value="0.999428510665894" calcext:value-type="float">
            <text:p>0.999428510665894</text:p>
          </table:table-cell>
          <table:table-cell office:value-type="float" office:value="0.740601181983948" calcext:value-type="float">
            <text:p>0.740601181983948</text:p>
          </table:table-cell>
          <table:table-cell office:value-type="float" office:value="1.2252424955368" calcext:value-type="float">
            <text:p>1.2252424955368</text:p>
          </table:table-cell>
          <table:table-cell office:value-type="float" office:value="0.0395929738879204" calcext:value-type="float">
            <text:p>0.0395929738879204</text:p>
          </table:table-cell>
          <table:table-cell office:value-type="float" office:value="0.0497419759631157" calcext:value-type="float">
            <text:p>0.0497419759631157</text:p>
          </table:table-cell>
          <table:table-cell office:value-type="float" office:value="0.417994737625122" calcext:value-type="float">
            <text:p>0.417994737625122</text:p>
          </table:table-cell>
          <table:table-cell office:value-type="float" office:value="1.21448266506195" calcext:value-type="float">
            <text:p>1.21448266506195</text:p>
          </table:table-cell>
          <table:table-cell office:value-type="float" office:value="-0.0289995018392801" calcext:value-type="float">
            <text:p>-0.0289995018392801</text:p>
          </table:table-cell>
          <table:table-cell office:value-type="float" office:value="0.0559317916631699" calcext:value-type="float">
            <text:p>0.05593179166316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([.J33]-[.F33])^2+([.K33]-[.G33])^2)" office:value-type="float" office:value="0.527607309384628" calcext:value-type="float">
            <text:p>0.527607309384628</text:p>
          </table:table-cell>
          <table:table-cell table:formula="of:=SQRT(([.R33]-[.N33])^2+([.S33]-[.O33])^2)" office:value-type="float" office:value="0.325542390783247" calcext:value-type="float">
            <text:p>0.325542390783247</text:p>
          </table:table-cell>
          <table:table-cell table:formula="of:=SQRT(([.R33]-[.F33])^2+([.S33]-[.G33])^2)" office:value-type="float" office:value="1.01701674057894" calcext:value-type="float">
            <text:p>1.01701674057894</text:p>
          </table:table-cell>
          <table:table-cell table:formula="of:=SQRT(([.N33]-[.J33])^2+([.O33]-[.K33])^2)" office:value-type="float" office:value="1.02067519743918" calcext:value-type="float">
            <text:p>1.02067519743918</text:p>
          </table:table-cell>
          <table:table-cell office:value-type="float" office:value="0.821644186973572" calcext:value-type="float">
            <text:p>0.821644186973572</text:p>
          </table:table-cell>
          <table:table-cell office:value-type="float" office:value="0.283210873603821" calcext:value-type="float">
            <text:p>0.283210873603821</text:p>
          </table:table-cell>
          <table:table-cell office:value-type="float" office:value="-0.658016860485077" calcext:value-type="float">
            <text:p>-0.658016860485077</text:p>
          </table:table-cell>
          <table:table-cell office:value-type="float" office:value="0.999334216117859" calcext:value-type="float">
            <text:p>0.999334216117859</text:p>
          </table:table-cell>
          <table:table-cell office:value-type="float" office:value="0.294617712497711" calcext:value-type="float">
            <text:p>0.294617712497711</text:p>
          </table:table-cell>
          <table:table-cell office:value-type="float" office:value="0.307960987091064" calcext:value-type="float">
            <text:p>0.307960987091064</text:p>
          </table:table-cell>
          <table:table-cell office:value-type="float" office:value="-0.667092978954315" calcext:value-type="float">
            <text:p>-0.667092978954315</text:p>
          </table:table-cell>
          <table:table-cell office:value-type="float" office:value="0.999446928501129" calcext:value-type="float">
            <text:p>0.999446928501129</text:p>
          </table:table-cell>
          <table:table-cell office:value-type="float" office:value="0.740157067775726" calcext:value-type="float">
            <text:p>0.740157067775726</text:p>
          </table:table-cell>
          <table:table-cell office:value-type="float" office:value="1.22625970840454" calcext:value-type="float">
            <text:p>1.22625970840454</text:p>
          </table:table-cell>
          <table:table-cell office:value-type="float" office:value="0.0399910099804401" calcext:value-type="float">
            <text:p>0.0399910099804401</text:p>
          </table:table-cell>
          <table:table-cell office:value-type="float" office:value="0.0486975163221359" calcext:value-type="float">
            <text:p>0.0486975163221359</text:p>
          </table:table-cell>
          <table:table-cell office:value-type="float" office:value="0.41479903459549" calcext:value-type="float">
            <text:p>0.41479903459549</text:p>
          </table:table-cell>
          <table:table-cell office:value-type="float" office:value="1.21530532836914" calcext:value-type="float">
            <text:p>1.21530532836914</text:p>
          </table:table-cell>
          <table:table-cell office:value-type="float" office:value="-0.0294466465711594" calcext:value-type="float">
            <text:p>-0.0294466465711594</text:p>
          </table:table-cell>
          <table:table-cell office:value-type="float" office:value="0.0545792914927006" calcext:value-type="float">
            <text:p>0.0545792914927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QRT(([.J34]-[.F34])^2+([.K34]-[.G34])^2)" office:value-type="float" office:value="0.52850772868449" calcext:value-type="float">
            <text:p>0.52850772868449</text:p>
          </table:table-cell>
          <table:table-cell table:formula="of:=SQRT(([.R34]-[.N34])^2+([.S34]-[.O34])^2)" office:value-type="float" office:value="0.327208193062355" calcext:value-type="float">
            <text:p>0.327208193062355</text:p>
          </table:table-cell>
          <table:table-cell table:formula="of:=SQRT(([.R34]-[.F34])^2+([.S34]-[.G34])^2)" office:value-type="float" office:value="1.02756956812473" calcext:value-type="float">
            <text:p>1.02756956812473</text:p>
          </table:table-cell>
          <table:table-cell table:formula="of:=SQRT(([.N34]-[.J34])^2+([.O34]-[.K34])^2)" office:value-type="float" office:value="1.0274536606149" calcext:value-type="float">
            <text:p>1.0274536606149</text:p>
          </table:table-cell>
          <table:table-cell office:value-type="float" office:value="0.823192477226257" calcext:value-type="float">
            <text:p>0.823192477226257</text:p>
          </table:table-cell>
          <table:table-cell office:value-type="float" office:value="0.283641219139099" calcext:value-type="float">
            <text:p>0.283641219139099</text:p>
          </table:table-cell>
          <table:table-cell office:value-type="float" office:value="-0.65186870098114" calcext:value-type="float">
            <text:p>-0.65186870098114</text:p>
          </table:table-cell>
          <table:table-cell office:value-type="float" office:value="0.999352633953095" calcext:value-type="float">
            <text:p>0.999352633953095</text:p>
          </table:table-cell>
          <table:table-cell office:value-type="float" office:value="0.295307636260986" calcext:value-type="float">
            <text:p>0.295307636260986</text:p>
          </table:table-cell>
          <table:table-cell office:value-type="float" office:value="0.309293001890183" calcext:value-type="float">
            <text:p>0.309293001890183</text:p>
          </table:table-cell>
          <table:table-cell office:value-type="float" office:value="-0.658203959465027" calcext:value-type="float">
            <text:p>-0.658203959465027</text:p>
          </table:table-cell>
          <table:table-cell office:value-type="float" office:value="0.999455690383911" calcext:value-type="float">
            <text:p>0.999455690383911</text:p>
          </table:table-cell>
          <table:table-cell office:value-type="float" office:value="0.742892503738403" calcext:value-type="float">
            <text:p>0.742892503738403</text:p>
          </table:table-cell>
          <table:table-cell office:value-type="float" office:value="1.23413288593292" calcext:value-type="float">
            <text:p>1.23413288593292</text:p>
          </table:table-cell>
          <table:table-cell office:value-type="float" office:value="0.0370068475604057" calcext:value-type="float">
            <text:p>0.0370068475604057</text:p>
          </table:table-cell>
          <table:table-cell office:value-type="float" office:value="0.0492530316114426" calcext:value-type="float">
            <text:p>0.0492530316114426</text:p>
          </table:table-cell>
          <table:table-cell office:value-type="float" office:value="0.415762364864349" calcext:value-type="float">
            <text:p>0.415762364864349</text:p>
          </table:table-cell>
          <table:table-cell office:value-type="float" office:value="1.22698628902435" calcext:value-type="float">
            <text:p>1.22698628902435</text:p>
          </table:table-cell>
          <table:table-cell office:value-type="float" office:value="-0.0265681147575378" calcext:value-type="float">
            <text:p>-0.0265681147575378</text:p>
          </table:table-cell>
          <table:table-cell office:value-type="float" office:value="0.0547858253121376" calcext:value-type="float">
            <text:p>0.05478582531213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QRT(([.J35]-[.F35])^2+([.K35]-[.G35])^2)" office:value-type="float" office:value="0.527459234785159" calcext:value-type="float">
            <text:p>0.527459234785159</text:p>
          </table:table-cell>
          <table:table-cell table:formula="of:=SQRT(([.R35]-[.N35])^2+([.S35]-[.O35])^2)" office:value-type="float" office:value="0.324787148630545" calcext:value-type="float">
            <text:p>0.324787148630545</text:p>
          </table:table-cell>
          <table:table-cell table:formula="of:=SQRT(([.R35]-[.F35])^2+([.S35]-[.G35])^2)" office:value-type="float" office:value="1.03001349097215" calcext:value-type="float">
            <text:p>1.03001349097215</text:p>
          </table:table-cell>
          <table:table-cell table:formula="of:=SQRT(([.N35]-[.J35])^2+([.O35]-[.K35])^2)" office:value-type="float" office:value="1.02758539950426" calcext:value-type="float">
            <text:p>1.02758539950426</text:p>
          </table:table-cell>
          <table:table-cell office:value-type="float" office:value="0.821965098381043" calcext:value-type="float">
            <text:p>0.821965098381043</text:p>
          </table:table-cell>
          <table:table-cell office:value-type="float" office:value="0.280638664960861" calcext:value-type="float">
            <text:p>0.280638664960861</text:p>
          </table:table-cell>
          <table:table-cell office:value-type="float" office:value="-0.579567432403565" calcext:value-type="float">
            <text:p>-0.579567432403565</text:p>
          </table:table-cell>
          <table:table-cell office:value-type="float" office:value="0.999346911907196" calcext:value-type="float">
            <text:p>0.999346911907196</text:p>
          </table:table-cell>
          <table:table-cell office:value-type="float" office:value="0.295297980308533" calcext:value-type="float">
            <text:p>0.295297980308533</text:p>
          </table:table-cell>
          <table:table-cell office:value-type="float" office:value="0.309534877538681" calcext:value-type="float">
            <text:p>0.309534877538681</text:p>
          </table:table-cell>
          <table:table-cell office:value-type="float" office:value="-0.595100343227387" calcext:value-type="float">
            <text:p>-0.595100343227387</text:p>
          </table:table-cell>
          <table:table-cell office:value-type="float" office:value="0.999455034732819" calcext:value-type="float">
            <text:p>0.999455034732819</text:p>
          </table:table-cell>
          <table:table-cell office:value-type="float" office:value="0.743880391120911" calcext:value-type="float">
            <text:p>0.743880391120911</text:p>
          </table:table-cell>
          <table:table-cell office:value-type="float" office:value="1.23403775691986" calcext:value-type="float">
            <text:p>1.23403775691986</text:p>
          </table:table-cell>
          <table:table-cell office:value-type="float" office:value="0.0341989398002625" calcext:value-type="float">
            <text:p>0.0341989398002625</text:p>
          </table:table-cell>
          <table:table-cell office:value-type="float" office:value="0.0495844893157482" calcext:value-type="float">
            <text:p>0.0495844893157482</text:p>
          </table:table-cell>
          <table:table-cell office:value-type="float" office:value="0.419138520956039" calcext:value-type="float">
            <text:p>0.419138520956039</text:p>
          </table:table-cell>
          <table:table-cell office:value-type="float" office:value="1.22861468791962" calcext:value-type="float">
            <text:p>1.22861468791962</text:p>
          </table:table-cell>
          <table:table-cell office:value-type="float" office:value="-0.0238989125937223" calcext:value-type="float">
            <text:p>-0.0238989125937223</text:p>
          </table:table-cell>
          <table:table-cell office:value-type="float" office:value="0.0551929995417595" calcext:value-type="float">
            <text:p>0.0551929995417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QRT(([.J36]-[.F36])^2+([.K36]-[.G36])^2)" office:value-type="float" office:value="0.525798936177295" calcext:value-type="float">
            <text:p>0.525798936177295</text:p>
          </table:table-cell>
          <table:table-cell table:formula="of:=SQRT(([.R36]-[.N36])^2+([.S36]-[.O36])^2)" office:value-type="float" office:value="0.324911123452003" calcext:value-type="float">
            <text:p>0.324911123452003</text:p>
          </table:table-cell>
          <table:table-cell table:formula="of:=SQRT(([.R36]-[.F36])^2+([.S36]-[.G36])^2)" office:value-type="float" office:value="1.02981165877934" calcext:value-type="float">
            <text:p>1.02981165877934</text:p>
          </table:table-cell>
          <table:table-cell table:formula="of:=SQRT(([.N36]-[.J36])^2+([.O36]-[.K36])^2)" office:value-type="float" office:value="1.02715342681177" calcext:value-type="float">
            <text:p>1.02715342681177</text:p>
          </table:table-cell>
          <table:table-cell office:value-type="float" office:value="0.821985065937042" calcext:value-type="float">
            <text:p>0.821985065937042</text:p>
          </table:table-cell>
          <table:table-cell office:value-type="float" office:value="0.280874043703079" calcext:value-type="float">
            <text:p>0.280874043703079</text:p>
          </table:table-cell>
          <table:table-cell office:value-type="float" office:value="-0.515617430210114" calcext:value-type="float">
            <text:p>-0.515617430210114</text:p>
          </table:table-cell>
          <table:table-cell office:value-type="float" office:value="0.999371349811554" calcext:value-type="float">
            <text:p>0.999371349811554</text:p>
          </table:table-cell>
          <table:table-cell office:value-type="float" office:value="0.296943098306656" calcext:value-type="float">
            <text:p>0.296943098306656</text:p>
          </table:table-cell>
          <table:table-cell office:value-type="float" office:value="0.309077829122543" calcext:value-type="float">
            <text:p>0.309077829122543</text:p>
          </table:table-cell>
          <table:table-cell office:value-type="float" office:value="-0.486474841833115" calcext:value-type="float">
            <text:p>-0.486474841833115</text:p>
          </table:table-cell>
          <table:table-cell office:value-type="float" office:value="0.999467432498932" calcext:value-type="float">
            <text:p>0.999467432498932</text:p>
          </table:table-cell>
          <table:table-cell office:value-type="float" office:value="0.743370532989502" calcext:value-type="float">
            <text:p>0.743370532989502</text:p>
          </table:table-cell>
          <table:table-cell office:value-type="float" office:value="1.23414361476898" calcext:value-type="float">
            <text:p>1.23414361476898</text:p>
          </table:table-cell>
          <table:table-cell office:value-type="float" office:value="0.0336638502776623" calcext:value-type="float">
            <text:p>0.0336638502776623</text:p>
          </table:table-cell>
          <table:table-cell office:value-type="float" office:value="0.0498308651149273" calcext:value-type="float">
            <text:p>0.0498308651149273</text:p>
          </table:table-cell>
          <table:table-cell office:value-type="float" office:value="0.418510973453522" calcext:value-type="float">
            <text:p>0.418510973453522</text:p>
          </table:table-cell>
          <table:table-cell office:value-type="float" office:value="1.22835528850555" calcext:value-type="float">
            <text:p>1.22835528850555</text:p>
          </table:table-cell>
          <table:table-cell office:value-type="float" office:value="-0.0234437547624111" calcext:value-type="float">
            <text:p>-0.0234437547624111</text:p>
          </table:table-cell>
          <table:table-cell office:value-type="float" office:value="0.0552468299865723" calcext:value-type="float">
            <text:p>0.05524682998657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QRT(([.J37]-[.F37])^2+([.K37]-[.G37])^2)" office:value-type="float" office:value="0.527933503493621" calcext:value-type="float">
            <text:p>0.527933503493621</text:p>
          </table:table-cell>
          <table:table-cell table:formula="of:=SQRT(([.R37]-[.N37])^2+([.S37]-[.O37])^2)" office:value-type="float" office:value="0.325143330766378" calcext:value-type="float">
            <text:p>0.325143330766378</text:p>
          </table:table-cell>
          <table:table-cell table:formula="of:=SQRT(([.R37]-[.F37])^2+([.S37]-[.G37])^2)" office:value-type="float" office:value="1.03284559779127" calcext:value-type="float">
            <text:p>1.03284559779127</text:p>
          </table:table-cell>
          <table:table-cell table:formula="of:=SQRT(([.N37]-[.J37])^2+([.O37]-[.K37])^2)" office:value-type="float" office:value="1.03497716692423" calcext:value-type="float">
            <text:p>1.03497716692423</text:p>
          </table:table-cell>
          <table:table-cell office:value-type="float" office:value="0.824517905712128" calcext:value-type="float">
            <text:p>0.824517905712128</text:p>
          </table:table-cell>
          <table:table-cell office:value-type="float" office:value="0.286039978265762" calcext:value-type="float">
            <text:p>0.286039978265762</text:p>
          </table:table-cell>
          <table:table-cell office:value-type="float" office:value="-0.555222034454346" calcext:value-type="float">
            <text:p>-0.555222034454346</text:p>
          </table:table-cell>
          <table:table-cell office:value-type="float" office:value="0.9993816614151" calcext:value-type="float">
            <text:p>0.9993816614151</text:p>
          </table:table-cell>
          <table:table-cell office:value-type="float" office:value="0.297152429819107" calcext:value-type="float">
            <text:p>0.297152429819107</text:p>
          </table:table-cell>
          <table:table-cell office:value-type="float" office:value="0.310523420572281" calcext:value-type="float">
            <text:p>0.310523420572281</text:p>
          </table:table-cell>
          <table:table-cell office:value-type="float" office:value="-0.527829349040985" calcext:value-type="float">
            <text:p>-0.527829349040985</text:p>
          </table:table-cell>
          <table:table-cell office:value-type="float" office:value="0.999467551708221" calcext:value-type="float">
            <text:p>0.999467551708221</text:p>
          </table:table-cell>
          <table:table-cell office:value-type="float" office:value="0.743641078472138" calcext:value-type="float">
            <text:p>0.743641078472138</text:p>
          </table:table-cell>
          <table:table-cell office:value-type="float" office:value="1.24423944950104" calcext:value-type="float">
            <text:p>1.24423944950104</text:p>
          </table:table-cell>
          <table:table-cell office:value-type="float" office:value="0.0250026024878025" calcext:value-type="float">
            <text:p>0.0250026024878025</text:p>
          </table:table-cell>
          <table:table-cell office:value-type="float" office:value="0.0490379109978676" calcext:value-type="float">
            <text:p>0.0490379109978676</text:p>
          </table:table-cell>
          <table:table-cell office:value-type="float" office:value="0.418607801198959" calcext:value-type="float">
            <text:p>0.418607801198959</text:p>
          </table:table-cell>
          <table:table-cell office:value-type="float" office:value="1.2357804775238" calcext:value-type="float">
            <text:p>1.2357804775238</text:p>
          </table:table-cell>
          <table:table-cell office:value-type="float" office:value="-0.0146394642069936" calcext:value-type="float">
            <text:p>-0.0146394642069936</text:p>
          </table:table-cell>
          <table:table-cell office:value-type="float" office:value="0.0540860146284103" calcext:value-type="float">
            <text:p>0.0540860146284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QRT(([.J38]-[.F38])^2+([.K38]-[.G38])^2)" office:value-type="float" office:value="0.529254140824619" calcext:value-type="float">
            <text:p>0.529254140824619</text:p>
          </table:table-cell>
          <table:table-cell table:formula="of:=SQRT(([.R38]-[.N38])^2+([.S38]-[.O38])^2)" office:value-type="float" office:value="0.323891256917364" calcext:value-type="float">
            <text:p>0.323891256917364</text:p>
          </table:table-cell>
          <table:table-cell table:formula="of:=SQRT(([.R38]-[.F38])^2+([.S38]-[.G38])^2)" office:value-type="float" office:value="1.03662592219458" calcext:value-type="float">
            <text:p>1.03662592219458</text:p>
          </table:table-cell>
          <table:table-cell table:formula="of:=SQRT(([.N38]-[.J38])^2+([.O38]-[.K38])^2)" office:value-type="float" office:value="1.030416946694" calcext:value-type="float">
            <text:p>1.030416946694</text:p>
          </table:table-cell>
          <table:table-cell office:value-type="float" office:value="0.823787093162537" calcext:value-type="float">
            <text:p>0.823787093162537</text:p>
          </table:table-cell>
          <table:table-cell office:value-type="float" office:value="0.279929310083389" calcext:value-type="float">
            <text:p>0.279929310083389</text:p>
          </table:table-cell>
          <table:table-cell office:value-type="float" office:value="-0.49479341506958" calcext:value-type="float">
            <text:p>-0.49479341506958</text:p>
          </table:table-cell>
          <table:table-cell office:value-type="float" office:value="0.999419391155243" calcext:value-type="float">
            <text:p>0.999419391155243</text:p>
          </table:table-cell>
          <table:table-cell office:value-type="float" office:value="0.295624792575836" calcext:value-type="float">
            <text:p>0.295624792575836</text:p>
          </table:table-cell>
          <table:table-cell office:value-type="float" office:value="0.31390768289566" calcext:value-type="float">
            <text:p>0.31390768289566</text:p>
          </table:table-cell>
          <table:table-cell office:value-type="float" office:value="-0.519749283790588" calcext:value-type="float">
            <text:p>-0.519749283790588</text:p>
          </table:table-cell>
          <table:table-cell office:value-type="float" office:value="0.99949312210083" calcext:value-type="float">
            <text:p>0.99949312210083</text:p>
          </table:table-cell>
          <table:table-cell office:value-type="float" office:value="0.746159911155701" calcext:value-type="float">
            <text:p>0.746159911155701</text:p>
          </table:table-cell>
          <table:table-cell office:value-type="float" office:value="1.24061000347137" calcext:value-type="float">
            <text:p>1.24061000347137</text:p>
          </table:table-cell>
          <table:table-cell office:value-type="float" office:value="0.0254795737564564" calcext:value-type="float">
            <text:p>0.0254795737564564</text:p>
          </table:table-cell>
          <table:table-cell office:value-type="float" office:value="0.04747474193573" calcext:value-type="float">
            <text:p>0.04747474193573</text:p>
          </table:table-cell>
          <table:table-cell office:value-type="float" office:value="0.422306597232819" calcext:value-type="float">
            <text:p>0.422306597232819</text:p>
          </table:table-cell>
          <table:table-cell office:value-type="float" office:value="1.23565244674683" calcext:value-type="float">
            <text:p>1.23565244674683</text:p>
          </table:table-cell>
          <table:table-cell office:value-type="float" office:value="-0.0151476059108973" calcext:value-type="float">
            <text:p>-0.0151476059108973</text:p>
          </table:table-cell>
          <table:table-cell office:value-type="float" office:value="0.051928699016571" calcext:value-type="float">
            <text:p>0.0519286990165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QRT(([.J39]-[.F39])^2+([.K39]-[.G39])^2)" office:value-type="float" office:value="0.529132414776999" calcext:value-type="float">
            <text:p>0.529132414776999</text:p>
          </table:table-cell>
          <table:table-cell table:formula="of:=SQRT(([.R39]-[.N39])^2+([.S39]-[.O39])^2)" office:value-type="float" office:value="0.323397794068073" calcext:value-type="float">
            <text:p>0.323397794068073</text:p>
          </table:table-cell>
          <table:table-cell table:formula="of:=SQRT(([.R39]-[.F39])^2+([.S39]-[.G39])^2)" office:value-type="float" office:value="1.03605864903103" calcext:value-type="float">
            <text:p>1.03605864903103</text:p>
          </table:table-cell>
          <table:table-cell table:formula="of:=SQRT(([.N39]-[.J39])^2+([.O39]-[.K39])^2)" office:value-type="float" office:value="1.03116665205059" calcext:value-type="float">
            <text:p>1.03116665205059</text:p>
          </table:table-cell>
          <table:table-cell office:value-type="float" office:value="0.824246406555176" calcext:value-type="float">
            <text:p>0.824246406555176</text:p>
          </table:table-cell>
          <table:table-cell office:value-type="float" office:value="0.28089627623558" calcext:value-type="float">
            <text:p>0.28089627623558</text:p>
          </table:table-cell>
          <table:table-cell office:value-type="float" office:value="-0.498001247644424" calcext:value-type="float">
            <text:p>-0.498001247644424</text:p>
          </table:table-cell>
          <table:table-cell office:value-type="float" office:value="0.999444842338562" calcext:value-type="float">
            <text:p>0.999444842338562</text:p>
          </table:table-cell>
          <table:table-cell office:value-type="float" office:value="0.296193391084671" calcext:value-type="float">
            <text:p>0.296193391084671</text:p>
          </table:table-cell>
          <table:table-cell office:value-type="float" office:value="0.314676821231842" calcext:value-type="float">
            <text:p>0.314676821231842</text:p>
          </table:table-cell>
          <table:table-cell office:value-type="float" office:value="-0.577251315116882" calcext:value-type="float">
            <text:p>-0.577251315116882</text:p>
          </table:table-cell>
          <table:table-cell office:value-type="float" office:value="0.999514698982239" calcext:value-type="float">
            <text:p>0.999514698982239</text:p>
          </table:table-cell>
          <table:table-cell office:value-type="float" office:value="0.744835138320923" calcext:value-type="float">
            <text:p>0.744835138320923</text:p>
          </table:table-cell>
          <table:table-cell office:value-type="float" office:value="1.24312996864319" calcext:value-type="float">
            <text:p>1.24312996864319</text:p>
          </table:table-cell>
          <table:table-cell office:value-type="float" office:value="0.0456438437104225" calcext:value-type="float">
            <text:p>0.0456438437104225</text:p>
          </table:table-cell>
          <table:table-cell office:value-type="float" office:value="0.0494165308773518" calcext:value-type="float">
            <text:p>0.0494165308773518</text:p>
          </table:table-cell>
          <table:table-cell office:value-type="float" office:value="0.421527773141861" calcext:value-type="float">
            <text:p>0.421527773141861</text:p>
          </table:table-cell>
          <table:table-cell office:value-type="float" office:value="1.23548269271851" calcext:value-type="float">
            <text:p>1.23548269271851</text:p>
          </table:table-cell>
          <table:table-cell office:value-type="float" office:value="-0.0361990891396999" calcext:value-type="float">
            <text:p>-0.0361990891396999</text:p>
          </table:table-cell>
          <table:table-cell office:value-type="float" office:value="0.0542169883847237" calcext:value-type="float">
            <text:p>0.05421698838472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QRT(([.J40]-[.F40])^2+([.K40]-[.G40])^2)" office:value-type="float" office:value="0.531926774505224" calcext:value-type="float">
            <text:p>0.531926774505224</text:p>
          </table:table-cell>
          <table:table-cell table:formula="of:=SQRT(([.R40]-[.N40])^2+([.S40]-[.O40])^2)" office:value-type="float" office:value="0.325643378174687" calcext:value-type="float">
            <text:p>0.325643378174687</text:p>
          </table:table-cell>
          <table:table-cell table:formula="of:=SQRT(([.R40]-[.F40])^2+([.S40]-[.G40])^2)" office:value-type="float" office:value="1.04108023991967" calcext:value-type="float">
            <text:p>1.04108023991967</text:p>
          </table:table-cell>
          <table:table-cell table:formula="of:=SQRT(([.N40]-[.J40])^2+([.O40]-[.K40])^2)" office:value-type="float" office:value="1.03993368074197" calcext:value-type="float">
            <text:p>1.03993368074197</text:p>
          </table:table-cell>
          <table:table-cell office:value-type="float" office:value="0.827239871025085" calcext:value-type="float">
            <text:p>0.827239871025085</text:p>
          </table:table-cell>
          <table:table-cell office:value-type="float" office:value="0.283442854881287" calcext:value-type="float">
            <text:p>0.283442854881287</text:p>
          </table:table-cell>
          <table:table-cell office:value-type="float" office:value="-0.499781042337418" calcext:value-type="float">
            <text:p>-0.499781042337418</text:p>
          </table:table-cell>
          <table:table-cell office:value-type="float" office:value="0.999467372894287" calcext:value-type="float">
            <text:p>0.999467372894287</text:p>
          </table:table-cell>
          <table:table-cell office:value-type="float" office:value="0.296211659908295" calcext:value-type="float">
            <text:p>0.296211659908295</text:p>
          </table:table-cell>
          <table:table-cell office:value-type="float" office:value="0.314348071813583" calcext:value-type="float">
            <text:p>0.314348071813583</text:p>
          </table:table-cell>
          <table:table-cell office:value-type="float" office:value="-0.52461165189743" calcext:value-type="float">
            <text:p>-0.52461165189743</text:p>
          </table:table-cell>
          <table:table-cell office:value-type="float" office:value="0.999523162841797" calcext:value-type="float">
            <text:p>0.999523162841797</text:p>
          </table:table-cell>
          <table:table-cell office:value-type="float" office:value="0.744763195514679" calcext:value-type="float">
            <text:p>0.744763195514679</text:p>
          </table:table-cell>
          <table:table-cell office:value-type="float" office:value="1.25257170200348" calcext:value-type="float">
            <text:p>1.25257170200348</text:p>
          </table:table-cell>
          <table:table-cell office:value-type="float" office:value="0.0393354631960392" calcext:value-type="float">
            <text:p>0.0393354631960392</text:p>
          </table:table-cell>
          <table:table-cell office:value-type="float" office:value="0.0496075041592121" calcext:value-type="float">
            <text:p>0.0496075041592121</text:p>
          </table:table-cell>
          <table:table-cell office:value-type="float" office:value="0.419315755367279" calcext:value-type="float">
            <text:p>0.419315755367279</text:p>
          </table:table-cell>
          <table:table-cell office:value-type="float" office:value="1.24127686023712" calcext:value-type="float">
            <text:p>1.24127686023712</text:p>
          </table:table-cell>
          <table:table-cell office:value-type="float" office:value="-0.0298613905906677" calcext:value-type="float">
            <text:p>-0.0298613905906677</text:p>
          </table:table-cell>
          <table:table-cell office:value-type="float" office:value="0.0539372228085995" calcext:value-type="float">
            <text:p>0.0539372228085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([.J41]-[.F41])^2+([.K41]-[.G41])^2)" office:value-type="float" office:value="0.534076408131928" calcext:value-type="float">
            <text:p>0.534076408131928</text:p>
          </table:table-cell>
          <table:table-cell table:formula="of:=SQRT(([.R41]-[.N41])^2+([.S41]-[.O41])^2)" office:value-type="float" office:value="0.330068107095954" calcext:value-type="float">
            <text:p>0.330068107095954</text:p>
          </table:table-cell>
          <table:table-cell table:formula="of:=SQRT(([.R41]-[.F41])^2+([.S41]-[.G41])^2)" office:value-type="float" office:value="1.04183915328583" calcext:value-type="float">
            <text:p>1.04183915328583</text:p>
          </table:table-cell>
          <table:table-cell table:formula="of:=SQRT(([.N41]-[.J41])^2+([.O41]-[.K41])^2)" office:value-type="float" office:value="1.04120209430088" calcext:value-type="float">
            <text:p>1.04120209430088</text:p>
          </table:table-cell>
          <table:table-cell office:value-type="float" office:value="0.829409241676331" calcext:value-type="float">
            <text:p>0.829409241676331</text:p>
          </table:table-cell>
          <table:table-cell office:value-type="float" office:value="0.283701628446579" calcext:value-type="float">
            <text:p>0.283701628446579</text:p>
          </table:table-cell>
          <table:table-cell office:value-type="float" office:value="-0.76021945476532" calcext:value-type="float">
            <text:p>-0.76021945476532</text:p>
          </table:table-cell>
          <table:table-cell office:value-type="float" office:value="0.999455809593201" calcext:value-type="float">
            <text:p>0.999455809593201</text:p>
          </table:table-cell>
          <table:table-cell office:value-type="float" office:value="0.296231597661972" calcext:value-type="float">
            <text:p>0.296231597661972</text:p>
          </table:table-cell>
          <table:table-cell office:value-type="float" office:value="0.314672738313675" calcext:value-type="float">
            <text:p>0.314672738313675</text:p>
          </table:table-cell>
          <table:table-cell office:value-type="float" office:value="-0.72774338722229" calcext:value-type="float">
            <text:p>-0.72774338722229</text:p>
          </table:table-cell>
          <table:table-cell office:value-type="float" office:value="0.999518513679504" calcext:value-type="float">
            <text:p>0.999518513679504</text:p>
          </table:table-cell>
          <table:table-cell office:value-type="float" office:value="0.749312281608582" calcext:value-type="float">
            <text:p>0.749312281608582</text:p>
          </table:table-cell>
          <table:table-cell office:value-type="float" office:value="1.2521265745163" calcext:value-type="float">
            <text:p>1.2521265745163</text:p>
          </table:table-cell>
          <table:table-cell office:value-type="float" office:value="0.0243076607584953" calcext:value-type="float">
            <text:p>0.0243076607584953</text:p>
          </table:table-cell>
          <table:table-cell office:value-type="float" office:value="0.0508519820868969" calcext:value-type="float">
            <text:p>0.0508519820868969</text:p>
          </table:table-cell>
          <table:table-cell office:value-type="float" office:value="0.419416010379791" calcext:value-type="float">
            <text:p>0.419416010379791</text:p>
          </table:table-cell>
          <table:table-cell office:value-type="float" office:value="1.24147737026215" calcext:value-type="float">
            <text:p>1.24147737026215</text:p>
          </table:table-cell>
          <table:table-cell office:value-type="float" office:value="-0.0143050970509648" calcext:value-type="float">
            <text:p>-0.0143050970509648</text:p>
          </table:table-cell>
          <table:table-cell office:value-type="float" office:value="0.0548795349895954" calcext:value-type="float">
            <text:p>0.05487953498959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QRT(([.J42]-[.F42])^2+([.K42]-[.G42])^2)" office:value-type="float" office:value="0.533038750093456" calcext:value-type="float">
            <text:p>0.533038750093456</text:p>
          </table:table-cell>
          <table:table-cell table:formula="of:=SQRT(([.R42]-[.N42])^2+([.S42]-[.O42])^2)" office:value-type="float" office:value="0.332048397688448" calcext:value-type="float">
            <text:p>0.332048397688448</text:p>
          </table:table-cell>
          <table:table-cell table:formula="of:=SQRT(([.R42]-[.F42])^2+([.S42]-[.G42])^2)" office:value-type="float" office:value="1.04433051688602" calcext:value-type="float">
            <text:p>1.04433051688602</text:p>
          </table:table-cell>
          <table:table-cell table:formula="of:=SQRT(([.N42]-[.J42])^2+([.O42]-[.K42])^2)" office:value-type="float" office:value="1.04321078612614" calcext:value-type="float">
            <text:p>1.04321078612614</text:p>
          </table:table-cell>
          <table:table-cell office:value-type="float" office:value="0.830611407756805" calcext:value-type="float">
            <text:p>0.830611407756805</text:p>
          </table:table-cell>
          <table:table-cell office:value-type="float" office:value="0.282025545835495" calcext:value-type="float">
            <text:p>0.282025545835495</text:p>
          </table:table-cell>
          <table:table-cell office:value-type="float" office:value="-0.583835303783417" calcext:value-type="float">
            <text:p>-0.583835303783417</text:p>
          </table:table-cell>
          <table:table-cell office:value-type="float" office:value="0.999468445777893" calcext:value-type="float">
            <text:p>0.999468445777893</text:p>
          </table:table-cell>
          <table:table-cell office:value-type="float" office:value="0.298403859138489" calcext:value-type="float">
            <text:p>0.298403859138489</text:p>
          </table:table-cell>
          <table:table-cell office:value-type="float" office:value="0.311781793832779" calcext:value-type="float">
            <text:p>0.311781793832779</text:p>
          </table:table-cell>
          <table:table-cell office:value-type="float" office:value="-0.529391467571259" calcext:value-type="float">
            <text:p>-0.529391467571259</text:p>
          </table:table-cell>
          <table:table-cell office:value-type="float" office:value="0.999519228935242" calcext:value-type="float">
            <text:p>0.999519228935242</text:p>
          </table:table-cell>
          <table:table-cell office:value-type="float" office:value="0.749775052070618" calcext:value-type="float">
            <text:p>0.749775052070618</text:p>
          </table:table-cell>
          <table:table-cell office:value-type="float" office:value="1.25228846073151" calcext:value-type="float">
            <text:p>1.25228846073151</text:p>
          </table:table-cell>
          <table:table-cell office:value-type="float" office:value="0.0254386514425278" calcext:value-type="float">
            <text:p>0.0254386514425278</text:p>
          </table:table-cell>
          <table:table-cell office:value-type="float" office:value="0.0508462302386761" calcext:value-type="float">
            <text:p>0.0508462302386761</text:p>
          </table:table-cell>
          <table:table-cell office:value-type="float" office:value="0.417906910181046" calcext:value-type="float">
            <text:p>0.417906910181046</text:p>
          </table:table-cell>
          <table:table-cell office:value-type="float" office:value="1.24134886264801" calcext:value-type="float">
            <text:p>1.24134886264801</text:p>
          </table:table-cell>
          <table:table-cell office:value-type="float" office:value="-0.0152528090402484" calcext:value-type="float">
            <text:p>-0.0152528090402484</text:p>
          </table:table-cell>
          <table:table-cell office:value-type="float" office:value="0.054852232336998" calcext:value-type="float">
            <text:p>0.0548522323369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QRT(([.J43]-[.F43])^2+([.K43]-[.G43])^2)" office:value-type="float" office:value="0.532658852452766" calcext:value-type="float">
            <text:p>0.532658852452766</text:p>
          </table:table-cell>
          <table:table-cell table:formula="of:=SQRT(([.R43]-[.N43])^2+([.S43]-[.O43])^2)" office:value-type="float" office:value="0.330790191639869" calcext:value-type="float">
            <text:p>0.330790191639869</text:p>
          </table:table-cell>
          <table:table-cell table:formula="of:=SQRT(([.R43]-[.F43])^2+([.S43]-[.G43])^2)" office:value-type="float" office:value="1.04534118748289" calcext:value-type="float">
            <text:p>1.04534118748289</text:p>
          </table:table-cell>
          <table:table-cell table:formula="of:=SQRT(([.N43]-[.J43])^2+([.O43]-[.K43])^2)" office:value-type="float" office:value="1.04333835723642" calcext:value-type="float">
            <text:p>1.04333835723642</text:p>
          </table:table-cell>
          <table:table-cell office:value-type="float" office:value="0.830562949180603" calcext:value-type="float">
            <text:p>0.830562949180603</text:p>
          </table:table-cell>
          <table:table-cell office:value-type="float" office:value="0.281228363513947" calcext:value-type="float">
            <text:p>0.281228363513947</text:p>
          </table:table-cell>
          <table:table-cell office:value-type="float" office:value="-0.552033960819244" calcext:value-type="float">
            <text:p>-0.552033960819244</text:p>
          </table:table-cell>
          <table:table-cell office:value-type="float" office:value="0.999487936496735" calcext:value-type="float">
            <text:p>0.999487936496735</text:p>
          </table:table-cell>
          <table:table-cell office:value-type="float" office:value="0.298767358064652" calcext:value-type="float">
            <text:p>0.298767358064652</text:p>
          </table:table-cell>
          <table:table-cell office:value-type="float" office:value="0.311541765928268" calcext:value-type="float">
            <text:p>0.311541765928268</text:p>
          </table:table-cell>
          <table:table-cell office:value-type="float" office:value="-0.505376875400543" calcext:value-type="float">
            <text:p>-0.505376875400543</text:p>
          </table:table-cell>
          <table:table-cell office:value-type="float" office:value="0.999533653259277" calcext:value-type="float">
            <text:p>0.999533653259277</text:p>
          </table:table-cell>
          <table:table-cell office:value-type="float" office:value="0.748332619667053" calcext:value-type="float">
            <text:p>0.748332619667053</text:p>
          </table:table-cell>
          <table:table-cell office:value-type="float" office:value="1.25305438041687" calcext:value-type="float">
            <text:p>1.25305438041687</text:p>
          </table:table-cell>
          <table:table-cell office:value-type="float" office:value="0.0232030488550663" calcext:value-type="float">
            <text:p>0.0232030488550663</text:p>
          </table:table-cell>
          <table:table-cell office:value-type="float" office:value="0.0508720092475414" calcext:value-type="float">
            <text:p>0.0508720092475414</text:p>
          </table:table-cell>
          <table:table-cell office:value-type="float" office:value="0.417740762233734" calcext:value-type="float">
            <text:p>0.417740762233734</text:p>
          </table:table-cell>
          <table:table-cell office:value-type="float" office:value="1.24160122871399" calcext:value-type="float">
            <text:p>1.24160122871399</text:p>
          </table:table-cell>
          <table:table-cell office:value-type="float" office:value="-0.0130806658416986" calcext:value-type="float">
            <text:p>-0.0130806658416986</text:p>
          </table:table-cell>
          <table:table-cell office:value-type="float" office:value="0.0547623299062252" calcext:value-type="float">
            <text:p>0.05476232990622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QRT(([.J44]-[.F44])^2+([.K44]-[.G44])^2)" office:value-type="float" office:value="0.532913996128049" calcext:value-type="float">
            <text:p>0.532913996128049</text:p>
          </table:table-cell>
          <table:table-cell table:formula="of:=SQRT(([.R44]-[.N44])^2+([.S44]-[.O44])^2)" office:value-type="float" office:value="0.331050876802187" calcext:value-type="float">
            <text:p>0.331050876802187</text:p>
          </table:table-cell>
          <table:table-cell table:formula="of:=SQRT(([.R44]-[.F44])^2+([.S44]-[.G44])^2)" office:value-type="float" office:value="1.04662883499666" calcext:value-type="float">
            <text:p>1.04662883499666</text:p>
          </table:table-cell>
          <table:table-cell table:formula="of:=SQRT(([.N44]-[.J44])^2+([.O44]-[.K44])^2)" office:value-type="float" office:value="1.04471324423197" calcext:value-type="float">
            <text:p>1.04471324423197</text:p>
          </table:table-cell>
          <table:table-cell office:value-type="float" office:value="0.830841660499573" calcext:value-type="float">
            <text:p>0.830841660499573</text:p>
          </table:table-cell>
          <table:table-cell office:value-type="float" office:value="0.281494826078415" calcext:value-type="float">
            <text:p>0.281494826078415</text:p>
          </table:table-cell>
          <table:table-cell office:value-type="float" office:value="-0.609356880187988" calcext:value-type="float">
            <text:p>-0.609356880187988</text:p>
          </table:table-cell>
          <table:table-cell office:value-type="float" office:value="0.999487280845642" calcext:value-type="float">
            <text:p>0.999487280845642</text:p>
          </table:table-cell>
          <table:table-cell office:value-type="float" office:value="0.298778176307678" calcext:value-type="float">
            <text:p>0.298778176307678</text:p>
          </table:table-cell>
          <table:table-cell office:value-type="float" office:value="0.311590939760208" calcext:value-type="float">
            <text:p>0.311590939760208</text:p>
          </table:table-cell>
          <table:table-cell office:value-type="float" office:value="-0.522975623607636" calcext:value-type="float">
            <text:p>-0.522975623607636</text:p>
          </table:table-cell>
          <table:table-cell office:value-type="float" office:value="0.999524295330048" calcext:value-type="float">
            <text:p>0.999524295330048</text:p>
          </table:table-cell>
          <table:table-cell office:value-type="float" office:value="0.748441278934479" calcext:value-type="float">
            <text:p>0.748441278934479</text:p>
          </table:table-cell>
          <table:table-cell office:value-type="float" office:value="1.25458025932312" calcext:value-type="float">
            <text:p>1.25458025932312</text:p>
          </table:table-cell>
          <table:table-cell office:value-type="float" office:value="0.0175008755177259" calcext:value-type="float">
            <text:p>0.0175008755177259</text:p>
          </table:table-cell>
          <table:table-cell office:value-type="float" office:value="0.0517784468829632" calcext:value-type="float">
            <text:p>0.0517784468829632</text:p>
          </table:table-cell>
          <table:table-cell office:value-type="float" office:value="0.41759005188942" calcext:value-type="float">
            <text:p>0.41759005188942</text:p>
          </table:table-cell>
          <table:table-cell office:value-type="float" office:value="1.24308466911316" calcext:value-type="float">
            <text:p>1.24308466911316</text:p>
          </table:table-cell>
          <table:table-cell office:value-type="float" office:value="-0.00752813881263137" calcext:value-type="float">
            <text:p>-0.00752813881263137</text:p>
          </table:table-cell>
          <table:table-cell office:value-type="float" office:value="0.0554618276655674" calcext:value-type="float">
            <text:p>0.05546182766556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QRT(([.J45]-[.F45])^2+([.K45]-[.G45])^2)" office:value-type="float" office:value="0.533163909406232" calcext:value-type="float">
            <text:p>0.533163909406232</text:p>
          </table:table-cell>
          <table:table-cell table:formula="of:=SQRT(([.R45]-[.N45])^2+([.S45]-[.O45])^2)" office:value-type="float" office:value="0.332471629239313" calcext:value-type="float">
            <text:p>0.332471629239313</text:p>
          </table:table-cell>
          <table:table-cell table:formula="of:=SQRT(([.R45]-[.F45])^2+([.S45]-[.G45])^2)" office:value-type="float" office:value="1.04815600283357" calcext:value-type="float">
            <text:p>1.04815600283357</text:p>
          </table:table-cell>
          <table:table-cell table:formula="of:=SQRT(([.N45]-[.J45])^2+([.O45]-[.K45])^2)" office:value-type="float" office:value="1.04266395462436" calcext:value-type="float">
            <text:p>1.04266395462436</text:p>
          </table:table-cell>
          <table:table-cell office:value-type="float" office:value="0.831044495105743" calcext:value-type="float">
            <text:p>0.831044495105743</text:p>
          </table:table-cell>
          <table:table-cell office:value-type="float" office:value="0.281373769044876" calcext:value-type="float">
            <text:p>0.281373769044876</text:p>
          </table:table-cell>
          <table:table-cell office:value-type="float" office:value="-0.52509868144989" calcext:value-type="float">
            <text:p>-0.52509868144989</text:p>
          </table:table-cell>
          <table:table-cell office:value-type="float" office:value="0.999500334262848" calcext:value-type="float">
            <text:p>0.999500334262848</text:p>
          </table:table-cell>
          <table:table-cell office:value-type="float" office:value="0.298803001642227" calcext:value-type="float">
            <text:p>0.298803001642227</text:p>
          </table:table-cell>
          <table:table-cell office:value-type="float" office:value="0.312722563743591" calcext:value-type="float">
            <text:p>0.312722563743591</text:p>
          </table:table-cell>
          <table:table-cell office:value-type="float" office:value="-0.403347253799439" calcext:value-type="float">
            <text:p>-0.403347253799439</text:p>
          </table:table-cell>
          <table:table-cell office:value-type="float" office:value="0.999534368515015" calcext:value-type="float">
            <text:p>0.999534368515015</text:p>
          </table:table-cell>
          <table:table-cell office:value-type="float" office:value="0.746296048164368" calcext:value-type="float">
            <text:p>0.746296048164368</text:p>
          </table:table-cell>
          <table:table-cell office:value-type="float" office:value="1.25447523593903" calcext:value-type="float">
            <text:p>1.25447523593903</text:p>
          </table:table-cell>
          <table:table-cell office:value-type="float" office:value="0.00724906008690596" calcext:value-type="float">
            <text:p>0.00724906008690596</text:p>
          </table:table-cell>
          <table:table-cell office:value-type="float" office:value="0.0521507188677788" calcext:value-type="float">
            <text:p>0.0521507188677788</text:p>
          </table:table-cell>
          <table:table-cell office:value-type="float" office:value="0.414022535085678" calcext:value-type="float">
            <text:p>0.414022535085678</text:p>
          </table:table-cell>
          <table:table-cell office:value-type="float" office:value="1.24299931526184" calcext:value-type="float">
            <text:p>1.24299931526184</text:p>
          </table:table-cell>
          <table:table-cell office:value-type="float" office:value="0.00267699779942632" calcext:value-type="float">
            <text:p>0.00267699779942632</text:p>
          </table:table-cell>
          <table:table-cell office:value-type="float" office:value="0.055603813380003" calcext:value-type="float">
            <text:p>0.055603813380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QRT(([.J46]-[.F46])^2+([.K46]-[.G46])^2)" office:value-type="float" office:value="0.53461002345805" calcext:value-type="float">
            <text:p>0.53461002345805</text:p>
          </table:table-cell>
          <table:table-cell table:formula="of:=SQRT(([.R46]-[.N46])^2+([.S46]-[.O46])^2)" office:value-type="float" office:value="0.331574767196154" calcext:value-type="float">
            <text:p>0.331574767196154</text:p>
          </table:table-cell>
          <table:table-cell table:formula="of:=SQRT(([.R46]-[.F46])^2+([.S46]-[.G46])^2)" office:value-type="float" office:value="1.0486589009432" calcext:value-type="float">
            <text:p>1.0486589009432</text:p>
          </table:table-cell>
          <table:table-cell table:formula="of:=SQRT(([.N46]-[.J46])^2+([.O46]-[.K46])^2)" office:value-type="float" office:value="1.04274979977017" calcext:value-type="float">
            <text:p>1.04274979977017</text:p>
          </table:table-cell>
          <table:table-cell office:value-type="float" office:value="0.832513332366943" calcext:value-type="float">
            <text:p>0.832513332366943</text:p>
          </table:table-cell>
          <table:table-cell office:value-type="float" office:value="0.281079351902008" calcext:value-type="float">
            <text:p>0.281079351902008</text:p>
          </table:table-cell>
          <table:table-cell office:value-type="float" office:value="-0.529456198215485" calcext:value-type="float">
            <text:p>-0.529456198215485</text:p>
          </table:table-cell>
          <table:table-cell office:value-type="float" office:value="0.999478697776794" calcext:value-type="float">
            <text:p>0.999478697776794</text:p>
          </table:table-cell>
          <table:table-cell office:value-type="float" office:value="0.298814833164215" calcext:value-type="float">
            <text:p>0.298814833164215</text:p>
          </table:table-cell>
          <table:table-cell office:value-type="float" office:value="0.31228494644165" calcext:value-type="float">
            <text:p>0.31228494644165</text:p>
          </table:table-cell>
          <table:table-cell office:value-type="float" office:value="-0.479499399662018" calcext:value-type="float">
            <text:p>-0.479499399662018</text:p>
          </table:table-cell>
          <table:table-cell office:value-type="float" office:value="0.999520063400269" calcext:value-type="float">
            <text:p>0.999520063400269</text:p>
          </table:table-cell>
          <table:table-cell office:value-type="float" office:value="0.745597958564758" calcext:value-type="float">
            <text:p>0.745597958564758</text:p>
          </table:table-cell>
          <table:table-cell office:value-type="float" office:value="1.25446963310242" calcext:value-type="float">
            <text:p>1.25446963310242</text:p>
          </table:table-cell>
          <table:table-cell office:value-type="float" office:value="0.00874280091375113" calcext:value-type="float">
            <text:p>0.00874280091375113</text:p>
          </table:table-cell>
          <table:table-cell office:value-type="float" office:value="0.0538147576153278" calcext:value-type="float">
            <text:p>0.0538147576153278</text:p>
          </table:table-cell>
          <table:table-cell office:value-type="float" office:value="0.414231926202774" calcext:value-type="float">
            <text:p>0.414231926202774</text:p>
          </table:table-cell>
          <table:table-cell office:value-type="float" office:value="1.24270617961884" calcext:value-type="float">
            <text:p>1.24270617961884</text:p>
          </table:table-cell>
          <table:table-cell office:value-type="float" office:value="0.00118068349547684" calcext:value-type="float">
            <text:p>0.00118068349547684</text:p>
          </table:table-cell>
          <table:table-cell office:value-type="float" office:value="0.0577695965766907" calcext:value-type="float">
            <text:p>0.05776959657669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QRT(([.J47]-[.F47])^2+([.K47]-[.G47])^2)" office:value-type="float" office:value="0.532584410979124" calcext:value-type="float">
            <text:p>0.532584410979124</text:p>
          </table:table-cell>
          <table:table-cell table:formula="of:=SQRT(([.R47]-[.N47])^2+([.S47]-[.O47])^2)" office:value-type="float" office:value="0.327686291801978" calcext:value-type="float">
            <text:p>0.327686291801978</text:p>
          </table:table-cell>
          <table:table-cell table:formula="of:=SQRT(([.R47]-[.F47])^2+([.S47]-[.G47])^2)" office:value-type="float" office:value="1.04860546617565" calcext:value-type="float">
            <text:p>1.04860546617565</text:p>
          </table:table-cell>
          <table:table-cell table:formula="of:=SQRT(([.N47]-[.J47])^2+([.O47]-[.K47])^2)" office:value-type="float" office:value="1.0371921021826" calcext:value-type="float">
            <text:p>1.0371921021826</text:p>
          </table:table-cell>
          <table:table-cell office:value-type="float" office:value="0.832047343254089" calcext:value-type="float">
            <text:p>0.832047343254089</text:p>
          </table:table-cell>
          <table:table-cell office:value-type="float" office:value="0.276258677244186" calcext:value-type="float">
            <text:p>0.276258677244186</text:p>
          </table:table-cell>
          <table:table-cell office:value-type="float" office:value="-0.370722949504852" calcext:value-type="float">
            <text:p>-0.370722949504852</text:p>
          </table:table-cell>
          <table:table-cell office:value-type="float" office:value="0.999498128890991" calcext:value-type="float">
            <text:p>0.999498128890991</text:p>
          </table:table-cell>
          <table:table-cell office:value-type="float" office:value="0.300641119480133" calcext:value-type="float">
            <text:p>0.300641119480133</text:p>
          </table:table-cell>
          <table:table-cell office:value-type="float" office:value="0.311664611101151" calcext:value-type="float">
            <text:p>0.311664611101151</text:p>
          </table:table-cell>
          <table:table-cell office:value-type="float" office:value="-0.380962699651718" calcext:value-type="float">
            <text:p>-0.380962699651718</text:p>
          </table:table-cell>
          <table:table-cell office:value-type="float" office:value="0.999533236026764" calcext:value-type="float">
            <text:p>0.999533236026764</text:p>
          </table:table-cell>
          <table:table-cell office:value-type="float" office:value="0.741727113723755" calcext:value-type="float">
            <text:p>0.741727113723755</text:p>
          </table:table-cell>
          <table:table-cell office:value-type="float" office:value="1.25039279460907" calcext:value-type="float">
            <text:p>1.25039279460907</text:p>
          </table:table-cell>
          <table:table-cell office:value-type="float" office:value="0.010908143594861" calcext:value-type="float">
            <text:p>0.010908143594861</text:p>
          </table:table-cell>
          <table:table-cell office:value-type="float" office:value="0.0565585158765316" calcext:value-type="float">
            <text:p>0.0565585158765316</text:p>
          </table:table-cell>
          <table:table-cell office:value-type="float" office:value="0.41427344083786" calcext:value-type="float">
            <text:p>0.41427344083786</text:p>
          </table:table-cell>
          <table:table-cell office:value-type="float" office:value="1.23804783821106" calcext:value-type="float">
            <text:p>1.23804783821106</text:p>
          </table:table-cell>
          <table:table-cell office:value-type="float" office:value="-0.00117793364915997" calcext:value-type="float">
            <text:p>-0.00117793364915997</text:p>
          </table:table-cell>
          <table:table-cell office:value-type="float" office:value="0.060222465544939" calcext:value-type="float">
            <text:p>0.0602224655449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QRT(([.J48]-[.F48])^2+([.K48]-[.G48])^2)" office:value-type="float" office:value="0.533271310313781" calcext:value-type="float">
            <text:p>0.533271310313781</text:p>
          </table:table-cell>
          <table:table-cell table:formula="of:=SQRT(([.R48]-[.N48])^2+([.S48]-[.O48])^2)" office:value-type="float" office:value="0.334045334360424" calcext:value-type="float">
            <text:p>0.334045334360424</text:p>
          </table:table-cell>
          <table:table-cell table:formula="of:=SQRT(([.R48]-[.F48])^2+([.S48]-[.G48])^2)" office:value-type="float" office:value="1.04959741486055" calcext:value-type="float">
            <text:p>1.04959741486055</text:p>
          </table:table-cell>
          <table:table-cell table:formula="of:=SQRT(([.N48]-[.J48])^2+([.O48]-[.K48])^2)" office:value-type="float" office:value="1.04274375407451" calcext:value-type="float">
            <text:p>1.04274375407451</text:p>
          </table:table-cell>
          <table:table-cell office:value-type="float" office:value="0.833121478557587" calcext:value-type="float">
            <text:p>0.833121478557587</text:p>
          </table:table-cell>
          <table:table-cell office:value-type="float" office:value="0.278449684381485" calcext:value-type="float">
            <text:p>0.278449684381485</text:p>
          </table:table-cell>
          <table:table-cell office:value-type="float" office:value="-0.451586574316025" calcext:value-type="float">
            <text:p>-0.451586574316025</text:p>
          </table:table-cell>
          <table:table-cell office:value-type="float" office:value="0.99950897693634" calcext:value-type="float">
            <text:p>0.99950897693634</text:p>
          </table:table-cell>
          <table:table-cell office:value-type="float" office:value="0.300679475069046" calcext:value-type="float">
            <text:p>0.300679475069046</text:p>
          </table:table-cell>
          <table:table-cell office:value-type="float" office:value="0.308178514242172" calcext:value-type="float">
            <text:p>0.308178514242172</text:p>
          </table:table-cell>
          <table:table-cell office:value-type="float" office:value="-0.406424909830093" calcext:value-type="float">
            <text:p>-0.406424909830093</text:p>
          </table:table-cell>
          <table:table-cell office:value-type="float" office:value="0.999553442001343" calcext:value-type="float">
            <text:p>0.999553442001343</text:p>
          </table:table-cell>
          <table:table-cell office:value-type="float" office:value="0.743656516075134" calcext:value-type="float">
            <text:p>0.743656516075134</text:p>
          </table:table-cell>
          <table:table-cell office:value-type="float" office:value="1.25215196609497" calcext:value-type="float">
            <text:p>1.25215196609497</text:p>
          </table:table-cell>
          <table:table-cell office:value-type="float" office:value="0.0113527486100793" calcext:value-type="float">
            <text:p>0.0113527486100793</text:p>
          </table:table-cell>
          <table:table-cell office:value-type="float" office:value="0.0563530661165714" calcext:value-type="float">
            <text:p>0.0563530661165714</text:p>
          </table:table-cell>
          <table:table-cell office:value-type="float" office:value="0.409873098134995" calcext:value-type="float">
            <text:p>0.409873098134995</text:p>
          </table:table-cell>
          <table:table-cell office:value-type="float" office:value="1.23892641067505" calcext:value-type="float">
            <text:p>1.23892641067505</text:p>
          </table:table-cell>
          <table:table-cell office:value-type="float" office:value="-0.00160794239491224" calcext:value-type="float">
            <text:p>-0.00160794239491224</text:p>
          </table:table-cell>
          <table:table-cell office:value-type="float" office:value="0.0608629919588566" calcext:value-type="float">
            <text:p>0.06086299195885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QRT(([.J49]-[.F49])^2+([.K49]-[.G49])^2)" office:value-type="float" office:value="0.533459246127312" calcext:value-type="float">
            <text:p>0.533459246127312</text:p>
          </table:table-cell>
          <table:table-cell table:formula="of:=SQRT(([.R49]-[.N49])^2+([.S49]-[.O49])^2)" office:value-type="float" office:value="0.335777398323235" calcext:value-type="float">
            <text:p>0.335777398323235</text:p>
          </table:table-cell>
          <table:table-cell table:formula="of:=SQRT(([.R49]-[.F49])^2+([.S49]-[.G49])^2)" office:value-type="float" office:value="1.05332189560389" calcext:value-type="float">
            <text:p>1.05332189560389</text:p>
          </table:table-cell>
          <table:table-cell table:formula="of:=SQRT(([.N49]-[.J49])^2+([.O49]-[.K49])^2)" office:value-type="float" office:value="1.04688586557299" calcext:value-type="float">
            <text:p>1.04688586557299</text:p>
          </table:table-cell>
          <table:table-cell office:value-type="float" office:value="0.833112835884094" calcext:value-type="float">
            <text:p>0.833112835884094</text:p>
          </table:table-cell>
          <table:table-cell office:value-type="float" office:value="0.279483675956726" calcext:value-type="float">
            <text:p>0.279483675956726</text:p>
          </table:table-cell>
          <table:table-cell office:value-type="float" office:value="-0.466837644577026" calcext:value-type="float">
            <text:p>-0.466837644577026</text:p>
          </table:table-cell>
          <table:table-cell office:value-type="float" office:value="0.999524295330048" calcext:value-type="float">
            <text:p>0.999524295330048</text:p>
          </table:table-cell>
          <table:table-cell office:value-type="float" office:value="0.300417363643646" calcext:value-type="float">
            <text:p>0.300417363643646</text:p>
          </table:table-cell>
          <table:table-cell office:value-type="float" office:value="0.308019638061523" calcext:value-type="float">
            <text:p>0.308019638061523</text:p>
          </table:table-cell>
          <table:table-cell office:value-type="float" office:value="-0.409728437662125" calcext:value-type="float">
            <text:p>-0.409728437662125</text:p>
          </table:table-cell>
          <table:table-cell office:value-type="float" office:value="0.999561548233032" calcext:value-type="float">
            <text:p>0.999561548233032</text:p>
          </table:table-cell>
          <table:table-cell office:value-type="float" office:value="0.742727994918823" calcext:value-type="float">
            <text:p>0.742727994918823</text:p>
          </table:table-cell>
          <table:table-cell office:value-type="float" office:value="1.25687754154205" calcext:value-type="float">
            <text:p>1.25687754154205</text:p>
          </table:table-cell>
          <table:table-cell office:value-type="float" office:value="0.00430492637678981" calcext:value-type="float">
            <text:p>0.00430492637678981</text:p>
          </table:table-cell>
          <table:table-cell office:value-type="float" office:value="0.0588357262313366" calcext:value-type="float">
            <text:p>0.0588357262313366</text:p>
          </table:table-cell>
          <table:table-cell office:value-type="float" office:value="0.407242715358734" calcext:value-type="float">
            <text:p>0.407242715358734</text:p>
          </table:table-cell>
          <table:table-cell office:value-type="float" office:value="1.24287438392639" calcext:value-type="float">
            <text:p>1.24287438392639</text:p>
          </table:table-cell>
          <table:table-cell office:value-type="float" office:value="0.00546634895727038" calcext:value-type="float">
            <text:p>0.00546634895727038</text:p>
          </table:table-cell>
          <table:table-cell office:value-type="float" office:value="0.0631165578961372" calcext:value-type="float">
            <text:p>0.06311655789613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QRT(([.J50]-[.F50])^2+([.K50]-[.G50])^2)" office:value-type="float" office:value="0.5361811397884" calcext:value-type="float">
            <text:p>0.5361811397884</text:p>
          </table:table-cell>
          <table:table-cell table:formula="of:=SQRT(([.R50]-[.N50])^2+([.S50]-[.O50])^2)" office:value-type="float" office:value="0.335872605548912" calcext:value-type="float">
            <text:p>0.335872605548912</text:p>
          </table:table-cell>
          <table:table-cell table:formula="of:=SQRT(([.R50]-[.F50])^2+([.S50]-[.G50])^2)" office:value-type="float" office:value="1.06280022551006" calcext:value-type="float">
            <text:p>1.06280022551006</text:p>
          </table:table-cell>
          <table:table-cell table:formula="of:=SQRT(([.N50]-[.J50])^2+([.O50]-[.K50])^2)" office:value-type="float" office:value="1.06002704388069" calcext:value-type="float">
            <text:p>1.06002704388069</text:p>
          </table:table-cell>
          <table:table-cell office:value-type="float" office:value="0.8365198969841" calcext:value-type="float">
            <text:p>0.8365198969841</text:p>
          </table:table-cell>
          <table:table-cell office:value-type="float" office:value="0.279520511627197" calcext:value-type="float">
            <text:p>0.279520511627197</text:p>
          </table:table-cell>
          <table:table-cell office:value-type="float" office:value="-0.458644449710846" calcext:value-type="float">
            <text:p>-0.458644449710846</text:p>
          </table:table-cell>
          <table:table-cell office:value-type="float" office:value="0.999514520168304" calcext:value-type="float">
            <text:p>0.999514520168304</text:p>
          </table:table-cell>
          <table:table-cell office:value-type="float" office:value="0.301071554422379" calcext:value-type="float">
            <text:p>0.301071554422379</text:p>
          </table:table-cell>
          <table:table-cell office:value-type="float" office:value="0.307543486356735" calcext:value-type="float">
            <text:p>0.307543486356735</text:p>
          </table:table-cell>
          <table:table-cell office:value-type="float" office:value="-0.424710333347321" calcext:value-type="float">
            <text:p>-0.424710333347321</text:p>
          </table:table-cell>
          <table:table-cell office:value-type="float" office:value="0.999552011489868" calcext:value-type="float">
            <text:p>0.999552011489868</text:p>
          </table:table-cell>
          <table:table-cell office:value-type="float" office:value="0.742369830608368" calcext:value-type="float">
            <text:p>0.742369830608368</text:p>
          </table:table-cell>
          <table:table-cell office:value-type="float" office:value="1.27134490013123" calcext:value-type="float">
            <text:p>1.27134490013123</text:p>
          </table:table-cell>
          <table:table-cell office:value-type="float" office:value="0.00740485917776823" calcext:value-type="float">
            <text:p>0.00740485917776823</text:p>
          </table:table-cell>
          <table:table-cell office:value-type="float" office:value="0.0593910925090313" calcext:value-type="float">
            <text:p>0.0593910925090313</text:p>
          </table:table-cell>
          <table:table-cell office:value-type="float" office:value="0.407072633504868" calcext:value-type="float">
            <text:p>0.407072633504868</text:p>
          </table:table-cell>
          <table:table-cell office:value-type="float" office:value="1.2516930103302" calcext:value-type="float">
            <text:p>1.2516930103302</text:p>
          </table:table-cell>
          <table:table-cell office:value-type="float" office:value="0.00246216030791402" calcext:value-type="float">
            <text:p>0.00246216030791402</text:p>
          </table:table-cell>
          <table:table-cell office:value-type="float" office:value="0.0637639164924622" calcext:value-type="float">
            <text:p>0.06376391649246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([.J51]-[.F51])^2+([.K51]-[.G51])^2)" office:value-type="float" office:value="0.533227599668967" calcext:value-type="float">
            <text:p>0.533227599668967</text:p>
          </table:table-cell>
          <table:table-cell table:formula="of:=SQRT(([.R51]-[.N51])^2+([.S51]-[.O51])^2)" office:value-type="float" office:value="0.335413487878273" calcext:value-type="float">
            <text:p>0.335413487878273</text:p>
          </table:table-cell>
          <table:table-cell table:formula="of:=SQRT(([.R51]-[.F51])^2+([.S51]-[.G51])^2)" office:value-type="float" office:value="1.06224111077456" calcext:value-type="float">
            <text:p>1.06224111077456</text:p>
          </table:table-cell>
          <table:table-cell table:formula="of:=SQRT(([.N51]-[.J51])^2+([.O51]-[.K51])^2)" office:value-type="float" office:value="1.06379305668941" calcext:value-type="float">
            <text:p>1.06379305668941</text:p>
          </table:table-cell>
          <table:table-cell office:value-type="float" office:value="0.836636662483215" calcext:value-type="float">
            <text:p>0.836636662483215</text:p>
          </table:table-cell>
          <table:table-cell office:value-type="float" office:value="0.279877096414566" calcext:value-type="float">
            <text:p>0.279877096414566</text:p>
          </table:table-cell>
          <table:table-cell office:value-type="float" office:value="-0.464434623718262" calcext:value-type="float">
            <text:p>-0.464434623718262</text:p>
          </table:table-cell>
          <table:table-cell office:value-type="float" office:value="0.999499976634979" calcext:value-type="float">
            <text:p>0.999499976634979</text:p>
          </table:table-cell>
          <table:table-cell office:value-type="float" office:value="0.304075211286545" calcext:value-type="float">
            <text:p>0.304075211286545</text:p>
          </table:table-cell>
          <table:table-cell office:value-type="float" office:value="0.30652242898941" calcext:value-type="float">
            <text:p>0.30652242898941</text:p>
          </table:table-cell>
          <table:table-cell office:value-type="float" office:value="-0.411380708217621" calcext:value-type="float">
            <text:p>-0.411380708217621</text:p>
          </table:table-cell>
          <table:table-cell office:value-type="float" office:value="0.99953556060791" calcext:value-type="float">
            <text:p>0.99953556060791</text:p>
          </table:table-cell>
          <table:table-cell office:value-type="float" office:value="0.742289900779724" calcext:value-type="float">
            <text:p>0.742289900779724</text:p>
          </table:table-cell>
          <table:table-cell office:value-type="float" office:value="1.27586424350739" calcext:value-type="float">
            <text:p>1.27586424350739</text:p>
          </table:table-cell>
          <table:table-cell office:value-type="float" office:value="0.00108195445500314" calcext:value-type="float">
            <text:p>0.00108195445500314</text:p>
          </table:table-cell>
          <table:table-cell office:value-type="float" office:value="0.0614948943257332" calcext:value-type="float">
            <text:p>0.0614948943257332</text:p>
          </table:table-cell>
          <table:table-cell office:value-type="float" office:value="0.407749027013779" calcext:value-type="float">
            <text:p>0.407749027013779</text:p>
          </table:table-cell>
          <table:table-cell office:value-type="float" office:value="1.25168550014496" calcext:value-type="float">
            <text:p>1.25168550014496</text:p>
          </table:table-cell>
          <table:table-cell office:value-type="float" office:value="0.0089876614511013" calcext:value-type="float">
            <text:p>0.0089876614511013</text:p>
          </table:table-cell>
          <table:table-cell office:value-type="float" office:value="0.0662564113736153" calcext:value-type="float">
            <text:p>0.06625641137361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QRT(([.J52]-[.F52])^2+([.K52]-[.G52])^2)" office:value-type="float" office:value="0.533373695639823" calcext:value-type="float">
            <text:p>0.533373695639823</text:p>
          </table:table-cell>
          <table:table-cell table:formula="of:=SQRT(([.R52]-[.N52])^2+([.S52]-[.O52])^2)" office:value-type="float" office:value="0.329825939430671" calcext:value-type="float">
            <text:p>0.329825939430671</text:p>
          </table:table-cell>
          <table:table-cell table:formula="of:=SQRT(([.R52]-[.F52])^2+([.S52]-[.G52])^2)" office:value-type="float" office:value="1.05889125423991" calcext:value-type="float">
            <text:p>1.05889125423991</text:p>
          </table:table-cell>
          <table:table-cell table:formula="of:=SQRT(([.N52]-[.J52])^2+([.O52]-[.K52])^2)" office:value-type="float" office:value="1.05403222144199" calcext:value-type="float">
            <text:p>1.05403222144199</text:p>
          </table:table-cell>
          <table:table-cell office:value-type="float" office:value="0.83654260635376" calcext:value-type="float">
            <text:p>0.83654260635376</text:p>
          </table:table-cell>
          <table:table-cell office:value-type="float" office:value="0.282697588205338" calcext:value-type="float">
            <text:p>0.282697588205338</text:p>
          </table:table-cell>
          <table:table-cell office:value-type="float" office:value="-0.682235240936279" calcext:value-type="float">
            <text:p>-0.682235240936279</text:p>
          </table:table-cell>
          <table:table-cell office:value-type="float" office:value="0.999488413333893" calcext:value-type="float">
            <text:p>0.999488413333893</text:p>
          </table:table-cell>
          <table:table-cell office:value-type="float" office:value="0.303981572389603" calcext:value-type="float">
            <text:p>0.303981572389603</text:p>
          </table:table-cell>
          <table:table-cell office:value-type="float" office:value="0.312129616737366" calcext:value-type="float">
            <text:p>0.312129616737366</text:p>
          </table:table-cell>
          <table:table-cell office:value-type="float" office:value="-0.63680636882782" calcext:value-type="float">
            <text:p>-0.63680636882782</text:p>
          </table:table-cell>
          <table:table-cell office:value-type="float" office:value="0.999504387378693" calcext:value-type="float">
            <text:p>0.999504387378693</text:p>
          </table:table-cell>
          <table:table-cell office:value-type="float" office:value="0.73637717962265" calcext:value-type="float">
            <text:p>0.73637717962265</text:p>
          </table:table-cell>
          <table:table-cell office:value-type="float" office:value="1.27338814735413" calcext:value-type="float">
            <text:p>1.27338814735413</text:p>
          </table:table-cell>
          <table:table-cell office:value-type="float" office:value="-0.000939605175517499" calcext:value-type="float">
            <text:p>-0.000939605175517499</text:p>
          </table:table-cell>
          <table:table-cell office:value-type="float" office:value="0.063971534371376" calcext:value-type="float">
            <text:p>0.063971534371376</text:p>
          </table:table-cell>
          <table:table-cell office:value-type="float" office:value="0.407332479953766" calcext:value-type="float">
            <text:p>0.407332479953766</text:p>
          </table:table-cell>
          <table:table-cell office:value-type="float" office:value="1.25070035457611" calcext:value-type="float">
            <text:p>1.25070035457611</text:p>
          </table:table-cell>
          <table:table-cell office:value-type="float" office:value="0.0109152216464281" calcext:value-type="float">
            <text:p>0.0109152216464281</text:p>
          </table:table-cell>
          <table:table-cell office:value-type="float" office:value="0.0677808225154877" calcext:value-type="float">
            <text:p>0.06778082251548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QRT(([.J53]-[.F53])^2+([.K53]-[.G53])^2)" office:value-type="float" office:value="0.529729102159068" calcext:value-type="float">
            <text:p>0.529729102159068</text:p>
          </table:table-cell>
          <table:table-cell table:formula="of:=SQRT(([.R53]-[.N53])^2+([.S53]-[.O53])^2)" office:value-type="float" office:value="0.333388977355342" calcext:value-type="float">
            <text:p>0.333388977355342</text:p>
          </table:table-cell>
          <table:table-cell table:formula="of:=SQRT(([.R53]-[.F53])^2+([.S53]-[.G53])^2)" office:value-type="float" office:value="1.04874882796031" calcext:value-type="float">
            <text:p>1.04874882796031</text:p>
          </table:table-cell>
          <table:table-cell table:formula="of:=SQRT(([.N53]-[.J53])^2+([.O53]-[.K53])^2)" office:value-type="float" office:value="1.05006223044708" calcext:value-type="float">
            <text:p>1.05006223044708</text:p>
          </table:table-cell>
          <table:table-cell office:value-type="float" office:value="0.836625754833221" calcext:value-type="float">
            <text:p>0.836625754833221</text:p>
          </table:table-cell>
          <table:table-cell office:value-type="float" office:value="0.281777441501617" calcext:value-type="float">
            <text:p>0.281777441501617</text:p>
          </table:table-cell>
          <table:table-cell office:value-type="float" office:value="-0.527508795261383" calcext:value-type="float">
            <text:p>-0.527508795261383</text:p>
          </table:table-cell>
          <table:table-cell office:value-type="float" office:value="0.999497413635254" calcext:value-type="float">
            <text:p>0.999497413635254</text:p>
          </table:table-cell>
          <table:table-cell office:value-type="float" office:value="0.30737230181694" calcext:value-type="float">
            <text:p>0.30737230181694</text:p>
          </table:table-cell>
          <table:table-cell office:value-type="float" office:value="0.304220795631409" calcext:value-type="float">
            <text:p>0.304220795631409</text:p>
          </table:table-cell>
          <table:table-cell office:value-type="float" office:value="-0.533355176448822" calcext:value-type="float">
            <text:p>-0.533355176448822</text:p>
          </table:table-cell>
          <table:table-cell office:value-type="float" office:value="0.999519050121307" calcext:value-type="float">
            <text:p>0.999519050121307</text:p>
          </table:table-cell>
          <table:table-cell office:value-type="float" office:value="0.740397393703461" calcext:value-type="float">
            <text:p>0.740397393703461</text:p>
          </table:table-cell>
          <table:table-cell office:value-type="float" office:value="1.26083981990814" calcext:value-type="float">
            <text:p>1.26083981990814</text:p>
          </table:table-cell>
          <table:table-cell office:value-type="float" office:value="0.0128971878439188" calcext:value-type="float">
            <text:p>0.0128971878439188</text:p>
          </table:table-cell>
          <table:table-cell office:value-type="float" office:value="0.0639728754758835" calcext:value-type="float">
            <text:p>0.0639728754758835</text:p>
          </table:table-cell>
          <table:table-cell office:value-type="float" office:value="0.407736480236053" calcext:value-type="float">
            <text:p>0.407736480236053</text:p>
          </table:table-cell>
          <table:table-cell office:value-type="float" office:value="1.23881876468658" calcext:value-type="float">
            <text:p>1.23881876468658</text:p>
          </table:table-cell>
          <table:table-cell office:value-type="float" office:value="-0.00295638502575457" calcext:value-type="float">
            <text:p>-0.00295638502575457</text:p>
          </table:table-cell>
          <table:table-cell office:value-type="float" office:value="0.0681474581360817" calcext:value-type="float">
            <text:p>0.06814745813608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QRT(([.J54]-[.F54])^2+([.K54]-[.G54])^2)" office:value-type="float" office:value="0.527529343561196" calcext:value-type="float">
            <text:p>0.527529343561196</text:p>
          </table:table-cell>
          <table:table-cell table:formula="of:=SQRT(([.R54]-[.N54])^2+([.S54]-[.O54])^2)" office:value-type="float" office:value="0.332593873218206" calcext:value-type="float">
            <text:p>0.332593873218206</text:p>
          </table:table-cell>
          <table:table-cell table:formula="of:=SQRT(([.R54]-[.F54])^2+([.S54]-[.G54])^2)" office:value-type="float" office:value="1.04543705742353" calcext:value-type="float">
            <text:p>1.04543705742353</text:p>
          </table:table-cell>
          <table:table-cell table:formula="of:=SQRT(([.N54]-[.J54])^2+([.O54]-[.K54])^2)" office:value-type="float" office:value="1.04416963777775" calcext:value-type="float">
            <text:p>1.04416963777775</text:p>
          </table:table-cell>
          <table:table-cell office:value-type="float" office:value="0.835348904132843" calcext:value-type="float">
            <text:p>0.835348904132843</text:p>
          </table:table-cell>
          <table:table-cell office:value-type="float" office:value="0.281742483377457" calcext:value-type="float">
            <text:p>0.281742483377457</text:p>
          </table:table-cell>
          <table:table-cell office:value-type="float" office:value="-0.513920187950134" calcext:value-type="float">
            <text:p>-0.513920187950134</text:p>
          </table:table-cell>
          <table:table-cell office:value-type="float" office:value="0.999506413936615" calcext:value-type="float">
            <text:p>0.999506413936615</text:p>
          </table:table-cell>
          <table:table-cell office:value-type="float" office:value="0.308296531438828" calcext:value-type="float">
            <text:p>0.308296531438828</text:p>
          </table:table-cell>
          <table:table-cell office:value-type="float" office:value="0.304170250892639" calcext:value-type="float">
            <text:p>0.304170250892639</text:p>
          </table:table-cell>
          <table:table-cell office:value-type="float" office:value="-0.399864554405212" calcext:value-type="float">
            <text:p>-0.399864554405212</text:p>
          </table:table-cell>
          <table:table-cell office:value-type="float" office:value="0.999525129795075" calcext:value-type="float">
            <text:p>0.999525129795075</text:p>
          </table:table-cell>
          <table:table-cell office:value-type="float" office:value="0.7404003739357" calcext:value-type="float">
            <text:p>0.7404003739357</text:p>
          </table:table-cell>
          <table:table-cell office:value-type="float" office:value="1.25473666191101" calcext:value-type="float">
            <text:p>1.25473666191101</text:p>
          </table:table-cell>
          <table:table-cell office:value-type="float" office:value="0.00141142215579748" calcext:value-type="float">
            <text:p>0.00141142215579748</text:p>
          </table:table-cell>
          <table:table-cell office:value-type="float" office:value="0.0644346252083778" calcext:value-type="float">
            <text:p>0.0644346252083778</text:p>
          </table:table-cell>
          <table:table-cell office:value-type="float" office:value="0.408334970474243" calcext:value-type="float">
            <text:p>0.408334970474243</text:p>
          </table:table-cell>
          <table:table-cell office:value-type="float" office:value="1.23599493503571" calcext:value-type="float">
            <text:p>1.23599493503571</text:p>
          </table:table-cell>
          <table:table-cell office:value-type="float" office:value="0.0085098734125495" calcext:value-type="float">
            <text:p>0.0085098734125495</text:p>
          </table:table-cell>
          <table:table-cell office:value-type="float" office:value="0.068074107170105" calcext:value-type="float">
            <text:p>0.068074107170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QRT(([.J55]-[.F55])^2+([.K55]-[.G55])^2)" office:value-type="float" office:value="0.526799919208863" calcext:value-type="float">
            <text:p>0.526799919208863</text:p>
          </table:table-cell>
          <table:table-cell table:formula="of:=SQRT(([.R55]-[.N55])^2+([.S55]-[.O55])^2)" office:value-type="float" office:value="0.333379017376644" calcext:value-type="float">
            <text:p>0.333379017376644</text:p>
          </table:table-cell>
          <table:table-cell table:formula="of:=SQRT(([.R55]-[.F55])^2+([.S55]-[.G55])^2)" office:value-type="float" office:value="1.05007046878787" calcext:value-type="float">
            <text:p>1.05007046878787</text:p>
          </table:table-cell>
          <table:table-cell table:formula="of:=SQRT(([.N55]-[.J55])^2+([.O55]-[.K55])^2)" office:value-type="float" office:value="1.04958655391747" calcext:value-type="float">
            <text:p>1.04958655391747</text:p>
          </table:table-cell>
          <table:table-cell office:value-type="float" office:value="0.835344672203064" calcext:value-type="float">
            <text:p>0.835344672203064</text:p>
          </table:table-cell>
          <table:table-cell office:value-type="float" office:value="0.280886292457581" calcext:value-type="float">
            <text:p>0.280886292457581</text:p>
          </table:table-cell>
          <table:table-cell office:value-type="float" office:value="-0.491770893335342" calcext:value-type="float">
            <text:p>-0.491770893335342</text:p>
          </table:table-cell>
          <table:table-cell office:value-type="float" office:value="0.999529957771301" calcext:value-type="float">
            <text:p>0.999529957771301</text:p>
          </table:table-cell>
          <table:table-cell office:value-type="float" office:value="0.308927416801453" calcext:value-type="float">
            <text:p>0.308927416801453</text:p>
          </table:table-cell>
          <table:table-cell office:value-type="float" office:value="0.300961852073669" calcext:value-type="float">
            <text:p>0.300961852073669</text:p>
          </table:table-cell>
          <table:table-cell office:value-type="float" office:value="-0.326222658157349" calcext:value-type="float">
            <text:p>-0.326222658157349</text:p>
          </table:table-cell>
          <table:table-cell office:value-type="float" office:value="0.999535620212555" calcext:value-type="float">
            <text:p>0.999535620212555</text:p>
          </table:table-cell>
          <table:table-cell office:value-type="float" office:value="0.741633296012878" calcext:value-type="float">
            <text:p>0.741633296012878</text:p>
          </table:table-cell>
          <table:table-cell office:value-type="float" office:value="1.25720322132111" calcext:value-type="float">
            <text:p>1.25720322132111</text:p>
          </table:table-cell>
          <table:table-cell office:value-type="float" office:value="-0.00578811718150973" calcext:value-type="float">
            <text:p>-0.00578811718150973</text:p>
          </table:table-cell>
          <table:table-cell office:value-type="float" office:value="0.0633102357387543" calcext:value-type="float">
            <text:p>0.0633102357387543</text:p>
          </table:table-cell>
          <table:table-cell office:value-type="float" office:value="0.408679634332657" calcext:value-type="float">
            <text:p>0.408679634332657</text:p>
          </table:table-cell>
          <table:table-cell office:value-type="float" office:value="1.2403678894043" calcext:value-type="float">
            <text:p>1.2403678894043</text:p>
          </table:table-cell>
          <table:table-cell office:value-type="float" office:value="0.0159369669854641" calcext:value-type="float">
            <text:p>0.0159369669854641</text:p>
          </table:table-cell>
          <table:table-cell office:value-type="float" office:value="0.0664242953062058" calcext:value-type="float">
            <text:p>0.06642429530620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QRT(([.J56]-[.F56])^2+([.K56]-[.G56])^2)" office:value-type="float" office:value="0.525797545291157" calcext:value-type="float">
            <text:p>0.525797545291157</text:p>
          </table:table-cell>
          <table:table-cell table:formula="of:=SQRT(([.R56]-[.N56])^2+([.S56]-[.O56])^2)" office:value-type="float" office:value="0.334310189576193" calcext:value-type="float">
            <text:p>0.334310189576193</text:p>
          </table:table-cell>
          <table:table-cell table:formula="of:=SQRT(([.R56]-[.F56])^2+([.S56]-[.G56])^2)" office:value-type="float" office:value="1.04430344842882" calcext:value-type="float">
            <text:p>1.04430344842882</text:p>
          </table:table-cell>
          <table:table-cell table:formula="of:=SQRT(([.N56]-[.J56])^2+([.O56]-[.K56])^2)" office:value-type="float" office:value="1.06350033667606" calcext:value-type="float">
            <text:p>1.06350033667606</text:p>
          </table:table-cell>
          <table:table-cell office:value-type="float" office:value="0.835473358631134" calcext:value-type="float">
            <text:p>0.835473358631134</text:p>
          </table:table-cell>
          <table:table-cell office:value-type="float" office:value="0.29706609249115" calcext:value-type="float">
            <text:p>0.29706609249115</text:p>
          </table:table-cell>
          <table:table-cell office:value-type="float" office:value="-0.441418468952179" calcext:value-type="float">
            <text:p>-0.441418468952179</text:p>
          </table:table-cell>
          <table:table-cell office:value-type="float" office:value="0.999538660049439" calcext:value-type="float">
            <text:p>0.999538660049439</text:p>
          </table:table-cell>
          <table:table-cell office:value-type="float" office:value="0.309692800045013" calcext:value-type="float">
            <text:p>0.309692800045013</text:p>
          </table:table-cell>
          <table:table-cell office:value-type="float" office:value="0.301292538642883" calcext:value-type="float">
            <text:p>0.301292538642883</text:p>
          </table:table-cell>
          <table:table-cell office:value-type="float" office:value="-0.353066623210907" calcext:value-type="float">
            <text:p>-0.353066623210907</text:p>
          </table:table-cell>
          <table:table-cell office:value-type="float" office:value="0.999548554420471" calcext:value-type="float">
            <text:p>0.999548554420471</text:p>
          </table:table-cell>
          <table:table-cell office:value-type="float" office:value="0.741844952106476" calcext:value-type="float">
            <text:p>0.741844952106476</text:p>
          </table:table-cell>
          <table:table-cell office:value-type="float" office:value="1.27303194999695" calcext:value-type="float">
            <text:p>1.27303194999695</text:p>
          </table:table-cell>
          <table:table-cell office:value-type="float" office:value="-0.00249199336394668" calcext:value-type="float">
            <text:p>-0.00249199336394668</text:p>
          </table:table-cell>
          <table:table-cell office:value-type="float" office:value="0.0653423145413399" calcext:value-type="float">
            <text:p>0.0653423145413399</text:p>
          </table:table-cell>
          <table:table-cell office:value-type="float" office:value="0.408327877521515" calcext:value-type="float">
            <text:p>0.408327877521515</text:p>
          </table:table-cell>
          <table:table-cell office:value-type="float" office:value="1.25001752376556" calcext:value-type="float">
            <text:p>1.25001752376556</text:p>
          </table:table-cell>
          <table:table-cell office:value-type="float" office:value="0.0124010499566793" calcext:value-type="float">
            <text:p>0.0124010499566793</text:p>
          </table:table-cell>
          <table:table-cell office:value-type="float" office:value="0.0688755139708519" calcext:value-type="float">
            <text:p>0.06887551397085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QRT(([.J57]-[.F57])^2+([.K57]-[.G57])^2)" office:value-type="float" office:value="0.528877411458949" calcext:value-type="float">
            <text:p>0.528877411458949</text:p>
          </table:table-cell>
          <table:table-cell table:formula="of:=SQRT(([.R57]-[.N57])^2+([.S57]-[.O57])^2)" office:value-type="float" office:value="0.332482225953655" calcext:value-type="float">
            <text:p>0.332482225953655</text:p>
          </table:table-cell>
          <table:table-cell table:formula="of:=SQRT(([.R57]-[.F57])^2+([.S57]-[.G57])^2)" office:value-type="float" office:value="1.04381513333313" calcext:value-type="float">
            <text:p>1.04381513333313</text:p>
          </table:table-cell>
          <table:table-cell table:formula="of:=SQRT(([.N57]-[.J57])^2+([.O57]-[.K57])^2)" office:value-type="float" office:value="1.05897904870918" calcext:value-type="float">
            <text:p>1.05897904870918</text:p>
          </table:table-cell>
          <table:table-cell office:value-type="float" office:value="0.836655259132385" calcext:value-type="float">
            <text:p>0.836655259132385</text:p>
          </table:table-cell>
          <table:table-cell office:value-type="float" office:value="0.296750456094742" calcext:value-type="float">
            <text:p>0.296750456094742</text:p>
          </table:table-cell>
          <table:table-cell office:value-type="float" office:value="-0.590049386024475" calcext:value-type="float">
            <text:p>-0.590049386024475</text:p>
          </table:table-cell>
          <table:table-cell office:value-type="float" office:value="0.999528884887695" calcext:value-type="float">
            <text:p>0.999528884887695</text:p>
          </table:table-cell>
          <table:table-cell office:value-type="float" office:value="0.307878881692886" calcext:value-type="float">
            <text:p>0.307878881692886</text:p>
          </table:table-cell>
          <table:table-cell office:value-type="float" office:value="0.30708771944046" calcext:value-type="float">
            <text:p>0.30708771944046</text:p>
          </table:table-cell>
          <table:table-cell office:value-type="float" office:value="-0.57547402381897" calcext:value-type="float">
            <text:p>-0.57547402381897</text:p>
          </table:table-cell>
          <table:table-cell office:value-type="float" office:value="0.999532759189606" calcext:value-type="float">
            <text:p>0.999532759189606</text:p>
          </table:table-cell>
          <table:table-cell office:value-type="float" office:value="0.742957293987274" calcext:value-type="float">
            <text:p>0.742957293987274</text:p>
          </table:table-cell>
          <table:table-cell office:value-type="float" office:value="1.27256345748901" calcext:value-type="float">
            <text:p>1.27256345748901</text:p>
          </table:table-cell>
          <table:table-cell office:value-type="float" office:value="-0.00207457621581852" calcext:value-type="float">
            <text:p>-0.00207457621581852</text:p>
          </table:table-cell>
          <table:table-cell office:value-type="float" office:value="0.0647798180580139" calcext:value-type="float">
            <text:p>0.0647798180580139</text:p>
          </table:table-cell>
          <table:table-cell office:value-type="float" office:value="0.411245435476303" calcext:value-type="float">
            <text:p>0.411245435476303</text:p>
          </table:table-cell>
          <table:table-cell office:value-type="float" office:value="1.24994325637817" calcext:value-type="float">
            <text:p>1.24994325637817</text:p>
          </table:table-cell>
          <table:table-cell office:value-type="float" office:value="0.0120063573122025" calcext:value-type="float">
            <text:p>0.0120063573122025</text:p>
          </table:table-cell>
          <table:table-cell office:value-type="float" office:value="0.0681146681308746" calcext:value-type="float">
            <text:p>0.06811466813087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QRT(([.J58]-[.F58])^2+([.K58]-[.G58])^2)" office:value-type="float" office:value="0.530067553493" calcext:value-type="float">
            <text:p>0.530067553493</text:p>
          </table:table-cell>
          <table:table-cell table:formula="of:=SQRT(([.R58]-[.N58])^2+([.S58]-[.O58])^2)" office:value-type="float" office:value="0.332983981307919" calcext:value-type="float">
            <text:p>0.332983981307919</text:p>
          </table:table-cell>
          <table:table-cell table:formula="of:=SQRT(([.R58]-[.F58])^2+([.S58]-[.G58])^2)" office:value-type="float" office:value="1.04259764966762" calcext:value-type="float">
            <text:p>1.04259764966762</text:p>
          </table:table-cell>
          <table:table-cell table:formula="of:=SQRT(([.N58]-[.J58])^2+([.O58]-[.K58])^2)" office:value-type="float" office:value="1.05834555490886" calcext:value-type="float">
            <text:p>1.05834555490886</text:p>
          </table:table-cell>
          <table:table-cell office:value-type="float" office:value="0.838005185127258" calcext:value-type="float">
            <text:p>0.838005185127258</text:p>
          </table:table-cell>
          <table:table-cell office:value-type="float" office:value="0.298871487379074" calcext:value-type="float">
            <text:p>0.298871487379074</text:p>
          </table:table-cell>
          <table:table-cell office:value-type="float" office:value="-0.571393251419067" calcext:value-type="float">
            <text:p>-0.571393251419067</text:p>
          </table:table-cell>
          <table:table-cell office:value-type="float" office:value="0.999554336071014" calcext:value-type="float">
            <text:p>0.999554336071014</text:p>
          </table:table-cell>
          <table:table-cell office:value-type="float" office:value="0.308006405830383" calcext:value-type="float">
            <text:p>0.308006405830383</text:p>
          </table:table-cell>
          <table:table-cell office:value-type="float" office:value="0.307409942150116" calcext:value-type="float">
            <text:p>0.307409942150116</text:p>
          </table:table-cell>
          <table:table-cell office:value-type="float" office:value="-0.538941025733948" calcext:value-type="float">
            <text:p>-0.538941025733948</text:p>
          </table:table-cell>
          <table:table-cell office:value-type="float" office:value="0.999556243419647" calcext:value-type="float">
            <text:p>0.999556243419647</text:p>
          </table:table-cell>
          <table:table-cell office:value-type="float" office:value="0.742962896823883" calcext:value-type="float">
            <text:p>0.742962896823883</text:p>
          </table:table-cell>
          <table:table-cell office:value-type="float" office:value="1.27224576473236" calcext:value-type="float">
            <text:p>1.27224576473236</text:p>
          </table:table-cell>
          <table:table-cell office:value-type="float" office:value="0.00636362191289663" calcext:value-type="float">
            <text:p>0.00636362191289663</text:p>
          </table:table-cell>
          <table:table-cell office:value-type="float" office:value="0.0622219368815422" calcext:value-type="float">
            <text:p>0.0622219368815422</text:p>
          </table:table-cell>
          <table:table-cell office:value-type="float" office:value="0.410729885101318" calcext:value-type="float">
            <text:p>0.410729885101318</text:p>
          </table:table-cell>
          <table:table-cell office:value-type="float" office:value="1.24989497661591" calcext:value-type="float">
            <text:p>1.24989497661591</text:p>
          </table:table-cell>
          <table:table-cell office:value-type="float" office:value="0.00376780587248504" calcext:value-type="float">
            <text:p>0.00376780587248504</text:p>
          </table:table-cell>
          <table:table-cell office:value-type="float" office:value="0.0654770061373711" calcext:value-type="float">
            <text:p>0.0654770061373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QRT(([.J59]-[.F59])^2+([.K59]-[.G59])^2)" office:value-type="float" office:value="0.529675484350728" calcext:value-type="float">
            <text:p>0.529675484350728</text:p>
          </table:table-cell>
          <table:table-cell table:formula="of:=SQRT(([.R59]-[.N59])^2+([.S59]-[.O59])^2)" office:value-type="float" office:value="0.332114709896841" calcext:value-type="float">
            <text:p>0.332114709896841</text:p>
          </table:table-cell>
          <table:table-cell table:formula="of:=SQRT(([.R59]-[.F59])^2+([.S59]-[.G59])^2)" office:value-type="float" office:value="1.04264636762392" calcext:value-type="float">
            <text:p>1.04264636762392</text:p>
          </table:table-cell>
          <table:table-cell table:formula="of:=SQRT(([.N59]-[.J59])^2+([.O59]-[.K59])^2)" office:value-type="float" office:value="1.05888126526248" calcext:value-type="float">
            <text:p>1.05888126526248</text:p>
          </table:table-cell>
          <table:table-cell office:value-type="float" office:value="0.838284313678742" calcext:value-type="float">
            <text:p>0.838284313678742</text:p>
          </table:table-cell>
          <table:table-cell office:value-type="float" office:value="0.29869732260704" calcext:value-type="float">
            <text:p>0.29869732260704</text:p>
          </table:table-cell>
          <table:table-cell office:value-type="float" office:value="-0.460201412439346" calcext:value-type="float">
            <text:p>-0.460201412439346</text:p>
          </table:table-cell>
          <table:table-cell office:value-type="float" office:value="0.999555706977844" calcext:value-type="float">
            <text:p>0.999555706977844</text:p>
          </table:table-cell>
          <table:table-cell office:value-type="float" office:value="0.30868199467659" calcext:value-type="float">
            <text:p>0.30868199467659</text:p>
          </table:table-cell>
          <table:table-cell office:value-type="float" office:value="0.307500869035721" calcext:value-type="float">
            <text:p>0.307500869035721</text:p>
          </table:table-cell>
          <table:table-cell office:value-type="float" office:value="-0.358135342597961" calcext:value-type="float">
            <text:p>-0.358135342597961</text:p>
          </table:table-cell>
          <table:table-cell office:value-type="float" office:value="0.999557316303253" calcext:value-type="float">
            <text:p>0.999557316303253</text:p>
          </table:table-cell>
          <table:table-cell office:value-type="float" office:value="0.742504477500916" calcext:value-type="float">
            <text:p>0.742504477500916</text:p>
          </table:table-cell>
          <table:table-cell office:value-type="float" office:value="1.27343440055847" calcext:value-type="float">
            <text:p>1.27343440055847</text:p>
          </table:table-cell>
          <table:table-cell office:value-type="float" office:value="-0.00371971656568348" calcext:value-type="float">
            <text:p>-0.00371971656568348</text:p>
          </table:table-cell>
          <table:table-cell office:value-type="float" office:value="0.0636735707521439" calcext:value-type="float">
            <text:p>0.0636735707521439</text:p>
          </table:table-cell>
          <table:table-cell office:value-type="float" office:value="0.411226660013199" calcext:value-type="float">
            <text:p>0.411226660013199</text:p>
          </table:table-cell>
          <table:table-cell office:value-type="float" office:value="1.24987196922302" calcext:value-type="float">
            <text:p>1.24987196922302</text:p>
          </table:table-cell>
          <table:table-cell office:value-type="float" office:value="0.0138818472623825" calcext:value-type="float">
            <text:p>0.0138818472623825</text:p>
          </table:table-cell>
          <table:table-cell office:value-type="float" office:value="0.0668833702802658" calcext:value-type="float">
            <text:p>0.06688337028026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QRT(([.J60]-[.F60])^2+([.K60]-[.G60])^2)" office:value-type="float" office:value="0.525297126195176" calcext:value-type="float">
            <text:p>0.525297126195176</text:p>
          </table:table-cell>
          <table:table-cell table:formula="of:=SQRT(([.R60]-[.N60])^2+([.S60]-[.O60])^2)" office:value-type="float" office:value="0.32884528920826" calcext:value-type="float">
            <text:p>0.32884528920826</text:p>
          </table:table-cell>
          <table:table-cell table:formula="of:=SQRT(([.R60]-[.F60])^2+([.S60]-[.G60])^2)" office:value-type="float" office:value="1.03982235184876" calcext:value-type="float">
            <text:p>1.03982235184876</text:p>
          </table:table-cell>
          <table:table-cell table:formula="of:=SQRT(([.N60]-[.J60])^2+([.O60]-[.K60])^2)" office:value-type="float" office:value="1.05124282630206" calcext:value-type="float">
            <text:p>1.05124282630206</text:p>
          </table:table-cell>
          <table:table-cell office:value-type="float" office:value="0.833928227424622" calcext:value-type="float">
            <text:p>0.833928227424622</text:p>
          </table:table-cell>
          <table:table-cell office:value-type="float" office:value="0.298319548368454" calcext:value-type="float">
            <text:p>0.298319548368454</text:p>
          </table:table-cell>
          <table:table-cell office:value-type="float" office:value="-0.486940145492554" calcext:value-type="float">
            <text:p>-0.486940145492554</text:p>
          </table:table-cell>
          <table:table-cell office:value-type="float" office:value="0.999528110027313" calcext:value-type="float">
            <text:p>0.999528110027313</text:p>
          </table:table-cell>
          <table:table-cell office:value-type="float" office:value="0.308736979961395" calcext:value-type="float">
            <text:p>0.308736979961395</text:p>
          </table:table-cell>
          <table:table-cell office:value-type="float" office:value="0.3088658452034" calcext:value-type="float">
            <text:p>0.3088658452034</text:p>
          </table:table-cell>
          <table:table-cell office:value-type="float" office:value="-0.473105430603027" calcext:value-type="float">
            <text:p>-0.473105430603027</text:p>
          </table:table-cell>
          <table:table-cell office:value-type="float" office:value="0.999527812004089" calcext:value-type="float">
            <text:p>0.999527812004089</text:p>
          </table:table-cell>
          <table:table-cell office:value-type="float" office:value="0.740888714790344" calcext:value-type="float">
            <text:p>0.740888714790344</text:p>
          </table:table-cell>
          <table:table-cell office:value-type="float" office:value="1.26717495918274" calcext:value-type="float">
            <text:p>1.26717495918274</text:p>
          </table:table-cell>
          <table:table-cell office:value-type="float" office:value="-0.00153934501577169" calcext:value-type="float">
            <text:p>-0.00153934501577169</text:p>
          </table:table-cell>
          <table:table-cell office:value-type="float" office:value="0.0626240074634552" calcext:value-type="float">
            <text:p>0.0626240074634552</text:p>
          </table:table-cell>
          <table:table-cell office:value-type="float" office:value="0.412549644708633" calcext:value-type="float">
            <text:p>0.412549644708633</text:p>
          </table:table-cell>
          <table:table-cell office:value-type="float" office:value="1.24893546104431" calcext:value-type="float">
            <text:p>1.24893546104431</text:p>
          </table:table-cell>
          <table:table-cell office:value-type="float" office:value="0.0118132727220654" calcext:value-type="float">
            <text:p>0.0118132727220654</text:p>
          </table:table-cell>
          <table:table-cell office:value-type="float" office:value="0.0657335668802261" calcext:value-type="float">
            <text:p>0.06573356688022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([.J61]-[.F61])^2+([.K61]-[.G61])^2)" office:value-type="float" office:value="0.524709158681358" calcext:value-type="float">
            <text:p>0.524709158681358</text:p>
          </table:table-cell>
          <table:table-cell table:formula="of:=SQRT(([.R61]-[.N61])^2+([.S61]-[.O61])^2)" office:value-type="float" office:value="0.329929333900038" calcext:value-type="float">
            <text:p>0.329929333900038</text:p>
          </table:table-cell>
          <table:table-cell table:formula="of:=SQRT(([.R61]-[.F61])^2+([.S61]-[.G61])^2)" office:value-type="float" office:value="1.03997464070266" calcext:value-type="float">
            <text:p>1.03997464070266</text:p>
          </table:table-cell>
          <table:table-cell table:formula="of:=SQRT(([.N61]-[.J61])^2+([.O61]-[.K61])^2)" office:value-type="float" office:value="1.05152064408444" calcext:value-type="float">
            <text:p>1.05152064408444</text:p>
          </table:table-cell>
          <table:table-cell office:value-type="float" office:value="0.833737850189209" calcext:value-type="float">
            <text:p>0.833737850189209</text:p>
          </table:table-cell>
          <table:table-cell office:value-type="float" office:value="0.300812304019928" calcext:value-type="float">
            <text:p>0.300812304019928</text:p>
          </table:table-cell>
          <table:table-cell office:value-type="float" office:value="-0.4840127825737" calcext:value-type="float">
            <text:p>-0.4840127825737</text:p>
          </table:table-cell>
          <table:table-cell office:value-type="float" office:value="0.999529242515564" calcext:value-type="float">
            <text:p>0.999529242515564</text:p>
          </table:table-cell>
          <table:table-cell office:value-type="float" office:value="0.309090405702591" calcext:value-type="float">
            <text:p>0.309090405702591</text:p>
          </table:table-cell>
          <table:table-cell office:value-type="float" office:value="0.308859676122665" calcext:value-type="float">
            <text:p>0.308859676122665</text:p>
          </table:table-cell>
          <table:table-cell office:value-type="float" office:value="-0.42890852689743" calcext:value-type="float">
            <text:p>-0.42890852689743</text:p>
          </table:table-cell>
          <table:table-cell office:value-type="float" office:value="0.999544262886047" calcext:value-type="float">
            <text:p>0.999544262886047</text:p>
          </table:table-cell>
          <table:table-cell office:value-type="float" office:value="0.740886747837067" calcext:value-type="float">
            <text:p>0.740886747837067</text:p>
          </table:table-cell>
          <table:table-cell office:value-type="float" office:value="1.26763367652893" calcext:value-type="float">
            <text:p>1.26763367652893</text:p>
          </table:table-cell>
          <table:table-cell office:value-type="float" office:value="-0.00131912552751601" calcext:value-type="float">
            <text:p>-0.00131912552751601</text:p>
          </table:table-cell>
          <table:table-cell office:value-type="float" office:value="0.06141621991992" calcext:value-type="float">
            <text:p>0.06141621991992</text:p>
          </table:table-cell>
          <table:table-cell office:value-type="float" office:value="0.411369174718857" calcext:value-type="float">
            <text:p>0.411369174718857</text:p>
          </table:table-cell>
          <table:table-cell office:value-type="float" office:value="1.25115537643433" calcext:value-type="float">
            <text:p>1.25115537643433</text:p>
          </table:table-cell>
          <table:table-cell office:value-type="float" office:value="0.0115690464153886" calcext:value-type="float">
            <text:p>0.0115690464153886</text:p>
          </table:table-cell>
          <table:table-cell office:value-type="float" office:value="0.06512251496315" calcext:value-type="float">
            <text:p>0.065122514963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QRT(([.J62]-[.F62])^2+([.K62]-[.G62])^2)" office:value-type="float" office:value="0.524006505005981" calcext:value-type="float">
            <text:p>0.524006505005981</text:p>
          </table:table-cell>
          <table:table-cell table:formula="of:=SQRT(([.R62]-[.N62])^2+([.S62]-[.O62])^2)" office:value-type="float" office:value="0.328213948197592" calcext:value-type="float">
            <text:p>0.328213948197592</text:p>
          </table:table-cell>
          <table:table-cell table:formula="of:=SQRT(([.R62]-[.F62])^2+([.S62]-[.G62])^2)" office:value-type="float" office:value="1.03970146817801" calcext:value-type="float">
            <text:p>1.03970146817801</text:p>
          </table:table-cell>
          <table:table-cell table:formula="of:=SQRT(([.N62]-[.J62])^2+([.O62]-[.K62])^2)" office:value-type="float" office:value="1.05262499710678" calcext:value-type="float">
            <text:p>1.05262499710678</text:p>
          </table:table-cell>
          <table:table-cell office:value-type="float" office:value="0.83320152759552" calcext:value-type="float">
            <text:p>0.83320152759552</text:p>
          </table:table-cell>
          <table:table-cell office:value-type="float" office:value="0.299402177333832" calcext:value-type="float">
            <text:p>0.299402177333832</text:p>
          </table:table-cell>
          <table:table-cell office:value-type="float" office:value="-0.486407846212387" calcext:value-type="float">
            <text:p>-0.486407846212387</text:p>
          </table:table-cell>
          <table:table-cell office:value-type="float" office:value="0.999503493309021" calcext:value-type="float">
            <text:p>0.999503493309021</text:p>
          </table:table-cell>
          <table:table-cell office:value-type="float" office:value="0.309265822172165" calcext:value-type="float">
            <text:p>0.309265822172165</text:p>
          </table:table-cell>
          <table:table-cell office:value-type="float" office:value="0.308015763759613" calcext:value-type="float">
            <text:p>0.308015763759613</text:p>
          </table:table-cell>
          <table:table-cell office:value-type="float" office:value="-0.447896152734756" calcext:value-type="float">
            <text:p>-0.447896152734756</text:p>
          </table:table-cell>
          <table:table-cell office:value-type="float" office:value="0.999527394771576" calcext:value-type="float">
            <text:p>0.999527394771576</text:p>
          </table:table-cell>
          <table:table-cell office:value-type="float" office:value="0.742064118385315" calcext:value-type="float">
            <text:p>0.742064118385315</text:p>
          </table:table-cell>
          <table:table-cell office:value-type="float" office:value="1.26754951477051" calcext:value-type="float">
            <text:p>1.26754951477051</text:p>
          </table:table-cell>
          <table:table-cell office:value-type="float" office:value="-0.00112876435741782" calcext:value-type="float">
            <text:p>-0.00112876435741782</text:p>
          </table:table-cell>
          <table:table-cell office:value-type="float" office:value="0.0611221455037594" calcext:value-type="float">
            <text:p>0.0611221455037594</text:p>
          </table:table-cell>
          <table:table-cell office:value-type="float" office:value="0.414269357919693" calcext:value-type="float">
            <text:p>0.414269357919693</text:p>
          </table:table-cell>
          <table:table-cell office:value-type="float" office:value="1.25096666812897" calcext:value-type="float">
            <text:p>1.25096666812897</text:p>
          </table:table-cell>
          <table:table-cell office:value-type="float" office:value="0.0113674029707909" calcext:value-type="float">
            <text:p>0.0113674029707909</text:p>
          </table:table-cell>
          <table:table-cell office:value-type="float" office:value="0.0648795440793037" calcext:value-type="float">
            <text:p>0.06487954407930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QRT(([.J63]-[.F63])^2+([.K63]-[.G63])^2)" office:value-type="float" office:value="0.527224486176418" calcext:value-type="float">
            <text:p>0.527224486176418</text:p>
          </table:table-cell>
          <table:table-cell table:formula="of:=SQRT(([.R63]-[.N63])^2+([.S63]-[.O63])^2)" office:value-type="float" office:value="0.329371294637406" calcext:value-type="float">
            <text:p>0.329371294637406</text:p>
          </table:table-cell>
          <table:table-cell table:formula="of:=SQRT(([.R63]-[.F63])^2+([.S63]-[.G63])^2)" office:value-type="float" office:value="1.04190484518209" calcext:value-type="float">
            <text:p>1.04190484518209</text:p>
          </table:table-cell>
          <table:table-cell table:formula="of:=SQRT(([.N63]-[.J63])^2+([.O63]-[.K63])^2)" office:value-type="float" office:value="1.04786338831814" calcext:value-type="float">
            <text:p>1.04786338831814</text:p>
          </table:table-cell>
          <table:table-cell office:value-type="float" office:value="0.832130908966065" calcext:value-type="float">
            <text:p>0.832130908966065</text:p>
          </table:table-cell>
          <table:table-cell office:value-type="float" office:value="0.299262076616287" calcext:value-type="float">
            <text:p>0.299262076616287</text:p>
          </table:table-cell>
          <table:table-cell office:value-type="float" office:value="-0.461215496063232" calcext:value-type="float">
            <text:p>-0.461215496063232</text:p>
          </table:table-cell>
          <table:table-cell office:value-type="float" office:value="0.999506056308746" calcext:value-type="float">
            <text:p>0.999506056308746</text:p>
          </table:table-cell>
          <table:table-cell office:value-type="float" office:value="0.305155634880066" calcext:value-type="float">
            <text:p>0.305155634880066</text:p>
          </table:table-cell>
          <table:table-cell office:value-type="float" office:value="0.315470695495605" calcext:value-type="float">
            <text:p>0.315470695495605</text:p>
          </table:table-cell>
          <table:table-cell office:value-type="float" office:value="-0.432861149311066" calcext:value-type="float">
            <text:p>-0.432861149311066</text:p>
          </table:table-cell>
          <table:table-cell office:value-type="float" office:value="0.999530851840973" calcext:value-type="float">
            <text:p>0.999530851840973</text:p>
          </table:table-cell>
          <table:table-cell office:value-type="float" office:value="0.743385016918182" calcext:value-type="float">
            <text:p>0.743385016918182</text:p>
          </table:table-cell>
          <table:table-cell office:value-type="float" office:value="1.26729667186737" calcext:value-type="float">
            <text:p>1.26729667186737</text:p>
          </table:table-cell>
          <table:table-cell office:value-type="float" office:value="0.00186718837358058" calcext:value-type="float">
            <text:p>0.00186718837358058</text:p>
          </table:table-cell>
          <table:table-cell office:value-type="float" office:value="0.0596919879317284" calcext:value-type="float">
            <text:p>0.0596919879317284</text:p>
          </table:table-cell>
          <table:table-cell office:value-type="float" office:value="0.41429391503334" calcext:value-type="float">
            <text:p>0.41429391503334</text:p>
          </table:table-cell>
          <table:table-cell office:value-type="float" office:value="1.25371372699738" calcext:value-type="float">
            <text:p>1.25371372699738</text:p>
          </table:table-cell>
          <table:table-cell office:value-type="float" office:value="0.00849734805524349" calcext:value-type="float">
            <text:p>0.00849734805524349</text:p>
          </table:table-cell>
          <table:table-cell office:value-type="float" office:value="0.0632797628641129" calcext:value-type="float">
            <text:p>0.06327976286411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QRT(([.J64]-[.F64])^2+([.K64]-[.G64])^2)" office:value-type="float" office:value="0.515194630714765" calcext:value-type="float">
            <text:p>0.515194630714765</text:p>
          </table:table-cell>
          <table:table-cell table:formula="of:=SQRT(([.R64]-[.N64])^2+([.S64]-[.O64])^2)" office:value-type="float" office:value="0.329829629387044" calcext:value-type="float">
            <text:p>0.329829629387044</text:p>
          </table:table-cell>
          <table:table-cell table:formula="of:=SQRT(([.R64]-[.F64])^2+([.S64]-[.G64])^2)" office:value-type="float" office:value="1.03652740467216" calcext:value-type="float">
            <text:p>1.03652740467216</text:p>
          </table:table-cell>
          <table:table-cell table:formula="of:=SQRT(([.N64]-[.J64])^2+([.O64]-[.K64])^2)" office:value-type="float" office:value="1.05214095160678" calcext:value-type="float">
            <text:p>1.05214095160678</text:p>
          </table:table-cell>
          <table:table-cell office:value-type="float" office:value="0.832708060741425" calcext:value-type="float">
            <text:p>0.832708060741425</text:p>
          </table:table-cell>
          <table:table-cell office:value-type="float" office:value="0.305809408426285" calcext:value-type="float">
            <text:p>0.305809408426285</text:p>
          </table:table-cell>
          <table:table-cell office:value-type="float" office:value="-0.388978362083435" calcext:value-type="float">
            <text:p>-0.388978362083435</text:p>
          </table:table-cell>
          <table:table-cell office:value-type="float" office:value="0.999510586261749" calcext:value-type="float">
            <text:p>0.999510586261749</text:p>
          </table:table-cell>
          <table:table-cell office:value-type="float" office:value="0.317569941282272" calcext:value-type="float">
            <text:p>0.317569941282272</text:p>
          </table:table-cell>
          <table:table-cell office:value-type="float" office:value="0.313439965248108" calcext:value-type="float">
            <text:p>0.313439965248108</text:p>
          </table:table-cell>
          <table:table-cell office:value-type="float" office:value="-0.294155776500702" calcext:value-type="float">
            <text:p>-0.294155776500702</text:p>
          </table:table-cell>
          <table:table-cell office:value-type="float" office:value="0.999533355236054" calcext:value-type="float">
            <text:p>0.999533355236054</text:p>
          </table:table-cell>
          <table:table-cell office:value-type="float" office:value="0.743521809577942" calcext:value-type="float">
            <text:p>0.743521809577942</text:p>
          </table:table-cell>
          <table:table-cell office:value-type="float" office:value="1.27550315856934" calcext:value-type="float">
            <text:p>1.27550315856934</text:p>
          </table:table-cell>
          <table:table-cell office:value-type="float" office:value="0.00340554933063686" calcext:value-type="float">
            <text:p>0.00340554933063686</text:p>
          </table:table-cell>
          <table:table-cell office:value-type="float" office:value="0.0624462254345417" calcext:value-type="float">
            <text:p>0.0624462254345417</text:p>
          </table:table-cell>
          <table:table-cell office:value-type="float" office:value="0.414382636547089" calcext:value-type="float">
            <text:p>0.414382636547089</text:p>
          </table:table-cell>
          <table:table-cell office:value-type="float" office:value="1.25417268276215" calcext:value-type="float">
            <text:p>1.25417268276215</text:p>
          </table:table-cell>
          <table:table-cell office:value-type="float" office:value="0.00704188132658601" calcext:value-type="float">
            <text:p>0.00704188132658601</text:p>
          </table:table-cell>
          <table:table-cell office:value-type="float" office:value="0.0667532980442047" calcext:value-type="float">
            <text:p>0.06675329804420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QRT(([.J65]-[.F65])^2+([.K65]-[.G65])^2)" office:value-type="float" office:value="0.514222170627212" calcext:value-type="float">
            <text:p>0.514222170627212</text:p>
          </table:table-cell>
          <table:table-cell table:formula="of:=SQRT(([.R65]-[.N65])^2+([.S65]-[.O65])^2)" office:value-type="float" office:value="0.325900222227901" calcext:value-type="float">
            <text:p>0.325900222227901</text:p>
          </table:table-cell>
          <table:table-cell table:formula="of:=SQRT(([.R65]-[.F65])^2+([.S65]-[.G65])^2)" office:value-type="float" office:value="1.02993605285771" calcext:value-type="float">
            <text:p>1.02993605285771</text:p>
          </table:table-cell>
          <table:table-cell table:formula="of:=SQRT(([.N65]-[.J65])^2+([.O65]-[.K65])^2)" office:value-type="float" office:value="1.03586856682995" calcext:value-type="float">
            <text:p>1.03586856682995</text:p>
          </table:table-cell>
          <table:table-cell office:value-type="float" office:value="0.831495940685272" calcext:value-type="float">
            <text:p>0.831495940685272</text:p>
          </table:table-cell>
          <table:table-cell office:value-type="float" office:value="0.303126901388168" calcext:value-type="float">
            <text:p>0.303126901388168</text:p>
          </table:table-cell>
          <table:table-cell office:value-type="float" office:value="-0.478977531194687" calcext:value-type="float">
            <text:p>-0.478977531194687</text:p>
          </table:table-cell>
          <table:table-cell office:value-type="float" office:value="0.999501526355743" calcext:value-type="float">
            <text:p>0.999501526355743</text:p>
          </table:table-cell>
          <table:table-cell office:value-type="float" office:value="0.317420721054077" calcext:value-type="float">
            <text:p>0.317420721054077</text:p>
          </table:table-cell>
          <table:table-cell office:value-type="float" office:value="0.315419554710388" calcext:value-type="float">
            <text:p>0.315419554710388</text:p>
          </table:table-cell>
          <table:table-cell office:value-type="float" office:value="-0.520833432674408" calcext:value-type="float">
            <text:p>-0.520833432674408</text:p>
          </table:table-cell>
          <table:table-cell office:value-type="float" office:value="0.999523520469666" calcext:value-type="float">
            <text:p>0.999523520469666</text:p>
          </table:table-cell>
          <table:table-cell office:value-type="float" office:value="0.740353524684906" calcext:value-type="float">
            <text:p>0.740353524684906</text:p>
          </table:table-cell>
          <table:table-cell office:value-type="float" office:value="1.26101541519165" calcext:value-type="float">
            <text:p>1.26101541519165</text:p>
          </table:table-cell>
          <table:table-cell office:value-type="float" office:value="0.0071201310493052" calcext:value-type="float">
            <text:p>0.0071201310493052</text:p>
          </table:table-cell>
          <table:table-cell office:value-type="float" office:value="0.0638191252946854" calcext:value-type="float">
            <text:p>0.0638191252946854</text:p>
          </table:table-cell>
          <table:table-cell office:value-type="float" office:value="0.414845854043961" calcext:value-type="float">
            <text:p>0.414845854043961</text:p>
          </table:table-cell>
          <table:table-cell office:value-type="float" office:value="1.24502444267273" calcext:value-type="float">
            <text:p>1.24502444267273</text:p>
          </table:table-cell>
          <table:table-cell office:value-type="float" office:value="0.00312133738771081" calcext:value-type="float">
            <text:p>0.00312133738771081</text:p>
          </table:table-cell>
          <table:table-cell office:value-type="float" office:value="0.0679529905319214" calcext:value-type="float">
            <text:p>0.06795299053192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QRT(([.J66]-[.F66])^2+([.K66]-[.G66])^2)" office:value-type="float" office:value="0.515569056303079" calcext:value-type="float">
            <text:p>0.515569056303079</text:p>
          </table:table-cell>
          <table:table-cell table:formula="of:=SQRT(([.R66]-[.N66])^2+([.S66]-[.O66])^2)" office:value-type="float" office:value="0.327727441871556" calcext:value-type="float">
            <text:p>0.327727441871556</text:p>
          </table:table-cell>
          <table:table-cell table:formula="of:=SQRT(([.R66]-[.F66])^2+([.S66]-[.G66])^2)" office:value-type="float" office:value="1.02502600340167" calcext:value-type="float">
            <text:p>1.02502600340167</text:p>
          </table:table-cell>
          <table:table-cell table:formula="of:=SQRT(([.N66]-[.J66])^2+([.O66]-[.K66])^2)" office:value-type="float" office:value="1.03511283973651" calcext:value-type="float">
            <text:p>1.03511283973651</text:p>
          </table:table-cell>
          <table:table-cell office:value-type="float" office:value="0.832180976867676" calcext:value-type="float">
            <text:p>0.832180976867676</text:p>
          </table:table-cell>
          <table:table-cell office:value-type="float" office:value="0.303559839725494" calcext:value-type="float">
            <text:p>0.303559839725494</text:p>
          </table:table-cell>
          <table:table-cell office:value-type="float" office:value="-0.513196051120758" calcext:value-type="float">
            <text:p>-0.513196051120758</text:p>
          </table:table-cell>
          <table:table-cell office:value-type="float" office:value="0.999488234519959" calcext:value-type="float">
            <text:p>0.999488234519959</text:p>
          </table:table-cell>
          <table:table-cell office:value-type="float" office:value="0.316747456789017" calcext:value-type="float">
            <text:p>0.316747456789017</text:p>
          </table:table-cell>
          <table:table-cell office:value-type="float" office:value="0.315380930900574" calcext:value-type="float">
            <text:p>0.315380930900574</text:p>
          </table:table-cell>
          <table:table-cell office:value-type="float" office:value="-0.536618113517761" calcext:value-type="float">
            <text:p>-0.536618113517761</text:p>
          </table:table-cell>
          <table:table-cell office:value-type="float" office:value="0.999530375003815" calcext:value-type="float">
            <text:p>0.999530375003815</text:p>
          </table:table-cell>
          <table:table-cell office:value-type="float" office:value="0.742103934288025" calcext:value-type="float">
            <text:p>0.742103934288025</text:p>
          </table:table-cell>
          <table:table-cell office:value-type="float" office:value="1.25906014442444" calcext:value-type="float">
            <text:p>1.25906014442444</text:p>
          </table:table-cell>
          <table:table-cell office:value-type="float" office:value="0.0144090931862593" calcext:value-type="float">
            <text:p>0.0144090931862593</text:p>
          </table:table-cell>
          <table:table-cell office:value-type="float" office:value="0.063238188624382" calcext:value-type="float">
            <text:p>0.063238188624382</text:p>
          </table:table-cell>
          <table:table-cell office:value-type="float" office:value="0.414941549301147" calcext:value-type="float">
            <text:p>0.414941549301147</text:p>
          </table:table-cell>
          <table:table-cell office:value-type="float" office:value="1.23982346057892" calcext:value-type="float">
            <text:p>1.23982346057892</text:p>
          </table:table-cell>
          <table:table-cell office:value-type="float" office:value="-0.00424480717629194" calcext:value-type="float">
            <text:p>-0.00424480717629194</text:p>
          </table:table-cell>
          <table:table-cell office:value-type="float" office:value="0.068122148513794" calcext:value-type="float">
            <text:p>0.0681221485137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QRT(([.J67]-[.F67])^2+([.K67]-[.G67])^2)" office:value-type="float" office:value="0.513522005087363" calcext:value-type="float">
            <text:p>0.513522005087363</text:p>
          </table:table-cell>
          <table:table-cell table:formula="of:=SQRT(([.R67]-[.N67])^2+([.S67]-[.O67])^2)" office:value-type="float" office:value="0.324277552991814" calcext:value-type="float">
            <text:p>0.324277552991814</text:p>
          </table:table-cell>
          <table:table-cell table:formula="of:=SQRT(([.R67]-[.F67])^2+([.S67]-[.G67])^2)" office:value-type="float" office:value="1.00130661130885" calcext:value-type="float">
            <text:p>1.00130661130885</text:p>
          </table:table-cell>
          <table:table-cell table:formula="of:=SQRT(([.N67]-[.J67])^2+([.O67]-[.K67])^2)" office:value-type="float" office:value="1.00136899164801" calcext:value-type="float">
            <text:p>1.00136899164801</text:p>
          </table:table-cell>
          <table:table-cell office:value-type="float" office:value="0.831055343151093" calcext:value-type="float">
            <text:p>0.831055343151093</text:p>
          </table:table-cell>
          <table:table-cell office:value-type="float" office:value="0.301616013050079" calcext:value-type="float">
            <text:p>0.301616013050079</text:p>
          </table:table-cell>
          <table:table-cell office:value-type="float" office:value="-0.516702175140381" calcext:value-type="float">
            <text:p>-0.516702175140381</text:p>
          </table:table-cell>
          <table:table-cell office:value-type="float" office:value="0.99951034784317" calcext:value-type="float">
            <text:p>0.99951034784317</text:p>
          </table:table-cell>
          <table:table-cell office:value-type="float" office:value="0.317728966474533" calcext:value-type="float">
            <text:p>0.317728966474533</text:p>
          </table:table-cell>
          <table:table-cell office:value-type="float" office:value="0.315789252519608" calcext:value-type="float">
            <text:p>0.315789252519608</text:p>
          </table:table-cell>
          <table:table-cell office:value-type="float" office:value="-0.51813542842865" calcext:value-type="float">
            <text:p>-0.51813542842865</text:p>
          </table:table-cell>
          <table:table-cell office:value-type="float" office:value="0.999544203281403" calcext:value-type="float">
            <text:p>0.999544203281403</text:p>
          </table:table-cell>
          <table:table-cell office:value-type="float" office:value="0.741455078125" calcext:value-type="float">
            <text:p>0.741455078125</text:p>
          </table:table-cell>
          <table:table-cell office:value-type="float" office:value="1.22309076786041" calcext:value-type="float">
            <text:p>1.22309076786041</text:p>
          </table:table-cell>
          <table:table-cell office:value-type="float" office:value="0.0143047627061605" calcext:value-type="float">
            <text:p>0.0143047627061605</text:p>
          </table:table-cell>
          <table:table-cell office:value-type="float" office:value="0.0668438225984573" calcext:value-type="float">
            <text:p>0.0668438225984573</text:p>
          </table:table-cell>
          <table:table-cell office:value-type="float" office:value="0.417320907115936" calcext:value-type="float">
            <text:p>0.417320907115936</text:p>
          </table:table-cell>
          <table:table-cell office:value-type="float" office:value="1.21344864368439" calcext:value-type="float">
            <text:p>1.21344864368439</text:p>
          </table:table-cell>
          <table:table-cell office:value-type="float" office:value="-0.00421686563640833" calcext:value-type="float">
            <text:p>-0.00421686563640833</text:p>
          </table:table-cell>
          <table:table-cell office:value-type="float" office:value="0.0712302550673485" calcext:value-type="float">
            <text:p>0.07123025506734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QRT(([.J68]-[.F68])^2+([.K68]-[.G68])^2)" office:value-type="float" office:value="0.513595449082899" calcext:value-type="float">
            <text:p>0.513595449082899</text:p>
          </table:table-cell>
          <table:table-cell table:formula="of:=SQRT(([.R68]-[.N68])^2+([.S68]-[.O68])^2)" office:value-type="float" office:value="0.323451147198822" calcext:value-type="float">
            <text:p>0.323451147198822</text:p>
          </table:table-cell>
          <table:table-cell table:formula="of:=SQRT(([.R68]-[.F68])^2+([.S68]-[.G68])^2)" office:value-type="float" office:value="1.00051805602495" calcext:value-type="float">
            <text:p>1.00051805602495</text:p>
          </table:table-cell>
          <table:table-cell table:formula="of:=SQRT(([.N68]-[.J68])^2+([.O68]-[.K68])^2)" office:value-type="float" office:value="1.00095836742886" calcext:value-type="float">
            <text:p>1.00095836742886</text:p>
          </table:table-cell>
          <table:table-cell office:value-type="float" office:value="0.831071496009827" calcext:value-type="float">
            <text:p>0.831071496009827</text:p>
          </table:table-cell>
          <table:table-cell office:value-type="float" office:value="0.302241623401642" calcext:value-type="float">
            <text:p>0.302241623401642</text:p>
          </table:table-cell>
          <table:table-cell office:value-type="float" office:value="-0.539623558521271" calcext:value-type="float">
            <text:p>-0.539623558521271</text:p>
          </table:table-cell>
          <table:table-cell office:value-type="float" office:value="0.999504685401917" calcext:value-type="float">
            <text:p>0.999504685401917</text:p>
          </table:table-cell>
          <table:table-cell office:value-type="float" office:value="0.317667543888092" calcext:value-type="float">
            <text:p>0.317667543888092</text:p>
          </table:table-cell>
          <table:table-cell office:value-type="float" office:value="0.316265434026718" calcext:value-type="float">
            <text:p>0.316265434026718</text:p>
          </table:table-cell>
          <table:table-cell office:value-type="float" office:value="-0.596683084964752" calcext:value-type="float">
            <text:p>-0.596683084964752</text:p>
          </table:table-cell>
          <table:table-cell office:value-type="float" office:value="0.999551057815552" calcext:value-type="float">
            <text:p>0.999551057815552</text:p>
          </table:table-cell>
          <table:table-cell office:value-type="float" office:value="0.741505801677704" calcext:value-type="float">
            <text:p>0.741505801677704</text:p>
          </table:table-cell>
          <table:table-cell office:value-type="float" office:value="1.22306132316589" calcext:value-type="float">
            <text:p>1.22306132316589</text:p>
          </table:table-cell>
          <table:table-cell office:value-type="float" office:value="0.0320267826318741" calcext:value-type="float">
            <text:p>0.0320267826318741</text:p>
          </table:table-cell>
          <table:table-cell office:value-type="float" office:value="0.0659974068403244" calcext:value-type="float">
            <text:p>0.0659974068403244</text:p>
          </table:table-cell>
          <table:table-cell office:value-type="float" office:value="0.418193161487579" calcext:value-type="float">
            <text:p>0.418193161487579</text:p>
          </table:table-cell>
          <table:table-cell office:value-type="float" office:value="1.21359658241272" calcext:value-type="float">
            <text:p>1.21359658241272</text:p>
          </table:table-cell>
          <table:table-cell office:value-type="float" office:value="-0.0222954880446196" calcext:value-type="float">
            <text:p>-0.0222954880446196</text:p>
          </table:table-cell>
          <table:table-cell office:value-type="float" office:value="0.0708702057600021" calcext:value-type="float">
            <text:p>0.07087020576000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QRT(([.J69]-[.F69])^2+([.K69]-[.G69])^2)" office:value-type="float" office:value="0.513668047329197" calcext:value-type="float">
            <text:p>0.513668047329197</text:p>
          </table:table-cell>
          <table:table-cell table:formula="of:=SQRT(([.R69]-[.N69])^2+([.S69]-[.O69])^2)" office:value-type="float" office:value="0.320534858822103" calcext:value-type="float">
            <text:p>0.320534858822103</text:p>
          </table:table-cell>
          <table:table-cell table:formula="of:=SQRT(([.R69]-[.F69])^2+([.S69]-[.G69])^2)" office:value-type="float" office:value="1.00019434739362" calcext:value-type="float">
            <text:p>1.00019434739362</text:p>
          </table:table-cell>
          <table:table-cell table:formula="of:=SQRT(([.N69]-[.J69])^2+([.O69]-[.K69])^2)" office:value-type="float" office:value="1.00029817934554" calcext:value-type="float">
            <text:p>1.00029817934554</text:p>
          </table:table-cell>
          <table:table-cell office:value-type="float" office:value="0.831160664558411" calcext:value-type="float">
            <text:p>0.831160664558411</text:p>
          </table:table-cell>
          <table:table-cell office:value-type="float" office:value="0.302200853824616" calcext:value-type="float">
            <text:p>0.302200853824616</text:p>
          </table:table-cell>
          <table:table-cell office:value-type="float" office:value="-0.584449291229248" calcext:value-type="float">
            <text:p>-0.584449291229248</text:p>
          </table:table-cell>
          <table:table-cell office:value-type="float" office:value="0.999494552612305" calcext:value-type="float">
            <text:p>0.999494552612305</text:p>
          </table:table-cell>
          <table:table-cell office:value-type="float" office:value="0.317724764347076" calcext:value-type="float">
            <text:p>0.317724764347076</text:p>
          </table:table-cell>
          <table:table-cell office:value-type="float" office:value="0.317642331123352" calcext:value-type="float">
            <text:p>0.317642331123352</text:p>
          </table:table-cell>
          <table:table-cell office:value-type="float" office:value="-0.637268304824829" calcext:value-type="float">
            <text:p>-0.637268304824829</text:p>
          </table:table-cell>
          <table:table-cell office:value-type="float" office:value="0.999549567699432" calcext:value-type="float">
            <text:p>0.999549567699432</text:p>
          </table:table-cell>
          <table:table-cell office:value-type="float" office:value="0.741661548614502" calcext:value-type="float">
            <text:p>0.741661548614502</text:p>
          </table:table-cell>
          <table:table-cell office:value-type="float" office:value="1.22366333007813" calcext:value-type="float">
            <text:p>1.22366333007813</text:p>
          </table:table-cell>
          <table:table-cell office:value-type="float" office:value="0.0319141671061516" calcext:value-type="float">
            <text:p>0.0319141671061516</text:p>
          </table:table-cell>
          <table:table-cell office:value-type="float" office:value="0.0640592277050018" calcext:value-type="float">
            <text:p>0.0640592277050018</text:p>
          </table:table-cell>
          <table:table-cell office:value-type="float" office:value="0.421256482601166" calcext:value-type="float">
            <text:p>0.421256482601166</text:p>
          </table:table-cell>
          <table:table-cell office:value-type="float" office:value="1.21454250812531" calcext:value-type="float">
            <text:p>1.21454250812531</text:p>
          </table:table-cell>
          <table:table-cell office:value-type="float" office:value="-0.0220847073942423" calcext:value-type="float">
            <text:p>-0.0220847073942423</text:p>
          </table:table-cell>
          <table:table-cell office:value-type="float" office:value="0.0687749162316322" calcext:value-type="float">
            <text:p>0.06877491623163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QRT(([.J70]-[.F70])^2+([.K70]-[.G70])^2)" office:value-type="float" office:value="0.511113577843179" calcext:value-type="float">
            <text:p>0.511113577843179</text:p>
          </table:table-cell>
          <table:table-cell table:formula="of:=SQRT(([.R70]-[.N70])^2+([.S70]-[.O70])^2)" office:value-type="float" office:value="0.31869058519737" calcext:value-type="float">
            <text:p>0.31869058519737</text:p>
          </table:table-cell>
          <table:table-cell table:formula="of:=SQRT(([.R70]-[.F70])^2+([.S70]-[.G70])^2)" office:value-type="float" office:value="1.00170706966225" calcext:value-type="float">
            <text:p>1.00170706966225</text:p>
          </table:table-cell>
          <table:table-cell table:formula="of:=SQRT(([.N70]-[.J70])^2+([.O70]-[.K70])^2)" office:value-type="float" office:value="0.997566458893108" calcext:value-type="float">
            <text:p>0.997566458893108</text:p>
          </table:table-cell>
          <table:table-cell office:value-type="float" office:value="0.828607261180878" calcext:value-type="float">
            <text:p>0.828607261180878</text:p>
          </table:table-cell>
          <table:table-cell office:value-type="float" office:value="0.302195429801941" calcext:value-type="float">
            <text:p>0.302195429801941</text:p>
          </table:table-cell>
          <table:table-cell office:value-type="float" office:value="-0.570358633995056" calcext:value-type="float">
            <text:p>-0.570358633995056</text:p>
          </table:table-cell>
          <table:table-cell office:value-type="float" office:value="0.999447643756867" calcext:value-type="float">
            <text:p>0.999447643756867</text:p>
          </table:table-cell>
          <table:table-cell office:value-type="float" office:value="0.31780606508255" calcext:value-type="float">
            <text:p>0.31780606508255</text:p>
          </table:table-cell>
          <table:table-cell office:value-type="float" office:value="0.3200623691082" calcext:value-type="float">
            <text:p>0.3200623691082</text:p>
          </table:table-cell>
          <table:table-cell office:value-type="float" office:value="-0.526875436306" calcext:value-type="float">
            <text:p>-0.526875436306</text:p>
          </table:table-cell>
          <table:table-cell office:value-type="float" office:value="0.999518215656281" calcext:value-type="float">
            <text:p>0.999518215656281</text:p>
          </table:table-cell>
          <table:table-cell office:value-type="float" office:value="0.739098966121674" calcext:value-type="float">
            <text:p>0.739098966121674</text:p>
          </table:table-cell>
          <table:table-cell office:value-type="float" office:value="1.22430300712585" calcext:value-type="float">
            <text:p>1.22430300712585</text:p>
          </table:table-cell>
          <table:table-cell office:value-type="float" office:value="0.0159035213291645" calcext:value-type="float">
            <text:p>0.0159035213291645</text:p>
          </table:table-cell>
          <table:table-cell office:value-type="float" office:value="0.0614313185214996" calcext:value-type="float">
            <text:p>0.0614313185214996</text:p>
          </table:table-cell>
          <table:table-cell office:value-type="float" office:value="0.420492172241211" calcext:value-type="float">
            <text:p>0.420492172241211</text:p>
          </table:table-cell>
          <table:table-cell office:value-type="float" office:value="1.21699547767639" calcext:value-type="float">
            <text:p>1.21699547767639</text:p>
          </table:table-cell>
          <table:table-cell office:value-type="float" office:value="-0.0059791118837893" calcext:value-type="float">
            <text:p>-0.0059791118837893</text:p>
          </table:table-cell>
          <table:table-cell office:value-type="float" office:value="0.0661861896514893" calcext:value-type="float">
            <text:p>0.06618618965148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([.J71]-[.F71])^2+([.K71]-[.G71])^2)" office:value-type="float" office:value="0.511693994401141" calcext:value-type="float">
            <text:p>0.511693994401141</text:p>
          </table:table-cell>
          <table:table-cell table:formula="of:=SQRT(([.R71]-[.N71])^2+([.S71]-[.O71])^2)" office:value-type="float" office:value="0.320221184681446" calcext:value-type="float">
            <text:p>0.320221184681446</text:p>
          </table:table-cell>
          <table:table-cell table:formula="of:=SQRT(([.R71]-[.F71])^2+([.S71]-[.G71])^2)" office:value-type="float" office:value="1.0044024912369" calcext:value-type="float">
            <text:p>1.0044024912369</text:p>
          </table:table-cell>
          <table:table-cell table:formula="of:=SQRT(([.N71]-[.J71])^2+([.O71]-[.K71])^2)" office:value-type="float" office:value="0.997038220847418" calcext:value-type="float">
            <text:p>0.997038220847418</text:p>
          </table:table-cell>
          <table:table-cell office:value-type="float" office:value="0.828317046165466" calcext:value-type="float">
            <text:p>0.828317046165466</text:p>
          </table:table-cell>
          <table:table-cell office:value-type="float" office:value="0.302175551652908" calcext:value-type="float">
            <text:p>0.302175551652908</text:p>
          </table:table-cell>
          <table:table-cell office:value-type="float" office:value="-0.455856949090958" calcext:value-type="float">
            <text:p>-0.455856949090958</text:p>
          </table:table-cell>
          <table:table-cell office:value-type="float" office:value="0.999446272850037" calcext:value-type="float">
            <text:p>0.999446272850037</text:p>
          </table:table-cell>
          <table:table-cell office:value-type="float" office:value="0.316998660564423" calcext:value-type="float">
            <text:p>0.316998660564423</text:p>
          </table:table-cell>
          <table:table-cell office:value-type="float" office:value="0.321777909994125" calcext:value-type="float">
            <text:p>0.321777909994125</text:p>
          </table:table-cell>
          <table:table-cell office:value-type="float" office:value="-0.497051388025284" calcext:value-type="float">
            <text:p>-0.497051388025284</text:p>
          </table:table-cell>
          <table:table-cell office:value-type="float" office:value="0.999531984329224" calcext:value-type="float">
            <text:p>0.999531984329224</text:p>
          </table:table-cell>
          <table:table-cell office:value-type="float" office:value="0.740242719650269" calcext:value-type="float">
            <text:p>0.740242719650269</text:p>
          </table:table-cell>
          <table:table-cell office:value-type="float" office:value="1.22452354431152" calcext:value-type="float">
            <text:p>1.22452354431152</text:p>
          </table:table-cell>
          <table:table-cell office:value-type="float" office:value="0.0265707615762949" calcext:value-type="float">
            <text:p>0.0265707615762949</text:p>
          </table:table-cell>
          <table:table-cell office:value-type="float" office:value="0.0623792186379433" calcext:value-type="float">
            <text:p>0.0623792186379433</text:p>
          </table:table-cell>
          <table:table-cell office:value-type="float" office:value="0.420055478811264" calcext:value-type="float">
            <text:p>0.420055478811264</text:p>
          </table:table-cell>
          <table:table-cell office:value-type="float" office:value="1.2198611497879" calcext:value-type="float">
            <text:p>1.2198611497879</text:p>
          </table:table-cell>
          <table:table-cell office:value-type="float" office:value="-0.0167824514210224" calcext:value-type="float">
            <text:p>-0.0167824514210224</text:p>
          </table:table-cell>
          <table:table-cell office:value-type="float" office:value="0.0678451582789421" calcext:value-type="float">
            <text:p>0.0678451582789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QRT(([.J72]-[.F72])^2+([.K72]-[.G72])^2)" office:value-type="float" office:value="0.509461830028611" calcext:value-type="float">
            <text:p>0.509461830028611</text:p>
          </table:table-cell>
          <table:table-cell table:formula="of:=SQRT(([.R72]-[.N72])^2+([.S72]-[.O72])^2)" office:value-type="float" office:value="0.321516769203266" calcext:value-type="float">
            <text:p>0.321516769203266</text:p>
          </table:table-cell>
          <table:table-cell table:formula="of:=SQRT(([.R72]-[.F72])^2+([.S72]-[.G72])^2)" office:value-type="float" office:value="1.00446796568058" calcext:value-type="float">
            <text:p>1.00446796568058</text:p>
          </table:table-cell>
          <table:table-cell table:formula="of:=SQRT(([.N72]-[.J72])^2+([.O72]-[.K72])^2)" office:value-type="float" office:value="1.00040752758103" calcext:value-type="float">
            <text:p>1.00040752758103</text:p>
          </table:table-cell>
          <table:table-cell office:value-type="float" office:value="0.825587451457977" calcext:value-type="float">
            <text:p>0.825587451457977</text:p>
          </table:table-cell>
          <table:table-cell office:value-type="float" office:value="0.301439076662064" calcext:value-type="float">
            <text:p>0.301439076662064</text:p>
          </table:table-cell>
          <table:table-cell office:value-type="float" office:value="-0.358514130115509" calcext:value-type="float">
            <text:p>-0.358514130115509</text:p>
          </table:table-cell>
          <table:table-cell office:value-type="float" office:value="0.999450623989105" calcext:value-type="float">
            <text:p>0.999450623989105</text:p>
          </table:table-cell>
          <table:table-cell office:value-type="float" office:value="0.316476464271545" calcext:value-type="float">
            <text:p>0.316476464271545</text:p>
          </table:table-cell>
          <table:table-cell office:value-type="float" office:value="0.320343017578125" calcext:value-type="float">
            <text:p>0.320343017578125</text:p>
          </table:table-cell>
          <table:table-cell office:value-type="float" office:value="-0.440399795770645" calcext:value-type="float">
            <text:p>-0.440399795770645</text:p>
          </table:table-cell>
          <table:table-cell office:value-type="float" office:value="0.9995396733284" calcext:value-type="float">
            <text:p>0.9995396733284</text:p>
          </table:table-cell>
          <table:table-cell office:value-type="float" office:value="0.741335868835449" calcext:value-type="float">
            <text:p>0.741335868835449</text:p>
          </table:table-cell>
          <table:table-cell office:value-type="float" office:value="1.2260525226593" calcext:value-type="float">
            <text:p>1.2260525226593</text:p>
          </table:table-cell>
          <table:table-cell office:value-type="float" office:value="0.0389893911778927" calcext:value-type="float">
            <text:p>0.0389893911778927</text:p>
          </table:table-cell>
          <table:table-cell office:value-type="float" office:value="0.0643475726246834" calcext:value-type="float">
            <text:p>0.0643475726246834</text:p>
          </table:table-cell>
          <table:table-cell office:value-type="float" office:value="0.419870138168335" calcext:value-type="float">
            <text:p>0.419870138168335</text:p>
          </table:table-cell>
          <table:table-cell office:value-type="float" office:value="1.22032392024994" calcext:value-type="float">
            <text:p>1.22032392024994</text:p>
          </table:table-cell>
          <table:table-cell office:value-type="float" office:value="-0.029386630281806" calcext:value-type="float">
            <text:p>-0.029386630281806</text:p>
          </table:table-cell>
          <table:table-cell office:value-type="float" office:value="0.0702202692627907" calcext:value-type="float">
            <text:p>0.07022026926279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QRT(([.J73]-[.F73])^2+([.K73]-[.G73])^2)" office:value-type="float" office:value="0.510275251229573" calcext:value-type="float">
            <text:p>0.510275251229573</text:p>
          </table:table-cell>
          <table:table-cell table:formula="of:=SQRT(([.R73]-[.N73])^2+([.S73]-[.O73])^2)" office:value-type="float" office:value="0.321706406743152" calcext:value-type="float">
            <text:p>0.321706406743152</text:p>
          </table:table-cell>
          <table:table-cell table:formula="of:=SQRT(([.R73]-[.F73])^2+([.S73]-[.G73])^2)" office:value-type="float" office:value="1.00243610314973" calcext:value-type="float">
            <text:p>1.00243610314973</text:p>
          </table:table-cell>
          <table:table-cell table:formula="of:=SQRT(([.N73]-[.J73])^2+([.O73]-[.K73])^2)" office:value-type="float" office:value="1.00311690065192" calcext:value-type="float">
            <text:p>1.00311690065192</text:p>
          </table:table-cell>
          <table:table-cell office:value-type="float" office:value="0.826417446136475" calcext:value-type="float">
            <text:p>0.826417446136475</text:p>
          </table:table-cell>
          <table:table-cell office:value-type="float" office:value="0.302037596702576" calcext:value-type="float">
            <text:p>0.302037596702576</text:p>
          </table:table-cell>
          <table:table-cell office:value-type="float" office:value="-0.471883058547974" calcext:value-type="float">
            <text:p>-0.471883058547974</text:p>
          </table:table-cell>
          <table:table-cell office:value-type="float" office:value="0.99943482875824" calcext:value-type="float">
            <text:p>0.99943482875824</text:p>
          </table:table-cell>
          <table:table-cell office:value-type="float" office:value="0.316395998001099" calcext:value-type="float">
            <text:p>0.316395998001099</text:p>
          </table:table-cell>
          <table:table-cell office:value-type="float" office:value="0.318129658699036" calcext:value-type="float">
            <text:p>0.318129658699036</text:p>
          </table:table-cell>
          <table:table-cell office:value-type="float" office:value="-0.514678776264191" calcext:value-type="float">
            <text:p>-0.514678776264191</text:p>
          </table:table-cell>
          <table:table-cell office:value-type="float" office:value="0.999533295631409" calcext:value-type="float">
            <text:p>0.999533295631409</text:p>
          </table:table-cell>
          <table:table-cell office:value-type="float" office:value="0.741351962089539" calcext:value-type="float">
            <text:p>0.741351962089539</text:p>
          </table:table-cell>
          <table:table-cell office:value-type="float" office:value="1.22678577899933" calcext:value-type="float">
            <text:p>1.22678577899933</text:p>
          </table:table-cell>
          <table:table-cell office:value-type="float" office:value="0.0385399200022221" calcext:value-type="float">
            <text:p>0.0385399200022221</text:p>
          </table:table-cell>
          <table:table-cell office:value-type="float" office:value="0.0631437972187996" calcext:value-type="float">
            <text:p>0.0631437972187996</text:p>
          </table:table-cell>
          <table:table-cell office:value-type="float" office:value="0.419757932424545" calcext:value-type="float">
            <text:p>0.419757932424545</text:p>
          </table:table-cell>
          <table:table-cell office:value-type="float" office:value="1.21828329563141" calcext:value-type="float">
            <text:p>1.21828329563141</text:p>
          </table:table-cell>
          <table:table-cell office:value-type="float" office:value="-0.0289040356874466" calcext:value-type="float">
            <text:p>-0.0289040356874466</text:p>
          </table:table-cell>
          <table:table-cell office:value-type="float" office:value="0.0691416934132576" calcext:value-type="float">
            <text:p>0.0691416934132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QRT(([.J74]-[.F74])^2+([.K74]-[.G74])^2)" office:value-type="float" office:value="0.510569646507372" calcext:value-type="float">
            <text:p>0.510569646507372</text:p>
          </table:table-cell>
          <table:table-cell table:formula="of:=SQRT(([.R74]-[.N74])^2+([.S74]-[.O74])^2)" office:value-type="float" office:value="0.321525991824249" calcext:value-type="float">
            <text:p>0.321525991824249</text:p>
          </table:table-cell>
          <table:table-cell table:formula="of:=SQRT(([.R74]-[.F74])^2+([.S74]-[.G74])^2)" office:value-type="float" office:value="1.00244306523469" calcext:value-type="float">
            <text:p>1.00244306523469</text:p>
          </table:table-cell>
          <table:table-cell table:formula="of:=SQRT(([.N74]-[.J74])^2+([.O74]-[.K74])^2)" office:value-type="float" office:value="1.00166717422979" calcext:value-type="float">
            <text:p>1.00166717422979</text:p>
          </table:table-cell>
          <table:table-cell office:value-type="float" office:value="0.826511263847351" calcext:value-type="float">
            <text:p>0.826511263847351</text:p>
          </table:table-cell>
          <table:table-cell office:value-type="float" office:value="0.302580505609512" calcext:value-type="float">
            <text:p>0.302580505609512</text:p>
          </table:table-cell>
          <table:table-cell office:value-type="float" office:value="-0.512976825237274" calcext:value-type="float">
            <text:p>-0.512976825237274</text:p>
          </table:table-cell>
          <table:table-cell office:value-type="float" office:value="0.999444305896759" calcext:value-type="float">
            <text:p>0.999444305896759</text:p>
          </table:table-cell>
          <table:table-cell office:value-type="float" office:value="0.316238194704056" calcext:value-type="float">
            <text:p>0.316238194704056</text:p>
          </table:table-cell>
          <table:table-cell office:value-type="float" office:value="0.319980472326279" calcext:value-type="float">
            <text:p>0.319980472326279</text:p>
          </table:table-cell>
          <table:table-cell office:value-type="float" office:value="-0.519899249076843" calcext:value-type="float">
            <text:p>-0.519899249076843</text:p>
          </table:table-cell>
          <table:table-cell office:value-type="float" office:value="0.999538600444794" calcext:value-type="float">
            <text:p>0.999538600444794</text:p>
          </table:table-cell>
          <table:table-cell office:value-type="float" office:value="0.740955710411072" calcext:value-type="float">
            <text:p>0.740955710411072</text:p>
          </table:table-cell>
          <table:table-cell office:value-type="float" office:value="1.22714757919312" calcext:value-type="float">
            <text:p>1.22714757919312</text:p>
          </table:table-cell>
          <table:table-cell office:value-type="float" office:value="0.0373070910573006" calcext:value-type="float">
            <text:p>0.0373070910573006</text:p>
          </table:table-cell>
          <table:table-cell office:value-type="float" office:value="0.061698853969574" calcext:value-type="float">
            <text:p>0.061698853969574</text:p>
          </table:table-cell>
          <table:table-cell office:value-type="float" office:value="0.419540822505951" calcext:value-type="float">
            <text:p>0.419540822505951</text:p>
          </table:table-cell>
          <table:table-cell office:value-type="float" office:value="1.21869575977325" calcext:value-type="float">
            <text:p>1.21869575977325</text:p>
          </table:table-cell>
          <table:table-cell office:value-type="float" office:value="-0.0276419017463923" calcext:value-type="float">
            <text:p>-0.0276419017463923</text:p>
          </table:table-cell>
          <table:table-cell office:value-type="float" office:value="0.0675024166703224" calcext:value-type="float">
            <text:p>0.06750241667032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QRT(([.J75]-[.F75])^2+([.K75]-[.G75])^2)" office:value-type="float" office:value="0.510473697528276" calcext:value-type="float">
            <text:p>0.510473697528276</text:p>
          </table:table-cell>
          <table:table-cell table:formula="of:=SQRT(([.R75]-[.N75])^2+([.S75]-[.O75])^2)" office:value-type="float" office:value="0.320517047707274" calcext:value-type="float">
            <text:p>0.320517047707274</text:p>
          </table:table-cell>
          <table:table-cell table:formula="of:=SQRT(([.R75]-[.F75])^2+([.S75]-[.G75])^2)" office:value-type="float" office:value="1.00037462562931" calcext:value-type="float">
            <text:p>1.00037462562931</text:p>
          </table:table-cell>
          <table:table-cell table:formula="of:=SQRT(([.N75]-[.J75])^2+([.O75]-[.K75])^2)" office:value-type="float" office:value="0.998028281464906" calcext:value-type="float">
            <text:p>0.998028281464906</text:p>
          </table:table-cell>
          <table:table-cell office:value-type="float" office:value="0.826554656028748" calcext:value-type="float">
            <text:p>0.826554656028748</text:p>
          </table:table-cell>
          <table:table-cell office:value-type="float" office:value="0.302584379911423" calcext:value-type="float">
            <text:p>0.302584379911423</text:p>
          </table:table-cell>
          <table:table-cell office:value-type="float" office:value="-0.645382702350617" calcext:value-type="float">
            <text:p>-0.645382702350617</text:p>
          </table:table-cell>
          <table:table-cell office:value-type="float" office:value="0.999445557594299" calcext:value-type="float">
            <text:p>0.999445557594299</text:p>
          </table:table-cell>
          <table:table-cell office:value-type="float" office:value="0.316397041082382" calcext:value-type="float">
            <text:p>0.316397041082382</text:p>
          </table:table-cell>
          <table:table-cell office:value-type="float" office:value="0.320545554161072" calcext:value-type="float">
            <text:p>0.320545554161072</text:p>
          </table:table-cell>
          <table:table-cell office:value-type="float" office:value="-0.673383414745331" calcext:value-type="float">
            <text:p>-0.673383414745331</text:p>
          </table:table-cell>
          <table:table-cell office:value-type="float" office:value="0.999523639678955" calcext:value-type="float">
            <text:p>0.999523639678955</text:p>
          </table:table-cell>
          <table:table-cell office:value-type="float" office:value="0.740906298160553" calcext:value-type="float">
            <text:p>0.740906298160553</text:p>
          </table:table-cell>
          <table:table-cell office:value-type="float" office:value="1.22379100322723" calcext:value-type="float">
            <text:p>1.22379100322723</text:p>
          </table:table-cell>
          <table:table-cell office:value-type="float" office:value="0.0318074375391007" calcext:value-type="float">
            <text:p>0.0318074375391007</text:p>
          </table:table-cell>
          <table:table-cell office:value-type="float" office:value="0.062032375484705" calcext:value-type="float">
            <text:p>0.062032375484705</text:p>
          </table:table-cell>
          <table:table-cell office:value-type="float" office:value="0.420464903116226" calcext:value-type="float">
            <text:p>0.420464903116226</text:p>
          </table:table-cell>
          <table:table-cell office:value-type="float" office:value="1.21682751178741" calcext:value-type="float">
            <text:p>1.21682751178741</text:p>
          </table:table-cell>
          <table:table-cell office:value-type="float" office:value="-0.021795179694891" calcext:value-type="float">
            <text:p>-0.021795179694891</text:p>
          </table:table-cell>
          <table:table-cell office:value-type="float" office:value="0.0669341906905174" calcext:value-type="float">
            <text:p>0.06693419069051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([.J76]-[.F76])^2+([.K76]-[.G76])^2)" office:value-type="float" office:value="0.507084609345516" calcext:value-type="float">
            <text:p>0.507084609345516</text:p>
          </table:table-cell>
          <table:table-cell table:formula="of:=SQRT(([.R76]-[.N76])^2+([.S76]-[.O76])^2)" office:value-type="float" office:value="0.315022282455475" calcext:value-type="float">
            <text:p>0.315022282455475</text:p>
          </table:table-cell>
          <table:table-cell table:formula="of:=SQRT(([.R76]-[.F76])^2+([.S76]-[.G76])^2)" office:value-type="float" office:value="0.991940687358679" calcext:value-type="float">
            <text:p>0.991940687358679</text:p>
          </table:table-cell>
          <table:table-cell table:formula="of:=SQRT(([.N76]-[.J76])^2+([.O76]-[.K76])^2)" office:value-type="float" office:value="0.985504704378563" calcext:value-type="float">
            <text:p>0.985504704378563</text:p>
          </table:table-cell>
          <table:table-cell office:value-type="float" office:value="0.822522342205048" calcext:value-type="float">
            <text:p>0.822522342205048</text:p>
          </table:table-cell>
          <table:table-cell office:value-type="float" office:value="0.301166146993637" calcext:value-type="float">
            <text:p>0.301166146993637</text:p>
          </table:table-cell>
          <table:table-cell office:value-type="float" office:value="-0.609915614128113" calcext:value-type="float">
            <text:p>-0.609915614128113</text:p>
          </table:table-cell>
          <table:table-cell office:value-type="float" office:value="0.99944394826889" calcext:value-type="float">
            <text:p>0.99944394826889</text:p>
          </table:table-cell>
          <table:table-cell office:value-type="float" office:value="0.315809935331345" calcext:value-type="float">
            <text:p>0.315809935331345</text:p>
          </table:table-cell>
          <table:table-cell office:value-type="float" office:value="0.320591330528259" calcext:value-type="float">
            <text:p>0.320591330528259</text:p>
          </table:table-cell>
          <table:table-cell office:value-type="float" office:value="-0.627514958381653" calcext:value-type="float">
            <text:p>-0.627514958381653</text:p>
          </table:table-cell>
          <table:table-cell office:value-type="float" office:value="0.999524056911469" calcext:value-type="float">
            <text:p>0.999524056911469</text:p>
          </table:table-cell>
          <table:table-cell office:value-type="float" office:value="0.735439896583557" calcext:value-type="float">
            <text:p>0.735439896583557</text:p>
          </table:table-cell>
          <table:table-cell office:value-type="float" office:value="1.21229207515717" calcext:value-type="float">
            <text:p>1.21229207515717</text:p>
          </table:table-cell>
          <table:table-cell office:value-type="float" office:value="0.0345277786254883" calcext:value-type="float">
            <text:p>0.0345277786254883</text:p>
          </table:table-cell>
          <table:table-cell office:value-type="float" office:value="0.0613581128418446" calcext:value-type="float">
            <text:p>0.0613581128418446</text:p>
          </table:table-cell>
          <table:table-cell office:value-type="float" office:value="0.42044734954834" calcext:value-type="float">
            <text:p>0.42044734954834</text:p>
          </table:table-cell>
          <table:table-cell office:value-type="float" office:value="1.20796382427216" calcext:value-type="float">
            <text:p>1.20796382427216</text:p>
          </table:table-cell>
          <table:table-cell office:value-type="float" office:value="-0.0246429424732924" calcext:value-type="float">
            <text:p>-0.0246429424732924</text:p>
          </table:table-cell>
          <table:table-cell office:value-type="float" office:value="0.0660804286599159" calcext:value-type="float">
            <text:p>0.06608042865991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QRT(([.J77]-[.F77])^2+([.K77]-[.G77])^2)" office:value-type="float" office:value="0.508269370224708" calcext:value-type="float">
            <text:p>0.508269370224708</text:p>
          </table:table-cell>
          <table:table-cell table:formula="of:=SQRT(([.R77]-[.N77])^2+([.S77]-[.O77])^2)" office:value-type="float" office:value="0.315222020540096" calcext:value-type="float">
            <text:p>0.315222020540096</text:p>
          </table:table-cell>
          <table:table-cell table:formula="of:=SQRT(([.R77]-[.F77])^2+([.S77]-[.G77])^2)" office:value-type="float" office:value="0.989966920880117" calcext:value-type="float">
            <text:p>0.989966920880117</text:p>
          </table:table-cell>
          <table:table-cell table:formula="of:=SQRT(([.N77]-[.J77])^2+([.O77]-[.K77])^2)" office:value-type="float" office:value="0.986658020869747" calcext:value-type="float">
            <text:p>0.986658020869747</text:p>
          </table:table-cell>
          <table:table-cell office:value-type="float" office:value="0.824273884296417" calcext:value-type="float">
            <text:p>0.824273884296417</text:p>
          </table:table-cell>
          <table:table-cell office:value-type="float" office:value="0.302450269460678" calcext:value-type="float">
            <text:p>0.302450269460678</text:p>
          </table:table-cell>
          <table:table-cell office:value-type="float" office:value="-0.60822594165802" calcext:value-type="float">
            <text:p>-0.60822594165802</text:p>
          </table:table-cell>
          <table:table-cell office:value-type="float" office:value="0.999448001384735" calcext:value-type="float">
            <text:p>0.999448001384735</text:p>
          </table:table-cell>
          <table:table-cell office:value-type="float" office:value="0.316304624080658" calcext:value-type="float">
            <text:p>0.316304624080658</text:p>
          </table:table-cell>
          <table:table-cell office:value-type="float" office:value="0.319914042949677" calcext:value-type="float">
            <text:p>0.319914042949677</text:p>
          </table:table-cell>
          <table:table-cell office:value-type="float" office:value="-0.61059981584549" calcext:value-type="float">
            <text:p>-0.61059981584549</text:p>
          </table:table-cell>
          <table:table-cell office:value-type="float" office:value="0.999537944793701" calcext:value-type="float">
            <text:p>0.999537944793701</text:p>
          </table:table-cell>
          <table:table-cell office:value-type="float" office:value="0.7354816198349" calcext:value-type="float">
            <text:p>0.7354816198349</text:p>
          </table:table-cell>
          <table:table-cell office:value-type="float" office:value="1.21310198307037" calcext:value-type="float">
            <text:p>1.21310198307037</text:p>
          </table:table-cell>
          <table:table-cell office:value-type="float" office:value="0.0350945815443993" calcext:value-type="float">
            <text:p>0.0350945815443993</text:p>
          </table:table-cell>
          <table:table-cell office:value-type="float" office:value="0.0602940060198307" calcext:value-type="float">
            <text:p>0.0602940060198307</text:p>
          </table:table-cell>
          <table:table-cell office:value-type="float" office:value="0.420333921909332" calcext:value-type="float">
            <text:p>0.420333921909332</text:p>
          </table:table-cell>
          <table:table-cell office:value-type="float" office:value="1.20625722408295" calcext:value-type="float">
            <text:p>1.20625722408295</text:p>
          </table:table-cell>
          <table:table-cell office:value-type="float" office:value="-0.0251920633018017" calcext:value-type="float">
            <text:p>-0.0251920633018017</text:p>
          </table:table-cell>
          <table:table-cell office:value-type="float" office:value="0.0656659379601479" calcext:value-type="float">
            <text:p>0.06566593796014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QRT(([.J78]-[.F78])^2+([.K78]-[.G78])^2)" office:value-type="float" office:value="0.508037255624292" calcext:value-type="float">
            <text:p>0.508037255624292</text:p>
          </table:table-cell>
          <table:table-cell table:formula="of:=SQRT(([.R78]-[.N78])^2+([.S78]-[.O78])^2)" office:value-type="float" office:value="0.315087357606964" calcext:value-type="float">
            <text:p>0.315087357606964</text:p>
          </table:table-cell>
          <table:table-cell table:formula="of:=SQRT(([.R78]-[.F78])^2+([.S78]-[.G78])^2)" office:value-type="float" office:value="0.991657150827602" calcext:value-type="float">
            <text:p>0.991657150827602</text:p>
          </table:table-cell>
          <table:table-cell table:formula="of:=SQRT(([.N78]-[.J78])^2+([.O78]-[.K78])^2)" office:value-type="float" office:value="0.987080531731173" calcext:value-type="float">
            <text:p>0.987080531731173</text:p>
          </table:table-cell>
          <table:table-cell office:value-type="float" office:value="0.823548138141632" calcext:value-type="float">
            <text:p>0.823548138141632</text:p>
          </table:table-cell>
          <table:table-cell office:value-type="float" office:value="0.300776600837708" calcext:value-type="float">
            <text:p>0.300776600837708</text:p>
          </table:table-cell>
          <table:table-cell office:value-type="float" office:value="-0.62199604511261" calcext:value-type="float">
            <text:p>-0.62199604511261</text:p>
          </table:table-cell>
          <table:table-cell office:value-type="float" office:value="0.999435365200043" calcext:value-type="float">
            <text:p>0.999435365200043</text:p>
          </table:table-cell>
          <table:table-cell office:value-type="float" office:value="0.315878182649612" calcext:value-type="float">
            <text:p>0.315878182649612</text:p>
          </table:table-cell>
          <table:table-cell office:value-type="float" office:value="0.320091605186462" calcext:value-type="float">
            <text:p>0.320091605186462</text:p>
          </table:table-cell>
          <table:table-cell office:value-type="float" office:value="-0.644709944725037" calcext:value-type="float">
            <text:p>-0.644709944725037</text:p>
          </table:table-cell>
          <table:table-cell office:value-type="float" office:value="0.999525904655457" calcext:value-type="float">
            <text:p>0.999525904655457</text:p>
          </table:table-cell>
          <table:table-cell office:value-type="float" office:value="0.735361158847809" calcext:value-type="float">
            <text:p>0.735361158847809</text:p>
          </table:table-cell>
          <table:table-cell office:value-type="float" office:value="1.21360266208649" calcext:value-type="float">
            <text:p>1.21360266208649</text:p>
          </table:table-cell>
          <table:table-cell office:value-type="float" office:value="0.0350342616438866" calcext:value-type="float">
            <text:p>0.0350342616438866</text:p>
          </table:table-cell>
          <table:table-cell office:value-type="float" office:value="0.057646282017231" calcext:value-type="float">
            <text:p>0.057646282017231</text:p>
          </table:table-cell>
          <table:table-cell office:value-type="float" office:value="0.420348018407822" calcext:value-type="float">
            <text:p>0.420348018407822</text:p>
          </table:table-cell>
          <table:table-cell office:value-type="float" office:value="1.20676422119141" calcext:value-type="float">
            <text:p>1.20676422119141</text:p>
          </table:table-cell>
          <table:table-cell office:value-type="float" office:value="-0.0250816438347101" calcext:value-type="float">
            <text:p>-0.0250816438347101</text:p>
          </table:table-cell>
          <table:table-cell office:value-type="float" office:value="0.0627256855368614" calcext:value-type="float">
            <text:p>0.06272568553686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QRT(([.J79]-[.F79])^2+([.K79]-[.G79])^2)" office:value-type="float" office:value="0.507484319794013" calcext:value-type="float">
            <text:p>0.507484319794013</text:p>
          </table:table-cell>
          <table:table-cell table:formula="of:=SQRT(([.R79]-[.N79])^2+([.S79]-[.O79])^2)" office:value-type="float" office:value="0.315954073677779" calcext:value-type="float">
            <text:p>0.315954073677779</text:p>
          </table:table-cell>
          <table:table-cell table:formula="of:=SQRT(([.R79]-[.F79])^2+([.S79]-[.G79])^2)" office:value-type="float" office:value="0.991741751942983" calcext:value-type="float">
            <text:p>0.991741751942983</text:p>
          </table:table-cell>
          <table:table-cell table:formula="of:=SQRT(([.N79]-[.J79])^2+([.O79]-[.K79])^2)" office:value-type="float" office:value="0.984553137095375" calcext:value-type="float">
            <text:p>0.984553137095375</text:p>
          </table:table-cell>
          <table:table-cell office:value-type="float" office:value="0.822577655315399" calcext:value-type="float">
            <text:p>0.822577655315399</text:p>
          </table:table-cell>
          <table:table-cell office:value-type="float" office:value="0.297148883342743" calcext:value-type="float">
            <text:p>0.297148883342743</text:p>
          </table:table-cell>
          <table:table-cell office:value-type="float" office:value="-0.401837766170502" calcext:value-type="float">
            <text:p>-0.401837766170502</text:p>
          </table:table-cell>
          <table:table-cell office:value-type="float" office:value="0.999447166919708" calcext:value-type="float">
            <text:p>0.999447166919708</text:p>
          </table:table-cell>
          <table:table-cell office:value-type="float" office:value="0.315550476312637" calcext:value-type="float">
            <text:p>0.315550476312637</text:p>
          </table:table-cell>
          <table:table-cell office:value-type="float" office:value="0.318684309720993" calcext:value-type="float">
            <text:p>0.318684309720993</text:p>
          </table:table-cell>
          <table:table-cell office:value-type="float" office:value="-0.392829895019531" calcext:value-type="float">
            <text:p>-0.392829895019531</text:p>
          </table:table-cell>
          <table:table-cell office:value-type="float" office:value="0.999542593955994" calcext:value-type="float">
            <text:p>0.999542593955994</text:p>
          </table:table-cell>
          <table:table-cell office:value-type="float" office:value="0.736607968807221" calcext:value-type="float">
            <text:p>0.736607968807221</text:p>
          </table:table-cell>
          <table:table-cell office:value-type="float" office:value="1.2086592912674" calcext:value-type="float">
            <text:p>1.2086592912674</text:p>
          </table:table-cell>
          <table:table-cell office:value-type="float" office:value="0.0291744470596313" calcext:value-type="float">
            <text:p>0.0291744470596313</text:p>
          </table:table-cell>
          <table:table-cell office:value-type="float" office:value="0.0617398545145988" calcext:value-type="float">
            <text:p>0.0617398545145988</text:p>
          </table:table-cell>
          <table:table-cell office:value-type="float" office:value="0.420691072940826" calcext:value-type="float">
            <text:p>0.420691072940826</text:p>
          </table:table-cell>
          <table:table-cell office:value-type="float" office:value="1.20381247997284" calcext:value-type="float">
            <text:p>1.20381247997284</text:p>
          </table:table-cell>
          <table:table-cell office:value-type="float" office:value="-0.0196265820413828" calcext:value-type="float">
            <text:p>-0.0196265820413828</text:p>
          </table:table-cell>
          <table:table-cell office:value-type="float" office:value="0.0676494613289833" calcext:value-type="float">
            <text:p>0.06764946132898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QRT(([.J80]-[.F80])^2+([.K80]-[.G80])^2)" office:value-type="float" office:value="0.507561607054675" calcext:value-type="float">
            <text:p>0.507561607054675</text:p>
          </table:table-cell>
          <table:table-cell table:formula="of:=SQRT(([.R80]-[.N80])^2+([.S80]-[.O80])^2)" office:value-type="float" office:value="0.314278928203454" calcext:value-type="float">
            <text:p>0.314278928203454</text:p>
          </table:table-cell>
          <table:table-cell table:formula="of:=SQRT(([.R80]-[.F80])^2+([.S80]-[.G80])^2)" office:value-type="float" office:value="0.991646283389961" calcext:value-type="float">
            <text:p>0.991646283389961</text:p>
          </table:table-cell>
          <table:table-cell table:formula="of:=SQRT(([.N80]-[.J80])^2+([.O80]-[.K80])^2)" office:value-type="float" office:value="0.984465469875387" calcext:value-type="float">
            <text:p>0.984465469875387</text:p>
          </table:table-cell>
          <table:table-cell office:value-type="float" office:value="0.8226358294487" calcext:value-type="float">
            <text:p>0.8226358294487</text:p>
          </table:table-cell>
          <table:table-cell office:value-type="float" office:value="0.297267556190491" calcext:value-type="float">
            <text:p>0.297267556190491</text:p>
          </table:table-cell>
          <table:table-cell office:value-type="float" office:value="-0.5032998919487" calcext:value-type="float">
            <text:p>-0.5032998919487</text:p>
          </table:table-cell>
          <table:table-cell office:value-type="float" office:value="0.99946129322052" calcext:value-type="float">
            <text:p>0.99946129322052</text:p>
          </table:table-cell>
          <table:table-cell office:value-type="float" office:value="0.315525829792023" calcext:value-type="float">
            <text:p>0.315525829792023</text:p>
          </table:table-cell>
          <table:table-cell office:value-type="float" office:value="0.318673938512802" calcext:value-type="float">
            <text:p>0.318673938512802</text:p>
          </table:table-cell>
          <table:table-cell office:value-type="float" office:value="-0.611131727695465" calcext:value-type="float">
            <text:p>-0.611131727695465</text:p>
          </table:table-cell>
          <table:table-cell office:value-type="float" office:value="0.999559283256531" calcext:value-type="float">
            <text:p>0.999559283256531</text:p>
          </table:table-cell>
          <table:table-cell office:value-type="float" office:value="0.734830498695374" calcext:value-type="float">
            <text:p>0.734830498695374</text:p>
          </table:table-cell>
          <table:table-cell office:value-type="float" office:value="1.20937919616699" calcext:value-type="float">
            <text:p>1.20937919616699</text:p>
          </table:table-cell>
          <table:table-cell office:value-type="float" office:value="0.0469407811760902" calcext:value-type="float">
            <text:p>0.0469407811760902</text:p>
          </table:table-cell>
          <table:table-cell office:value-type="float" office:value="0.0626991763710976" calcext:value-type="float">
            <text:p>0.0626991763710976</text:p>
          </table:table-cell>
          <table:table-cell office:value-type="float" office:value="0.420601785182953" calcext:value-type="float">
            <text:p>0.420601785182953</text:p>
          </table:table-cell>
          <table:table-cell office:value-type="float" office:value="1.20376133918762" calcext:value-type="float">
            <text:p>1.20376133918762</text:p>
          </table:table-cell>
          <table:table-cell office:value-type="float" office:value="-0.0381268039345741" calcext:value-type="float">
            <text:p>-0.0381268039345741</text:p>
          </table:table-cell>
          <table:table-cell office:value-type="float" office:value="0.069057360291481" calcext:value-type="float">
            <text:p>0.0690573602914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([.J81]-[.F81])^2+([.K81]-[.G81])^2)" office:value-type="float" office:value="0.509216181228301" calcext:value-type="float">
            <text:p>0.509216181228301</text:p>
          </table:table-cell>
          <table:table-cell table:formula="of:=SQRT(([.R81]-[.N81])^2+([.S81]-[.O81])^2)" office:value-type="float" office:value="0.314739820425467" calcext:value-type="float">
            <text:p>0.314739820425467</text:p>
          </table:table-cell>
          <table:table-cell table:formula="of:=SQRT(([.R81]-[.F81])^2+([.S81]-[.G81])^2)" office:value-type="float" office:value="0.990733054919261" calcext:value-type="float">
            <text:p>0.990733054919261</text:p>
          </table:table-cell>
          <table:table-cell table:formula="of:=SQRT(([.N81]-[.J81])^2+([.O81]-[.K81])^2)" office:value-type="float" office:value="0.98513857303917" calcext:value-type="float">
            <text:p>0.98513857303917</text:p>
          </table:table-cell>
          <table:table-cell office:value-type="float" office:value="0.822337985038757" calcext:value-type="float">
            <text:p>0.822337985038757</text:p>
          </table:table-cell>
          <table:table-cell office:value-type="float" office:value="0.298048853874207" calcext:value-type="float">
            <text:p>0.298048853874207</text:p>
          </table:table-cell>
          <table:table-cell office:value-type="float" office:value="-0.640160322189331" calcext:value-type="float">
            <text:p>-0.640160322189331</text:p>
          </table:table-cell>
          <table:table-cell office:value-type="float" office:value="0.999434947967529" calcext:value-type="float">
            <text:p>0.999434947967529</text:p>
          </table:table-cell>
          <table:table-cell office:value-type="float" office:value="0.313542425632477" calcext:value-type="float">
            <text:p>0.313542425632477</text:p>
          </table:table-cell>
          <table:table-cell office:value-type="float" office:value="0.318741798400879" calcext:value-type="float">
            <text:p>0.318741798400879</text:p>
          </table:table-cell>
          <table:table-cell office:value-type="float" office:value="-0.681184351444244" calcext:value-type="float">
            <text:p>-0.681184351444244</text:p>
          </table:table-cell>
          <table:table-cell office:value-type="float" office:value="0.999539494514465" calcext:value-type="float">
            <text:p>0.999539494514465</text:p>
          </table:table-cell>
          <table:table-cell office:value-type="float" office:value="0.734848141670227" calcext:value-type="float">
            <text:p>0.734848141670227</text:p>
          </table:table-cell>
          <table:table-cell office:value-type="float" office:value="1.20924699306488" calcext:value-type="float">
            <text:p>1.20924699306488</text:p>
          </table:table-cell>
          <table:table-cell office:value-type="float" office:value="0.0419755205512047" calcext:value-type="float">
            <text:p>0.0419755205512047</text:p>
          </table:table-cell>
          <table:table-cell office:value-type="float" office:value="0.060867290943861" calcext:value-type="float">
            <text:p>0.060867290943861</text:p>
          </table:table-cell>
          <table:table-cell office:value-type="float" office:value="0.420161157846451" calcext:value-type="float">
            <text:p>0.420161157846451</text:p>
          </table:table-cell>
          <table:table-cell office:value-type="float" office:value="1.20348012447357" calcext:value-type="float">
            <text:p>1.20348012447357</text:p>
          </table:table-cell>
          <table:table-cell office:value-type="float" office:value="-0.032797534018755" calcext:value-type="float">
            <text:p>-0.032797534018755</text:p>
          </table:table-cell>
          <table:table-cell office:value-type="float" office:value="0.0670676082372665" calcext:value-type="float">
            <text:p>0.06706760823726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QRT(([.J82]-[.F82])^2+([.K82]-[.G82])^2)" office:value-type="float" office:value="0.507495897775813" calcext:value-type="float">
            <text:p>0.507495897775813</text:p>
          </table:table-cell>
          <table:table-cell table:formula="of:=SQRT(([.R82]-[.N82])^2+([.S82]-[.O82])^2)" office:value-type="float" office:value="0.314128491441419" calcext:value-type="float">
            <text:p>0.314128491441419</text:p>
          </table:table-cell>
          <table:table-cell table:formula="of:=SQRT(([.R82]-[.F82])^2+([.S82]-[.G82])^2)" office:value-type="float" office:value="0.989932710810838" calcext:value-type="float">
            <text:p>0.989932710810838</text:p>
          </table:table-cell>
          <table:table-cell table:formula="of:=SQRT(([.N82]-[.J82])^2+([.O82]-[.K82])^2)" office:value-type="float" office:value="0.986056075205743" calcext:value-type="float">
            <text:p>0.986056075205743</text:p>
          </table:table-cell>
          <table:table-cell office:value-type="float" office:value="0.820736885070801" calcext:value-type="float">
            <text:p>0.820736885070801</text:p>
          </table:table-cell>
          <table:table-cell office:value-type="float" office:value="0.298735737800598" calcext:value-type="float">
            <text:p>0.298735737800598</text:p>
          </table:table-cell>
          <table:table-cell office:value-type="float" office:value="-0.549249291419983" calcext:value-type="float">
            <text:p>-0.549249291419983</text:p>
          </table:table-cell>
          <table:table-cell office:value-type="float" office:value="0.999418258666992" calcext:value-type="float">
            <text:p>0.999418258666992</text:p>
          </table:table-cell>
          <table:table-cell office:value-type="float" office:value="0.313594251871109" calcext:value-type="float">
            <text:p>0.313594251871109</text:p>
          </table:table-cell>
          <table:table-cell office:value-type="float" office:value="0.31766813993454" calcext:value-type="float">
            <text:p>0.31766813993454</text:p>
          </table:table-cell>
          <table:table-cell office:value-type="float" office:value="-0.550168454647064" calcext:value-type="float">
            <text:p>-0.550168454647064</text:p>
          </table:table-cell>
          <table:table-cell office:value-type="float" office:value="0.999530792236328" calcext:value-type="float">
            <text:p>0.999530792236328</text:p>
          </table:table-cell>
          <table:table-cell office:value-type="float" office:value="0.734202802181244" calcext:value-type="float">
            <text:p>0.734202802181244</text:p>
          </table:table-cell>
          <table:table-cell office:value-type="float" office:value="1.20951735973358" calcext:value-type="float">
            <text:p>1.20951735973358</text:p>
          </table:table-cell>
          <table:table-cell office:value-type="float" office:value="0.0398309491574764" calcext:value-type="float">
            <text:p>0.0398309491574764</text:p>
          </table:table-cell>
          <table:table-cell office:value-type="float" office:value="0.0606113374233246" calcext:value-type="float">
            <text:p>0.0606113374233246</text:p>
          </table:table-cell>
          <table:table-cell office:value-type="float" office:value="0.420123040676117" calcext:value-type="float">
            <text:p>0.420123040676117</text:p>
          </table:table-cell>
          <table:table-cell office:value-type="float" office:value="1.20398449897766" calcext:value-type="float">
            <text:p>1.20398449897766</text:p>
          </table:table-cell>
          <table:table-cell office:value-type="float" office:value="-0.0305819809436798" calcext:value-type="float">
            <text:p>-0.0305819809436798</text:p>
          </table:table-cell>
          <table:table-cell office:value-type="float" office:value="0.0671721249818802" calcext:value-type="float">
            <text:p>0.06717212498188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QRT(([.J83]-[.F83])^2+([.K83]-[.G83])^2)" office:value-type="float" office:value="0.506590990429234" calcext:value-type="float">
            <text:p>0.506590990429234</text:p>
          </table:table-cell>
          <table:table-cell table:formula="of:=SQRT(([.R83]-[.N83])^2+([.S83]-[.O83])^2)" office:value-type="float" office:value="0.311674304748115" calcext:value-type="float">
            <text:p>0.311674304748115</text:p>
          </table:table-cell>
          <table:table-cell table:formula="of:=SQRT(([.R83]-[.F83])^2+([.S83]-[.G83])^2)" office:value-type="float" office:value="0.988523649404395" calcext:value-type="float">
            <text:p>0.988523649404395</text:p>
          </table:table-cell>
          <table:table-cell table:formula="of:=SQRT(([.N83]-[.J83])^2+([.O83]-[.K83])^2)" office:value-type="float" office:value="0.988386253928848" calcext:value-type="float">
            <text:p>0.988386253928848</text:p>
          </table:table-cell>
          <table:table-cell office:value-type="float" office:value="0.820054531097412" calcext:value-type="float">
            <text:p>0.820054531097412</text:p>
          </table:table-cell>
          <table:table-cell office:value-type="float" office:value="0.302061915397644" calcext:value-type="float">
            <text:p>0.302061915397644</text:p>
          </table:table-cell>
          <table:table-cell office:value-type="float" office:value="-0.47002711892128" calcext:value-type="float">
            <text:p>-0.47002711892128</text:p>
          </table:table-cell>
          <table:table-cell office:value-type="float" office:value="0.999385714530945" calcext:value-type="float">
            <text:p>0.999385714530945</text:p>
          </table:table-cell>
          <table:table-cell office:value-type="float" office:value="0.313728392124176" calcext:value-type="float">
            <text:p>0.313728392124176</text:p>
          </table:table-cell>
          <table:table-cell office:value-type="float" office:value="0.318440943956375" calcext:value-type="float">
            <text:p>0.318440943956375</text:p>
          </table:table-cell>
          <table:table-cell office:value-type="float" office:value="-0.515381515026093" calcext:value-type="float">
            <text:p>-0.515381515026093</text:p>
          </table:table-cell>
          <table:table-cell office:value-type="float" office:value="0.999507784843445" calcext:value-type="float">
            <text:p>0.999507784843445</text:p>
          </table:table-cell>
          <table:table-cell office:value-type="float" office:value="0.730887532234192" calcext:value-type="float">
            <text:p>0.730887532234192</text:p>
          </table:table-cell>
          <table:table-cell office:value-type="float" office:value="1.214479804039" calcext:value-type="float">
            <text:p>1.214479804039</text:p>
          </table:table-cell>
          <table:table-cell office:value-type="float" office:value="0.0396227613091469" calcext:value-type="float">
            <text:p>0.0396227613091469</text:p>
          </table:table-cell>
          <table:table-cell office:value-type="float" office:value="0.0613052695989609" calcext:value-type="float">
            <text:p>0.0613052695989609</text:p>
          </table:table-cell>
          <table:table-cell office:value-type="float" office:value="0.419336259365082" calcext:value-type="float">
            <text:p>0.419336259365082</text:p>
          </table:table-cell>
          <table:table-cell office:value-type="float" office:value="1.20572328567505" calcext:value-type="float">
            <text:p>1.20572328567505</text:p>
          </table:table-cell>
          <table:table-cell office:value-type="float" office:value="-0.0303507894277573" calcext:value-type="float">
            <text:p>-0.0303507894277573</text:p>
          </table:table-cell>
          <table:table-cell office:value-type="float" office:value="0.0677748247981072" calcext:value-type="float">
            <text:p>0.06777482479810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QRT(([.J84]-[.F84])^2+([.K84]-[.G84])^2)" office:value-type="float" office:value="0.506117235709047" calcext:value-type="float">
            <text:p>0.506117235709047</text:p>
          </table:table-cell>
          <table:table-cell table:formula="of:=SQRT(([.R84]-[.N84])^2+([.S84]-[.O84])^2)" office:value-type="float" office:value="0.3126254748488" calcext:value-type="float">
            <text:p>0.3126254748488</text:p>
          </table:table-cell>
          <table:table-cell table:formula="of:=SQRT(([.R84]-[.F84])^2+([.S84]-[.G84])^2)" office:value-type="float" office:value="0.986331318862803" calcext:value-type="float">
            <text:p>0.986331318862803</text:p>
          </table:table-cell>
          <table:table-cell table:formula="of:=SQRT(([.N84]-[.J84])^2+([.O84]-[.K84])^2)" office:value-type="float" office:value="0.98809557844147" calcext:value-type="float">
            <text:p>0.98809557844147</text:p>
          </table:table-cell>
          <table:table-cell office:value-type="float" office:value="0.819200396537781" calcext:value-type="float">
            <text:p>0.819200396537781</text:p>
          </table:table-cell>
          <table:table-cell office:value-type="float" office:value="0.301584035158157" calcext:value-type="float">
            <text:p>0.301584035158157</text:p>
          </table:table-cell>
          <table:table-cell office:value-type="float" office:value="-0.460686147212982" calcext:value-type="float">
            <text:p>-0.460686147212982</text:p>
          </table:table-cell>
          <table:table-cell office:value-type="float" office:value="0.999324440956116" calcext:value-type="float">
            <text:p>0.999324440956116</text:p>
          </table:table-cell>
          <table:table-cell office:value-type="float" office:value="0.313310116529465" calcext:value-type="float">
            <text:p>0.313310116529465</text:p>
          </table:table-cell>
          <table:table-cell office:value-type="float" office:value="0.31673926115036" calcext:value-type="float">
            <text:p>0.31673926115036</text:p>
          </table:table-cell>
          <table:table-cell office:value-type="float" office:value="-0.499141156673431" calcext:value-type="float">
            <text:p>-0.499141156673431</text:p>
          </table:table-cell>
          <table:table-cell office:value-type="float" office:value="0.999490678310394" calcext:value-type="float">
            <text:p>0.999490678310394</text:p>
          </table:table-cell>
          <table:table-cell office:value-type="float" office:value="0.73091447353363" calcext:value-type="float">
            <text:p>0.73091447353363</text:p>
          </table:table-cell>
          <table:table-cell office:value-type="float" office:value="1.21224999427795" calcext:value-type="float">
            <text:p>1.21224999427795</text:p>
          </table:table-cell>
          <table:table-cell office:value-type="float" office:value="0.0379154905676842" calcext:value-type="float">
            <text:p>0.0379154905676842</text:p>
          </table:table-cell>
          <table:table-cell office:value-type="float" office:value="0.0628722608089447" calcext:value-type="float">
            <text:p>0.0628722608089447</text:p>
          </table:table-cell>
          <table:table-cell office:value-type="float" office:value="0.418431133031845" calcext:value-type="float">
            <text:p>0.418431133031845</text:p>
          </table:table-cell>
          <table:table-cell office:value-type="float" office:value="1.20282399654388" calcext:value-type="float">
            <text:p>1.20282399654388</text:p>
          </table:table-cell>
          <table:table-cell office:value-type="float" office:value="-0.0285573899745941" calcext:value-type="float">
            <text:p>-0.0285573899745941</text:p>
          </table:table-cell>
          <table:table-cell office:value-type="float" office:value="0.0705237835645676" calcext:value-type="float">
            <text:p>0.07052378356456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QRT(([.J85]-[.F85])^2+([.K85]-[.G85])^2)" office:value-type="float" office:value="0.506485916988233" calcext:value-type="float">
            <text:p>0.506485916988233</text:p>
          </table:table-cell>
          <table:table-cell table:formula="of:=SQRT(([.R85]-[.N85])^2+([.S85]-[.O85])^2)" office:value-type="float" office:value="0.311948914082451" calcext:value-type="float">
            <text:p>0.311948914082451</text:p>
          </table:table-cell>
          <table:table-cell table:formula="of:=SQRT(([.R85]-[.F85])^2+([.S85]-[.G85])^2)" office:value-type="float" office:value="0.978443046762018" calcext:value-type="float">
            <text:p>0.978443046762018</text:p>
          </table:table-cell>
          <table:table-cell table:formula="of:=SQRT(([.N85]-[.J85])^2+([.O85]-[.K85])^2)" office:value-type="float" office:value="0.974912167364629" calcext:value-type="float">
            <text:p>0.974912167364629</text:p>
          </table:table-cell>
          <table:table-cell office:value-type="float" office:value="0.819276928901672" calcext:value-type="float">
            <text:p>0.819276928901672</text:p>
          </table:table-cell>
          <table:table-cell office:value-type="float" office:value="0.301006436347961" calcext:value-type="float">
            <text:p>0.301006436347961</text:p>
          </table:table-cell>
          <table:table-cell office:value-type="float" office:value="-0.575089156627655" calcext:value-type="float">
            <text:p>-0.575089156627655</text:p>
          </table:table-cell>
          <table:table-cell office:value-type="float" office:value="0.999314665794373" calcext:value-type="float">
            <text:p>0.999314665794373</text:p>
          </table:table-cell>
          <table:table-cell office:value-type="float" office:value="0.313035428524017" calcext:value-type="float">
            <text:p>0.313035428524017</text:p>
          </table:table-cell>
          <table:table-cell office:value-type="float" office:value="0.316739439964294" calcext:value-type="float">
            <text:p>0.316739439964294</text:p>
          </table:table-cell>
          <table:table-cell office:value-type="float" office:value="-0.606808841228485" calcext:value-type="float">
            <text:p>-0.606808841228485</text:p>
          </table:table-cell>
          <table:table-cell office:value-type="float" office:value="0.999476253986359" calcext:value-type="float">
            <text:p>0.999476253986359</text:p>
          </table:table-cell>
          <table:table-cell office:value-type="float" office:value="0.730962872505188" calcext:value-type="float">
            <text:p>0.730962872505188</text:p>
          </table:table-cell>
          <table:table-cell office:value-type="float" office:value="1.19752907752991" calcext:value-type="float">
            <text:p>1.19752907752991</text:p>
          </table:table-cell>
          <table:table-cell office:value-type="float" office:value="0.0376186557114124" calcext:value-type="float">
            <text:p>0.0376186557114124</text:p>
          </table:table-cell>
          <table:table-cell office:value-type="float" office:value="0.0613383278250694" calcext:value-type="float">
            <text:p>0.0613383278250694</text:p>
          </table:table-cell>
          <table:table-cell office:value-type="float" office:value="0.419035732746124" calcext:value-type="float">
            <text:p>0.419035732746124</text:p>
          </table:table-cell>
          <table:table-cell office:value-type="float" office:value="1.19384336471558" calcext:value-type="float">
            <text:p>1.19384336471558</text:p>
          </table:table-cell>
          <table:table-cell office:value-type="float" office:value="-0.0282350778579712" calcext:value-type="float">
            <text:p>-0.0282350778579712</text:p>
          </table:table-cell>
          <table:table-cell office:value-type="float" office:value="0.0684434697031975" calcext:value-type="float">
            <text:p>0.06844346970319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QRT(([.J86]-[.F86])^2+([.K86]-[.G86])^2)" office:value-type="float" office:value="0.508863323815872" calcext:value-type="float">
            <text:p>0.508863323815872</text:p>
          </table:table-cell>
          <table:table-cell table:formula="of:=SQRT(([.R86]-[.N86])^2+([.S86]-[.O86])^2)" office:value-type="float" office:value="0.312420550059434" calcext:value-type="float">
            <text:p>0.312420550059434</text:p>
          </table:table-cell>
          <table:table-cell table:formula="of:=SQRT(([.R86]-[.F86])^2+([.S86]-[.G86])^2)" office:value-type="float" office:value="0.979506331735372" calcext:value-type="float">
            <text:p>0.979506331735372</text:p>
          </table:table-cell>
          <table:table-cell table:formula="of:=SQRT(([.N86]-[.J86])^2+([.O86]-[.K86])^2)" office:value-type="float" office:value="0.974426135933131" calcext:value-type="float">
            <text:p>0.974426135933131</text:p>
          </table:table-cell>
          <table:table-cell office:value-type="float" office:value="0.820793747901917" calcext:value-type="float">
            <text:p>0.820793747901917</text:p>
          </table:table-cell>
          <table:table-cell office:value-type="float" office:value="0.301003783941269" calcext:value-type="float">
            <text:p>0.301003783941269</text:p>
          </table:table-cell>
          <table:table-cell office:value-type="float" office:value="-0.870640575885773" calcext:value-type="float">
            <text:p>-0.870640575885773</text:p>
          </table:table-cell>
          <table:table-cell office:value-type="float" office:value="0.999345898628235" calcext:value-type="float">
            <text:p>0.999345898628235</text:p>
          </table:table-cell>
          <table:table-cell office:value-type="float" office:value="0.312241852283478" calcext:value-type="float">
            <text:p>0.312241852283478</text:p>
          </table:table-cell>
          <table:table-cell office:value-type="float" office:value="0.318804115056992" calcext:value-type="float">
            <text:p>0.318804115056992</text:p>
          </table:table-cell>
          <table:table-cell office:value-type="float" office:value="-0.89965832233429" calcext:value-type="float">
            <text:p>-0.89965832233429</text:p>
          </table:table-cell>
          <table:table-cell office:value-type="float" office:value="0.999503433704376" calcext:value-type="float">
            <text:p>0.999503433704376</text:p>
          </table:table-cell>
          <table:table-cell office:value-type="float" office:value="0.731415569782257" calcext:value-type="float">
            <text:p>0.731415569782257</text:p>
          </table:table-cell>
          <table:table-cell office:value-type="float" office:value="1.19846296310425" calcext:value-type="float">
            <text:p>1.19846296310425</text:p>
          </table:table-cell>
          <table:table-cell office:value-type="float" office:value="0.0366464331746101" calcext:value-type="float">
            <text:p>0.0366464331746101</text:p>
          </table:table-cell>
          <table:table-cell office:value-type="float" office:value="0.0623271726071835" calcext:value-type="float">
            <text:p>0.0623271726071835</text:p>
          </table:table-cell>
          <table:table-cell office:value-type="float" office:value="0.419022500514984" calcext:value-type="float">
            <text:p>0.419022500514984</text:p>
          </table:table-cell>
          <table:table-cell office:value-type="float" office:value="1.19431924819946" calcext:value-type="float">
            <text:p>1.19431924819946</text:p>
          </table:table-cell>
          <table:table-cell office:value-type="float" office:value="-0.0274040903896093" calcext:value-type="float">
            <text:p>-0.0274040903896093</text:p>
          </table:table-cell>
          <table:table-cell office:value-type="float" office:value="0.0691776499152184" calcext:value-type="float">
            <text:p>0.06917764991521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QRT(([.J87]-[.F87])^2+([.K87]-[.G87])^2)" office:value-type="float" office:value="0.50846729443219" calcext:value-type="float">
            <text:p>0.50846729443219</text:p>
          </table:table-cell>
          <table:table-cell table:formula="of:=SQRT(([.R87]-[.N87])^2+([.S87]-[.O87])^2)" office:value-type="float" office:value="0.310965785799481" calcext:value-type="float">
            <text:p>0.310965785799481</text:p>
          </table:table-cell>
          <table:table-cell table:formula="of:=SQRT(([.R87]-[.F87])^2+([.S87]-[.G87])^2)" office:value-type="float" office:value="0.980821654870317" calcext:value-type="float">
            <text:p>0.980821654870317</text:p>
          </table:table-cell>
          <table:table-cell table:formula="of:=SQRT(([.N87]-[.J87])^2+([.O87]-[.K87])^2)" office:value-type="float" office:value="0.975049897258201" calcext:value-type="float">
            <text:p>0.975049897258201</text:p>
          </table:table-cell>
          <table:table-cell office:value-type="float" office:value="0.820542454719544" calcext:value-type="float">
            <text:p>0.820542454719544</text:p>
          </table:table-cell>
          <table:table-cell office:value-type="float" office:value="0.299515813589096" calcext:value-type="float">
            <text:p>0.299515813589096</text:p>
          </table:table-cell>
          <table:table-cell office:value-type="float" office:value="-0.760131537914276" calcext:value-type="float">
            <text:p>-0.760131537914276</text:p>
          </table:table-cell>
          <table:table-cell office:value-type="float" office:value="0.999357879161835" calcext:value-type="float">
            <text:p>0.999357879161835</text:p>
          </table:table-cell>
          <table:table-cell office:value-type="float" office:value="0.312441259622574" calcext:value-type="float">
            <text:p>0.312441259622574</text:p>
          </table:table-cell>
          <table:table-cell office:value-type="float" office:value="0.318807393312454" calcext:value-type="float">
            <text:p>0.318807393312454</text:p>
          </table:table-cell>
          <table:table-cell office:value-type="float" office:value="-0.785005152225494" calcext:value-type="float">
            <text:p>-0.785005152225494</text:p>
          </table:table-cell>
          <table:table-cell office:value-type="float" office:value="0.999511957168579" calcext:value-type="float">
            <text:p>0.999511957168579</text:p>
          </table:table-cell>
          <table:table-cell office:value-type="float" office:value="0.731787502765656" calcext:value-type="float">
            <text:p>0.731787502765656</text:p>
          </table:table-cell>
          <table:table-cell office:value-type="float" office:value="1.1990749835968" calcext:value-type="float">
            <text:p>1.1990749835968</text:p>
          </table:table-cell>
          <table:table-cell office:value-type="float" office:value="0.0275373216718435" calcext:value-type="float">
            <text:p>0.0275373216718435</text:p>
          </table:table-cell>
          <table:table-cell office:value-type="float" office:value="0.0614275485277176" calcext:value-type="float">
            <text:p>0.0614275485277176</text:p>
          </table:table-cell>
          <table:table-cell office:value-type="float" office:value="0.420845836400986" calcext:value-type="float">
            <text:p>0.420845836400986</text:p>
          </table:table-cell>
          <table:table-cell office:value-type="float" office:value="1.19520199298859" calcext:value-type="float">
            <text:p>1.19520199298859</text:p>
          </table:table-cell>
          <table:table-cell office:value-type="float" office:value="-0.0181302577257156" calcext:value-type="float">
            <text:p>-0.0181302577257156</text:p>
          </table:table-cell>
          <table:table-cell office:value-type="float" office:value="0.0681213065981865" calcext:value-type="float">
            <text:p>0.06812130659818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QRT(([.J88]-[.F88])^2+([.K88]-[.G88])^2)" office:value-type="float" office:value="0.507711722488519" calcext:value-type="float">
            <text:p>0.507711722488519</text:p>
          </table:table-cell>
          <table:table-cell table:formula="of:=SQRT(([.R88]-[.N88])^2+([.S88]-[.O88])^2)" office:value-type="float" office:value="0.310836523425634" calcext:value-type="float">
            <text:p>0.310836523425634</text:p>
          </table:table-cell>
          <table:table-cell table:formula="of:=SQRT(([.R88]-[.F88])^2+([.S88]-[.G88])^2)" office:value-type="float" office:value="0.985384570918311" calcext:value-type="float">
            <text:p>0.985384570918311</text:p>
          </table:table-cell>
          <table:table-cell table:formula="of:=SQRT(([.N88]-[.J88])^2+([.O88]-[.K88])^2)" office:value-type="float" office:value="0.978213660553709" calcext:value-type="float">
            <text:p>0.978213660553709</text:p>
          </table:table-cell>
          <table:table-cell office:value-type="float" office:value="0.819782137870789" calcext:value-type="float">
            <text:p>0.819782137870789</text:p>
          </table:table-cell>
          <table:table-cell office:value-type="float" office:value="0.293075501918793" calcext:value-type="float">
            <text:p>0.293075501918793</text:p>
          </table:table-cell>
          <table:table-cell office:value-type="float" office:value="-0.495182424783707" calcext:value-type="float">
            <text:p>-0.495182424783707</text:p>
          </table:table-cell>
          <table:table-cell office:value-type="float" office:value="0.999360799789429" calcext:value-type="float">
            <text:p>0.999360799789429</text:p>
          </table:table-cell>
          <table:table-cell office:value-type="float" office:value="0.312543094158173" calcext:value-type="float">
            <text:p>0.312543094158173</text:p>
          </table:table-cell>
          <table:table-cell office:value-type="float" office:value="0.31497859954834" calcext:value-type="float">
            <text:p>0.31497859954834</text:p>
          </table:table-cell>
          <table:table-cell office:value-type="float" office:value="-0.576143622398377" calcext:value-type="float">
            <text:p>-0.576143622398377</text:p>
          </table:table-cell>
          <table:table-cell office:value-type="float" office:value="0.999506533145905" calcext:value-type="float">
            <text:p>0.999506533145905</text:p>
          </table:table-cell>
          <table:table-cell office:value-type="float" office:value="0.732351839542389" calcext:value-type="float">
            <text:p>0.732351839542389</text:p>
          </table:table-cell>
          <table:table-cell office:value-type="float" office:value="1.1985297203064" calcext:value-type="float">
            <text:p>1.1985297203064</text:p>
          </table:table-cell>
          <table:table-cell office:value-type="float" office:value="0.0439615808427334" calcext:value-type="float">
            <text:p>0.0439615808427334</text:p>
          </table:table-cell>
          <table:table-cell office:value-type="float" office:value="0.0624801516532898" calcext:value-type="float">
            <text:p>0.0624801516532898</text:p>
          </table:table-cell>
          <table:table-cell office:value-type="float" office:value="0.4215427339077" calcext:value-type="float">
            <text:p>0.4215427339077</text:p>
          </table:table-cell>
          <table:table-cell office:value-type="float" office:value="1.19440126419067" calcext:value-type="float">
            <text:p>1.19440126419067</text:p>
          </table:table-cell>
          <table:table-cell office:value-type="float" office:value="-0.034467089921236" calcext:value-type="float">
            <text:p>-0.034467089921236</text:p>
          </table:table-cell>
          <table:table-cell office:value-type="float" office:value="0.0694558173418045" calcext:value-type="float">
            <text:p>0.06945581734180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QRT(([.J89]-[.F89])^2+([.K89]-[.G89])^2)" office:value-type="float" office:value="0.507869649904168" calcext:value-type="float">
            <text:p>0.507869649904168</text:p>
          </table:table-cell>
          <table:table-cell table:formula="of:=SQRT(([.R89]-[.N89])^2+([.S89]-[.O89])^2)" office:value-type="float" office:value="0.309768377915747" calcext:value-type="float">
            <text:p>0.309768377915747</text:p>
          </table:table-cell>
          <table:table-cell table:formula="of:=SQRT(([.R89]-[.F89])^2+([.S89]-[.G89])^2)" office:value-type="float" office:value="0.984477143754138" calcext:value-type="float">
            <text:p>0.984477143754138</text:p>
          </table:table-cell>
          <table:table-cell table:formula="of:=SQRT(([.N89]-[.J89])^2+([.O89]-[.K89])^2)" office:value-type="float" office:value="0.975360622346724" calcext:value-type="float">
            <text:p>0.975360622346724</text:p>
          </table:table-cell>
          <table:table-cell office:value-type="float" office:value="0.819890797138214" calcext:value-type="float">
            <text:p>0.819890797138214</text:p>
          </table:table-cell>
          <table:table-cell office:value-type="float" office:value="0.293073624372482" calcext:value-type="float">
            <text:p>0.293073624372482</text:p>
          </table:table-cell>
          <table:table-cell office:value-type="float" office:value="-0.653374493122101" calcext:value-type="float">
            <text:p>-0.653374493122101</text:p>
          </table:table-cell>
          <table:table-cell office:value-type="float" office:value="0.999365329742432" calcext:value-type="float">
            <text:p>0.999365329742432</text:p>
          </table:table-cell>
          <table:table-cell office:value-type="float" office:value="0.312540292739868" calcext:value-type="float">
            <text:p>0.312540292739868</text:p>
          </table:table-cell>
          <table:table-cell office:value-type="float" office:value="0.316031128168106" calcext:value-type="float">
            <text:p>0.316031128168106</text:p>
          </table:table-cell>
          <table:table-cell office:value-type="float" office:value="-0.709299683570862" calcext:value-type="float">
            <text:p>-0.709299683570862</text:p>
          </table:table-cell>
          <table:table-cell office:value-type="float" office:value="0.999510228633881" calcext:value-type="float">
            <text:p>0.999510228633881</text:p>
          </table:table-cell>
          <table:table-cell office:value-type="float" office:value="0.732380867004395" calcext:value-type="float">
            <text:p>0.732380867004395</text:p>
          </table:table-cell>
          <table:table-cell office:value-type="float" office:value="1.19640731811523" calcext:value-type="float">
            <text:p>1.19640731811523</text:p>
          </table:table-cell>
          <table:table-cell office:value-type="float" office:value="0.0433319881558418" calcext:value-type="float">
            <text:p>0.0433319881558418</text:p>
          </table:table-cell>
          <table:table-cell office:value-type="float" office:value="0.0620346739888191" calcext:value-type="float">
            <text:p>0.0620346739888191</text:p>
          </table:table-cell>
          <table:table-cell office:value-type="float" office:value="0.422623157501221" calcext:value-type="float">
            <text:p>0.422623157501221</text:p>
          </table:table-cell>
          <table:table-cell office:value-type="float" office:value="1.19383645057678" calcext:value-type="float">
            <text:p>1.19383645057678</text:p>
          </table:table-cell>
          <table:table-cell office:value-type="float" office:value="-0.0338028073310852" calcext:value-type="float">
            <text:p>-0.0338028073310852</text:p>
          </table:table-cell>
          <table:table-cell office:value-type="float" office:value="0.0686860308051109" calcext:value-type="float">
            <text:p>0.06868603080511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QRT(([.J90]-[.F90])^2+([.K90]-[.G90])^2)" office:value-type="float" office:value="0.506613669944221" calcext:value-type="float">
            <text:p>0.506613669944221</text:p>
          </table:table-cell>
          <table:table-cell table:formula="of:=SQRT(([.R90]-[.N90])^2+([.S90]-[.O90])^2)" office:value-type="float" office:value="0.310893185491849" calcext:value-type="float">
            <text:p>0.310893185491849</text:p>
          </table:table-cell>
          <table:table-cell table:formula="of:=SQRT(([.R90]-[.F90])^2+([.S90]-[.G90])^2)" office:value-type="float" office:value="0.985183073652128" calcext:value-type="float">
            <text:p>0.985183073652128</text:p>
          </table:table-cell>
          <table:table-cell table:formula="of:=SQRT(([.N90]-[.J90])^2+([.O90]-[.K90])^2)" office:value-type="float" office:value="0.97550787874268" calcext:value-type="float">
            <text:p>0.97550787874268</text:p>
          </table:table-cell>
          <table:table-cell office:value-type="float" office:value="0.818609416484833" calcext:value-type="float">
            <text:p>0.818609416484833</text:p>
          </table:table-cell>
          <table:table-cell office:value-type="float" office:value="0.291937947273254" calcext:value-type="float">
            <text:p>0.291937947273254</text:p>
          </table:table-cell>
          <table:table-cell office:value-type="float" office:value="-0.638657748699188" calcext:value-type="float">
            <text:p>-0.638657748699188</text:p>
          </table:table-cell>
          <table:table-cell office:value-type="float" office:value="0.999368965625763" calcext:value-type="float">
            <text:p>0.999368965625763</text:p>
          </table:table-cell>
          <table:table-cell office:value-type="float" office:value="0.312539041042328" calcext:value-type="float">
            <text:p>0.312539041042328</text:p>
          </table:table-cell>
          <table:table-cell office:value-type="float" office:value="0.31539398431778" calcext:value-type="float">
            <text:p>0.31539398431778</text:p>
          </table:table-cell>
          <table:table-cell office:value-type="float" office:value="-0.684973061084747" calcext:value-type="float">
            <text:p>-0.684973061084747</text:p>
          </table:table-cell>
          <table:table-cell office:value-type="float" office:value="0.999511241912842" calcext:value-type="float">
            <text:p>0.999511241912842</text:p>
          </table:table-cell>
          <table:table-cell office:value-type="float" office:value="0.730794012546539" calcext:value-type="float">
            <text:p>0.730794012546539</text:p>
          </table:table-cell>
          <table:table-cell office:value-type="float" office:value="1.19668757915497" calcext:value-type="float">
            <text:p>1.19668757915497</text:p>
          </table:table-cell>
          <table:table-cell office:value-type="float" office:value="0.0487666875123978" calcext:value-type="float">
            <text:p>0.0487666875123978</text:p>
          </table:table-cell>
          <table:table-cell office:value-type="float" office:value="0.0605160109698772" calcext:value-type="float">
            <text:p>0.0605160109698772</text:p>
          </table:table-cell>
          <table:table-cell office:value-type="float" office:value="0.419924557209015" calcext:value-type="float">
            <text:p>0.419924557209015</text:p>
          </table:table-cell>
          <table:table-cell office:value-type="float" office:value="1.19284641742706" calcext:value-type="float">
            <text:p>1.19284641742706</text:p>
          </table:table-cell>
          <table:table-cell office:value-type="float" office:value="-0.0389481596648693" calcext:value-type="float">
            <text:p>-0.0389481596648693</text:p>
          </table:table-cell>
          <table:table-cell office:value-type="float" office:value="0.0671358779072762" calcext:value-type="float">
            <text:p>0.06713587790727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QRT(([.J91]-[.F91])^2+([.K91]-[.G91])^2)" office:value-type="float" office:value="0.507766766459034" calcext:value-type="float">
            <text:p>0.507766766459034</text:p>
          </table:table-cell>
          <table:table-cell table:formula="of:=SQRT(([.R91]-[.N91])^2+([.S91]-[.O91])^2)" office:value-type="float" office:value="0.310565585608968" calcext:value-type="float">
            <text:p>0.310565585608968</text:p>
          </table:table-cell>
          <table:table-cell table:formula="of:=SQRT(([.R91]-[.F91])^2+([.S91]-[.G91])^2)" office:value-type="float" office:value="0.99136300239518" calcext:value-type="float">
            <text:p>0.99136300239518</text:p>
          </table:table-cell>
          <table:table-cell table:formula="of:=SQRT(([.N91]-[.J91])^2+([.O91]-[.K91])^2)" office:value-type="float" office:value="0.976153692027361" calcext:value-type="float">
            <text:p>0.976153692027361</text:p>
          </table:table-cell>
          <table:table-cell office:value-type="float" office:value="0.818277060985565" calcext:value-type="float">
            <text:p>0.818277060985565</text:p>
          </table:table-cell>
          <table:table-cell office:value-type="float" office:value="0.292033463716507" calcext:value-type="float">
            <text:p>0.292033463716507</text:p>
          </table:table-cell>
          <table:table-cell office:value-type="float" office:value="-0.658129453659058" calcext:value-type="float">
            <text:p>-0.658129453659058</text:p>
          </table:table-cell>
          <table:table-cell office:value-type="float" office:value="0.999369025230408" calcext:value-type="float">
            <text:p>0.999369025230408</text:p>
          </table:table-cell>
          <table:table-cell office:value-type="float" office:value="0.311228454113007" calcext:value-type="float">
            <text:p>0.311228454113007</text:p>
          </table:table-cell>
          <table:table-cell office:value-type="float" office:value="0.319029748439789" calcext:value-type="float">
            <text:p>0.319029748439789</text:p>
          </table:table-cell>
          <table:table-cell office:value-type="float" office:value="-0.691447257995606" calcext:value-type="float">
            <text:p>-0.691447257995606</text:p>
          </table:table-cell>
          <table:table-cell office:value-type="float" office:value="0.999509334564209" calcext:value-type="float">
            <text:p>0.999509334564209</text:p>
          </table:table-cell>
          <table:table-cell office:value-type="float" office:value="0.728335976600647" calcext:value-type="float">
            <text:p>0.728335976600647</text:p>
          </table:table-cell>
          <table:table-cell office:value-type="float" office:value="1.20158135890961" calcext:value-type="float">
            <text:p>1.20158135890961</text:p>
          </table:table-cell>
          <table:table-cell office:value-type="float" office:value="0.0394161939620972" calcext:value-type="float">
            <text:p>0.0394161939620972</text:p>
          </table:table-cell>
          <table:table-cell office:value-type="float" office:value="0.0586211159825325" calcext:value-type="float">
            <text:p>0.0586211159825325</text:p>
          </table:table-cell>
          <table:table-cell office:value-type="float" office:value="0.417781978845596" calcext:value-type="float">
            <text:p>0.417781978845596</text:p>
          </table:table-cell>
          <table:table-cell office:value-type="float" office:value="1.19889855384827" calcext:value-type="float">
            <text:p>1.19889855384827</text:p>
          </table:table-cell>
          <table:table-cell office:value-type="float" office:value="-0.029477259144187" calcext:value-type="float">
            <text:p>-0.029477259144187</text:p>
          </table:table-cell>
          <table:table-cell office:value-type="float" office:value="0.0648312121629715" calcext:value-type="float">
            <text:p>0.06483121216297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QRT(([.J92]-[.F92])^2+([.K92]-[.G92])^2)" office:value-type="float" office:value="0.50857084168208" calcext:value-type="float">
            <text:p>0.50857084168208</text:p>
          </table:table-cell>
          <table:table-cell table:formula="of:=SQRT(([.R92]-[.N92])^2+([.S92]-[.O92])^2)" office:value-type="float" office:value="0.314174226032552" calcext:value-type="float">
            <text:p>0.314174226032552</text:p>
          </table:table-cell>
          <table:table-cell table:formula="of:=SQRT(([.R92]-[.F92])^2+([.S92]-[.G92])^2)" office:value-type="float" office:value="0.996377978073576" calcext:value-type="float">
            <text:p>0.996377978073576</text:p>
          </table:table-cell>
          <table:table-cell table:formula="of:=SQRT(([.N92]-[.J92])^2+([.O92]-[.K92])^2)" office:value-type="float" office:value="0.986106866759248" calcext:value-type="float">
            <text:p>0.986106866759248</text:p>
          </table:table-cell>
          <table:table-cell office:value-type="float" office:value="0.819601833820343" calcext:value-type="float">
            <text:p>0.819601833820343</text:p>
          </table:table-cell>
          <table:table-cell office:value-type="float" office:value="0.291305959224701" calcext:value-type="float">
            <text:p>0.291305959224701</text:p>
          </table:table-cell>
          <table:table-cell office:value-type="float" office:value="-0.544038832187653" calcext:value-type="float">
            <text:p>-0.544038832187653</text:p>
          </table:table-cell>
          <table:table-cell office:value-type="float" office:value="0.999394595623016" calcext:value-type="float">
            <text:p>0.999394595623016</text:p>
          </table:table-cell>
          <table:table-cell office:value-type="float" office:value="0.311630487442017" calcext:value-type="float">
            <text:p>0.311630487442017</text:p>
          </table:table-cell>
          <table:table-cell office:value-type="float" office:value="0.31599223613739" calcext:value-type="float">
            <text:p>0.31599223613739</text:p>
          </table:table-cell>
          <table:table-cell office:value-type="float" office:value="-0.526168584823608" calcext:value-type="float">
            <text:p>-0.526168584823608</text:p>
          </table:table-cell>
          <table:table-cell office:value-type="float" office:value="0.999521553516388" calcext:value-type="float">
            <text:p>0.999521553516388</text:p>
          </table:table-cell>
          <table:table-cell office:value-type="float" office:value="0.732271790504456" calcext:value-type="float">
            <text:p>0.732271790504456</text:p>
          </table:table-cell>
          <table:table-cell office:value-type="float" office:value="1.20788216590881" calcext:value-type="float">
            <text:p>1.20788216590881</text:p>
          </table:table-cell>
          <table:table-cell office:value-type="float" office:value="0.0336940512061119" calcext:value-type="float">
            <text:p>0.0336940512061119</text:p>
          </table:table-cell>
          <table:table-cell office:value-type="float" office:value="0.057914849370718" calcext:value-type="float">
            <text:p>0.057914849370718</text:p>
          </table:table-cell>
          <table:table-cell office:value-type="float" office:value="0.418132126331329" calcext:value-type="float">
            <text:p>0.418132126331329</text:p>
          </table:table-cell>
          <table:table-cell office:value-type="float" office:value="1.20322215557098" calcext:value-type="float">
            <text:p>1.20322215557098</text:p>
          </table:table-cell>
          <table:table-cell office:value-type="float" office:value="-0.0238647051155567" calcext:value-type="float">
            <text:p>-0.0238647051155567</text:p>
          </table:table-cell>
          <table:table-cell office:value-type="float" office:value="0.0639736279845238" calcext:value-type="float">
            <text:p>0.06397362798452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QRT(([.J93]-[.F93])^2+([.K93]-[.G93])^2)" office:value-type="float" office:value="0.508756964112842" calcext:value-type="float">
            <text:p>0.508756964112842</text:p>
          </table:table-cell>
          <table:table-cell table:formula="of:=SQRT(([.R93]-[.N93])^2+([.S93]-[.O93])^2)" office:value-type="float" office:value="0.314236985991038" calcext:value-type="float">
            <text:p>0.314236985991038</text:p>
          </table:table-cell>
          <table:table-cell table:formula="of:=SQRT(([.R93]-[.F93])^2+([.S93]-[.G93])^2)" office:value-type="float" office:value="0.998580159283607" calcext:value-type="float">
            <text:p>0.998580159283607</text:p>
          </table:table-cell>
          <table:table-cell table:formula="of:=SQRT(([.N93]-[.J93])^2+([.O93]-[.K93])^2)" office:value-type="float" office:value="0.987939054920038" calcext:value-type="float">
            <text:p>0.987939054920038</text:p>
          </table:table-cell>
          <table:table-cell office:value-type="float" office:value="0.818406939506531" calcext:value-type="float">
            <text:p>0.818406939506531</text:p>
          </table:table-cell>
          <table:table-cell office:value-type="float" office:value="0.291506350040436" calcext:value-type="float">
            <text:p>0.291506350040436</text:p>
          </table:table-cell>
          <table:table-cell office:value-type="float" office:value="-0.518107056617737" calcext:value-type="float">
            <text:p>-0.518107056617737</text:p>
          </table:table-cell>
          <table:table-cell office:value-type="float" office:value="0.999371111392975" calcext:value-type="float">
            <text:p>0.999371111392975</text:p>
          </table:table-cell>
          <table:table-cell office:value-type="float" office:value="0.310284912586212" calcext:value-type="float">
            <text:p>0.310284912586212</text:p>
          </table:table-cell>
          <table:table-cell office:value-type="float" office:value="0.316916078329086" calcext:value-type="float">
            <text:p>0.316916078329086</text:p>
          </table:table-cell>
          <table:table-cell office:value-type="float" office:value="-0.530219495296478" calcext:value-type="float">
            <text:p>-0.530219495296478</text:p>
          </table:table-cell>
          <table:table-cell office:value-type="float" office:value="0.999498903751373" calcext:value-type="float">
            <text:p>0.999498903751373</text:p>
          </table:table-cell>
          <table:table-cell office:value-type="float" office:value="0.732140421867371" calcext:value-type="float">
            <text:p>0.732140421867371</text:p>
          </table:table-cell>
          <table:table-cell office:value-type="float" office:value="1.21025896072388" calcext:value-type="float">
            <text:p>1.21025896072388</text:p>
          </table:table-cell>
          <table:table-cell office:value-type="float" office:value="0.0330504551529884" calcext:value-type="float">
            <text:p>0.0330504551529884</text:p>
          </table:table-cell>
          <table:table-cell office:value-type="float" office:value="0.0592005699872971" calcext:value-type="float">
            <text:p>0.0592005699872971</text:p>
          </table:table-cell>
          <table:table-cell office:value-type="float" office:value="0.417928844690323" calcext:value-type="float">
            <text:p>0.417928844690323</text:p>
          </table:table-cell>
          <table:table-cell office:value-type="float" office:value="1.20626294612885" calcext:value-type="float">
            <text:p>1.20626294612885</text:p>
          </table:table-cell>
          <table:table-cell office:value-type="float" office:value="-0.0231553260236979" calcext:value-type="float">
            <text:p>-0.0231553260236979</text:p>
          </table:table-cell>
          <table:table-cell office:value-type="float" office:value="0.0655769482254982" calcext:value-type="float">
            <text:p>0.06557694822549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QRT(([.J94]-[.F94])^2+([.K94]-[.G94])^2)" office:value-type="float" office:value="0.507995132029663" calcext:value-type="float">
            <text:p>0.507995132029663</text:p>
          </table:table-cell>
          <table:table-cell table:formula="of:=SQRT(([.R94]-[.N94])^2+([.S94]-[.O94])^2)" office:value-type="float" office:value="0.314060898359941" calcext:value-type="float">
            <text:p>0.314060898359941</text:p>
          </table:table-cell>
          <table:table-cell table:formula="of:=SQRT(([.R94]-[.F94])^2+([.S94]-[.G94])^2)" office:value-type="float" office:value="0.998816028480283" calcext:value-type="float">
            <text:p>0.998816028480283</text:p>
          </table:table-cell>
          <table:table-cell table:formula="of:=SQRT(([.N94]-[.J94])^2+([.O94]-[.K94])^2)" office:value-type="float" office:value="0.987090877801201" calcext:value-type="float">
            <text:p>0.987090877801201</text:p>
          </table:table-cell>
          <table:table-cell office:value-type="float" office:value="0.818125367164612" calcext:value-type="float">
            <text:p>0.818125367164612</text:p>
          </table:table-cell>
          <table:table-cell office:value-type="float" office:value="0.289568722248077" calcext:value-type="float">
            <text:p>0.289568722248077</text:p>
          </table:table-cell>
          <table:table-cell office:value-type="float" office:value="-0.389890968799591" calcext:value-type="float">
            <text:p>-0.389890968799591</text:p>
          </table:table-cell>
          <table:table-cell office:value-type="float" office:value="0.999370336532593" calcext:value-type="float">
            <text:p>0.999370336532593</text:p>
          </table:table-cell>
          <table:table-cell office:value-type="float" office:value="0.310807228088379" calcext:value-type="float">
            <text:p>0.310807228088379</text:p>
          </table:table-cell>
          <table:table-cell office:value-type="float" office:value="0.315786272287369" calcext:value-type="float">
            <text:p>0.315786272287369</text:p>
          </table:table-cell>
          <table:table-cell office:value-type="float" office:value="-0.441673755645752" calcext:value-type="float">
            <text:p>-0.441673755645752</text:p>
          </table:table-cell>
          <table:table-cell office:value-type="float" office:value="0.999491572380066" calcext:value-type="float">
            <text:p>0.999491572380066</text:p>
          </table:table-cell>
          <table:table-cell office:value-type="float" office:value="0.732377231121063" calcext:value-type="float">
            <text:p>0.732377231121063</text:p>
          </table:table-cell>
          <table:table-cell office:value-type="float" office:value="1.20832598209381" calcext:value-type="float">
            <text:p>1.20832598209381</text:p>
          </table:table-cell>
          <table:table-cell office:value-type="float" office:value="0.0346357896924019" calcext:value-type="float">
            <text:p>0.0346357896924019</text:p>
          </table:table-cell>
          <table:table-cell office:value-type="float" office:value="0.059520848095417" calcext:value-type="float">
            <text:p>0.059520848095417</text:p>
          </table:table-cell>
          <table:table-cell office:value-type="float" office:value="0.418335199356079" calcext:value-type="float">
            <text:p>0.418335199356079</text:p>
          </table:table-cell>
          <table:table-cell office:value-type="float" office:value="1.20488357543945" calcext:value-type="float">
            <text:p>1.20488357543945</text:p>
          </table:table-cell>
          <table:table-cell office:value-type="float" office:value="-0.0248440466821194" calcext:value-type="float">
            <text:p>-0.0248440466821194</text:p>
          </table:table-cell>
          <table:table-cell office:value-type="float" office:value="0.065702423453331" calcext:value-type="float">
            <text:p>0.0657024234533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QRT(([.J95]-[.F95])^2+([.K95]-[.G95])^2)" office:value-type="float" office:value="0.507474218412097" calcext:value-type="float">
            <text:p>0.507474218412097</text:p>
          </table:table-cell>
          <table:table-cell table:formula="of:=SQRT(([.R95]-[.N95])^2+([.S95]-[.O95])^2)" office:value-type="float" office:value="0.314335251407481" calcext:value-type="float">
            <text:p>0.314335251407481</text:p>
          </table:table-cell>
          <table:table-cell table:formula="of:=SQRT(([.R95]-[.F95])^2+([.S95]-[.G95])^2)" office:value-type="float" office:value="0.995173028525568" calcext:value-type="float">
            <text:p>0.995173028525568</text:p>
          </table:table-cell>
          <table:table-cell table:formula="of:=SQRT(([.N95]-[.J95])^2+([.O95]-[.K95])^2)" office:value-type="float" office:value="0.986229564216785" calcext:value-type="float">
            <text:p>0.986229564216785</text:p>
          </table:table-cell>
          <table:table-cell office:value-type="float" office:value="0.81838071346283" calcext:value-type="float">
            <text:p>0.81838071346283</text:p>
          </table:table-cell>
          <table:table-cell office:value-type="float" office:value="0.289548933506012" calcext:value-type="float">
            <text:p>0.289548933506012</text:p>
          </table:table-cell>
          <table:table-cell office:value-type="float" office:value="-0.441210687160492" calcext:value-type="float">
            <text:p>-0.441210687160492</text:p>
          </table:table-cell>
          <table:table-cell office:value-type="float" office:value="0.999385118484497" calcext:value-type="float">
            <text:p>0.999385118484497</text:p>
          </table:table-cell>
          <table:table-cell office:value-type="float" office:value="0.311522781848907" calcext:value-type="float">
            <text:p>0.311522781848907</text:p>
          </table:table-cell>
          <table:table-cell office:value-type="float" office:value="0.314551323652267" calcext:value-type="float">
            <text:p>0.314551323652267</text:p>
          </table:table-cell>
          <table:table-cell office:value-type="float" office:value="-0.487261861562729" calcext:value-type="float">
            <text:p>-0.487261861562729</text:p>
          </table:table-cell>
          <table:table-cell office:value-type="float" office:value="0.999509155750275" calcext:value-type="float">
            <text:p>0.999509155750275</text:p>
          </table:table-cell>
          <table:table-cell office:value-type="float" office:value="0.73343425989151" calcext:value-type="float">
            <text:p>0.73343425989151</text:p>
          </table:table-cell>
          <table:table-cell office:value-type="float" office:value="1.20597684383392" calcext:value-type="float">
            <text:p>1.20597684383392</text:p>
          </table:table-cell>
          <table:table-cell office:value-type="float" office:value="0.0354891791939735" calcext:value-type="float">
            <text:p>0.0354891791939735</text:p>
          </table:table-cell>
          <table:table-cell office:value-type="float" office:value="0.0595459043979645" calcext:value-type="float">
            <text:p>0.0595459043979645</text:p>
          </table:table-cell>
          <table:table-cell office:value-type="float" office:value="0.419136434793472" calcext:value-type="float">
            <text:p>0.419136434793472</text:p>
          </table:table-cell>
          <table:table-cell office:value-type="float" office:value="1.20112633705139" calcext:value-type="float">
            <text:p>1.20112633705139</text:p>
          </table:table-cell>
          <table:table-cell office:value-type="float" office:value="-0.0257790237665176" calcext:value-type="float">
            <text:p>-0.0257790237665176</text:p>
          </table:table-cell>
          <table:table-cell office:value-type="float" office:value="0.0661763623356819" calcext:value-type="float">
            <text:p>0.06617636233568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QRT(([.J96]-[.F96])^2+([.K96]-[.G96])^2)" office:value-type="float" office:value="0.508150262309804" calcext:value-type="float">
            <text:p>0.508150262309804</text:p>
          </table:table-cell>
          <table:table-cell table:formula="of:=SQRT(([.R96]-[.N96])^2+([.S96]-[.O96])^2)" office:value-type="float" office:value="0.314475478015394" calcext:value-type="float">
            <text:p>0.314475478015394</text:p>
          </table:table-cell>
          <table:table-cell table:formula="of:=SQRT(([.R96]-[.F96])^2+([.S96]-[.G96])^2)" office:value-type="float" office:value="0.997211027098945" calcext:value-type="float">
            <text:p>0.997211027098945</text:p>
          </table:table-cell>
          <table:table-cell table:formula="of:=SQRT(([.N96]-[.J96])^2+([.O96]-[.K96])^2)" office:value-type="float" office:value="0.989180245067468" calcext:value-type="float">
            <text:p>0.989180245067468</text:p>
          </table:table-cell>
          <table:table-cell office:value-type="float" office:value="0.819068431854248" calcext:value-type="float">
            <text:p>0.819068431854248</text:p>
          </table:table-cell>
          <table:table-cell office:value-type="float" office:value="0.289840698242188" calcext:value-type="float">
            <text:p>0.289840698242188</text:p>
          </table:table-cell>
          <table:table-cell office:value-type="float" office:value="-0.445731550455093" calcext:value-type="float">
            <text:p>-0.445731550455093</text:p>
          </table:table-cell>
          <table:table-cell office:value-type="float" office:value="0.999374866485596" calcext:value-type="float">
            <text:p>0.999374866485596</text:p>
          </table:table-cell>
          <table:table-cell office:value-type="float" office:value="0.311577796936035" calcext:value-type="float">
            <text:p>0.311577796936035</text:p>
          </table:table-cell>
          <table:table-cell office:value-type="float" office:value="0.315723985433579" calcext:value-type="float">
            <text:p>0.315723985433579</text:p>
          </table:table-cell>
          <table:table-cell office:value-type="float" office:value="-0.506195068359375" calcext:value-type="float">
            <text:p>-0.506195068359375</text:p>
          </table:table-cell>
          <table:table-cell office:value-type="float" office:value="0.999500513076782" calcext:value-type="float">
            <text:p>0.999500513076782</text:p>
          </table:table-cell>
          <table:table-cell office:value-type="float" office:value="0.73342490196228" calcext:value-type="float">
            <text:p>0.73342490196228</text:p>
          </table:table-cell>
          <table:table-cell office:value-type="float" office:value="1.21044325828552" calcext:value-type="float">
            <text:p>1.21044325828552</text:p>
          </table:table-cell>
          <table:table-cell office:value-type="float" office:value="0.031500980257988" calcext:value-type="float">
            <text:p>0.031500980257988</text:p>
          </table:table-cell>
          <table:table-cell office:value-type="float" office:value="0.0590022280812264" calcext:value-type="float">
            <text:p>0.0590022280812264</text:p>
          </table:table-cell>
          <table:table-cell office:value-type="float" office:value="0.419030666351318" calcext:value-type="float">
            <text:p>0.419030666351318</text:p>
          </table:table-cell>
          <table:table-cell office:value-type="float" office:value="1.20329546928406" calcext:value-type="float">
            <text:p>1.20329546928406</text:p>
          </table:table-cell>
          <table:table-cell office:value-type="float" office:value="-0.0214728247374296" calcext:value-type="float">
            <text:p>-0.0214728247374296</text:p>
          </table:table-cell>
          <table:table-cell office:value-type="float" office:value="0.0654446855187416" calcext:value-type="float">
            <text:p>0.06544468551874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QRT(([.J97]-[.F97])^2+([.K97]-[.G97])^2)" office:value-type="float" office:value="0.510070749010988" calcext:value-type="float">
            <text:p>0.510070749010988</text:p>
          </table:table-cell>
          <table:table-cell table:formula="of:=SQRT(([.R97]-[.N97])^2+([.S97]-[.O97])^2)" office:value-type="float" office:value="0.316299423762979" calcext:value-type="float">
            <text:p>0.316299423762979</text:p>
          </table:table-cell>
          <table:table-cell table:formula="of:=SQRT(([.R97]-[.F97])^2+([.S97]-[.G97])^2)" office:value-type="float" office:value="1.00111556320395" calcext:value-type="float">
            <text:p>1.00111556320395</text:p>
          </table:table-cell>
          <table:table-cell table:formula="of:=SQRT(([.N97]-[.J97])^2+([.O97]-[.K97])^2)" office:value-type="float" office:value="0.995264353057615" calcext:value-type="float">
            <text:p>0.995264353057615</text:p>
          </table:table-cell>
          <table:table-cell office:value-type="float" office:value="0.819898128509522" calcext:value-type="float">
            <text:p>0.819898128509522</text:p>
          </table:table-cell>
          <table:table-cell office:value-type="float" office:value="0.290865063667297" calcext:value-type="float">
            <text:p>0.290865063667297</text:p>
          </table:table-cell>
          <table:table-cell office:value-type="float" office:value="-0.464381068944931" calcext:value-type="float">
            <text:p>-0.464381068944931</text:p>
          </table:table-cell>
          <table:table-cell office:value-type="float" office:value="0.999371767044067" calcext:value-type="float">
            <text:p>0.999371767044067</text:p>
          </table:table-cell>
          <table:table-cell office:value-type="float" office:value="0.310419380664825" calcext:value-type="float">
            <text:p>0.310419380664825</text:p>
          </table:table-cell>
          <table:table-cell office:value-type="float" office:value="0.315432816743851" calcext:value-type="float">
            <text:p>0.315432816743851</text:p>
          </table:table-cell>
          <table:table-cell office:value-type="float" office:value="-0.480235517024994" calcext:value-type="float">
            <text:p>-0.480235517024994</text:p>
          </table:table-cell>
          <table:table-cell office:value-type="float" office:value="0.999496161937714" calcext:value-type="float">
            <text:p>0.999496161937714</text:p>
          </table:table-cell>
          <table:table-cell office:value-type="float" office:value="0.733708024024963" calcext:value-type="float">
            <text:p>0.733708024024963</text:p>
          </table:table-cell>
          <table:table-cell office:value-type="float" office:value="1.2161979675293" calcext:value-type="float">
            <text:p>1.2161979675293</text:p>
          </table:table-cell>
          <table:table-cell office:value-type="float" office:value="0.0271324701607227" calcext:value-type="float">
            <text:p>0.0271324701607227</text:p>
          </table:table-cell>
          <table:table-cell office:value-type="float" office:value="0.0601399838924408" calcext:value-type="float">
            <text:p>0.0601399838924408</text:p>
          </table:table-cell>
          <table:table-cell office:value-type="float" office:value="0.417526572942734" calcext:value-type="float">
            <text:p>0.417526572942734</text:p>
          </table:table-cell>
          <table:table-cell office:value-type="float" office:value="1.20755994319916" calcext:value-type="float">
            <text:p>1.20755994319916</text:p>
          </table:table-cell>
          <table:table-cell office:value-type="float" office:value="-0.0172565784305334" calcext:value-type="float">
            <text:p>-0.0172565784305334</text:p>
          </table:table-cell>
          <table:table-cell office:value-type="float" office:value="0.0667236223816872" calcext:value-type="float">
            <text:p>0.06672362238168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QRT(([.J98]-[.F98])^2+([.K98]-[.G98])^2)" office:value-type="float" office:value="0.510618462378817" calcext:value-type="float">
            <text:p>0.510618462378817</text:p>
          </table:table-cell>
          <table:table-cell table:formula="of:=SQRT(([.R98]-[.N98])^2+([.S98]-[.O98])^2)" office:value-type="float" office:value="0.319659121407781" calcext:value-type="float">
            <text:p>0.319659121407781</text:p>
          </table:table-cell>
          <table:table-cell table:formula="of:=SQRT(([.R98]-[.F98])^2+([.S98]-[.G98])^2)" office:value-type="float" office:value="1.0009331110796" calcext:value-type="float">
            <text:p>1.0009331110796</text:p>
          </table:table-cell>
          <table:table-cell table:formula="of:=SQRT(([.N98]-[.J98])^2+([.O98]-[.K98])^2)" office:value-type="float" office:value="0.998651868787267" calcext:value-type="float">
            <text:p>0.998651868787267</text:p>
          </table:table-cell>
          <table:table-cell office:value-type="float" office:value="0.821551501750946" calcext:value-type="float">
            <text:p>0.821551501750946</text:p>
          </table:table-cell>
          <table:table-cell office:value-type="float" office:value="0.292629688978195" calcext:value-type="float">
            <text:p>0.292629688978195</text:p>
          </table:table-cell>
          <table:table-cell office:value-type="float" office:value="-0.473370611667633" calcext:value-type="float">
            <text:p>-0.473370611667633</text:p>
          </table:table-cell>
          <table:table-cell office:value-type="float" office:value="0.999387860298157" calcext:value-type="float">
            <text:p>0.999387860298157</text:p>
          </table:table-cell>
          <table:table-cell office:value-type="float" office:value="0.311442047357559" calcext:value-type="float">
            <text:p>0.311442047357559</text:p>
          </table:table-cell>
          <table:table-cell office:value-type="float" office:value="0.315423518419266" calcext:value-type="float">
            <text:p>0.315423518419266</text:p>
          </table:table-cell>
          <table:table-cell office:value-type="float" office:value="-0.46160489320755" calcext:value-type="float">
            <text:p>-0.46160489320755</text:p>
          </table:table-cell>
          <table:table-cell office:value-type="float" office:value="0.999508321285248" calcext:value-type="float">
            <text:p>0.999508321285248</text:p>
          </table:table-cell>
          <table:table-cell office:value-type="float" office:value="0.737028658390045" calcext:value-type="float">
            <text:p>0.737028658390045</text:p>
          </table:table-cell>
          <table:table-cell office:value-type="float" office:value="1.21885120868683" calcext:value-type="float">
            <text:p>1.21885120868683</text:p>
          </table:table-cell>
          <table:table-cell office:value-type="float" office:value="0.0261684916913509" calcext:value-type="float">
            <text:p>0.0261684916913509</text:p>
          </table:table-cell>
          <table:table-cell office:value-type="float" office:value="0.0593715831637383" calcext:value-type="float">
            <text:p>0.0593715831637383</text:p>
          </table:table-cell>
          <table:table-cell office:value-type="float" office:value="0.417540311813355" calcext:value-type="float">
            <text:p>0.417540311813355</text:p>
          </table:table-cell>
          <table:table-cell office:value-type="float" office:value="1.2084037065506" calcext:value-type="float">
            <text:p>1.2084037065506</text:p>
          </table:table-cell>
          <table:table-cell office:value-type="float" office:value="-0.0162552986294031" calcext:value-type="float">
            <text:p>-0.0162552986294031</text:p>
          </table:table-cell>
          <table:table-cell office:value-type="float" office:value="0.0660321563482285" calcext:value-type="float">
            <text:p>0.06603215634822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QRT(([.J99]-[.F99])^2+([.K99]-[.G99])^2)" office:value-type="float" office:value="0.510404836622885" calcext:value-type="float">
            <text:p>0.510404836622885</text:p>
          </table:table-cell>
          <table:table-cell table:formula="of:=SQRT(([.R99]-[.N99])^2+([.S99]-[.O99])^2)" office:value-type="float" office:value="0.319583532176726" calcext:value-type="float">
            <text:p>0.319583532176726</text:p>
          </table:table-cell>
          <table:table-cell table:formula="of:=SQRT(([.R99]-[.F99])^2+([.S99]-[.G99])^2)" office:value-type="float" office:value="0.994989693324455" calcext:value-type="float">
            <text:p>0.994989693324455</text:p>
          </table:table-cell>
          <table:table-cell table:formula="of:=SQRT(([.N99]-[.J99])^2+([.O99]-[.K99])^2)" office:value-type="float" office:value="0.99273913994791" calcext:value-type="float">
            <text:p>0.99273913994791</text:p>
          </table:table-cell>
          <table:table-cell office:value-type="float" office:value="0.821555614471436" calcext:value-type="float">
            <text:p>0.821555614471436</text:p>
          </table:table-cell>
          <table:table-cell office:value-type="float" office:value="0.293731808662415" calcext:value-type="float">
            <text:p>0.293731808662415</text:p>
          </table:table-cell>
          <table:table-cell office:value-type="float" office:value="-0.589364588260651" calcext:value-type="float">
            <text:p>-0.589364588260651</text:p>
          </table:table-cell>
          <table:table-cell office:value-type="float" office:value="0.999413669109345" calcext:value-type="float">
            <text:p>0.999413669109345</text:p>
          </table:table-cell>
          <table:table-cell office:value-type="float" office:value="0.311642020940781" calcext:value-type="float">
            <text:p>0.311642020940781</text:p>
          </table:table-cell>
          <table:table-cell office:value-type="float" office:value="0.316119849681854" calcext:value-type="float">
            <text:p>0.316119849681854</text:p>
          </table:table-cell>
          <table:table-cell office:value-type="float" office:value="-0.607917428016663" calcext:value-type="float">
            <text:p>-0.607917428016663</text:p>
          </table:table-cell>
          <table:table-cell office:value-type="float" office:value="0.999524116516113" calcext:value-type="float">
            <text:p>0.999524116516113</text:p>
          </table:table-cell>
          <table:table-cell office:value-type="float" office:value="0.736676871776581" calcext:value-type="float">
            <text:p>0.736676871776581</text:p>
          </table:table-cell>
          <table:table-cell office:value-type="float" office:value="1.21326887607574" calcext:value-type="float">
            <text:p>1.21326887607574</text:p>
          </table:table-cell>
          <table:table-cell office:value-type="float" office:value="0.0311093982309103" calcext:value-type="float">
            <text:p>0.0311093982309103</text:p>
          </table:table-cell>
          <table:table-cell office:value-type="float" office:value="0.061336662620306" calcext:value-type="float">
            <text:p>0.061336662620306</text:p>
          </table:table-cell>
          <table:table-cell office:value-type="float" office:value="0.417262226343155" calcext:value-type="float">
            <text:p>0.417262226343155</text:p>
          </table:table-cell>
          <table:table-cell office:value-type="float" office:value="1.20288050174713" calcext:value-type="float">
            <text:p>1.20288050174713</text:p>
          </table:table-cell>
          <table:table-cell office:value-type="float" office:value="-0.0212361123412848" calcext:value-type="float">
            <text:p>-0.0212361123412848</text:p>
          </table:table-cell>
          <table:table-cell office:value-type="float" office:value="0.0676534771919251" calcext:value-type="float">
            <text:p>0.06765347719192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QRT(([.J100]-[.F100])^2+([.K100]-[.G100])^2)" office:value-type="float" office:value="0.510872830696441" calcext:value-type="float">
            <text:p>0.510872830696441</text:p>
          </table:table-cell>
          <table:table-cell table:formula="of:=SQRT(([.R100]-[.N100])^2+([.S100]-[.O100])^2)" office:value-type="float" office:value="0.318431709845734" calcext:value-type="float">
            <text:p>0.318431709845734</text:p>
          </table:table-cell>
          <table:table-cell table:formula="of:=SQRT(([.R100]-[.F100])^2+([.S100]-[.G100])^2)" office:value-type="float" office:value="0.994392761869004" calcext:value-type="float">
            <text:p>0.994392761869004</text:p>
          </table:table-cell>
          <table:table-cell table:formula="of:=SQRT(([.N100]-[.J100])^2+([.O100]-[.K100])^2)" office:value-type="float" office:value="0.990653603949075" calcext:value-type="float">
            <text:p>0.990653603949075</text:p>
          </table:table-cell>
          <table:table-cell office:value-type="float" office:value="0.821527659893036" calcext:value-type="float">
            <text:p>0.821527659893036</text:p>
          </table:table-cell>
          <table:table-cell office:value-type="float" office:value="0.294382959604263" calcext:value-type="float">
            <text:p>0.294382959604263</text:p>
          </table:table-cell>
          <table:table-cell office:value-type="float" office:value="-0.716077446937561" calcext:value-type="float">
            <text:p>-0.716077446937561</text:p>
          </table:table-cell>
          <table:table-cell office:value-type="float" office:value="0.999434053897858" calcext:value-type="float">
            <text:p>0.999434053897858</text:p>
          </table:table-cell>
          <table:table-cell office:value-type="float" office:value="0.311184912919998" calcext:value-type="float">
            <text:p>0.311184912919998</text:p>
          </table:table-cell>
          <table:table-cell office:value-type="float" office:value="0.317649453878403" calcext:value-type="float">
            <text:p>0.317649453878403</text:p>
          </table:table-cell>
          <table:table-cell office:value-type="float" office:value="-0.687446117401123" calcext:value-type="float">
            <text:p>-0.687446117401123</text:p>
          </table:table-cell>
          <table:table-cell office:value-type="float" office:value="0.999534547328949" calcext:value-type="float">
            <text:p>0.999534547328949</text:p>
          </table:table-cell>
          <table:table-cell office:value-type="float" office:value="0.735552251338959" calcext:value-type="float">
            <text:p>0.735552251338959</text:p>
          </table:table-cell>
          <table:table-cell office:value-type="float" office:value="1.21280694007874" calcext:value-type="float">
            <text:p>1.21280694007874</text:p>
          </table:table-cell>
          <table:table-cell office:value-type="float" office:value="0.0149817289784551" calcext:value-type="float">
            <text:p>0.0149817289784551</text:p>
          </table:table-cell>
          <table:table-cell office:value-type="float" office:value="0.0618015415966511" calcext:value-type="float">
            <text:p>0.0618015415966511</text:p>
          </table:table-cell>
          <table:table-cell office:value-type="float" office:value="0.417274802923203" calcext:value-type="float">
            <text:p>0.417274802923203</text:p>
          </table:table-cell>
          <table:table-cell office:value-type="float" office:value="1.20289635658264" calcext:value-type="float">
            <text:p>1.20289635658264</text:p>
          </table:table-cell>
          <table:table-cell office:value-type="float" office:value="-0.00528628937900066" calcext:value-type="float">
            <text:p>-0.00528628937900066</text:p>
          </table:table-cell>
          <table:table-cell office:value-type="float" office:value="0.0672573372721672" calcext:value-type="float">
            <text:p>0.06725733727216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([.J101]-[.F101])^2+([.K101]-[.G101])^2)" office:value-type="float" office:value="0.511266488035408" calcext:value-type="float">
            <text:p>0.511266488035408</text:p>
          </table:table-cell>
          <table:table-cell table:formula="of:=SQRT(([.R101]-[.N101])^2+([.S101]-[.O101])^2)" office:value-type="float" office:value="0.318602956052587" calcext:value-type="float">
            <text:p>0.318602956052587</text:p>
          </table:table-cell>
          <table:table-cell table:formula="of:=SQRT(([.R101]-[.F101])^2+([.S101]-[.G101])^2)" office:value-type="float" office:value="0.995122871264381" calcext:value-type="float">
            <text:p>0.995122871264381</text:p>
          </table:table-cell>
          <table:table-cell table:formula="of:=SQRT(([.N101]-[.J101])^2+([.O101]-[.K101])^2)" office:value-type="float" office:value="0.993518150943332" calcext:value-type="float">
            <text:p>0.993518150943332</text:p>
          </table:table-cell>
          <table:table-cell office:value-type="float" office:value="0.823030173778534" calcext:value-type="float">
            <text:p>0.823030173778534</text:p>
          </table:table-cell>
          <table:table-cell office:value-type="float" office:value="0.293178349733353" calcext:value-type="float">
            <text:p>0.293178349733353</text:p>
          </table:table-cell>
          <table:table-cell office:value-type="float" office:value="-0.508245348930359" calcext:value-type="float">
            <text:p>-0.508245348930359</text:p>
          </table:table-cell>
          <table:table-cell office:value-type="float" office:value="0.999452292919159" calcext:value-type="float">
            <text:p>0.999452292919159</text:p>
          </table:table-cell>
          <table:table-cell office:value-type="float" office:value="0.312221467494965" calcext:value-type="float">
            <text:p>0.312221467494965</text:p>
          </table:table-cell>
          <table:table-cell office:value-type="float" office:value="0.314809054136276" calcext:value-type="float">
            <text:p>0.314809054136276</text:p>
          </table:table-cell>
          <table:table-cell office:value-type="float" office:value="-0.62094920873642" calcext:value-type="float">
            <text:p>-0.62094920873642</text:p>
          </table:table-cell>
          <table:table-cell office:value-type="float" office:value="0.999551475048065" calcext:value-type="float">
            <text:p>0.999551475048065</text:p>
          </table:table-cell>
          <table:table-cell office:value-type="float" office:value="0.73826676607132" calcext:value-type="float">
            <text:p>0.73826676607132</text:p>
          </table:table-cell>
          <table:table-cell office:value-type="float" office:value="1.21234107017517" calcext:value-type="float">
            <text:p>1.21234107017517</text:p>
          </table:table-cell>
          <table:table-cell office:value-type="float" office:value="0.0236583780497313" calcext:value-type="float">
            <text:p>0.0236583780497313</text:p>
          </table:table-cell>
          <table:table-cell office:value-type="float" office:value="0.0606743358075619" calcext:value-type="float">
            <text:p>0.0606743358075619</text:p>
          </table:table-cell>
          <table:table-cell office:value-type="float" office:value="0.419802367687225" calcext:value-type="float">
            <text:p>0.419802367687225</text:p>
          </table:table-cell>
          <table:table-cell office:value-type="float" office:value="1.20294582843781" calcext:value-type="float">
            <text:p>1.20294582843781</text:p>
          </table:table-cell>
          <table:table-cell office:value-type="float" office:value="-0.0140114258974791" calcext:value-type="float">
            <text:p>-0.0140114258974791</text:p>
          </table:table-cell>
          <table:table-cell office:value-type="float" office:value="0.06645318120718" calcext:value-type="float">
            <text:p>0.066453181207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QRT(([.J102]-[.F102])^2+([.K102]-[.G102])^2)" office:value-type="float" office:value="0.510898357689613" calcext:value-type="float">
            <text:p>0.510898357689613</text:p>
          </table:table-cell>
          <table:table-cell table:formula="of:=SQRT(([.R102]-[.N102])^2+([.S102]-[.O102])^2)" office:value-type="float" office:value="0.317786004694473" calcext:value-type="float">
            <text:p>0.317786004694473</text:p>
          </table:table-cell>
          <table:table-cell table:formula="of:=SQRT(([.R102]-[.F102])^2+([.S102]-[.G102])^2)" office:value-type="float" office:value="0.994110092596894" calcext:value-type="float">
            <text:p>0.994110092596894</text:p>
          </table:table-cell>
          <table:table-cell table:formula="of:=SQRT(([.N102]-[.J102])^2+([.O102]-[.K102])^2)" office:value-type="float" office:value="0.992145118282981" calcext:value-type="float">
            <text:p>0.992145118282981</text:p>
          </table:table-cell>
          <table:table-cell office:value-type="float" office:value="0.822721600532532" calcext:value-type="float">
            <text:p>0.822721600532532</text:p>
          </table:table-cell>
          <table:table-cell office:value-type="float" office:value="0.292966783046722" calcext:value-type="float">
            <text:p>0.292966783046722</text:p>
          </table:table-cell>
          <table:table-cell office:value-type="float" office:value="-0.506783723831177" calcext:value-type="float">
            <text:p>-0.506783723831177</text:p>
          </table:table-cell>
          <table:table-cell office:value-type="float" office:value="0.999458432197571" calcext:value-type="float">
            <text:p>0.999458432197571</text:p>
          </table:table-cell>
          <table:table-cell office:value-type="float" office:value="0.312298148870468" calcext:value-type="float">
            <text:p>0.312298148870468</text:p>
          </table:table-cell>
          <table:table-cell office:value-type="float" office:value="0.314990222454071" calcext:value-type="float">
            <text:p>0.314990222454071</text:p>
          </table:table-cell>
          <table:table-cell office:value-type="float" office:value="-0.609977066516876" calcext:value-type="float">
            <text:p>-0.609977066516876</text:p>
          </table:table-cell>
          <table:table-cell office:value-type="float" office:value="0.999555826187134" calcext:value-type="float">
            <text:p>0.999555826187134</text:p>
          </table:table-cell>
          <table:table-cell office:value-type="float" office:value="0.736663699150085" calcext:value-type="float">
            <text:p>0.736663699150085</text:p>
          </table:table-cell>
          <table:table-cell office:value-type="float" office:value="1.21179890632629" calcext:value-type="float">
            <text:p>1.21179890632629</text:p>
          </table:table-cell>
          <table:table-cell office:value-type="float" office:value="0.0409719906747341" calcext:value-type="float">
            <text:p>0.0409719906747341</text:p>
          </table:table-cell>
          <table:table-cell office:value-type="float" office:value="0.0613158158957958" calcext:value-type="float">
            <text:p>0.0613158158957958</text:p>
          </table:table-cell>
          <table:table-cell office:value-type="float" office:value="0.419046968221664" calcext:value-type="float">
            <text:p>0.419046968221664</text:p>
          </table:table-cell>
          <table:table-cell office:value-type="float" office:value="1.20142793655396" calcext:value-type="float">
            <text:p>1.20142793655396</text:p>
          </table:table-cell>
          <table:table-cell office:value-type="float" office:value="-0.0312490016222" calcext:value-type="float">
            <text:p>-0.0312490016222</text:p>
          </table:table-cell>
          <table:table-cell office:value-type="float" office:value="0.0674551576375961" calcext:value-type="float">
            <text:p>0.06745515763759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QRT(([.J103]-[.F103])^2+([.K103]-[.G103])^2)" office:value-type="float" office:value="0.510799411763314" calcext:value-type="float">
            <text:p>0.510799411763314</text:p>
          </table:table-cell>
          <table:table-cell table:formula="of:=SQRT(([.R103]-[.N103])^2+([.S103]-[.O103])^2)" office:value-type="float" office:value="0.317568350239713" calcext:value-type="float">
            <text:p>0.317568350239713</text:p>
          </table:table-cell>
          <table:table-cell table:formula="of:=SQRT(([.R103]-[.F103])^2+([.S103]-[.G103])^2)" office:value-type="float" office:value="0.994352699410813" calcext:value-type="float">
            <text:p>0.994352699410813</text:p>
          </table:table-cell>
          <table:table-cell table:formula="of:=SQRT(([.N103]-[.J103])^2+([.O103]-[.K103])^2)" office:value-type="float" office:value="0.991722809591917" calcext:value-type="float">
            <text:p>0.991722809591917</text:p>
          </table:table-cell>
          <table:table-cell office:value-type="float" office:value="0.822729289531708" calcext:value-type="float">
            <text:p>0.822729289531708</text:p>
          </table:table-cell>
          <table:table-cell office:value-type="float" office:value="0.293217450380325" calcext:value-type="float">
            <text:p>0.293217450380325</text:p>
          </table:table-cell>
          <table:table-cell office:value-type="float" office:value="-0.505387961864471" calcext:value-type="float">
            <text:p>-0.505387961864471</text:p>
          </table:table-cell>
          <table:table-cell office:value-type="float" office:value="0.999484717845917" calcext:value-type="float">
            <text:p>0.999484717845917</text:p>
          </table:table-cell>
          <table:table-cell office:value-type="float" office:value="0.312396824359894" calcext:value-type="float">
            <text:p>0.312396824359894</text:p>
          </table:table-cell>
          <table:table-cell office:value-type="float" office:value="0.315053522586823" calcext:value-type="float">
            <text:p>0.315053522586823</text:p>
          </table:table-cell>
          <table:table-cell office:value-type="float" office:value="-0.563687920570374" calcext:value-type="float">
            <text:p>-0.563687920570374</text:p>
          </table:table-cell>
          <table:table-cell office:value-type="float" office:value="0.999573171138763" calcext:value-type="float">
            <text:p>0.999573171138763</text:p>
          </table:table-cell>
          <table:table-cell office:value-type="float" office:value="0.735337734222412" calcext:value-type="float">
            <text:p>0.735337734222412</text:p>
          </table:table-cell>
          <table:table-cell office:value-type="float" office:value="1.2120680809021" calcext:value-type="float">
            <text:p>1.2120680809021</text:p>
          </table:table-cell>
          <table:table-cell office:value-type="float" office:value="0.0406181886792183" calcext:value-type="float">
            <text:p>0.0406181886792183</text:p>
          </table:table-cell>
          <table:table-cell office:value-type="float" office:value="0.0610757954418659" calcext:value-type="float">
            <text:p>0.0610757954418659</text:p>
          </table:table-cell>
          <table:table-cell office:value-type="float" office:value="0.41794690489769" calcext:value-type="float">
            <text:p>0.41794690489769</text:p>
          </table:table-cell>
          <table:table-cell office:value-type="float" office:value="1.20145118236542" calcext:value-type="float">
            <text:p>1.20145118236542</text:p>
          </table:table-cell>
          <table:table-cell office:value-type="float" office:value="-0.0309037826955318" calcext:value-type="float">
            <text:p>-0.0309037826955318</text:p>
          </table:table-cell>
          <table:table-cell office:value-type="float" office:value="0.066994808614254" calcext:value-type="float">
            <text:p>0.0669948086142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QRT(([.J104]-[.F104])^2+([.K104]-[.G104])^2)" office:value-type="float" office:value="0.51170730909562" calcext:value-type="float">
            <text:p>0.51170730909562</text:p>
          </table:table-cell>
          <table:table-cell table:formula="of:=SQRT(([.R104]-[.N104])^2+([.S104]-[.O104])^2)" office:value-type="float" office:value="0.317863954926078" calcext:value-type="float">
            <text:p>0.317863954926078</text:p>
          </table:table-cell>
          <table:table-cell table:formula="of:=SQRT(([.R104]-[.F104])^2+([.S104]-[.G104])^2)" office:value-type="float" office:value="1.00007314413621" calcext:value-type="float">
            <text:p>1.00007314413621</text:p>
          </table:table-cell>
          <table:table-cell table:formula="of:=SQRT(([.N104]-[.J104])^2+([.O104]-[.K104])^2)" office:value-type="float" office:value="0.994487164739478" calcext:value-type="float">
            <text:p>0.994487164739478</text:p>
          </table:table-cell>
          <table:table-cell office:value-type="float" office:value="0.822818636894226" calcext:value-type="float">
            <text:p>0.822818636894226</text:p>
          </table:table-cell>
          <table:table-cell office:value-type="float" office:value="0.291938632726669" calcext:value-type="float">
            <text:p>0.291938632726669</text:p>
          </table:table-cell>
          <table:table-cell office:value-type="float" office:value="-0.509203135967255" calcext:value-type="float">
            <text:p>-0.509203135967255</text:p>
          </table:table-cell>
          <table:table-cell office:value-type="float" office:value="0.999491035938263" calcext:value-type="float">
            <text:p>0.999491035938263</text:p>
          </table:table-cell>
          <table:table-cell office:value-type="float" office:value="0.311627209186554" calcext:value-type="float">
            <text:p>0.311627209186554</text:p>
          </table:table-cell>
          <table:table-cell office:value-type="float" office:value="0.314910233020782" calcext:value-type="float">
            <text:p>0.314910233020782</text:p>
          </table:table-cell>
          <table:table-cell office:value-type="float" office:value="-0.506162703037262" calcext:value-type="float">
            <text:p>-0.506162703037262</text:p>
          </table:table-cell>
          <table:table-cell office:value-type="float" office:value="0.999569118022919" calcext:value-type="float">
            <text:p>0.999569118022919</text:p>
          </table:table-cell>
          <table:table-cell office:value-type="float" office:value="0.734983801841736" calcext:value-type="float">
            <text:p>0.734983801841736</text:p>
          </table:table-cell>
          <table:table-cell office:value-type="float" office:value="1.21478462219238" calcext:value-type="float">
            <text:p>1.21478462219238</text:p>
          </table:table-cell>
          <table:table-cell office:value-type="float" office:value="0.0300317797809839" calcext:value-type="float">
            <text:p>0.0300317797809839</text:p>
          </table:table-cell>
          <table:table-cell office:value-type="float" office:value="0.0605488047003746" calcext:value-type="float">
            <text:p>0.0605488047003746</text:p>
          </table:table-cell>
          <table:table-cell office:value-type="float" office:value="0.417239099740982" calcext:value-type="float">
            <text:p>0.417239099740982</text:p>
          </table:table-cell>
          <table:table-cell office:value-type="float" office:value="1.20607841014862" calcext:value-type="float">
            <text:p>1.20607841014862</text:p>
          </table:table-cell>
          <table:table-cell office:value-type="float" office:value="-0.0202490761876106" calcext:value-type="float">
            <text:p>-0.0202490761876106</text:p>
          </table:table-cell>
          <table:table-cell office:value-type="float" office:value="0.0660342574119568" calcext:value-type="float">
            <text:p>0.06603425741195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QRT(([.J105]-[.F105])^2+([.K105]-[.G105])^2)" office:value-type="float" office:value="0.513474257342168" calcext:value-type="float">
            <text:p>0.513474257342168</text:p>
          </table:table-cell>
          <table:table-cell table:formula="of:=SQRT(([.R105]-[.N105])^2+([.S105]-[.O105])^2)" office:value-type="float" office:value="0.320035728200869" calcext:value-type="float">
            <text:p>0.320035728200869</text:p>
          </table:table-cell>
          <table:table-cell table:formula="of:=SQRT(([.R105]-[.F105])^2+([.S105]-[.G105])^2)" office:value-type="float" office:value="1.00662952132783" calcext:value-type="float">
            <text:p>1.00662952132783</text:p>
          </table:table-cell>
          <table:table-cell table:formula="of:=SQRT(([.N105]-[.J105])^2+([.O105]-[.K105])^2)" office:value-type="float" office:value="1.00283134506414" calcext:value-type="float">
            <text:p>1.00283134506414</text:p>
          </table:table-cell>
          <table:table-cell office:value-type="float" office:value="0.823792934417725" calcext:value-type="float">
            <text:p>0.823792934417725</text:p>
          </table:table-cell>
          <table:table-cell office:value-type="float" office:value="0.294802159070969" calcext:value-type="float">
            <text:p>0.294802159070969</text:p>
          </table:table-cell>
          <table:table-cell office:value-type="float" office:value="-0.514279246330261" calcext:value-type="float">
            <text:p>-0.514279246330261</text:p>
          </table:table-cell>
          <table:table-cell office:value-type="float" office:value="0.99949187040329" calcext:value-type="float">
            <text:p>0.99949187040329</text:p>
          </table:table-cell>
          <table:table-cell office:value-type="float" office:value="0.310820609331131" calcext:value-type="float">
            <text:p>0.310820609331131</text:p>
          </table:table-cell>
          <table:table-cell office:value-type="float" office:value="0.317500323057175" calcext:value-type="float">
            <text:p>0.317500323057175</text:p>
          </table:table-cell>
          <table:table-cell office:value-type="float" office:value="-0.496230930089951" calcext:value-type="float">
            <text:p>-0.496230930089951</text:p>
          </table:table-cell>
          <table:table-cell office:value-type="float" office:value="0.999571919441223" calcext:value-type="float">
            <text:p>0.999571919441223</text:p>
          </table:table-cell>
          <table:table-cell office:value-type="float" office:value="0.737490594387054" calcext:value-type="float">
            <text:p>0.737490594387054</text:p>
          </table:table-cell>
          <table:table-cell office:value-type="float" office:value="1.22503733634949" calcext:value-type="float">
            <text:p>1.22503733634949</text:p>
          </table:table-cell>
          <table:table-cell office:value-type="float" office:value="0.0235412828624249" calcext:value-type="float">
            <text:p>0.0235412828624249</text:p>
          </table:table-cell>
          <table:table-cell office:value-type="float" office:value="0.0611025765538216" calcext:value-type="float">
            <text:p>0.0611025765538216</text:p>
          </table:table-cell>
          <table:table-cell office:value-type="float" office:value="0.417587220668793" calcext:value-type="float">
            <text:p>0.417587220668793</text:p>
          </table:table-cell>
          <table:table-cell office:value-type="float" office:value="1.21583414077759" calcext:value-type="float">
            <text:p>1.21583414077759</text:p>
          </table:table-cell>
          <table:table-cell office:value-type="float" office:value="-0.0140455532819033" calcext:value-type="float">
            <text:p>-0.0140455532819033</text:p>
          </table:table-cell>
          <table:table-cell office:value-type="float" office:value="0.067045085132122" calcext:value-type="float">
            <text:p>0.0670450851321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QRT(([.J106]-[.F106])^2+([.K106]-[.G106])^2)" office:value-type="float" office:value="0.512988618085317" calcext:value-type="float">
            <text:p>0.512988618085317</text:p>
          </table:table-cell>
          <table:table-cell table:formula="of:=SQRT(([.R106]-[.N106])^2+([.S106]-[.O106])^2)" office:value-type="float" office:value="0.318953377465223" calcext:value-type="float">
            <text:p>0.318953377465223</text:p>
          </table:table-cell>
          <table:table-cell table:formula="of:=SQRT(([.R106]-[.F106])^2+([.S106]-[.G106])^2)" office:value-type="float" office:value="1.02039796475896" calcext:value-type="float">
            <text:p>1.02039796475896</text:p>
          </table:table-cell>
          <table:table-cell table:formula="of:=SQRT(([.N106]-[.J106])^2+([.O106]-[.K106])^2)" office:value-type="float" office:value="1.0032633817986" calcext:value-type="float">
            <text:p>1.0032633817986</text:p>
          </table:table-cell>
          <table:table-cell office:value-type="float" office:value="0.821585357189179" calcext:value-type="float">
            <text:p>0.821585357189179</text:p>
          </table:table-cell>
          <table:table-cell office:value-type="float" office:value="0.283164143562317" calcext:value-type="float">
            <text:p>0.283164143562317</text:p>
          </table:table-cell>
          <table:table-cell office:value-type="float" office:value="-0.44303235411644" calcext:value-type="float">
            <text:p>-0.44303235411644</text:p>
          </table:table-cell>
          <table:table-cell office:value-type="float" office:value="0.999513268470764" calcext:value-type="float">
            <text:p>0.999513268470764</text:p>
          </table:table-cell>
          <table:table-cell office:value-type="float" office:value="0.309743970632553" calcext:value-type="float">
            <text:p>0.309743970632553</text:p>
          </table:table-cell>
          <table:table-cell office:value-type="float" office:value="0.317452877759933" calcext:value-type="float">
            <text:p>0.317452877759933</text:p>
          </table:table-cell>
          <table:table-cell office:value-type="float" office:value="-0.465812832117081" calcext:value-type="float">
            <text:p>-0.465812832117081</text:p>
          </table:table-cell>
          <table:table-cell office:value-type="float" office:value="0.999580144882202" calcext:value-type="float">
            <text:p>0.999580144882202</text:p>
          </table:table-cell>
          <table:table-cell office:value-type="float" office:value="0.73654979467392" calcext:value-type="float">
            <text:p>0.73654979467392</text:p>
          </table:table-cell>
          <table:table-cell office:value-type="float" office:value="1.2254034280777" calcext:value-type="float">
            <text:p>1.2254034280777</text:p>
          </table:table-cell>
          <table:table-cell office:value-type="float" office:value="0.0220820270478725" calcext:value-type="float">
            <text:p>0.0220820270478725</text:p>
          </table:table-cell>
          <table:table-cell office:value-type="float" office:value="0.0598039291799068" calcext:value-type="float">
            <text:p>0.0598039291799068</text:p>
          </table:table-cell>
          <table:table-cell office:value-type="float" office:value="0.417638838291168" calcext:value-type="float">
            <text:p>0.417638838291168</text:p>
          </table:table-cell>
          <table:table-cell office:value-type="float" office:value="1.22020161151886" calcext:value-type="float">
            <text:p>1.22020161151886</text:p>
          </table:table-cell>
          <table:table-cell office:value-type="float" office:value="-0.0125789046287537" calcext:value-type="float">
            <text:p>-0.0125789046287537</text:p>
          </table:table-cell>
          <table:table-cell office:value-type="float" office:value="0.0651105418801308" calcext:value-type="float">
            <text:p>0.0651105418801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QRT(([.J107]-[.F107])^2+([.K107]-[.G107])^2)" office:value-type="float" office:value="0.513685482585459" calcext:value-type="float">
            <text:p>0.513685482585459</text:p>
          </table:table-cell>
          <table:table-cell table:formula="of:=SQRT(([.R107]-[.N107])^2+([.S107]-[.O107])^2)" office:value-type="float" office:value="0.320940529779123" calcext:value-type="float">
            <text:p>0.320940529779123</text:p>
          </table:table-cell>
          <table:table-cell table:formula="of:=SQRT(([.R107]-[.F107])^2+([.S107]-[.G107])^2)" office:value-type="float" office:value="1.02367835779396" calcext:value-type="float">
            <text:p>1.02367835779396</text:p>
          </table:table-cell>
          <table:table-cell table:formula="of:=SQRT(([.N107]-[.J107])^2+([.O107]-[.K107])^2)" office:value-type="float" office:value="1.00978255512701" calcext:value-type="float">
            <text:p>1.00978255512701</text:p>
          </table:table-cell>
          <table:table-cell office:value-type="float" office:value="0.822352707386017" calcext:value-type="float">
            <text:p>0.822352707386017</text:p>
          </table:table-cell>
          <table:table-cell office:value-type="float" office:value="0.283304184675217" calcext:value-type="float">
            <text:p>0.283304184675217</text:p>
          </table:table-cell>
          <table:table-cell office:value-type="float" office:value="-0.450543105602264" calcext:value-type="float">
            <text:p>-0.450543105602264</text:p>
          </table:table-cell>
          <table:table-cell office:value-type="float" office:value="0.999535501003265" calcext:value-type="float">
            <text:p>0.999535501003265</text:p>
          </table:table-cell>
          <table:table-cell office:value-type="float" office:value="0.309686720371246" calcext:value-type="float">
            <text:p>0.309686720371246</text:p>
          </table:table-cell>
          <table:table-cell office:value-type="float" office:value="0.315651684999466" calcext:value-type="float">
            <text:p>0.315651684999466</text:p>
          </table:table-cell>
          <table:table-cell office:value-type="float" office:value="-0.458602011203766" calcext:value-type="float">
            <text:p>-0.458602011203766</text:p>
          </table:table-cell>
          <table:table-cell office:value-type="float" office:value="0.999598205089569" calcext:value-type="float">
            <text:p>0.999598205089569</text:p>
          </table:table-cell>
          <table:table-cell office:value-type="float" office:value="0.736615478992462" calcext:value-type="float">
            <text:p>0.736615478992462</text:p>
          </table:table-cell>
          <table:table-cell office:value-type="float" office:value="1.23074328899384" calcext:value-type="float">
            <text:p>1.23074328899384</text:p>
          </table:table-cell>
          <table:table-cell office:value-type="float" office:value="0.0221728570759296" calcext:value-type="float">
            <text:p>0.0221728570759296</text:p>
          </table:table-cell>
          <table:table-cell office:value-type="float" office:value="0.0625319257378578" calcext:value-type="float">
            <text:p>0.0625319257378578</text:p>
          </table:table-cell>
          <table:table-cell office:value-type="float" office:value="0.415773808956146" calcext:value-type="float">
            <text:p>0.415773808956146</text:p>
          </table:table-cell>
          <table:table-cell office:value-type="float" office:value="1.22277796268463" calcext:value-type="float">
            <text:p>1.22277796268463</text:p>
          </table:table-cell>
          <table:table-cell office:value-type="float" office:value="-0.0126688461750746" calcext:value-type="float">
            <text:p>-0.0126688461750746</text:p>
          </table:table-cell>
          <table:table-cell office:value-type="float" office:value="0.0682588815689087" calcext:value-type="float">
            <text:p>0.06825888156890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QRT(([.J108]-[.F108])^2+([.K108]-[.G108])^2)" office:value-type="float" office:value="0.517575426120118" calcext:value-type="float">
            <text:p>0.517575426120118</text:p>
          </table:table-cell>
          <table:table-cell table:formula="of:=SQRT(([.R108]-[.N108])^2+([.S108]-[.O108])^2)" office:value-type="float" office:value="0.321722097150655" calcext:value-type="float">
            <text:p>0.321722097150655</text:p>
          </table:table-cell>
          <table:table-cell table:formula="of:=SQRT(([.R108]-[.F108])^2+([.S108]-[.G108])^2)" office:value-type="float" office:value="1.0271134993872" calcext:value-type="float">
            <text:p>1.0271134993872</text:p>
          </table:table-cell>
          <table:table-cell table:formula="of:=SQRT(([.N108]-[.J108])^2+([.O108]-[.K108])^2)" office:value-type="float" office:value="1.01233547589068" calcext:value-type="float">
            <text:p>1.01233547589068</text:p>
          </table:table-cell>
          <table:table-cell office:value-type="float" office:value="0.826603293418884" calcext:value-type="float">
            <text:p>0.826603293418884</text:p>
          </table:table-cell>
          <table:table-cell office:value-type="float" office:value="0.283420503139496" calcext:value-type="float">
            <text:p>0.283420503139496</text:p>
          </table:table-cell>
          <table:table-cell office:value-type="float" office:value="-0.458756685256958" calcext:value-type="float">
            <text:p>-0.458756685256958</text:p>
          </table:table-cell>
          <table:table-cell office:value-type="float" office:value="0.999562978744507" calcext:value-type="float">
            <text:p>0.999562978744507</text:p>
          </table:table-cell>
          <table:table-cell office:value-type="float" office:value="0.310016691684723" calcext:value-type="float">
            <text:p>0.310016691684723</text:p>
          </table:table-cell>
          <table:table-cell office:value-type="float" office:value="0.315398693084717" calcext:value-type="float">
            <text:p>0.315398693084717</text:p>
          </table:table-cell>
          <table:table-cell office:value-type="float" office:value="-0.426636159420013" calcext:value-type="float">
            <text:p>-0.426636159420013</text:p>
          </table:table-cell>
          <table:table-cell office:value-type="float" office:value="0.999618887901306" calcext:value-type="float">
            <text:p>0.999618887901306</text:p>
          </table:table-cell>
          <table:table-cell office:value-type="float" office:value="0.737370073795319" calcext:value-type="float">
            <text:p>0.737370073795319</text:p>
          </table:table-cell>
          <table:table-cell office:value-type="float" office:value="1.23310899734497" calcext:value-type="float">
            <text:p>1.23310899734497</text:p>
          </table:table-cell>
          <table:table-cell office:value-type="float" office:value="0.0133254304528236" calcext:value-type="float">
            <text:p>0.0133254304528236</text:p>
          </table:table-cell>
          <table:table-cell office:value-type="float" office:value="0.0614853948354721" calcext:value-type="float">
            <text:p>0.0614853948354721</text:p>
          </table:table-cell>
          <table:table-cell office:value-type="float" office:value="0.415755689144135" calcext:value-type="float">
            <text:p>0.415755689144135</text:p>
          </table:table-cell>
          <table:table-cell office:value-type="float" office:value="1.22478461265564" calcext:value-type="float">
            <text:p>1.22478461265564</text:p>
          </table:table-cell>
          <table:table-cell office:value-type="float" office:value="-0.00367332925088704" calcext:value-type="float">
            <text:p>-0.00367332925088704</text:p>
          </table:table-cell>
          <table:table-cell office:value-type="float" office:value="0.0667628794908524" calcext:value-type="float">
            <text:p>0.06676287949085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QRT(([.J109]-[.F109])^2+([.K109]-[.G109])^2)" office:value-type="float" office:value="0.519543417074407" calcext:value-type="float">
            <text:p>0.519543417074407</text:p>
          </table:table-cell>
          <table:table-cell table:formula="of:=SQRT(([.R109]-[.N109])^2+([.S109]-[.O109])^2)" office:value-type="float" office:value="0.321193590204621" calcext:value-type="float">
            <text:p>0.321193590204621</text:p>
          </table:table-cell>
          <table:table-cell table:formula="of:=SQRT(([.R109]-[.F109])^2+([.S109]-[.G109])^2)" office:value-type="float" office:value="1.0306347286286" calcext:value-type="float">
            <text:p>1.0306347286286</text:p>
          </table:table-cell>
          <table:table-cell table:formula="of:=SQRT(([.N109]-[.J109])^2+([.O109]-[.K109])^2)" office:value-type="float" office:value="1.01570374302916" calcext:value-type="float">
            <text:p>1.01570374302916</text:p>
          </table:table-cell>
          <table:table-cell office:value-type="float" office:value="0.826746463775635" calcext:value-type="float">
            <text:p>0.826746463775635</text:p>
          </table:table-cell>
          <table:table-cell office:value-type="float" office:value="0.283577769994736" calcext:value-type="float">
            <text:p>0.283577769994736</text:p>
          </table:table-cell>
          <table:table-cell office:value-type="float" office:value="-0.507664084434509" calcext:value-type="float">
            <text:p>-0.507664084434509</text:p>
          </table:table-cell>
          <table:table-cell office:value-type="float" office:value="0.999542772769928" calcext:value-type="float">
            <text:p>0.999542772769928</text:p>
          </table:table-cell>
          <table:table-cell office:value-type="float" office:value="0.308337241411209" calcext:value-type="float">
            <text:p>0.308337241411209</text:p>
          </table:table-cell>
          <table:table-cell office:value-type="float" office:value="0.317888706922531" calcext:value-type="float">
            <text:p>0.317888706922531</text:p>
          </table:table-cell>
          <table:table-cell office:value-type="float" office:value="-0.47833862900734" calcext:value-type="float">
            <text:p>-0.47833862900734</text:p>
          </table:table-cell>
          <table:table-cell office:value-type="float" office:value="0.999597072601318" calcext:value-type="float">
            <text:p>0.999597072601318</text:p>
          </table:table-cell>
          <table:table-cell office:value-type="float" office:value="0.736767470836639" calcext:value-type="float">
            <text:p>0.736767470836639</text:p>
          </table:table-cell>
          <table:table-cell office:value-type="float" office:value="1.23881304264069" calcext:value-type="float">
            <text:p>1.23881304264069</text:p>
          </table:table-cell>
          <table:table-cell office:value-type="float" office:value="0.0122200539335608" calcext:value-type="float">
            <text:p>0.0122200539335608</text:p>
          </table:table-cell>
          <table:table-cell office:value-type="float" office:value="0.0613056160509586" calcext:value-type="float">
            <text:p>0.0613056160509586</text:p>
          </table:table-cell>
          <table:table-cell office:value-type="float" office:value="0.415732800960541" calcext:value-type="float">
            <text:p>0.415732800960541</text:p>
          </table:table-cell>
          <table:table-cell office:value-type="float" office:value="1.22871041297913" calcext:value-type="float">
            <text:p>1.22871041297913</text:p>
          </table:table-cell>
          <table:table-cell office:value-type="float" office:value="-0.00257433764636517" calcext:value-type="float">
            <text:p>-0.00257433764636517</text:p>
          </table:table-cell>
          <table:table-cell office:value-type="float" office:value="0.0663067251443863" calcext:value-type="float">
            <text:p>0.06630672514438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QRT(([.J110]-[.F110])^2+([.K110]-[.G110])^2)" office:value-type="float" office:value="0.521830345522769" calcext:value-type="float">
            <text:p>0.521830345522769</text:p>
          </table:table-cell>
          <table:table-cell table:formula="of:=SQRT(([.R110]-[.N110])^2+([.S110]-[.O110])^2)" office:value-type="float" office:value="0.324316765007724" calcext:value-type="float">
            <text:p>0.324316765007724</text:p>
          </table:table-cell>
          <table:table-cell table:formula="of:=SQRT(([.R110]-[.F110])^2+([.S110]-[.G110])^2)" office:value-type="float" office:value="1.03821977904826" calcext:value-type="float">
            <text:p>1.03821977904826</text:p>
          </table:table-cell>
          <table:table-cell table:formula="of:=SQRT(([.N110]-[.J110])^2+([.O110]-[.K110])^2)" office:value-type="float" office:value="1.01911124142048" calcext:value-type="float">
            <text:p>1.01911124142048</text:p>
          </table:table-cell>
          <table:table-cell office:value-type="float" office:value="0.826739311218262" calcext:value-type="float">
            <text:p>0.826739311218262</text:p>
          </table:table-cell>
          <table:table-cell office:value-type="float" office:value="0.28292191028595" calcext:value-type="float">
            <text:p>0.28292191028595</text:p>
          </table:table-cell>
          <table:table-cell office:value-type="float" office:value="-0.523553311824799" calcext:value-type="float">
            <text:p>-0.523553311824799</text:p>
          </table:table-cell>
          <table:table-cell office:value-type="float" office:value="0.999560415744782" calcext:value-type="float">
            <text:p>0.999560415744782</text:p>
          </table:table-cell>
          <table:table-cell office:value-type="float" office:value="0.306141048669815" calcext:value-type="float">
            <text:p>0.306141048669815</text:p>
          </table:table-cell>
          <table:table-cell office:value-type="float" office:value="0.318759858608246" calcext:value-type="float">
            <text:p>0.318759858608246</text:p>
          </table:table-cell>
          <table:table-cell office:value-type="float" office:value="-0.469576984643936" calcext:value-type="float">
            <text:p>-0.469576984643936</text:p>
          </table:table-cell>
          <table:table-cell office:value-type="float" office:value="0.999598443508148" calcext:value-type="float">
            <text:p>0.999598443508148</text:p>
          </table:table-cell>
          <table:table-cell office:value-type="float" office:value="0.735479712486267" calcext:value-type="float">
            <text:p>0.735479712486267</text:p>
          </table:table-cell>
          <table:table-cell office:value-type="float" office:value="1.24301958084106" calcext:value-type="float">
            <text:p>1.24301958084106</text:p>
          </table:table-cell>
          <table:table-cell office:value-type="float" office:value="0.00344020570628345" calcext:value-type="float">
            <text:p>0.00344020570628345</text:p>
          </table:table-cell>
          <table:table-cell office:value-type="float" office:value="0.0602491721510887" calcext:value-type="float">
            <text:p>0.0602491721510887</text:p>
          </table:table-cell>
          <table:table-cell office:value-type="float" office:value="0.411277770996094" calcext:value-type="float">
            <text:p>0.411277770996094</text:p>
          </table:table-cell>
          <table:table-cell office:value-type="float" office:value="1.23439025878906" calcext:value-type="float">
            <text:p>1.23439025878906</text:p>
          </table:table-cell>
          <table:table-cell office:value-type="float" office:value="0.00642671948298812" calcext:value-type="float">
            <text:p>0.00642671948298812</text:p>
          </table:table-cell>
          <table:table-cell office:value-type="float" office:value="0.0644392296671867" calcext:value-type="float">
            <text:p>0.06443922966718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QRT(([.J111]-[.F111])^2+([.K111]-[.G111])^2)" office:value-type="float" office:value="0.522616814942631" calcext:value-type="float">
            <text:p>0.522616814942631</text:p>
          </table:table-cell>
          <table:table-cell table:formula="of:=SQRT(([.R111]-[.N111])^2+([.S111]-[.O111])^2)" office:value-type="float" office:value="0.32483288638377" calcext:value-type="float">
            <text:p>0.32483288638377</text:p>
          </table:table-cell>
          <table:table-cell table:formula="of:=SQRT(([.R111]-[.F111])^2+([.S111]-[.G111])^2)" office:value-type="float" office:value="1.03818796321035" calcext:value-type="float">
            <text:p>1.03818796321035</text:p>
          </table:table-cell>
          <table:table-cell table:formula="of:=SQRT(([.N111]-[.J111])^2+([.O111]-[.K111])^2)" office:value-type="float" office:value="1.02495912844368" calcext:value-type="float">
            <text:p>1.02495912844368</text:p>
          </table:table-cell>
          <table:table-cell office:value-type="float" office:value="0.827609539031982" calcext:value-type="float">
            <text:p>0.827609539031982</text:p>
          </table:table-cell>
          <table:table-cell office:value-type="float" office:value="0.287188500165939" calcext:value-type="float">
            <text:p>0.287188500165939</text:p>
          </table:table-cell>
          <table:table-cell office:value-type="float" office:value="-0.510369300842285" calcext:value-type="float">
            <text:p>-0.510369300842285</text:p>
          </table:table-cell>
          <table:table-cell office:value-type="float" office:value="0.999562621116638" calcext:value-type="float">
            <text:p>0.999562621116638</text:p>
          </table:table-cell>
          <table:table-cell office:value-type="float" office:value="0.305894613265991" calcext:value-type="float">
            <text:p>0.305894613265991</text:p>
          </table:table-cell>
          <table:table-cell office:value-type="float" office:value="0.317878425121307" calcext:value-type="float">
            <text:p>0.317878425121307</text:p>
          </table:table-cell>
          <table:table-cell office:value-type="float" office:value="-0.472108542919159" calcext:value-type="float">
            <text:p>-0.472108542919159</text:p>
          </table:table-cell>
          <table:table-cell office:value-type="float" office:value="0.99960857629776" calcext:value-type="float">
            <text:p>0.99960857629776</text:p>
          </table:table-cell>
          <table:table-cell office:value-type="float" office:value="0.735815703868866" calcext:value-type="float">
            <text:p>0.735815703868866</text:p>
          </table:table-cell>
          <table:table-cell office:value-type="float" office:value="1.24831330776215" calcext:value-type="float">
            <text:p>1.24831330776215</text:p>
          </table:table-cell>
          <table:table-cell office:value-type="float" office:value="0.00367820519022644" calcext:value-type="float">
            <text:p>0.00367820519022644</text:p>
          </table:table-cell>
          <table:table-cell office:value-type="float" office:value="0.0618060603737831" calcext:value-type="float">
            <text:p>0.0618060603737831</text:p>
          </table:table-cell>
          <table:table-cell office:value-type="float" office:value="0.411140859127045" calcext:value-type="float">
            <text:p>0.411140859127045</text:p>
          </table:table-cell>
          <table:table-cell office:value-type="float" office:value="1.23818171024323" calcext:value-type="float">
            <text:p>1.23818171024323</text:p>
          </table:table-cell>
          <table:table-cell office:value-type="float" office:value="0.00612615700811148" calcext:value-type="float">
            <text:p>0.00612615700811148</text:p>
          </table:table-cell>
          <table:table-cell office:value-type="float" office:value="0.0668783113360405" calcext:value-type="float">
            <text:p>0.06687831133604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QRT(([.J112]-[.F112])^2+([.K112]-[.G112])^2)" office:value-type="float" office:value="0.518181890146671" calcext:value-type="float">
            <text:p>0.518181890146671</text:p>
          </table:table-cell>
          <table:table-cell table:formula="of:=SQRT(([.R112]-[.N112])^2+([.S112]-[.O112])^2)" office:value-type="float" office:value="0.325885321442332" calcext:value-type="float">
            <text:p>0.325885321442332</text:p>
          </table:table-cell>
          <table:table-cell table:formula="of:=SQRT(([.R112]-[.F112])^2+([.S112]-[.G112])^2)" office:value-type="float" office:value="1.04195534519396" calcext:value-type="float">
            <text:p>1.04195534519396</text:p>
          </table:table-cell>
          <table:table-cell table:formula="of:=SQRT(([.N112]-[.J112])^2+([.O112]-[.K112])^2)" office:value-type="float" office:value="1.02666001483477" calcext:value-type="float">
            <text:p>1.02666001483477</text:p>
          </table:table-cell>
          <table:table-cell office:value-type="float" office:value="0.82763659954071" calcext:value-type="float">
            <text:p>0.82763659954071</text:p>
          </table:table-cell>
          <table:table-cell office:value-type="float" office:value="0.28541624546051" calcext:value-type="float">
            <text:p>0.28541624546051</text:p>
          </table:table-cell>
          <table:table-cell office:value-type="float" office:value="-0.348799496889114" calcext:value-type="float">
            <text:p>-0.348799496889114</text:p>
          </table:table-cell>
          <table:table-cell office:value-type="float" office:value="0.999574482440949" calcext:value-type="float">
            <text:p>0.999574482440949</text:p>
          </table:table-cell>
          <table:table-cell office:value-type="float" office:value="0.310400724411011" calcext:value-type="float">
            <text:p>0.310400724411011</text:p>
          </table:table-cell>
          <table:table-cell office:value-type="float" office:value="0.31671354174614" calcext:value-type="float">
            <text:p>0.31671354174614</text:p>
          </table:table-cell>
          <table:table-cell office:value-type="float" office:value="-0.297311902046204" calcext:value-type="float">
            <text:p>-0.297311902046204</text:p>
          </table:table-cell>
          <table:table-cell office:value-type="float" office:value="0.999611794948578" calcext:value-type="float">
            <text:p>0.999611794948578</text:p>
          </table:table-cell>
          <table:table-cell office:value-type="float" office:value="0.735650837421417" calcext:value-type="float">
            <text:p>0.735650837421417</text:p>
          </table:table-cell>
          <table:table-cell office:value-type="float" office:value="1.25116157531738" calcext:value-type="float">
            <text:p>1.25116157531738</text:p>
          </table:table-cell>
          <table:table-cell office:value-type="float" office:value="0.00397646194323897" calcext:value-type="float">
            <text:p>0.00397646194323897</text:p>
          </table:table-cell>
          <table:table-cell office:value-type="float" office:value="0.0603529401123524" calcext:value-type="float">
            <text:p>0.0603529401123524</text:p>
          </table:table-cell>
          <table:table-cell office:value-type="float" office:value="0.409956991672516" calcext:value-type="float">
            <text:p>0.409956991672516</text:p>
          </table:table-cell>
          <table:table-cell office:value-type="float" office:value="1.23999190330505" calcext:value-type="float">
            <text:p>1.23999190330505</text:p>
          </table:table-cell>
          <table:table-cell office:value-type="float" office:value="0.00570122245699167" calcext:value-type="float">
            <text:p>0.00570122245699167</text:p>
          </table:table-cell>
          <table:table-cell office:value-type="float" office:value="0.0648711025714874" calcext:value-type="float">
            <text:p>0.06487110257148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QRT(([.J113]-[.F113])^2+([.K113]-[.G113])^2)" office:value-type="float" office:value="0.521393298316401" calcext:value-type="float">
            <text:p>0.521393298316401</text:p>
          </table:table-cell>
          <table:table-cell table:formula="of:=SQRT(([.R113]-[.N113])^2+([.S113]-[.O113])^2)" office:value-type="float" office:value="0.326510255649227" calcext:value-type="float">
            <text:p>0.326510255649227</text:p>
          </table:table-cell>
          <table:table-cell table:formula="of:=SQRT(([.R113]-[.F113])^2+([.S113]-[.G113])^2)" office:value-type="float" office:value="1.04600145820358" calcext:value-type="float">
            <text:p>1.04600145820358</text:p>
          </table:table-cell>
          <table:table-cell table:formula="of:=SQRT(([.N113]-[.J113])^2+([.O113]-[.K113])^2)" office:value-type="float" office:value="1.02868633223707" calcext:value-type="float">
            <text:p>1.02868633223707</text:p>
          </table:table-cell>
          <table:table-cell office:value-type="float" office:value="0.827646553516388" calcext:value-type="float">
            <text:p>0.827646553516388</text:p>
          </table:table-cell>
          <table:table-cell office:value-type="float" office:value="0.280170410871506" calcext:value-type="float">
            <text:p>0.280170410871506</text:p>
          </table:table-cell>
          <table:table-cell office:value-type="float" office:value="-0.388812333345413" calcext:value-type="float">
            <text:p>-0.388812333345413</text:p>
          </table:table-cell>
          <table:table-cell office:value-type="float" office:value="0.999574065208435" calcext:value-type="float">
            <text:p>0.999574065208435</text:p>
          </table:table-cell>
          <table:table-cell office:value-type="float" office:value="0.307460010051727" calcext:value-type="float">
            <text:p>0.307460010051727</text:p>
          </table:table-cell>
          <table:table-cell office:value-type="float" office:value="0.315623641014099" calcext:value-type="float">
            <text:p>0.315623641014099</text:p>
          </table:table-cell>
          <table:table-cell office:value-type="float" office:value="-0.340190798044205" calcext:value-type="float">
            <text:p>-0.340190798044205</text:p>
          </table:table-cell>
          <table:table-cell office:value-type="float" office:value="0.999598860740662" calcext:value-type="float">
            <text:p>0.999598860740662</text:p>
          </table:table-cell>
          <table:table-cell office:value-type="float" office:value="0.736473917961121" calcext:value-type="float">
            <text:p>0.736473917961121</text:p>
          </table:table-cell>
          <table:table-cell office:value-type="float" office:value="1.2505795955658" calcext:value-type="float">
            <text:p>1.2505795955658</text:p>
          </table:table-cell>
          <table:table-cell office:value-type="float" office:value="-0.000396599527448416" calcext:value-type="float">
            <text:p>-0.000396599527448416</text:p>
          </table:table-cell>
          <table:table-cell office:value-type="float" office:value="0.0630995705723763" calcext:value-type="float">
            <text:p>0.0630995705723763</text:p>
          </table:table-cell>
          <table:table-cell office:value-type="float" office:value="0.410160452127457" calcext:value-type="float">
            <text:p>0.410160452127457</text:p>
          </table:table-cell>
          <table:table-cell office:value-type="float" office:value="1.23924517631531" calcext:value-type="float">
            <text:p>1.23924517631531</text:p>
          </table:table-cell>
          <table:table-cell office:value-type="float" office:value="0.0100768776610494" calcext:value-type="float">
            <text:p>0.0100768776610494</text:p>
          </table:table-cell>
          <table:table-cell office:value-type="float" office:value="0.066947266459465" calcext:value-type="float">
            <text:p>0.0669472664594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QRT(([.J114]-[.F114])^2+([.K114]-[.G114])^2)" office:value-type="float" office:value="0.523106467360515" calcext:value-type="float">
            <text:p>0.523106467360515</text:p>
          </table:table-cell>
          <table:table-cell table:formula="of:=SQRT(([.R114]-[.N114])^2+([.S114]-[.O114])^2)" office:value-type="float" office:value="0.329248361065401" calcext:value-type="float">
            <text:p>0.329248361065401</text:p>
          </table:table-cell>
          <table:table-cell table:formula="of:=SQRT(([.R114]-[.F114])^2+([.S114]-[.G114])^2)" office:value-type="float" office:value="1.05405337429809" calcext:value-type="float">
            <text:p>1.05405337429809</text:p>
          </table:table-cell>
          <table:table-cell table:formula="of:=SQRT(([.N114]-[.J114])^2+([.O114]-[.K114])^2)" office:value-type="float" office:value="1.04051233627162" calcext:value-type="float">
            <text:p>1.04051233627162</text:p>
          </table:table-cell>
          <table:table-cell office:value-type="float" office:value="0.829798817634583" calcext:value-type="float">
            <text:p>0.829798817634583</text:p>
          </table:table-cell>
          <table:table-cell office:value-type="float" office:value="0.280092239379883" calcext:value-type="float">
            <text:p>0.280092239379883</text:p>
          </table:table-cell>
          <table:table-cell office:value-type="float" office:value="-0.362978637218475" calcext:value-type="float">
            <text:p>-0.362978637218475</text:p>
          </table:table-cell>
          <table:table-cell office:value-type="float" office:value="0.999597728252411" calcext:value-type="float">
            <text:p>0.999597728252411</text:p>
          </table:table-cell>
          <table:table-cell office:value-type="float" office:value="0.30783075094223" calcext:value-type="float">
            <text:p>0.30783075094223</text:p>
          </table:table-cell>
          <table:table-cell office:value-type="float" office:value="0.314584463834763" calcext:value-type="float">
            <text:p>0.314584463834763</text:p>
          </table:table-cell>
          <table:table-cell office:value-type="float" office:value="-0.293799728155136" calcext:value-type="float">
            <text:p>-0.293799728155136</text:p>
          </table:table-cell>
          <table:table-cell office:value-type="float" office:value="0.999612390995026" calcext:value-type="float">
            <text:p>0.999612390995026</text:p>
          </table:table-cell>
          <table:table-cell office:value-type="float" office:value="0.736678004264832" calcext:value-type="float">
            <text:p>0.736678004264832</text:p>
          </table:table-cell>
          <table:table-cell office:value-type="float" office:value="1.26261186599731" calcext:value-type="float">
            <text:p>1.26261186599731</text:p>
          </table:table-cell>
          <table:table-cell office:value-type="float" office:value="0.000263173074927181" calcext:value-type="float">
            <text:p>0.000263173074927181</text:p>
          </table:table-cell>
          <table:table-cell office:value-type="float" office:value="0.0624033696949482" calcext:value-type="float">
            <text:p>0.0624033696949482</text:p>
          </table:table-cell>
          <table:table-cell office:value-type="float" office:value="0.407848745584488" calcext:value-type="float">
            <text:p>0.407848745584488</text:p>
          </table:table-cell>
          <table:table-cell office:value-type="float" office:value="1.24600458145142" calcext:value-type="float">
            <text:p>1.24600458145142</text:p>
          </table:table-cell>
          <table:table-cell office:value-type="float" office:value="0.00937872566282749" calcext:value-type="float">
            <text:p>0.00937872566282749</text:p>
          </table:table-cell>
          <table:table-cell office:value-type="float" office:value="0.0654800534248352" calcext:value-type="float">
            <text:p>0.06548005342483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QRT(([.J115]-[.F115])^2+([.K115]-[.G115])^2)" office:value-type="float" office:value="0.525066676603828" calcext:value-type="float">
            <text:p>0.525066676603828</text:p>
          </table:table-cell>
          <table:table-cell table:formula="of:=SQRT(([.R115]-[.N115])^2+([.S115]-[.O115])^2)" office:value-type="float" office:value="0.325656501052187" calcext:value-type="float">
            <text:p>0.325656501052187</text:p>
          </table:table-cell>
          <table:table-cell table:formula="of:=SQRT(([.R115]-[.F115])^2+([.S115]-[.G115])^2)" office:value-type="float" office:value="1.05570122009431" calcext:value-type="float">
            <text:p>1.05570122009431</text:p>
          </table:table-cell>
          <table:table-cell table:formula="of:=SQRT(([.N115]-[.J115])^2+([.O115]-[.K115])^2)" office:value-type="float" office:value="1.03927890494057" calcext:value-type="float">
            <text:p>1.03927890494057</text:p>
          </table:table-cell>
          <table:table-cell office:value-type="float" office:value="0.831530392169952" calcext:value-type="float">
            <text:p>0.831530392169952</text:p>
          </table:table-cell>
          <table:table-cell office:value-type="float" office:value="0.277964532375336" calcext:value-type="float">
            <text:p>0.277964532375336</text:p>
          </table:table-cell>
          <table:table-cell office:value-type="float" office:value="-0.42653489112854" calcext:value-type="float">
            <text:p>-0.42653489112854</text:p>
          </table:table-cell>
          <table:table-cell office:value-type="float" office:value="0.999599874019623" calcext:value-type="float">
            <text:p>0.999599874019623</text:p>
          </table:table-cell>
          <table:table-cell office:value-type="float" office:value="0.307888120412827" calcext:value-type="float">
            <text:p>0.307888120412827</text:p>
          </table:table-cell>
          <table:table-cell office:value-type="float" office:value="0.316614061594009" calcext:value-type="float">
            <text:p>0.316614061594009</text:p>
          </table:table-cell>
          <table:table-cell office:value-type="float" office:value="-0.415903329849243" calcext:value-type="float">
            <text:p>-0.415903329849243</text:p>
          </table:table-cell>
          <table:table-cell office:value-type="float" office:value="0.999614953994751" calcext:value-type="float">
            <text:p>0.999614953994751</text:p>
          </table:table-cell>
          <table:table-cell office:value-type="float" office:value="0.736694574356079" calcext:value-type="float">
            <text:p>0.736694574356079</text:p>
          </table:table-cell>
          <table:table-cell office:value-type="float" office:value="1.26330602169037" calcext:value-type="float">
            <text:p>1.26330602169037</text:p>
          </table:table-cell>
          <table:table-cell office:value-type="float" office:value="0.000502976530697197" calcext:value-type="float">
            <text:p>0.000502976530697197</text:p>
          </table:table-cell>
          <table:table-cell office:value-type="float" office:value="0.0643937736749649" calcext:value-type="float">
            <text:p>0.0643937736749649</text:p>
          </table:table-cell>
          <table:table-cell office:value-type="float" office:value="0.411472141742706" calcext:value-type="float">
            <text:p>0.411472141742706</text:p>
          </table:table-cell>
          <table:table-cell office:value-type="float" office:value="1.24649751186371" calcext:value-type="float">
            <text:p>1.24649751186371</text:p>
          </table:table-cell>
          <table:table-cell office:value-type="float" office:value="0.00923686847090721" calcext:value-type="float">
            <text:p>0.00923686847090721</text:p>
          </table:table-cell>
          <table:table-cell office:value-type="float" office:value="0.0681681111454964" calcext:value-type="float">
            <text:p>0.06816811114549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QRT(([.J116]-[.F116])^2+([.K116]-[.G116])^2)" office:value-type="float" office:value="0.523371669581561" calcext:value-type="float">
            <text:p>0.523371669581561</text:p>
          </table:table-cell>
          <table:table-cell table:formula="of:=SQRT(([.R116]-[.N116])^2+([.S116]-[.O116])^2)" office:value-type="float" office:value="0.325167227114651" calcext:value-type="float">
            <text:p>0.325167227114651</text:p>
          </table:table-cell>
          <table:table-cell table:formula="of:=SQRT(([.R116]-[.F116])^2+([.S116]-[.G116])^2)" office:value-type="float" office:value="1.06404682890289" calcext:value-type="float">
            <text:p>1.06404682890289</text:p>
          </table:table-cell>
          <table:table-cell table:formula="of:=SQRT(([.N116]-[.J116])^2+([.O116]-[.K116])^2)" office:value-type="float" office:value="1.04318676197544" calcext:value-type="float">
            <text:p>1.04318676197544</text:p>
          </table:table-cell>
          <table:table-cell office:value-type="float" office:value="0.831694483757019" calcext:value-type="float">
            <text:p>0.831694483757019</text:p>
          </table:table-cell>
          <table:table-cell office:value-type="float" office:value="0.277735024690628" calcext:value-type="float">
            <text:p>0.277735024690628</text:p>
          </table:table-cell>
          <table:table-cell office:value-type="float" office:value="-0.358699917793274" calcext:value-type="float">
            <text:p>-0.358699917793274</text:p>
          </table:table-cell>
          <table:table-cell office:value-type="float" office:value="0.999617159366608" calcext:value-type="float">
            <text:p>0.999617159366608</text:p>
          </table:table-cell>
          <table:table-cell office:value-type="float" office:value="0.309925734996796" calcext:value-type="float">
            <text:p>0.309925734996796</text:p>
          </table:table-cell>
          <table:table-cell office:value-type="float" office:value="0.31866517663002" calcext:value-type="float">
            <text:p>0.31866517663002</text:p>
          </table:table-cell>
          <table:table-cell office:value-type="float" office:value="-0.262206852436066" calcext:value-type="float">
            <text:p>-0.262206852436066</text:p>
          </table:table-cell>
          <table:table-cell office:value-type="float" office:value="0.999625146389008" calcext:value-type="float">
            <text:p>0.999625146389008</text:p>
          </table:table-cell>
          <table:table-cell office:value-type="float" office:value="0.736478865146637" calcext:value-type="float">
            <text:p>0.736478865146637</text:p>
          </table:table-cell>
          <table:table-cell office:value-type="float" office:value="1.2706583738327" calcext:value-type="float">
            <text:p>1.2706583738327</text:p>
          </table:table-cell>
          <table:table-cell office:value-type="float" office:value="-0.00121145404409617" calcext:value-type="float">
            <text:p>-0.00121145404409617</text:p>
          </table:table-cell>
          <table:table-cell office:value-type="float" office:value="0.0657216683030129" calcext:value-type="float">
            <text:p>0.0657216683030129</text:p>
          </table:table-cell>
          <table:table-cell office:value-type="float" office:value="0.411671102046967" calcext:value-type="float">
            <text:p>0.411671102046967</text:p>
          </table:table-cell>
          <table:table-cell office:value-type="float" office:value="1.25537300109863" calcext:value-type="float">
            <text:p>1.25537300109863</text:p>
          </table:table-cell>
          <table:table-cell office:value-type="float" office:value="0.0107813775539398" calcext:value-type="float">
            <text:p>0.0107813775539398</text:p>
          </table:table-cell>
          <table:table-cell office:value-type="float" office:value="0.0688556730747223" calcext:value-type="float">
            <text:p>0.06885567307472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QRT(([.J117]-[.F117])^2+([.K117]-[.G117])^2)" office:value-type="float" office:value="0.525465049167089" calcext:value-type="float">
            <text:p>0.525465049167089</text:p>
          </table:table-cell>
          <table:table-cell table:formula="of:=SQRT(([.R117]-[.N117])^2+([.S117]-[.O117])^2)" office:value-type="float" office:value="0.319222995350294" calcext:value-type="float">
            <text:p>0.319222995350294</text:p>
          </table:table-cell>
          <table:table-cell table:formula="of:=SQRT(([.R117]-[.F117])^2+([.S117]-[.G117])^2)" office:value-type="float" office:value="1.06878100673383" calcext:value-type="float">
            <text:p>1.06878100673383</text:p>
          </table:table-cell>
          <table:table-cell table:formula="of:=SQRT(([.N117]-[.J117])^2+([.O117]-[.K117])^2)" office:value-type="float" office:value="1.04549706337302" calcext:value-type="float">
            <text:p>1.04549706337302</text:p>
          </table:table-cell>
          <table:table-cell office:value-type="float" office:value="0.831380367279053" calcext:value-type="float">
            <text:p>0.831380367279053</text:p>
          </table:table-cell>
          <table:table-cell office:value-type="float" office:value="0.269504219293594" calcext:value-type="float">
            <text:p>0.269504219293594</text:p>
          </table:table-cell>
          <table:table-cell office:value-type="float" office:value="-0.364024072885513" calcext:value-type="float">
            <text:p>-0.364024072885513</text:p>
          </table:table-cell>
          <table:table-cell office:value-type="float" office:value="0.999614119529724" calcext:value-type="float">
            <text:p>0.999614119529724</text:p>
          </table:table-cell>
          <table:table-cell office:value-type="float" office:value="0.308042585849762" calcext:value-type="float">
            <text:p>0.308042585849762</text:p>
          </table:table-cell>
          <table:table-cell office:value-type="float" office:value="0.316738575696945" calcext:value-type="float">
            <text:p>0.316738575696945</text:p>
          </table:table-cell>
          <table:table-cell office:value-type="float" office:value="-0.30332937836647" calcext:value-type="float">
            <text:p>-0.30332937836647</text:p>
          </table:table-cell>
          <table:table-cell office:value-type="float" office:value="0.999620378017426" calcext:value-type="float">
            <text:p>0.999620378017426</text:p>
          </table:table-cell>
          <table:table-cell office:value-type="float" office:value="0.737056732177734" calcext:value-type="float">
            <text:p>0.737056732177734</text:p>
          </table:table-cell>
          <table:table-cell office:value-type="float" office:value="1.27015924453735" calcext:value-type="float">
            <text:p>1.27015924453735</text:p>
          </table:table-cell>
          <table:table-cell office:value-type="float" office:value="-0.0027842887211591" calcext:value-type="float">
            <text:p>-0.0027842887211591</text:p>
          </table:table-cell>
          <table:table-cell office:value-type="float" office:value="0.0656303688883781" calcext:value-type="float">
            <text:p>0.0656303688883781</text:p>
          </table:table-cell>
          <table:table-cell office:value-type="float" office:value="0.418185234069824" calcext:value-type="float">
            <text:p>0.418185234069824</text:p>
          </table:table-cell>
          <table:table-cell office:value-type="float" office:value="1.25518298149109" calcext:value-type="float">
            <text:p>1.25518298149109</text:p>
          </table:table-cell>
          <table:table-cell office:value-type="float" office:value="0.0122968973591924" calcext:value-type="float">
            <text:p>0.0122968973591924</text:p>
          </table:table-cell>
          <table:table-cell office:value-type="float" office:value="0.0688935220241547" calcext:value-type="float">
            <text:p>0.06889352202415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QRT(([.J118]-[.F118])^2+([.K118]-[.G118])^2)" office:value-type="float" office:value="0.525757824927207" calcext:value-type="float">
            <text:p>0.525757824927207</text:p>
          </table:table-cell>
          <table:table-cell table:formula="of:=SQRT(([.R118]-[.N118])^2+([.S118]-[.O118])^2)" office:value-type="float" office:value="0.323942407691603" calcext:value-type="float">
            <text:p>0.323942407691603</text:p>
          </table:table-cell>
          <table:table-cell table:formula="of:=SQRT(([.R118]-[.F118])^2+([.S118]-[.G118])^2)" office:value-type="float" office:value="1.07439135449229" calcext:value-type="float">
            <text:p>1.07439135449229</text:p>
          </table:table-cell>
          <table:table-cell table:formula="of:=SQRT(([.N118]-[.J118])^2+([.O118]-[.K118])^2)" office:value-type="float" office:value="1.055492687216" calcext:value-type="float">
            <text:p>1.055492687216</text:p>
          </table:table-cell>
          <table:table-cell office:value-type="float" office:value="0.831438839435577" calcext:value-type="float">
            <text:p>0.831438839435577</text:p>
          </table:table-cell>
          <table:table-cell office:value-type="float" office:value="0.270444482564926" calcext:value-type="float">
            <text:p>0.270444482564926</text:p>
          </table:table-cell>
          <table:table-cell office:value-type="float" office:value="-0.379887700080872" calcext:value-type="float">
            <text:p>-0.379887700080872</text:p>
          </table:table-cell>
          <table:table-cell office:value-type="float" office:value="0.999629497528076" calcext:value-type="float">
            <text:p>0.999629497528076</text:p>
          </table:table-cell>
          <table:table-cell office:value-type="float" office:value="0.307651847600937" calcext:value-type="float">
            <text:p>0.307651847600937</text:p>
          </table:table-cell>
          <table:table-cell office:value-type="float" office:value="0.315925002098084" calcext:value-type="float">
            <text:p>0.315925002098084</text:p>
          </table:table-cell>
          <table:table-cell office:value-type="float" office:value="-0.334486752748489" calcext:value-type="float">
            <text:p>-0.334486752748489</text:p>
          </table:table-cell>
          <table:table-cell office:value-type="float" office:value="0.999622046947479" calcext:value-type="float">
            <text:p>0.999622046947479</text:p>
          </table:table-cell>
          <table:table-cell office:value-type="float" office:value="0.737282156944275" calcext:value-type="float">
            <text:p>0.737282156944275</text:p>
          </table:table-cell>
          <table:table-cell office:value-type="float" office:value="1.28002178668976" calcext:value-type="float">
            <text:p>1.28002178668976</text:p>
          </table:table-cell>
          <table:table-cell office:value-type="float" office:value="0.010073272511363" calcext:value-type="float">
            <text:p>0.010073272511363</text:p>
          </table:table-cell>
          <table:table-cell office:value-type="float" office:value="0.0653215274214745" calcext:value-type="float">
            <text:p>0.0653215274214745</text:p>
          </table:table-cell>
          <table:table-cell office:value-type="float" office:value="0.413934707641602" calcext:value-type="float">
            <text:p>0.413934707641602</text:p>
          </table:table-cell>
          <table:table-cell office:value-type="float" office:value="1.26039755344391" calcext:value-type="float">
            <text:p>1.26039755344391</text:p>
          </table:table-cell>
          <table:table-cell office:value-type="float" office:value="0.0000394532871723641" calcext:value-type="float">
            <text:p>3.94532871723641E-05</text:p>
          </table:table-cell>
          <table:table-cell office:value-type="float" office:value="0.0684045776724815" calcext:value-type="float">
            <text:p>0.06840457767248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QRT(([.J119]-[.F119])^2+([.K119]-[.G119])^2)" office:value-type="float" office:value="0.525781493032874" calcext:value-type="float">
            <text:p>0.525781493032874</text:p>
          </table:table-cell>
          <table:table-cell table:formula="of:=SQRT(([.R119]-[.N119])^2+([.S119]-[.O119])^2)" office:value-type="float" office:value="0.321680298227425" calcext:value-type="float">
            <text:p>0.321680298227425</text:p>
          </table:table-cell>
          <table:table-cell table:formula="of:=SQRT(([.R119]-[.F119])^2+([.S119]-[.G119])^2)" office:value-type="float" office:value="1.07712248096973" calcext:value-type="float">
            <text:p>1.07712248096973</text:p>
          </table:table-cell>
          <table:table-cell table:formula="of:=SQRT(([.N119]-[.J119])^2+([.O119]-[.K119])^2)" office:value-type="float" office:value="1.05849256759222" calcext:value-type="float">
            <text:p>1.05849256759222</text:p>
          </table:table-cell>
          <table:table-cell office:value-type="float" office:value="0.831488013267517" calcext:value-type="float">
            <text:p>0.831488013267517</text:p>
          </table:table-cell>
          <table:table-cell office:value-type="float" office:value="0.270058631896973" calcext:value-type="float">
            <text:p>0.270058631896973</text:p>
          </table:table-cell>
          <table:table-cell office:value-type="float" office:value="-0.386496841907501" calcext:value-type="float">
            <text:p>-0.386496841907501</text:p>
          </table:table-cell>
          <table:table-cell office:value-type="float" office:value="0.999610245227814" calcext:value-type="float">
            <text:p>0.999610245227814</text:p>
          </table:table-cell>
          <table:table-cell office:value-type="float" office:value="0.307544887065887" calcext:value-type="float">
            <text:p>0.307544887065887</text:p>
          </table:table-cell>
          <table:table-cell office:value-type="float" office:value="0.313987880945206" calcext:value-type="float">
            <text:p>0.313987880945206</text:p>
          </table:table-cell>
          <table:table-cell office:value-type="float" office:value="-0.336973607540131" calcext:value-type="float">
            <text:p>-0.336973607540131</text:p>
          </table:table-cell>
          <table:table-cell office:value-type="float" office:value="0.999597668647766" calcext:value-type="float">
            <text:p>0.999597668647766</text:p>
          </table:table-cell>
          <table:table-cell office:value-type="float" office:value="0.737678647041321" calcext:value-type="float">
            <text:p>0.737678647041321</text:p>
          </table:table-cell>
          <table:table-cell office:value-type="float" office:value="1.28114426136017" calcext:value-type="float">
            <text:p>1.28114426136017</text:p>
          </table:table-cell>
          <table:table-cell office:value-type="float" office:value="0.00674444902688265" calcext:value-type="float">
            <text:p>0.00674444902688265</text:p>
          </table:table-cell>
          <table:table-cell office:value-type="float" office:value="0.0649150535464287" calcext:value-type="float">
            <text:p>0.0649150535464287</text:p>
          </table:table-cell>
          <table:table-cell office:value-type="float" office:value="0.416454970836639" calcext:value-type="float">
            <text:p>0.416454970836639</text:p>
          </table:table-cell>
          <table:table-cell office:value-type="float" office:value="1.26401054859161" calcext:value-type="float">
            <text:p>1.26401054859161</text:p>
          </table:table-cell>
          <table:table-cell office:value-type="float" office:value="0.00342513667419553" calcext:value-type="float">
            <text:p>0.00342513667419553</text:p>
          </table:table-cell>
          <table:table-cell office:value-type="float" office:value="0.0678573772311211" calcext:value-type="float">
            <text:p>0.06785737723112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QRT(([.J120]-[.F120])^2+([.K120]-[.G120])^2)" office:value-type="float" office:value="0.528447266248572" calcext:value-type="float">
            <text:p>0.528447266248572</text:p>
          </table:table-cell>
          <table:table-cell table:formula="of:=SQRT(([.R120]-[.N120])^2+([.S120]-[.O120])^2)" office:value-type="float" office:value="0.320106145232651" calcext:value-type="float">
            <text:p>0.320106145232651</text:p>
          </table:table-cell>
          <table:table-cell table:formula="of:=SQRT(([.R120]-[.F120])^2+([.S120]-[.G120])^2)" office:value-type="float" office:value="1.07901247728192" calcext:value-type="float">
            <text:p>1.07901247728192</text:p>
          </table:table-cell>
          <table:table-cell table:formula="of:=SQRT(([.N120]-[.J120])^2+([.O120]-[.K120])^2)" office:value-type="float" office:value="1.05995991818115" calcext:value-type="float">
            <text:p>1.05995991818115</text:p>
          </table:table-cell>
          <table:table-cell office:value-type="float" office:value="0.829969763755798" calcext:value-type="float">
            <text:p>0.829969763755798</text:p>
          </table:table-cell>
          <table:table-cell office:value-type="float" office:value="0.269214272499085" calcext:value-type="float">
            <text:p>0.269214272499085</text:p>
          </table:table-cell>
          <table:table-cell office:value-type="float" office:value="-0.257992029190064" calcext:value-type="float">
            <text:p>-0.257992029190064</text:p>
          </table:table-cell>
          <table:table-cell office:value-type="float" office:value="0.999625265598297" calcext:value-type="float">
            <text:p>0.999625265598297</text:p>
          </table:table-cell>
          <table:table-cell office:value-type="float" office:value="0.303416728973389" calcext:value-type="float">
            <text:p>0.303416728973389</text:p>
          </table:table-cell>
          <table:table-cell office:value-type="float" office:value="0.313917905092239" calcext:value-type="float">
            <text:p>0.313917905092239</text:p>
          </table:table-cell>
          <table:table-cell office:value-type="float" office:value="-0.241658210754395" calcext:value-type="float">
            <text:p>-0.241658210754395</text:p>
          </table:table-cell>
          <table:table-cell office:value-type="float" office:value="0.999612033367157" calcext:value-type="float">
            <text:p>0.999612033367157</text:p>
          </table:table-cell>
          <table:table-cell office:value-type="float" office:value="0.736035227775574" calcext:value-type="float">
            <text:p>0.736035227775574</text:p>
          </table:table-cell>
          <table:table-cell office:value-type="float" office:value="1.28157293796539" calcext:value-type="float">
            <text:p>1.28157293796539</text:p>
          </table:table-cell>
          <table:table-cell office:value-type="float" office:value="0.0109178405255079" calcext:value-type="float">
            <text:p>0.0109178405255079</text:p>
          </table:table-cell>
          <table:table-cell office:value-type="float" office:value="0.0666076764464378" calcext:value-type="float">
            <text:p>0.0666076764464378</text:p>
          </table:table-cell>
          <table:table-cell office:value-type="float" office:value="0.416318476200104" calcext:value-type="float">
            <text:p>0.416318476200104</text:p>
          </table:table-cell>
          <table:table-cell office:value-type="float" office:value="1.26578867435455" calcext:value-type="float">
            <text:p>1.26578867435455</text:p>
          </table:table-cell>
          <table:table-cell office:value-type="float" office:value="-0.000897035119123757" calcext:value-type="float">
            <text:p>-0.000897035119123757</text:p>
          </table:table-cell>
          <table:table-cell office:value-type="float" office:value="0.0697230845689774" calcext:value-type="float">
            <text:p>0.06972308456897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QRT(([.J121]-[.F121])^2+([.K121]-[.G121])^2)" office:value-type="float" office:value="0.528398246775457" calcext:value-type="float">
            <text:p>0.528398246775457</text:p>
          </table:table-cell>
          <table:table-cell table:formula="of:=SQRT(([.R121]-[.N121])^2+([.S121]-[.O121])^2)" office:value-type="float" office:value="0.321462591376483" calcext:value-type="float">
            <text:p>0.321462591376483</text:p>
          </table:table-cell>
          <table:table-cell table:formula="of:=SQRT(([.R121]-[.F121])^2+([.S121]-[.G121])^2)" office:value-type="float" office:value="1.0789853208709" calcext:value-type="float">
            <text:p>1.0789853208709</text:p>
          </table:table-cell>
          <table:table-cell table:formula="of:=SQRT(([.N121]-[.J121])^2+([.O121]-[.K121])^2)" office:value-type="float" office:value="1.06031904045005" calcext:value-type="float">
            <text:p>1.06031904045005</text:p>
          </table:table-cell>
          <table:table-cell office:value-type="float" office:value="0.830631077289581" calcext:value-type="float">
            <text:p>0.830631077289581</text:p>
          </table:table-cell>
          <table:table-cell office:value-type="float" office:value="0.26970174908638" calcext:value-type="float">
            <text:p>0.26970174908638</text:p>
          </table:table-cell>
          <table:table-cell office:value-type="float" office:value="-0.293792307376862" calcext:value-type="float">
            <text:p>-0.293792307376862</text:p>
          </table:table-cell>
          <table:table-cell office:value-type="float" office:value="0.999646067619324" calcext:value-type="float">
            <text:p>0.999646067619324</text:p>
          </table:table-cell>
          <table:table-cell office:value-type="float" office:value="0.303999722003937" calcext:value-type="float">
            <text:p>0.303999722003937</text:p>
          </table:table-cell>
          <table:table-cell office:value-type="float" office:value="0.312877237796783" calcext:value-type="float">
            <text:p>0.312877237796783</text:p>
          </table:table-cell>
          <table:table-cell office:value-type="float" office:value="-0.253849059343338" calcext:value-type="float">
            <text:p>-0.253849059343338</text:p>
          </table:table-cell>
          <table:table-cell office:value-type="float" office:value="0.999627828598023" calcext:value-type="float">
            <text:p>0.999627828598023</text:p>
          </table:table-cell>
          <table:table-cell office:value-type="float" office:value="0.736068844795227" calcext:value-type="float">
            <text:p>0.736068844795227</text:p>
          </table:table-cell>
          <table:table-cell office:value-type="float" office:value="1.28117096424103" calcext:value-type="float">
            <text:p>1.28117096424103</text:p>
          </table:table-cell>
          <table:table-cell office:value-type="float" office:value="0.0134050454944372" calcext:value-type="float">
            <text:p>0.0134050454944372</text:p>
          </table:table-cell>
          <table:table-cell office:value-type="float" office:value="0.0662341639399529" calcext:value-type="float">
            <text:p>0.0662341639399529</text:p>
          </table:table-cell>
          <table:table-cell office:value-type="float" office:value="0.414992392063141" calcext:value-type="float">
            <text:p>0.414992392063141</text:p>
          </table:table-cell>
          <table:table-cell office:value-type="float" office:value="1.26541948318481" calcext:value-type="float">
            <text:p>1.26541948318481</text:p>
          </table:table-cell>
          <table:table-cell office:value-type="float" office:value="-0.00344375474378467" calcext:value-type="float">
            <text:p>-0.00344375474378467</text:p>
          </table:table-cell>
          <table:table-cell office:value-type="float" office:value="0.0691369995474815" calcext:value-type="float">
            <text:p>0.06913699954748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QRT(([.J122]-[.F122])^2+([.K122]-[.G122])^2)" office:value-type="float" office:value="0.529350723594546" calcext:value-type="float">
            <text:p>0.529350723594546</text:p>
          </table:table-cell>
          <table:table-cell table:formula="of:=SQRT(([.R122]-[.N122])^2+([.S122]-[.O122])^2)" office:value-type="float" office:value="0.324521096829919" calcext:value-type="float">
            <text:p>0.324521096829919</text:p>
          </table:table-cell>
          <table:table-cell table:formula="of:=SQRT(([.R122]-[.F122])^2+([.S122]-[.G122])^2)" office:value-type="float" office:value="1.07472520224228" calcext:value-type="float">
            <text:p>1.07472520224228</text:p>
          </table:table-cell>
          <table:table-cell table:formula="of:=SQRT(([.N122]-[.J122])^2+([.O122]-[.K122])^2)" office:value-type="float" office:value="1.06058730847444" calcext:value-type="float">
            <text:p>1.06058730847444</text:p>
          </table:table-cell>
          <table:table-cell office:value-type="float" office:value="0.831876873970032" calcext:value-type="float">
            <text:p>0.831876873970032</text:p>
          </table:table-cell>
          <table:table-cell office:value-type="float" office:value="0.268272280693054" calcext:value-type="float">
            <text:p>0.268272280693054</text:p>
          </table:table-cell>
          <table:table-cell office:value-type="float" office:value="-0.459594577550888" calcext:value-type="float">
            <text:p>-0.459594577550888</text:p>
          </table:table-cell>
          <table:table-cell office:value-type="float" office:value="0.999618232250214" calcext:value-type="float">
            <text:p>0.999618232250214</text:p>
          </table:table-cell>
          <table:table-cell office:value-type="float" office:value="0.304120302200317" calcext:value-type="float">
            <text:p>0.304120302200317</text:p>
          </table:table-cell>
          <table:table-cell office:value-type="float" office:value="0.309323340654373" calcext:value-type="float">
            <text:p>0.309323340654373</text:p>
          </table:table-cell>
          <table:table-cell office:value-type="float" office:value="-0.31219682097435" calcext:value-type="float">
            <text:p>-0.31219682097435</text:p>
          </table:table-cell>
          <table:table-cell office:value-type="float" office:value="0.999594986438751" calcext:value-type="float">
            <text:p>0.999594986438751</text:p>
          </table:table-cell>
          <table:table-cell office:value-type="float" office:value="0.742608547210693" calcext:value-type="float">
            <text:p>0.742608547210693</text:p>
          </table:table-cell>
          <table:table-cell office:value-type="float" office:value="1.27502179145813" calcext:value-type="float">
            <text:p>1.27502179145813</text:p>
          </table:table-cell>
          <table:table-cell office:value-type="float" office:value="-0.00344820623286068" calcext:value-type="float">
            <text:p>-0.00344820623286068</text:p>
          </table:table-cell>
          <table:table-cell office:value-type="float" office:value="0.0666415467858315" calcext:value-type="float">
            <text:p>0.0666415467858315</text:p>
          </table:table-cell>
          <table:table-cell office:value-type="float" office:value="0.418422222137451" calcext:value-type="float">
            <text:p>0.418422222137451</text:p>
          </table:table-cell>
          <table:table-cell office:value-type="float" office:value="1.26028513908386" calcext:value-type="float">
            <text:p>1.26028513908386</text:p>
          </table:table-cell>
          <table:table-cell office:value-type="float" office:value="0.0138952331617475" calcext:value-type="float">
            <text:p>0.0138952331617475</text:p>
          </table:table-cell>
          <table:table-cell office:value-type="float" office:value="0.0693731904029846" calcext:value-type="float">
            <text:p>0.06937319040298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QRT(([.J123]-[.F123])^2+([.K123]-[.G123])^2)" office:value-type="float" office:value="0.530217042455078" calcext:value-type="float">
            <text:p>0.530217042455078</text:p>
          </table:table-cell>
          <table:table-cell table:formula="of:=SQRT(([.R123]-[.N123])^2+([.S123]-[.O123])^2)" office:value-type="float" office:value="0.326270469450728" calcext:value-type="float">
            <text:p>0.326270469450728</text:p>
          </table:table-cell>
          <table:table-cell table:formula="of:=SQRT(([.R123]-[.F123])^2+([.S123]-[.G123])^2)" office:value-type="float" office:value="1.06384331699952" calcext:value-type="float">
            <text:p>1.06384331699952</text:p>
          </table:table-cell>
          <table:table-cell table:formula="of:=SQRT(([.N123]-[.J123])^2+([.O123]-[.K123])^2)" office:value-type="float" office:value="1.04993748567618" calcext:value-type="float">
            <text:p>1.04993748567618</text:p>
          </table:table-cell>
          <table:table-cell office:value-type="float" office:value="0.829466998577118" calcext:value-type="float">
            <text:p>0.829466998577118</text:p>
          </table:table-cell>
          <table:table-cell office:value-type="float" office:value="0.272297829389572" calcext:value-type="float">
            <text:p>0.272297829389572</text:p>
          </table:table-cell>
          <table:table-cell office:value-type="float" office:value="-0.388782382011414" calcext:value-type="float">
            <text:p>-0.388782382011414</text:p>
          </table:table-cell>
          <table:table-cell office:value-type="float" office:value="0.999618947505951" calcext:value-type="float">
            <text:p>0.999618947505951</text:p>
          </table:table-cell>
          <table:table-cell office:value-type="float" office:value="0.300521194934845" calcext:value-type="float">
            <text:p>0.300521194934845</text:p>
          </table:table-cell>
          <table:table-cell office:value-type="float" office:value="0.308991819620132" calcext:value-type="float">
            <text:p>0.308991819620132</text:p>
          </table:table-cell>
          <table:table-cell office:value-type="float" office:value="-0.317676573991776" calcext:value-type="float">
            <text:p>-0.317676573991776</text:p>
          </table:table-cell>
          <table:table-cell office:value-type="float" office:value="0.999605596065521" calcext:value-type="float">
            <text:p>0.999605596065521</text:p>
          </table:table-cell>
          <table:table-cell office:value-type="float" office:value="0.735732138156891" calcext:value-type="float">
            <text:p>0.735732138156891</text:p>
          </table:table-cell>
          <table:table-cell office:value-type="float" office:value="1.26448130607605" calcext:value-type="float">
            <text:p>1.26448130607605</text:p>
          </table:table-cell>
          <table:table-cell office:value-type="float" office:value="0.00271674897521734" calcext:value-type="float">
            <text:p>0.00271674897521734</text:p>
          </table:table-cell>
          <table:table-cell office:value-type="float" office:value="0.0684845447540283" calcext:value-type="float">
            <text:p>0.0684845447540283</text:p>
          </table:table-cell>
          <table:table-cell office:value-type="float" office:value="0.409789323806763" calcext:value-type="float">
            <text:p>0.409789323806763</text:p>
          </table:table-cell>
          <table:table-cell office:value-type="float" office:value="1.24986279010773" calcext:value-type="float">
            <text:p>1.24986279010773</text:p>
          </table:table-cell>
          <table:table-cell office:value-type="float" office:value="0.00740180443972349" calcext:value-type="float">
            <text:p>0.00740180443972349</text:p>
          </table:table-cell>
          <table:table-cell office:value-type="float" office:value="0.0716159343719482" calcext:value-type="float">
            <text:p>0.07161593437194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QRT(([.J124]-[.F124])^2+([.K124]-[.G124])^2)" office:value-type="float" office:value="0.532364673231876" calcext:value-type="float">
            <text:p>0.532364673231876</text:p>
          </table:table-cell>
          <table:table-cell table:formula="of:=SQRT(([.R124]-[.N124])^2+([.S124]-[.O124])^2)" office:value-type="float" office:value="0.331257744119308" calcext:value-type="float">
            <text:p>0.331257744119308</text:p>
          </table:table-cell>
          <table:table-cell table:formula="of:=SQRT(([.R124]-[.F124])^2+([.S124]-[.G124])^2)" office:value-type="float" office:value="1.05861532886405" calcext:value-type="float">
            <text:p>1.05861532886405</text:p>
          </table:table-cell>
          <table:table-cell table:formula="of:=SQRT(([.N124]-[.J124])^2+([.O124]-[.K124])^2)" office:value-type="float" office:value="1.05074434099271" calcext:value-type="float">
            <text:p>1.05074434099271</text:p>
          </table:table-cell>
          <table:table-cell office:value-type="float" office:value="0.831952393054962" calcext:value-type="float">
            <text:p>0.831952393054962</text:p>
          </table:table-cell>
          <table:table-cell office:value-type="float" office:value="0.278260916471481" calcext:value-type="float">
            <text:p>0.278260916471481</text:p>
          </table:table-cell>
          <table:table-cell office:value-type="float" office:value="-0.558914303779602" calcext:value-type="float">
            <text:p>-0.558914303779602</text:p>
          </table:table-cell>
          <table:table-cell office:value-type="float" office:value="0.999604463577271" calcext:value-type="float">
            <text:p>0.999604463577271</text:p>
          </table:table-cell>
          <table:table-cell office:value-type="float" office:value="0.300495892763138" calcext:value-type="float">
            <text:p>0.300495892763138</text:p>
          </table:table-cell>
          <table:table-cell office:value-type="float" office:value="0.309343606233597" calcext:value-type="float">
            <text:p>0.309343606233597</text:p>
          </table:table-cell>
          <table:table-cell office:value-type="float" office:value="-0.484723746776581" calcext:value-type="float">
            <text:p>-0.484723746776581</text:p>
          </table:table-cell>
          <table:table-cell office:value-type="float" office:value="0.999608755111694" calcext:value-type="float">
            <text:p>0.999608755111694</text:p>
          </table:table-cell>
          <table:table-cell office:value-type="float" office:value="0.739185869693756" calcext:value-type="float">
            <text:p>0.739185869693756</text:p>
          </table:table-cell>
          <table:table-cell office:value-type="float" office:value="1.26412880420685" calcext:value-type="float">
            <text:p>1.26412880420685</text:p>
          </table:table-cell>
          <table:table-cell office:value-type="float" office:value="0.00291789276525378" calcext:value-type="float">
            <text:p>0.00291789276525378</text:p>
          </table:table-cell>
          <table:table-cell office:value-type="float" office:value="0.0674080774188042" calcext:value-type="float">
            <text:p>0.0674080774188042</text:p>
          </table:table-cell>
          <table:table-cell office:value-type="float" office:value="0.40830135345459" calcext:value-type="float">
            <text:p>0.40830135345459</text:p>
          </table:table-cell>
          <table:table-cell office:value-type="float" office:value="1.24840843677521" calcext:value-type="float">
            <text:p>1.24840843677521</text:p>
          </table:table-cell>
          <table:table-cell office:value-type="float" office:value="0.00718463584780693" calcext:value-type="float">
            <text:p>0.00718463584780693</text:p>
          </table:table-cell>
          <table:table-cell office:value-type="float" office:value="0.0711459219455719" calcext:value-type="float">
            <text:p>0.07114592194557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QRT(([.J125]-[.F125])^2+([.K125]-[.G125])^2)" office:value-type="float" office:value="0.533560902958893" calcext:value-type="float">
            <text:p>0.533560902958893</text:p>
          </table:table-cell>
          <table:table-cell table:formula="of:=SQRT(([.R125]-[.N125])^2+([.S125]-[.O125])^2)" office:value-type="float" office:value="0.328828424846031" calcext:value-type="float">
            <text:p>0.328828424846031</text:p>
          </table:table-cell>
          <table:table-cell table:formula="of:=SQRT(([.R125]-[.F125])^2+([.S125]-[.G125])^2)" office:value-type="float" office:value="1.06154473328896" calcext:value-type="float">
            <text:p>1.06154473328896</text:p>
          </table:table-cell>
          <table:table-cell table:formula="of:=SQRT(([.N125]-[.J125])^2+([.O125]-[.K125])^2)" office:value-type="float" office:value="1.04474698046619" calcext:value-type="float">
            <text:p>1.04474698046619</text:p>
          </table:table-cell>
          <table:table-cell office:value-type="float" office:value="0.831707179546356" calcext:value-type="float">
            <text:p>0.831707179546356</text:p>
          </table:table-cell>
          <table:table-cell office:value-type="float" office:value="0.272498816251755" calcext:value-type="float">
            <text:p>0.272498816251755</text:p>
          </table:table-cell>
          <table:table-cell office:value-type="float" office:value="-0.519314169883728" calcext:value-type="float">
            <text:p>-0.519314169883728</text:p>
          </table:table-cell>
          <table:table-cell office:value-type="float" office:value="0.99961131811142" calcext:value-type="float">
            <text:p>0.99961131811142</text:p>
          </table:table-cell>
          <table:table-cell office:value-type="float" office:value="0.299506723880768" calcext:value-type="float">
            <text:p>0.299506723880768</text:p>
          </table:table-cell>
          <table:table-cell office:value-type="float" office:value="0.310576528310776" calcext:value-type="float">
            <text:p>0.310576528310776</text:p>
          </table:table-cell>
          <table:table-cell office:value-type="float" office:value="-0.463253200054169" calcext:value-type="float">
            <text:p>-0.463253200054169</text:p>
          </table:table-cell>
          <table:table-cell office:value-type="float" office:value="0.999607801437378" calcext:value-type="float">
            <text:p>0.999607801437378</text:p>
          </table:table-cell>
          <table:table-cell office:value-type="float" office:value="0.739930987358093" calcext:value-type="float">
            <text:p>0.739930987358093</text:p>
          </table:table-cell>
          <table:table-cell office:value-type="float" office:value="1.25795328617096" calcext:value-type="float">
            <text:p>1.25795328617096</text:p>
          </table:table-cell>
          <table:table-cell office:value-type="float" office:value="0.00126327690668404" calcext:value-type="float">
            <text:p>0.00126327690668404</text:p>
          </table:table-cell>
          <table:table-cell office:value-type="float" office:value="0.065910279750824" calcext:value-type="float">
            <text:p>0.065910279750824</text:p>
          </table:table-cell>
          <table:table-cell office:value-type="float" office:value="0.411277204751968" calcext:value-type="float">
            <text:p>0.411277204751968</text:p>
          </table:table-cell>
          <table:table-cell office:value-type="float" office:value="1.24723768234253" calcext:value-type="float">
            <text:p>1.24723768234253</text:p>
          </table:table-cell>
          <table:table-cell office:value-type="float" office:value="0.00883972458541393" calcext:value-type="float">
            <text:p>0.00883972458541393</text:p>
          </table:table-cell>
          <table:table-cell office:value-type="float" office:value="0.0690950453281403" calcext:value-type="float">
            <text:p>0.06909504532814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QRT(([.J126]-[.F126])^2+([.K126]-[.G126])^2)" office:value-type="float" office:value="0.529273533919267" calcext:value-type="float">
            <text:p>0.529273533919267</text:p>
          </table:table-cell>
          <table:table-cell table:formula="of:=SQRT(([.R126]-[.N126])^2+([.S126]-[.O126])^2)" office:value-type="float" office:value="0.327927604942432" calcext:value-type="float">
            <text:p>0.327927604942432</text:p>
          </table:table-cell>
          <table:table-cell table:formula="of:=SQRT(([.R126]-[.F126])^2+([.S126]-[.G126])^2)" office:value-type="float" office:value="1.05444207223164" calcext:value-type="float">
            <text:p>1.05444207223164</text:p>
          </table:table-cell>
          <table:table-cell table:formula="of:=SQRT(([.N126]-[.J126])^2+([.O126]-[.K126])^2)" office:value-type="float" office:value="1.04081415738702" calcext:value-type="float">
            <text:p>1.04081415738702</text:p>
          </table:table-cell>
          <table:table-cell office:value-type="float" office:value="0.829373717308044" calcext:value-type="float">
            <text:p>0.829373717308044</text:p>
          </table:table-cell>
          <table:table-cell office:value-type="float" office:value="0.273689150810242" calcext:value-type="float">
            <text:p>0.273689150810242</text:p>
          </table:table-cell>
          <table:table-cell office:value-type="float" office:value="-0.418622434139252" calcext:value-type="float">
            <text:p>-0.418622434139252</text:p>
          </table:table-cell>
          <table:table-cell office:value-type="float" office:value="0.9996178150177" calcext:value-type="float">
            <text:p>0.9996178150177</text:p>
          </table:table-cell>
          <table:table-cell office:value-type="float" office:value="0.301290839910507" calcext:value-type="float">
            <text:p>0.301290839910507</text:p>
          </table:table-cell>
          <table:table-cell office:value-type="float" office:value="0.309170812368393" calcext:value-type="float">
            <text:p>0.309170812368393</text:p>
          </table:table-cell>
          <table:table-cell office:value-type="float" office:value="-0.361617922782898" calcext:value-type="float">
            <text:p>-0.361617922782898</text:p>
          </table:table-cell>
          <table:table-cell office:value-type="float" office:value="0.999596893787384" calcext:value-type="float">
            <text:p>0.999596893787384</text:p>
          </table:table-cell>
          <table:table-cell office:value-type="float" office:value="0.740090727806091" calcext:value-type="float">
            <text:p>0.740090727806091</text:p>
          </table:table-cell>
          <table:table-cell office:value-type="float" office:value="1.25296568870544" calcext:value-type="float">
            <text:p>1.25296568870544</text:p>
          </table:table-cell>
          <table:table-cell office:value-type="float" office:value="0.00699744233861566" calcext:value-type="float">
            <text:p>0.00699744233861566</text:p>
          </table:table-cell>
          <table:table-cell office:value-type="float" office:value="0.0652190819382668" calcext:value-type="float">
            <text:p>0.0652190819382668</text:p>
          </table:table-cell>
          <table:table-cell office:value-type="float" office:value="0.412341266870499" calcext:value-type="float">
            <text:p>0.412341266870499</text:p>
          </table:table-cell>
          <table:table-cell office:value-type="float" office:value="1.24215805530548" calcext:value-type="float">
            <text:p>1.24215805530548</text:p>
          </table:table-cell>
          <table:table-cell office:value-type="float" office:value="0.00317159784026444" calcext:value-type="float">
            <text:p>0.00317159784026444</text:p>
          </table:table-cell>
          <table:table-cell office:value-type="float" office:value="0.0679599046707153" calcext:value-type="float">
            <text:p>0.06795990467071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QRT(([.J127]-[.F127])^2+([.K127]-[.G127])^2)" office:value-type="float" office:value="0.524664963494854" calcext:value-type="float">
            <text:p>0.524664963494854</text:p>
          </table:table-cell>
          <table:table-cell table:formula="of:=SQRT(([.R127]-[.N127])^2+([.S127]-[.O127])^2)" office:value-type="float" office:value="0.326064643328939" calcext:value-type="float">
            <text:p>0.326064643328939</text:p>
          </table:table-cell>
          <table:table-cell table:formula="of:=SQRT(([.R127]-[.F127])^2+([.S127]-[.G127])^2)" office:value-type="float" office:value="1.03904086682894" calcext:value-type="float">
            <text:p>1.03904086682894</text:p>
          </table:table-cell>
          <table:table-cell table:formula="of:=SQRT(([.N127]-[.J127])^2+([.O127]-[.K127])^2)" office:value-type="float" office:value="1.0197503295314" calcext:value-type="float">
            <text:p>1.0197503295314</text:p>
          </table:table-cell>
          <table:table-cell office:value-type="float" office:value="0.825506567955017" calcext:value-type="float">
            <text:p>0.825506567955017</text:p>
          </table:table-cell>
          <table:table-cell office:value-type="float" office:value="0.273462116718292" calcext:value-type="float">
            <text:p>0.273462116718292</text:p>
          </table:table-cell>
          <table:table-cell office:value-type="float" office:value="-0.445858329534531" calcext:value-type="float">
            <text:p>-0.445858329534531</text:p>
          </table:table-cell>
          <table:table-cell office:value-type="float" office:value="0.999623954296112" calcext:value-type="float">
            <text:p>0.999623954296112</text:p>
          </table:table-cell>
          <table:table-cell office:value-type="float" office:value="0.302215158939362" calcext:value-type="float">
            <text:p>0.302215158939362</text:p>
          </table:table-cell>
          <table:table-cell office:value-type="float" office:value="0.311401873826981" calcext:value-type="float">
            <text:p>0.311401873826981</text:p>
          </table:table-cell>
          <table:table-cell office:value-type="float" office:value="-0.400439888238907" calcext:value-type="float">
            <text:p>-0.400439888238907</text:p>
          </table:table-cell>
          <table:table-cell office:value-type="float" office:value="0.999609291553497" calcext:value-type="float">
            <text:p>0.999609291553497</text:p>
          </table:table-cell>
          <table:table-cell office:value-type="float" office:value="0.740281939506531" calcext:value-type="float">
            <text:p>0.740281939506531</text:p>
          </table:table-cell>
          <table:table-cell office:value-type="float" office:value="1.23226463794708" calcext:value-type="float">
            <text:p>1.23226463794708</text:p>
          </table:table-cell>
          <table:table-cell office:value-type="float" office:value="0.0103997606784105" calcext:value-type="float">
            <text:p>0.0103997606784105</text:p>
          </table:table-cell>
          <table:table-cell office:value-type="float" office:value="0.0664489567279816" calcext:value-type="float">
            <text:p>0.0664489567279816</text:p>
          </table:table-cell>
          <table:table-cell office:value-type="float" office:value="0.414249956607819" calcext:value-type="float">
            <text:p>0.414249956607819</text:p>
          </table:table-cell>
          <table:table-cell office:value-type="float" office:value="1.2276496887207" calcext:value-type="float">
            <text:p>1.2276496887207</text:p>
          </table:table-cell>
          <table:table-cell office:value-type="float" office:value="-0.000371757138054818" calcext:value-type="float">
            <text:p>-0.000371757138054818</text:p>
          </table:table-cell>
          <table:table-cell office:value-type="float" office:value="0.069501131772995" calcext:value-type="float">
            <text:p>0.0695011317729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QRT(([.J128]-[.F128])^2+([.K128]-[.G128])^2)" office:value-type="float" office:value="0.5213174746154" calcext:value-type="float">
            <text:p>0.5213174746154</text:p>
          </table:table-cell>
          <table:table-cell table:formula="of:=SQRT(([.R128]-[.N128])^2+([.S128]-[.O128])^2)" office:value-type="float" office:value="0.324856345373705" calcext:value-type="float">
            <text:p>0.324856345373705</text:p>
          </table:table-cell>
          <table:table-cell table:formula="of:=SQRT(([.R128]-[.F128])^2+([.S128]-[.G128])^2)" office:value-type="float" office:value="1.03050707663179" calcext:value-type="float">
            <text:p>1.03050707663179</text:p>
          </table:table-cell>
          <table:table-cell table:formula="of:=SQRT(([.N128]-[.J128])^2+([.O128]-[.K128])^2)" office:value-type="float" office:value="1.01244640019511" calcext:value-type="float">
            <text:p>1.01244640019511</text:p>
          </table:table-cell>
          <table:table-cell office:value-type="float" office:value="0.825540721416473" calcext:value-type="float">
            <text:p>0.825540721416473</text:p>
          </table:table-cell>
          <table:table-cell office:value-type="float" office:value="0.276680082082748" calcext:value-type="float">
            <text:p>0.276680082082748</text:p>
          </table:table-cell>
          <table:table-cell office:value-type="float" office:value="-0.597060203552246" calcext:value-type="float">
            <text:p>-0.597060203552246</text:p>
          </table:table-cell>
          <table:table-cell office:value-type="float" office:value="0.999629139900208" calcext:value-type="float">
            <text:p>0.999629139900208</text:p>
          </table:table-cell>
          <table:table-cell office:value-type="float" office:value="0.305416643619537" calcext:value-type="float">
            <text:p>0.305416643619537</text:p>
          </table:table-cell>
          <table:table-cell office:value-type="float" office:value="0.31193420290947" calcext:value-type="float">
            <text:p>0.31193420290947</text:p>
          </table:table-cell>
          <table:table-cell office:value-type="float" office:value="-0.567192018032074" calcext:value-type="float">
            <text:p>-0.567192018032074</text:p>
          </table:table-cell>
          <table:table-cell office:value-type="float" office:value="0.999613046646118" calcext:value-type="float">
            <text:p>0.999613046646118</text:p>
          </table:table-cell>
          <table:table-cell office:value-type="float" office:value="0.738618314266205" calcext:value-type="float">
            <text:p>0.738618314266205</text:p>
          </table:table-cell>
          <table:table-cell office:value-type="float" office:value="1.2270210981369" calcext:value-type="float">
            <text:p>1.2270210981369</text:p>
          </table:table-cell>
          <table:table-cell office:value-type="float" office:value="0.0143765341490507" calcext:value-type="float">
            <text:p>0.0143765341490507</text:p>
          </table:table-cell>
          <table:table-cell office:value-type="float" office:value="0.067238874733448" calcext:value-type="float">
            <text:p>0.067238874733448</text:p>
          </table:table-cell>
          <table:table-cell office:value-type="float" office:value="0.413811266422272" calcext:value-type="float">
            <text:p>0.413811266422272</text:p>
          </table:table-cell>
          <table:table-cell office:value-type="float" office:value="1.22136187553406" calcext:value-type="float">
            <text:p>1.22136187553406</text:p>
          </table:table-cell>
          <table:table-cell office:value-type="float" office:value="-0.00460197916254401" calcext:value-type="float">
            <text:p>-0.00460197916254401</text:p>
          </table:table-cell>
          <table:table-cell office:value-type="float" office:value="0.0696795433759689" calcext:value-type="float">
            <text:p>0.06967954337596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QRT(([.J129]-[.F129])^2+([.K129]-[.G129])^2)" office:value-type="float" office:value="0.521854573104015" calcext:value-type="float">
            <text:p>0.521854573104015</text:p>
          </table:table-cell>
          <table:table-cell table:formula="of:=SQRT(([.R129]-[.N129])^2+([.S129]-[.O129])^2)" office:value-type="float" office:value="0.324145383632503" calcext:value-type="float">
            <text:p>0.324145383632503</text:p>
          </table:table-cell>
          <table:table-cell table:formula="of:=SQRT(([.R129]-[.F129])^2+([.S129]-[.G129])^2)" office:value-type="float" office:value="1.02408209048722" calcext:value-type="float">
            <text:p>1.02408209048722</text:p>
          </table:table-cell>
          <table:table-cell table:formula="of:=SQRT(([.N129]-[.J129])^2+([.O129]-[.K129])^2)" office:value-type="float" office:value="1.00352443392326" calcext:value-type="float">
            <text:p>1.00352443392326</text:p>
          </table:table-cell>
          <table:table-cell office:value-type="float" office:value="0.825515747070313" calcext:value-type="float">
            <text:p>0.825515747070313</text:p>
          </table:table-cell>
          <table:table-cell office:value-type="float" office:value="0.276683807373047" calcext:value-type="float">
            <text:p>0.276683807373047</text:p>
          </table:table-cell>
          <table:table-cell office:value-type="float" office:value="-0.665757894515991" calcext:value-type="float">
            <text:p>-0.665757894515991</text:p>
          </table:table-cell>
          <table:table-cell office:value-type="float" office:value="0.999608039855957" calcext:value-type="float">
            <text:p>0.999608039855957</text:p>
          </table:table-cell>
          <table:table-cell office:value-type="float" office:value="0.30499529838562" calcext:value-type="float">
            <text:p>0.30499529838562</text:p>
          </table:table-cell>
          <table:table-cell office:value-type="float" office:value="0.31397533416748" calcext:value-type="float">
            <text:p>0.31397533416748</text:p>
          </table:table-cell>
          <table:table-cell office:value-type="float" office:value="-0.657914280891419" calcext:value-type="float">
            <text:p>-0.657914280891419</text:p>
          </table:table-cell>
          <table:table-cell office:value-type="float" office:value="0.999600410461426" calcext:value-type="float">
            <text:p>0.999600410461426</text:p>
          </table:table-cell>
          <table:table-cell office:value-type="float" office:value="0.738246262073517" calcext:value-type="float">
            <text:p>0.738246262073517</text:p>
          </table:table-cell>
          <table:table-cell office:value-type="float" office:value="1.21915757656097" calcext:value-type="float">
            <text:p>1.21915757656097</text:p>
          </table:table-cell>
          <table:table-cell office:value-type="float" office:value="0.0143615799024701" calcext:value-type="float">
            <text:p>0.0143615799024701</text:p>
          </table:table-cell>
          <table:table-cell office:value-type="float" office:value="0.0697897374629974" calcext:value-type="float">
            <text:p>0.0697897374629974</text:p>
          </table:table-cell>
          <table:table-cell office:value-type="float" office:value="0.41413426399231" calcext:value-type="float">
            <text:p>0.41413426399231</text:p>
          </table:table-cell>
          <table:table-cell office:value-type="float" office:value="1.21450543403625" calcext:value-type="float">
            <text:p>1.21450543403625</text:p>
          </table:table-cell>
          <table:table-cell office:value-type="float" office:value="-0.00458612199872732" calcext:value-type="float">
            <text:p>-0.00458612199872732</text:p>
          </table:table-cell>
          <table:table-cell office:value-type="float" office:value="0.0719096660614014" calcext:value-type="float">
            <text:p>0.07190966606140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QRT(([.J130]-[.F130])^2+([.K130]-[.G130])^2)" office:value-type="float" office:value="0.526106078125974" calcext:value-type="float">
            <text:p>0.526106078125974</text:p>
          </table:table-cell>
          <table:table-cell table:formula="of:=SQRT(([.R130]-[.N130])^2+([.S130]-[.O130])^2)" office:value-type="float" office:value="0.325006479965762" calcext:value-type="float">
            <text:p>0.325006479965762</text:p>
          </table:table-cell>
          <table:table-cell table:formula="of:=SQRT(([.R130]-[.F130])^2+([.S130]-[.G130])^2)" office:value-type="float" office:value="1.01521343501848" calcext:value-type="float">
            <text:p>1.01521343501848</text:p>
          </table:table-cell>
          <table:table-cell table:formula="of:=SQRT(([.N130]-[.J130])^2+([.O130]-[.K130])^2)" office:value-type="float" office:value="0.996025043564465" calcext:value-type="float">
            <text:p>0.996025043564465</text:p>
          </table:table-cell>
          <table:table-cell office:value-type="float" office:value="0.825517535209656" calcext:value-type="float">
            <text:p>0.825517535209656</text:p>
          </table:table-cell>
          <table:table-cell office:value-type="float" office:value="0.279353260993958" calcext:value-type="float">
            <text:p>0.279353260993958</text:p>
          </table:table-cell>
          <table:table-cell office:value-type="float" office:value="-0.760703921318054" calcext:value-type="float">
            <text:p>-0.760703921318054</text:p>
          </table:table-cell>
          <table:table-cell office:value-type="float" office:value="0.999602496623993" calcext:value-type="float">
            <text:p>0.999602496623993</text:p>
          </table:table-cell>
          <table:table-cell office:value-type="float" office:value="0.300586640834808" calcext:value-type="float">
            <text:p>0.300586640834808</text:p>
          </table:table-cell>
          <table:table-cell office:value-type="float" office:value="0.314498126506805" calcext:value-type="float">
            <text:p>0.314498126506805</text:p>
          </table:table-cell>
          <table:table-cell office:value-type="float" office:value="-0.794665396213532" calcext:value-type="float">
            <text:p>-0.794665396213532</text:p>
          </table:table-cell>
          <table:table-cell office:value-type="float" office:value="0.999608039855957" calcext:value-type="float">
            <text:p>0.999608039855957</text:p>
          </table:table-cell>
          <table:table-cell office:value-type="float" office:value="0.738159835338593" calcext:value-type="float">
            <text:p>0.738159835338593</text:p>
          </table:table-cell>
          <table:table-cell office:value-type="float" office:value="1.2092581987381" calcext:value-type="float">
            <text:p>1.2092581987381</text:p>
          </table:table-cell>
          <table:table-cell office:value-type="float" office:value="0.031558271497488" calcext:value-type="float">
            <text:p>0.031558271497488</text:p>
          </table:table-cell>
          <table:table-cell office:value-type="float" office:value="0.0708034709095955" calcext:value-type="float">
            <text:p>0.0708034709095955</text:p>
          </table:table-cell>
          <table:table-cell office:value-type="float" office:value="0.413160860538483" calcext:value-type="float">
            <text:p>0.413160860538483</text:p>
          </table:table-cell>
          <table:table-cell office:value-type="float" office:value="1.2070494890213" calcext:value-type="float">
            <text:p>1.2070494890213</text:p>
          </table:table-cell>
          <table:table-cell office:value-type="float" office:value="-0.0219970736652613" calcext:value-type="float">
            <text:p>-0.0219970736652613</text:p>
          </table:table-cell>
          <table:table-cell office:value-type="float" office:value="0.0727860033512116" calcext:value-type="float">
            <text:p>0.07278600335121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QRT(([.J131]-[.F131])^2+([.K131]-[.G131])^2)" office:value-type="float" office:value="0.527059284217285" calcext:value-type="float">
            <text:p>0.527059284217285</text:p>
          </table:table-cell>
          <table:table-cell table:formula="of:=SQRT(([.R131]-[.N131])^2+([.S131]-[.O131])^2)" office:value-type="float" office:value="0.324594321328867" calcext:value-type="float">
            <text:p>0.324594321328867</text:p>
          </table:table-cell>
          <table:table-cell table:formula="of:=SQRT(([.R131]-[.F131])^2+([.S131]-[.G131])^2)" office:value-type="float" office:value="1.01559048769056" calcext:value-type="float">
            <text:p>1.01559048769056</text:p>
          </table:table-cell>
          <table:table-cell table:formula="of:=SQRT(([.N131]-[.J131])^2+([.O131]-[.K131])^2)" office:value-type="float" office:value="0.996656751556689" calcext:value-type="float">
            <text:p>0.996656751556689</text:p>
          </table:table-cell>
          <table:table-cell office:value-type="float" office:value="0.825428009033203" calcext:value-type="float">
            <text:p>0.825428009033203</text:p>
          </table:table-cell>
          <table:table-cell office:value-type="float" office:value="0.28041398525238" calcext:value-type="float">
            <text:p>0.28041398525238</text:p>
          </table:table-cell>
          <table:table-cell office:value-type="float" office:value="-0.764948308467865" calcext:value-type="float">
            <text:p>-0.764948308467865</text:p>
          </table:table-cell>
          <table:table-cell office:value-type="float" office:value="0.99959260225296" calcext:value-type="float">
            <text:p>0.99959260225296</text:p>
          </table:table-cell>
          <table:table-cell office:value-type="float" office:value="0.299518167972565" calcext:value-type="float">
            <text:p>0.299518167972565</text:p>
          </table:table-cell>
          <table:table-cell office:value-type="float" office:value="0.315203756093979" calcext:value-type="float">
            <text:p>0.315203756093979</text:p>
          </table:table-cell>
          <table:table-cell office:value-type="float" office:value="-0.808869659900665" calcext:value-type="float">
            <text:p>-0.808869659900665</text:p>
          </table:table-cell>
          <table:table-cell office:value-type="float" office:value="0.999599993228912" calcext:value-type="float">
            <text:p>0.999599993228912</text:p>
          </table:table-cell>
          <table:table-cell office:value-type="float" office:value="0.73604953289032" calcext:value-type="float">
            <text:p>0.73604953289032</text:p>
          </table:table-cell>
          <table:table-cell office:value-type="float" office:value="1.21117532253265" calcext:value-type="float">
            <text:p>1.21117532253265</text:p>
          </table:table-cell>
          <table:table-cell office:value-type="float" office:value="0.0315982550382614" calcext:value-type="float">
            <text:p>0.0315982550382614</text:p>
          </table:table-cell>
          <table:table-cell office:value-type="float" office:value="0.0725253820419312" calcext:value-type="float">
            <text:p>0.0725253820419312</text:p>
          </table:table-cell>
          <table:table-cell office:value-type="float" office:value="0.411472648382187" calcext:value-type="float">
            <text:p>0.411472648382187</text:p>
          </table:table-cell>
          <table:table-cell office:value-type="float" office:value="1.20781087875366" calcext:value-type="float">
            <text:p>1.20781087875366</text:p>
          </table:table-cell>
          <table:table-cell office:value-type="float" office:value="-0.0220264755189419" calcext:value-type="float">
            <text:p>-0.0220264755189419</text:p>
          </table:table-cell>
          <table:table-cell office:value-type="float" office:value="0.0739651545882225" calcext:value-type="float">
            <text:p>0.07396515458822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QRT(([.J132]-[.F132])^2+([.K132]-[.G132])^2)" office:value-type="float" office:value="0.523121055061269" calcext:value-type="float">
            <text:p>0.523121055061269</text:p>
          </table:table-cell>
          <table:table-cell table:formula="of:=SQRT(([.R132]-[.N132])^2+([.S132]-[.O132])^2)" office:value-type="float" office:value="0.324179603998313" calcext:value-type="float">
            <text:p>0.324179603998313</text:p>
          </table:table-cell>
          <table:table-cell table:formula="of:=SQRT(([.R132]-[.F132])^2+([.S132]-[.G132])^2)" office:value-type="float" office:value="1.01382342189672" calcext:value-type="float">
            <text:p>1.01382342189672</text:p>
          </table:table-cell>
          <table:table-cell table:formula="of:=SQRT(([.N132]-[.J132])^2+([.O132]-[.K132])^2)" office:value-type="float" office:value="0.996680611722756" calcext:value-type="float">
            <text:p>0.996680611722756</text:p>
          </table:table-cell>
          <table:table-cell office:value-type="float" office:value="0.824544310569763" calcext:value-type="float">
            <text:p>0.824544310569763</text:p>
          </table:table-cell>
          <table:table-cell office:value-type="float" office:value="0.282347291707993" calcext:value-type="float">
            <text:p>0.282347291707993</text:p>
          </table:table-cell>
          <table:table-cell office:value-type="float" office:value="-0.705735862255096" calcext:value-type="float">
            <text:p>-0.705735862255096</text:p>
          </table:table-cell>
          <table:table-cell office:value-type="float" office:value="0.999552428722382" calcext:value-type="float">
            <text:p>0.999552428722382</text:p>
          </table:table-cell>
          <table:table-cell office:value-type="float" office:value="0.302451729774475" calcext:value-type="float">
            <text:p>0.302451729774475</text:p>
          </table:table-cell>
          <table:table-cell office:value-type="float" office:value="0.315134108066559" calcext:value-type="float">
            <text:p>0.315134108066559</text:p>
          </table:table-cell>
          <table:table-cell office:value-type="float" office:value="-0.545906960964203" calcext:value-type="float">
            <text:p>-0.545906960964203</text:p>
          </table:table-cell>
          <table:table-cell office:value-type="float" office:value="0.999568104743958" calcext:value-type="float">
            <text:p>0.999568104743958</text:p>
          </table:table-cell>
          <table:table-cell office:value-type="float" office:value="0.736000657081604" calcext:value-type="float">
            <text:p>0.736000657081604</text:p>
          </table:table-cell>
          <table:table-cell office:value-type="float" office:value="1.2125791311264" calcext:value-type="float">
            <text:p>1.2125791311264</text:p>
          </table:table-cell>
          <table:table-cell office:value-type="float" office:value="0.00548607017844915" calcext:value-type="float">
            <text:p>0.00548607017844915</text:p>
          </table:table-cell>
          <table:table-cell office:value-type="float" office:value="0.0724627003073692" calcext:value-type="float">
            <text:p>0.0724627003073692</text:p>
          </table:table-cell>
          <table:table-cell office:value-type="float" office:value="0.411848366260529" calcext:value-type="float">
            <text:p>0.411848366260529</text:p>
          </table:table-cell>
          <table:table-cell office:value-type="float" office:value="1.20837104320526" calcext:value-type="float">
            <text:p>1.20837104320526</text:p>
          </table:table-cell>
          <table:table-cell office:value-type="float" office:value="0.00446804007515311" calcext:value-type="float">
            <text:p>0.00446804007515311</text:p>
          </table:table-cell>
          <table:table-cell office:value-type="float" office:value="0.0741289108991623" calcext:value-type="float">
            <text:p>0.07412891089916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QRT(([.J133]-[.F133])^2+([.K133]-[.G133])^2)" office:value-type="float" office:value="0.52437196651742" calcext:value-type="float">
            <text:p>0.52437196651742</text:p>
          </table:table-cell>
          <table:table-cell table:formula="of:=SQRT(([.R133]-[.N133])^2+([.S133]-[.O133])^2)" office:value-type="float" office:value="0.32415559498645" calcext:value-type="float">
            <text:p>0.32415559498645</text:p>
          </table:table-cell>
          <table:table-cell table:formula="of:=SQRT(([.R133]-[.F133])^2+([.S133]-[.G133])^2)" office:value-type="float" office:value="1.01637075171901" calcext:value-type="float">
            <text:p>1.01637075171901</text:p>
          </table:table-cell>
          <table:table-cell table:formula="of:=SQRT(([.N133]-[.J133])^2+([.O133]-[.K133])^2)" office:value-type="float" office:value="1.00638022142528" calcext:value-type="float">
            <text:p>1.00638022142528</text:p>
          </table:table-cell>
          <table:table-cell office:value-type="float" office:value="0.82246321439743" calcext:value-type="float">
            <text:p>0.82246321439743</text:p>
          </table:table-cell>
          <table:table-cell office:value-type="float" office:value="0.287368595600128" calcext:value-type="float">
            <text:p>0.287368595600128</text:p>
          </table:table-cell>
          <table:table-cell office:value-type="float" office:value="-0.617443680763245" calcext:value-type="float">
            <text:p>-0.617443680763245</text:p>
          </table:table-cell>
          <table:table-cell office:value-type="float" office:value="0.999533593654633" calcext:value-type="float">
            <text:p>0.999533593654633</text:p>
          </table:table-cell>
          <table:table-cell office:value-type="float" office:value="0.2988700568676" calcext:value-type="float">
            <text:p>0.2988700568676</text:p>
          </table:table-cell>
          <table:table-cell office:value-type="float" office:value="0.31593719124794" calcext:value-type="float">
            <text:p>0.31593719124794</text:p>
          </table:table-cell>
          <table:table-cell office:value-type="float" office:value="-0.54664272069931" calcext:value-type="float">
            <text:p>-0.54664272069931</text:p>
          </table:table-cell>
          <table:table-cell office:value-type="float" office:value="0.999565005302429" calcext:value-type="float">
            <text:p>0.999565005302429</text:p>
          </table:table-cell>
          <table:table-cell office:value-type="float" office:value="0.736014783382416" calcext:value-type="float">
            <text:p>0.736014783382416</text:p>
          </table:table-cell>
          <table:table-cell office:value-type="float" office:value="1.22241699695587" calcext:value-type="float">
            <text:p>1.22241699695587</text:p>
          </table:table-cell>
          <table:table-cell office:value-type="float" office:value="0.00585836125537753" calcext:value-type="float">
            <text:p>0.00585836125537753</text:p>
          </table:table-cell>
          <table:table-cell office:value-type="float" office:value="0.0720955431461334" calcext:value-type="float">
            <text:p>0.0720955431461334</text:p>
          </table:table-cell>
          <table:table-cell office:value-type="float" office:value="0.411902368068695" calcext:value-type="float">
            <text:p>0.411902368068695</text:p>
          </table:table-cell>
          <table:table-cell office:value-type="float" office:value="1.21712625026703" calcext:value-type="float">
            <text:p>1.21712625026703</text:p>
          </table:table-cell>
          <table:table-cell office:value-type="float" office:value="0.00385460699908435" calcext:value-type="float">
            <text:p>0.00385460699908435</text:p>
          </table:table-cell>
          <table:table-cell office:value-type="float" office:value="0.0738972723484039" calcext:value-type="float">
            <text:p>0.07389727234840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QRT(([.J134]-[.F134])^2+([.K134]-[.G134])^2)" office:value-type="float" office:value="0.524325681272375" calcext:value-type="float">
            <text:p>0.524325681272375</text:p>
          </table:table-cell>
          <table:table-cell table:formula="of:=SQRT(([.R134]-[.N134])^2+([.S134]-[.O134])^2)" office:value-type="float" office:value="0.328042855048641" calcext:value-type="float">
            <text:p>0.328042855048641</text:p>
          </table:table-cell>
          <table:table-cell table:formula="of:=SQRT(([.R134]-[.F134])^2+([.S134]-[.G134])^2)" office:value-type="float" office:value="1.00160930282236" calcext:value-type="float">
            <text:p>1.00160930282236</text:p>
          </table:table-cell>
          <table:table-cell table:formula="of:=SQRT(([.N134]-[.J134])^2+([.O134]-[.K134])^2)" office:value-type="float" office:value="0.997478289722113" calcext:value-type="float">
            <text:p>0.997478289722113</text:p>
          </table:table-cell>
          <table:table-cell office:value-type="float" office:value="0.822026908397675" calcext:value-type="float">
            <text:p>0.822026908397675</text:p>
          </table:table-cell>
          <table:table-cell office:value-type="float" office:value="0.28740993142128" calcext:value-type="float">
            <text:p>0.28740993142128</text:p>
          </table:table-cell>
          <table:table-cell office:value-type="float" office:value="-0.517118573188782" calcext:value-type="float">
            <text:p>-0.517118573188782</text:p>
          </table:table-cell>
          <table:table-cell office:value-type="float" office:value="0.999479353427887" calcext:value-type="float">
            <text:p>0.999479353427887</text:p>
          </table:table-cell>
          <table:table-cell office:value-type="float" office:value="0.298308402299881" calcext:value-type="float">
            <text:p>0.298308402299881</text:p>
          </table:table-cell>
          <table:table-cell office:value-type="float" office:value="0.312635838985443" calcext:value-type="float">
            <text:p>0.312635838985443</text:p>
          </table:table-cell>
          <table:table-cell office:value-type="float" office:value="-0.468029260635376" calcext:value-type="float">
            <text:p>-0.468029260635376</text:p>
          </table:table-cell>
          <table:table-cell office:value-type="float" office:value="0.999546229839325" calcext:value-type="float">
            <text:p>0.999546229839325</text:p>
          </table:table-cell>
          <table:table-cell office:value-type="float" office:value="0.735607504844666" calcext:value-type="float">
            <text:p>0.735607504844666</text:p>
          </table:table-cell>
          <table:table-cell office:value-type="float" office:value="1.20914709568024" calcext:value-type="float">
            <text:p>1.20914709568024</text:p>
          </table:table-cell>
          <table:table-cell office:value-type="float" office:value="0.0101096481084824" calcext:value-type="float">
            <text:p>0.0101096481084824</text:p>
          </table:table-cell>
          <table:table-cell office:value-type="float" office:value="0.0748866051435471" calcext:value-type="float">
            <text:p>0.0748866051435471</text:p>
          </table:table-cell>
          <table:table-cell office:value-type="float" office:value="0.407712131738663" calcext:value-type="float">
            <text:p>0.407712131738663</text:p>
          </table:table-cell>
          <table:table-cell office:value-type="float" office:value="1.19931149482727" calcext:value-type="float">
            <text:p>1.19931149482727</text:p>
          </table:table-cell>
          <table:table-cell office:value-type="float" office:value="-0.000402531906729564" calcext:value-type="float">
            <text:p>-0.000402531906729564</text:p>
          </table:table-cell>
          <table:table-cell office:value-type="float" office:value="0.0785133689641953" calcext:value-type="float">
            <text:p>0.07851336896419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QRT(([.J135]-[.F135])^2+([.K135]-[.G135])^2)" office:value-type="float" office:value="0.528747227100124" calcext:value-type="float">
            <text:p>0.528747227100124</text:p>
          </table:table-cell>
          <table:table-cell table:formula="of:=SQRT(([.R135]-[.N135])^2+([.S135]-[.O135])^2)" office:value-type="float" office:value="0.328353749270319" calcext:value-type="float">
            <text:p>0.328353749270319</text:p>
          </table:table-cell>
          <table:table-cell table:formula="of:=SQRT(([.R135]-[.F135])^2+([.S135]-[.G135])^2)" office:value-type="float" office:value="1.00297292594874" calcext:value-type="float">
            <text:p>1.00297292594874</text:p>
          </table:table-cell>
          <table:table-cell table:formula="of:=SQRT(([.N135]-[.J135])^2+([.O135]-[.K135])^2)" office:value-type="float" office:value="0.998023427248063" calcext:value-type="float">
            <text:p>0.998023427248063</text:p>
          </table:table-cell>
          <table:table-cell office:value-type="float" office:value="0.822397589683533" calcext:value-type="float">
            <text:p>0.822397589683533</text:p>
          </table:table-cell>
          <table:table-cell office:value-type="float" office:value="0.287450015544891" calcext:value-type="float">
            <text:p>0.287450015544891</text:p>
          </table:table-cell>
          <table:table-cell office:value-type="float" office:value="-0.811402022838593" calcext:value-type="float">
            <text:p>-0.811402022838593</text:p>
          </table:table-cell>
          <table:table-cell office:value-type="float" office:value="0.999492704868317" calcext:value-type="float">
            <text:p>0.999492704868317</text:p>
          </table:table-cell>
          <table:table-cell office:value-type="float" office:value="0.294355511665344" calcext:value-type="float">
            <text:p>0.294355511665344</text:p>
          </table:table-cell>
          <table:table-cell office:value-type="float" office:value="0.314748257398605" calcext:value-type="float">
            <text:p>0.314748257398605</text:p>
          </table:table-cell>
          <table:table-cell office:value-type="float" office:value="-0.858670592308044" calcext:value-type="float">
            <text:p>-0.858670592308044</text:p>
          </table:table-cell>
          <table:table-cell office:value-type="float" office:value="0.999560415744782" calcext:value-type="float">
            <text:p>0.999560415744782</text:p>
          </table:table-cell>
          <table:table-cell office:value-type="float" office:value="0.734868347644806" calcext:value-type="float">
            <text:p>0.734868347644806</text:p>
          </table:table-cell>
          <table:table-cell office:value-type="float" office:value="1.21029233932495" calcext:value-type="float">
            <text:p>1.21029233932495</text:p>
          </table:table-cell>
          <table:table-cell office:value-type="float" office:value="0.0134837506338954" calcext:value-type="float">
            <text:p>0.0134837506338954</text:p>
          </table:table-cell>
          <table:table-cell office:value-type="float" office:value="0.0748895704746246" calcext:value-type="float">
            <text:p>0.0748895704746246</text:p>
          </table:table-cell>
          <table:table-cell office:value-type="float" office:value="0.406669527292252" calcext:value-type="float">
            <text:p>0.406669527292252</text:p>
          </table:table-cell>
          <table:table-cell office:value-type="float" office:value="1.2002067565918" calcext:value-type="float">
            <text:p>1.2002067565918</text:p>
          </table:table-cell>
          <table:table-cell office:value-type="float" office:value="-0.00388467754237354" calcext:value-type="float">
            <text:p>-0.00388467754237354</text:p>
          </table:table-cell>
          <table:table-cell office:value-type="float" office:value="0.0787643641233444" calcext:value-type="float">
            <text:p>0.07876436412334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QRT(([.J136]-[.F136])^2+([.K136]-[.G136])^2)" office:value-type="float" office:value="0.528552315193178" calcext:value-type="float">
            <text:p>0.528552315193178</text:p>
          </table:table-cell>
          <table:table-cell table:formula="of:=SQRT(([.R136]-[.N136])^2+([.S136]-[.O136])^2)" office:value-type="float" office:value="0.328266231679615" calcext:value-type="float">
            <text:p>0.328266231679615</text:p>
          </table:table-cell>
          <table:table-cell table:formula="of:=SQRT(([.R136]-[.F136])^2+([.S136]-[.G136])^2)" office:value-type="float" office:value="0.999455096380375" calcext:value-type="float">
            <text:p>0.999455096380375</text:p>
          </table:table-cell>
          <table:table-cell table:formula="of:=SQRT(([.N136]-[.J136])^2+([.O136]-[.K136])^2)" office:value-type="float" office:value="0.993816092785166" calcext:value-type="float">
            <text:p>0.993816092785166</text:p>
          </table:table-cell>
          <table:table-cell office:value-type="float" office:value="0.822330474853516" calcext:value-type="float">
            <text:p>0.822330474853516</text:p>
          </table:table-cell>
          <table:table-cell office:value-type="float" office:value="0.28702649474144" calcext:value-type="float">
            <text:p>0.28702649474144</text:p>
          </table:table-cell>
          <table:table-cell office:value-type="float" office:value="-0.737031579017639" calcext:value-type="float">
            <text:p>-0.737031579017639</text:p>
          </table:table-cell>
          <table:table-cell office:value-type="float" office:value="0.999496400356293" calcext:value-type="float">
            <text:p>0.999496400356293</text:p>
          </table:table-cell>
          <table:table-cell office:value-type="float" office:value="0.294373571872711" calcext:value-type="float">
            <text:p>0.294373571872711</text:p>
          </table:table-cell>
          <table:table-cell office:value-type="float" office:value="0.312107533216476" calcext:value-type="float">
            <text:p>0.312107533216476</text:p>
          </table:table-cell>
          <table:table-cell office:value-type="float" office:value="-0.759403884410858" calcext:value-type="float">
            <text:p>-0.759403884410858</text:p>
          </table:table-cell>
          <table:table-cell office:value-type="float" office:value="0.999565064907074" calcext:value-type="float">
            <text:p>0.999565064907074</text:p>
          </table:table-cell>
          <table:table-cell office:value-type="float" office:value="0.733113765716553" calcext:value-type="float">
            <text:p>0.733113765716553</text:p>
          </table:table-cell>
          <table:table-cell office:value-type="float" office:value="1.20383477210999" calcext:value-type="float">
            <text:p>1.20383477210999</text:p>
          </table:table-cell>
          <table:table-cell office:value-type="float" office:value="0.0121846990659833" calcext:value-type="float">
            <text:p>0.0121846990659833</text:p>
          </table:table-cell>
          <table:table-cell office:value-type="float" office:value="0.0727319493889809" calcext:value-type="float">
            <text:p>0.0727319493889809</text:p>
          </table:table-cell>
          <table:table-cell office:value-type="float" office:value="0.404962062835693" calcext:value-type="float">
            <text:p>0.404962062835693</text:p>
          </table:table-cell>
          <table:table-cell office:value-type="float" office:value="1.1951642036438" calcext:value-type="float">
            <text:p>1.1951642036438</text:p>
          </table:table-cell>
          <table:table-cell office:value-type="float" office:value="-0.00253699743188918" calcext:value-type="float">
            <text:p>-0.00253699743188918</text:p>
          </table:table-cell>
          <table:table-cell office:value-type="float" office:value="0.0763614028692246" calcext:value-type="float">
            <text:p>0.07636140286922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QRT(([.J137]-[.F137])^2+([.K137]-[.G137])^2)" office:value-type="float" office:value="0.528648926641006" calcext:value-type="float">
            <text:p>0.528648926641006</text:p>
          </table:table-cell>
          <table:table-cell table:formula="of:=SQRT(([.R137]-[.N137])^2+([.S137]-[.O137])^2)" office:value-type="float" office:value="0.326163811673105" calcext:value-type="float">
            <text:p>0.326163811673105</text:p>
          </table:table-cell>
          <table:table-cell table:formula="of:=SQRT(([.R137]-[.F137])^2+([.S137]-[.G137])^2)" office:value-type="float" office:value="0.999128819910408" calcext:value-type="float">
            <text:p>0.999128819910408</text:p>
          </table:table-cell>
          <table:table-cell table:formula="of:=SQRT(([.N137]-[.J137])^2+([.O137]-[.K137])^2)" office:value-type="float" office:value="0.992891022982093" calcext:value-type="float">
            <text:p>0.992891022982093</text:p>
          </table:table-cell>
          <table:table-cell office:value-type="float" office:value="0.822837710380554" calcext:value-type="float">
            <text:p>0.822837710380554</text:p>
          </table:table-cell>
          <table:table-cell office:value-type="float" office:value="0.288158446550369" calcext:value-type="float">
            <text:p>0.288158446550369</text:p>
          </table:table-cell>
          <table:table-cell office:value-type="float" office:value="-0.84418785572052" calcext:value-type="float">
            <text:p>-0.84418785572052</text:p>
          </table:table-cell>
          <table:table-cell office:value-type="float" office:value="0.999494194984436" calcext:value-type="float">
            <text:p>0.999494194984436</text:p>
          </table:table-cell>
          <table:table-cell office:value-type="float" office:value="0.29473477602005" calcext:value-type="float">
            <text:p>0.29473477602005</text:p>
          </table:table-cell>
          <table:table-cell office:value-type="float" office:value="0.312178820371628" calcext:value-type="float">
            <text:p>0.312178820371628</text:p>
          </table:table-cell>
          <table:table-cell office:value-type="float" office:value="-0.775466680526733" calcext:value-type="float">
            <text:p>-0.775466680526733</text:p>
          </table:table-cell>
          <table:table-cell office:value-type="float" office:value="0.999564170837402" calcext:value-type="float">
            <text:p>0.999564170837402</text:p>
          </table:table-cell>
          <table:table-cell office:value-type="float" office:value="0.730738282203674" calcext:value-type="float">
            <text:p>0.730738282203674</text:p>
          </table:table-cell>
          <table:table-cell office:value-type="float" office:value="1.20421779155731" calcext:value-type="float">
            <text:p>1.20421779155731</text:p>
          </table:table-cell>
          <table:table-cell office:value-type="float" office:value="0.00151375972200185" calcext:value-type="float">
            <text:p>0.00151375972200185</text:p>
          </table:table-cell>
          <table:table-cell office:value-type="float" office:value="0.0735071673989296" calcext:value-type="float">
            <text:p>0.0735071673989296</text:p>
          </table:table-cell>
          <table:table-cell office:value-type="float" office:value="0.40468892455101" calcext:value-type="float">
            <text:p>0.40468892455101</text:p>
          </table:table-cell>
          <table:table-cell office:value-type="float" office:value="1.19557785987854" calcext:value-type="float">
            <text:p>1.19557785987854</text:p>
          </table:table-cell>
          <table:table-cell office:value-type="float" office:value="0.00774587038904429" calcext:value-type="float">
            <text:p>0.00774587038904429</text:p>
          </table:table-cell>
          <table:table-cell office:value-type="float" office:value="0.0764545872807503" calcext:value-type="float">
            <text:p>0.07645458728075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QRT(([.J138]-[.F138])^2+([.K138]-[.G138])^2)" office:value-type="float" office:value="0.528259299301789" calcext:value-type="float">
            <text:p>0.528259299301789</text:p>
          </table:table-cell>
          <table:table-cell table:formula="of:=SQRT(([.R138]-[.N138])^2+([.S138]-[.O138])^2)" office:value-type="float" office:value="0.324460012243888" calcext:value-type="float">
            <text:p>0.324460012243888</text:p>
          </table:table-cell>
          <table:table-cell table:formula="of:=SQRT(([.R138]-[.F138])^2+([.S138]-[.G138])^2)" office:value-type="float" office:value="0.998128512413267" calcext:value-type="float">
            <text:p>0.998128512413267</text:p>
          </table:table-cell>
          <table:table-cell table:formula="of:=SQRT(([.N138]-[.J138])^2+([.O138]-[.K138])^2)" office:value-type="float" office:value="0.992714999887065" calcext:value-type="float">
            <text:p>0.992714999887065</text:p>
          </table:table-cell>
          <table:table-cell office:value-type="float" office:value="0.823524177074432" calcext:value-type="float">
            <text:p>0.823524177074432</text:p>
          </table:table-cell>
          <table:table-cell office:value-type="float" office:value="0.289451986551285" calcext:value-type="float">
            <text:p>0.289451986551285</text:p>
          </table:table-cell>
          <table:table-cell office:value-type="float" office:value="-0.826845645904541" calcext:value-type="float">
            <text:p>-0.826845645904541</text:p>
          </table:table-cell>
          <table:table-cell office:value-type="float" office:value="0.999486863613129" calcext:value-type="float">
            <text:p>0.999486863613129</text:p>
          </table:table-cell>
          <table:table-cell office:value-type="float" office:value="0.295768976211548" calcext:value-type="float">
            <text:p>0.295768976211548</text:p>
          </table:table-cell>
          <table:table-cell office:value-type="float" office:value="0.312524378299713" calcext:value-type="float">
            <text:p>0.312524378299713</text:p>
          </table:table-cell>
          <table:table-cell office:value-type="float" office:value="-0.777252912521362" calcext:value-type="float">
            <text:p>-0.777252912521362</text:p>
          </table:table-cell>
          <table:table-cell office:value-type="float" office:value="0.999560058116913" calcext:value-type="float">
            <text:p>0.999560058116913</text:p>
          </table:table-cell>
          <table:table-cell office:value-type="float" office:value="0.730845928192139" calcext:value-type="float">
            <text:p>0.730845928192139</text:p>
          </table:table-cell>
          <table:table-cell office:value-type="float" office:value="1.20481979846954" calcext:value-type="float">
            <text:p>1.20481979846954</text:p>
          </table:table-cell>
          <table:table-cell office:value-type="float" office:value="0.00205882382579148" calcext:value-type="float">
            <text:p>0.00205882382579148</text:p>
          </table:table-cell>
          <table:table-cell office:value-type="float" office:value="0.0720108151435852" calcext:value-type="float">
            <text:p>0.0720108151435852</text:p>
          </table:table-cell>
          <table:table-cell office:value-type="float" office:value="0.4064981341362" calcext:value-type="float">
            <text:p>0.4064981341362</text:p>
          </table:table-cell>
          <table:table-cell office:value-type="float" office:value="1.19628703594208" calcext:value-type="float">
            <text:p>1.19628703594208</text:p>
          </table:table-cell>
          <table:table-cell office:value-type="float" office:value="0.00722118001431227" calcext:value-type="float">
            <text:p>0.00722118001431227</text:p>
          </table:table-cell>
          <table:table-cell office:value-type="float" office:value="0.0746241807937622" calcext:value-type="float">
            <text:p>0.07462418079376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QRT(([.J139]-[.F139])^2+([.K139]-[.G139])^2)" office:value-type="float" office:value="0.524026275088313" calcext:value-type="float">
            <text:p>0.524026275088313</text:p>
          </table:table-cell>
          <table:table-cell table:formula="of:=SQRT(([.R139]-[.N139])^2+([.S139]-[.O139])^2)" office:value-type="float" office:value="0.323124407500173" calcext:value-type="float">
            <text:p>0.323124407500173</text:p>
          </table:table-cell>
          <table:table-cell table:formula="of:=SQRT(([.R139]-[.F139])^2+([.S139]-[.G139])^2)" office:value-type="float" office:value="0.997979494004194" calcext:value-type="float">
            <text:p>0.997979494004194</text:p>
          </table:table-cell>
          <table:table-cell table:formula="of:=SQRT(([.N139]-[.J139])^2+([.O139]-[.K139])^2)" office:value-type="float" office:value="0.991252332002527" calcext:value-type="float">
            <text:p>0.991252332002527</text:p>
          </table:table-cell>
          <table:table-cell office:value-type="float" office:value="0.818964660167694" calcext:value-type="float">
            <text:p>0.818964660167694</text:p>
          </table:table-cell>
          <table:table-cell office:value-type="float" office:value="0.288039147853851" calcext:value-type="float">
            <text:p>0.288039147853851</text:p>
          </table:table-cell>
          <table:table-cell office:value-type="float" office:value="-0.781923115253449" calcext:value-type="float">
            <text:p>-0.781923115253449</text:p>
          </table:table-cell>
          <table:table-cell office:value-type="float" office:value="0.999487042427063" calcext:value-type="float">
            <text:p>0.999487042427063</text:p>
          </table:table-cell>
          <table:table-cell office:value-type="float" office:value="0.295606762170792" calcext:value-type="float">
            <text:p>0.295606762170792</text:p>
          </table:table-cell>
          <table:table-cell office:value-type="float" office:value="0.31449756026268" calcext:value-type="float">
            <text:p>0.31449756026268</text:p>
          </table:table-cell>
          <table:table-cell office:value-type="float" office:value="-0.748409867286682" calcext:value-type="float">
            <text:p>-0.748409867286682</text:p>
          </table:table-cell>
          <table:table-cell office:value-type="float" office:value="0.999550580978394" calcext:value-type="float">
            <text:p>0.999550580978394</text:p>
          </table:table-cell>
          <table:table-cell office:value-type="float" office:value="0.73032021522522" calcext:value-type="float">
            <text:p>0.73032021522522</text:p>
          </table:table-cell>
          <table:table-cell office:value-type="float" office:value="1.20534288883209" calcext:value-type="float">
            <text:p>1.20534288883209</text:p>
          </table:table-cell>
          <table:table-cell office:value-type="float" office:value="0.00165747629944235" calcext:value-type="float">
            <text:p>0.00165747629944235</text:p>
          </table:table-cell>
          <table:table-cell office:value-type="float" office:value="0.0696757510304451" calcext:value-type="float">
            <text:p>0.0696757510304451</text:p>
          </table:table-cell>
          <table:table-cell office:value-type="float" office:value="0.407299518585205" calcext:value-type="float">
            <text:p>0.407299518585205</text:p>
          </table:table-cell>
          <table:table-cell office:value-type="float" office:value="1.19715678691864" calcext:value-type="float">
            <text:p>1.19715678691864</text:p>
          </table:table-cell>
          <table:table-cell office:value-type="float" office:value="0.00767170498147607" calcext:value-type="float">
            <text:p>0.00767170498147607</text:p>
          </table:table-cell>
          <table:table-cell office:value-type="float" office:value="0.0719214528799057" calcext:value-type="float">
            <text:p>0.07192145287990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QRT(([.J140]-[.F140])^2+([.K140]-[.G140])^2)" office:value-type="float" office:value="0.521424363108826" calcext:value-type="float">
            <text:p>0.521424363108826</text:p>
          </table:table-cell>
          <table:table-cell table:formula="of:=SQRT(([.R140]-[.N140])^2+([.S140]-[.O140])^2)" office:value-type="float" office:value="0.321700671528673" calcext:value-type="float">
            <text:p>0.321700671528673</text:p>
          </table:table-cell>
          <table:table-cell table:formula="of:=SQRT(([.R140]-[.F140])^2+([.S140]-[.G140])^2)" office:value-type="float" office:value="0.998668018571971" calcext:value-type="float">
            <text:p>0.998668018571971</text:p>
          </table:table-cell>
          <table:table-cell table:formula="of:=SQRT(([.N140]-[.J140])^2+([.O140]-[.K140])^2)" office:value-type="float" office:value="0.987244417803671" calcext:value-type="float">
            <text:p>0.987244417803671</text:p>
          </table:table-cell>
          <table:table-cell office:value-type="float" office:value="0.816175758838654" calcext:value-type="float">
            <text:p>0.816175758838654</text:p>
          </table:table-cell>
          <table:table-cell office:value-type="float" office:value="0.285808682441711" calcext:value-type="float">
            <text:p>0.285808682441711</text:p>
          </table:table-cell>
          <table:table-cell office:value-type="float" office:value="-0.765914797782898" calcext:value-type="float">
            <text:p>-0.765914797782898</text:p>
          </table:table-cell>
          <table:table-cell office:value-type="float" office:value="0.999458134174347" calcext:value-type="float">
            <text:p>0.999458134174347</text:p>
          </table:table-cell>
          <table:table-cell office:value-type="float" office:value="0.295605421066284" calcext:value-type="float">
            <text:p>0.295605421066284</text:p>
          </table:table-cell>
          <table:table-cell office:value-type="float" office:value="0.315639704465866" calcext:value-type="float">
            <text:p>0.315639704465866</text:p>
          </table:table-cell>
          <table:table-cell office:value-type="float" office:value="-0.745928943157196" calcext:value-type="float">
            <text:p>-0.745928943157196</text:p>
          </table:table-cell>
          <table:table-cell office:value-type="float" office:value="0.999520421028137" calcext:value-type="float">
            <text:p>0.999520421028137</text:p>
          </table:table-cell>
          <table:table-cell office:value-type="float" office:value="0.730324387550354" calcext:value-type="float">
            <text:p>0.730324387550354</text:p>
          </table:table-cell>
          <table:table-cell office:value-type="float" office:value="1.20202052593231" calcext:value-type="float">
            <text:p>1.20202052593231</text:p>
          </table:table-cell>
          <table:table-cell office:value-type="float" office:value="-0.00474847061559558" calcext:value-type="float">
            <text:p>-0.00474847061559558</text:p>
          </table:table-cell>
          <table:table-cell office:value-type="float" office:value="0.0676549896597862" calcext:value-type="float">
            <text:p>0.0676549896597862</text:p>
          </table:table-cell>
          <table:table-cell office:value-type="float" office:value="0.40865483880043" calcext:value-type="float">
            <text:p>0.40865483880043</text:p>
          </table:table-cell>
          <table:table-cell office:value-type="float" office:value="1.19754576683044" calcext:value-type="float">
            <text:p>1.19754576683044</text:p>
          </table:table-cell>
          <table:table-cell office:value-type="float" office:value="0.0140691120177507" calcext:value-type="float">
            <text:p>0.0140691120177507</text:p>
          </table:table-cell>
          <table:table-cell office:value-type="float" office:value="0.0696855634450913" calcext:value-type="float">
            <text:p>0.06968556344509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QRT(([.J141]-[.F141])^2+([.K141]-[.G141])^2)" office:value-type="float" office:value="0.520936018323625" calcext:value-type="float">
            <text:p>0.520936018323625</text:p>
          </table:table-cell>
          <table:table-cell table:formula="of:=SQRT(([.R141]-[.N141])^2+([.S141]-[.O141])^2)" office:value-type="float" office:value="0.320656378384255" calcext:value-type="float">
            <text:p>0.320656378384255</text:p>
          </table:table-cell>
          <table:table-cell table:formula="of:=SQRT(([.R141]-[.F141])^2+([.S141]-[.G141])^2)" office:value-type="float" office:value="0.994135656836831" calcext:value-type="float">
            <text:p>0.994135656836831</text:p>
          </table:table-cell>
          <table:table-cell table:formula="of:=SQRT(([.N141]-[.J141])^2+([.O141]-[.K141])^2)" office:value-type="float" office:value="0.979877469037755" calcext:value-type="float">
            <text:p>0.979877469037755</text:p>
          </table:table-cell>
          <table:table-cell office:value-type="float" office:value="0.815654754638672" calcext:value-type="float">
            <text:p>0.815654754638672</text:p>
          </table:table-cell>
          <table:table-cell office:value-type="float" office:value="0.285469889640808" calcext:value-type="float">
            <text:p>0.285469889640808</text:p>
          </table:table-cell>
          <table:table-cell office:value-type="float" office:value="-0.866112589836121" calcext:value-type="float">
            <text:p>-0.866112589836121</text:p>
          </table:table-cell>
          <table:table-cell office:value-type="float" office:value="0.999391317367554" calcext:value-type="float">
            <text:p>0.999391317367554</text:p>
          </table:table-cell>
          <table:table-cell office:value-type="float" office:value="0.295591026544571" calcext:value-type="float">
            <text:p>0.295591026544571</text:p>
          </table:table-cell>
          <table:table-cell office:value-type="float" office:value="0.315603822469711" calcext:value-type="float">
            <text:p>0.315603822469711</text:p>
          </table:table-cell>
          <table:table-cell office:value-type="float" office:value="-0.885902106761932" calcext:value-type="float">
            <text:p>-0.885902106761932</text:p>
          </table:table-cell>
          <table:table-cell office:value-type="float" office:value="0.99950098991394" calcext:value-type="float">
            <text:p>0.99950098991394</text:p>
          </table:table-cell>
          <table:table-cell office:value-type="float" office:value="0.73186194896698" calcext:value-type="float">
            <text:p>0.73186194896698</text:p>
          </table:table-cell>
          <table:table-cell office:value-type="float" office:value="1.19300198554993" calcext:value-type="float">
            <text:p>1.19300198554993</text:p>
          </table:table-cell>
          <table:table-cell office:value-type="float" office:value="0.0145395696163177" calcext:value-type="float">
            <text:p>0.0145395696163177</text:p>
          </table:table-cell>
          <table:table-cell office:value-type="float" office:value="0.070200651884079" calcext:value-type="float">
            <text:p>0.070200651884079</text:p>
          </table:table-cell>
          <table:table-cell office:value-type="float" office:value="0.411206156015396" calcext:value-type="float">
            <text:p>0.411206156015396</text:p>
          </table:table-cell>
          <table:table-cell office:value-type="float" office:value="1.19361472129822" calcext:value-type="float">
            <text:p>1.19361472129822</text:p>
          </table:table-cell>
          <table:table-cell office:value-type="float" office:value="-0.00585197564214468" calcext:value-type="float">
            <text:p>-0.00585197564214468</text:p>
          </table:table-cell>
          <table:table-cell office:value-type="float" office:value="0.0724413171410561" calcext:value-type="float">
            <text:p>0.07244131714105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QRT(([.J142]-[.F142])^2+([.K142]-[.G142])^2)" office:value-type="float" office:value="0.521038288347239" calcext:value-type="float">
            <text:p>0.521038288347239</text:p>
          </table:table-cell>
          <table:table-cell table:formula="of:=SQRT(([.R142]-[.N142])^2+([.S142]-[.O142])^2)" office:value-type="float" office:value="0.320117032911844" calcext:value-type="float">
            <text:p>0.320117032911844</text:p>
          </table:table-cell>
          <table:table-cell table:formula="of:=SQRT(([.R142]-[.F142])^2+([.S142]-[.G142])^2)" office:value-type="float" office:value="0.993223267485357" calcext:value-type="float">
            <text:p>0.993223267485357</text:p>
          </table:table-cell>
          <table:table-cell table:formula="of:=SQRT(([.N142]-[.J142])^2+([.O142]-[.K142])^2)" office:value-type="float" office:value="0.980334729477996" calcext:value-type="float">
            <text:p>0.980334729477996</text:p>
          </table:table-cell>
          <table:table-cell office:value-type="float" office:value="0.815699219703674" calcext:value-type="float">
            <text:p>0.815699219703674</text:p>
          </table:table-cell>
          <table:table-cell office:value-type="float" office:value="0.285495132207871" calcext:value-type="float">
            <text:p>0.285495132207871</text:p>
          </table:table-cell>
          <table:table-cell office:value-type="float" office:value="-0.864193081855774" calcext:value-type="float">
            <text:p>-0.864193081855774</text:p>
          </table:table-cell>
          <table:table-cell office:value-type="float" office:value="0.999367892742157" calcext:value-type="float">
            <text:p>0.999367892742157</text:p>
          </table:table-cell>
          <table:table-cell office:value-type="float" office:value="0.295555084943771" calcext:value-type="float">
            <text:p>0.295555084943771</text:p>
          </table:table-cell>
          <table:table-cell office:value-type="float" office:value="0.316007047891617" calcext:value-type="float">
            <text:p>0.316007047891617</text:p>
          </table:table-cell>
          <table:table-cell office:value-type="float" office:value="-0.847934544086456" calcext:value-type="float">
            <text:p>-0.847934544086456</text:p>
          </table:table-cell>
          <table:table-cell office:value-type="float" office:value="0.999498009681702" calcext:value-type="float">
            <text:p>0.999498009681702</text:p>
          </table:table-cell>
          <table:table-cell office:value-type="float" office:value="0.734449863433838" calcext:value-type="float">
            <text:p>0.734449863433838</text:p>
          </table:table-cell>
          <table:table-cell office:value-type="float" office:value="1.19260704517365" calcext:value-type="float">
            <text:p>1.19260704517365</text:p>
          </table:table-cell>
          <table:table-cell office:value-type="float" office:value="0.0189089514315128" calcext:value-type="float">
            <text:p>0.0189089514315128</text:p>
          </table:table-cell>
          <table:table-cell office:value-type="float" office:value="0.070918969810009" calcext:value-type="float">
            <text:p>0.070918969810009</text:p>
          </table:table-cell>
          <table:table-cell office:value-type="float" office:value="0.414335906505585" calcext:value-type="float">
            <text:p>0.414335906505585</text:p>
          </table:table-cell>
          <table:table-cell office:value-type="float" office:value="1.19401037693024" calcext:value-type="float">
            <text:p>1.19401037693024</text:p>
          </table:table-cell>
          <table:table-cell office:value-type="float" office:value="-0.0101594608277082" calcext:value-type="float">
            <text:p>-0.0101594608277082</text:p>
          </table:table-cell>
          <table:table-cell office:value-type="float" office:value="0.0731030628085136" calcext:value-type="float">
            <text:p>0.07310306280851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QRT(([.J143]-[.F143])^2+([.K143]-[.G143])^2)" office:value-type="float" office:value="0.522606429427726" calcext:value-type="float">
            <text:p>0.522606429427726</text:p>
          </table:table-cell>
          <table:table-cell table:formula="of:=SQRT(([.R143]-[.N143])^2+([.S143]-[.O143])^2)" office:value-type="float" office:value="0.320082258919054" calcext:value-type="float">
            <text:p>0.320082258919054</text:p>
          </table:table-cell>
          <table:table-cell table:formula="of:=SQRT(([.R143]-[.F143])^2+([.S143]-[.G143])^2)" office:value-type="float" office:value="0.993362528775869" calcext:value-type="float">
            <text:p>0.993362528775869</text:p>
          </table:table-cell>
          <table:table-cell table:formula="of:=SQRT(([.N143]-[.J143])^2+([.O143]-[.K143])^2)" office:value-type="float" office:value="0.980444141926936" calcext:value-type="float">
            <text:p>0.980444141926936</text:p>
          </table:table-cell>
          <table:table-cell office:value-type="float" office:value="0.817252814769745" calcext:value-type="float">
            <text:p>0.817252814769745</text:p>
          </table:table-cell>
          <table:table-cell office:value-type="float" office:value="0.28547465801239" calcext:value-type="float">
            <text:p>0.28547465801239</text:p>
          </table:table-cell>
          <table:table-cell office:value-type="float" office:value="-1.06350362300873" calcext:value-type="float">
            <text:p>-1.06350362300873</text:p>
          </table:table-cell>
          <table:table-cell office:value-type="float" office:value="0.999352037906647" calcext:value-type="float">
            <text:p>0.999352037906647</text:p>
          </table:table-cell>
          <table:table-cell office:value-type="float" office:value="0.295563042163849" calcext:value-type="float">
            <text:p>0.295563042163849</text:p>
          </table:table-cell>
          <table:table-cell office:value-type="float" office:value="0.316414296627045" calcext:value-type="float">
            <text:p>0.316414296627045</text:p>
          </table:table-cell>
          <table:table-cell office:value-type="float" office:value="-0.974151909351349" calcext:value-type="float">
            <text:p>-0.974151909351349</text:p>
          </table:table-cell>
          <table:table-cell office:value-type="float" office:value="0.99948263168335" calcext:value-type="float">
            <text:p>0.99948263168335</text:p>
          </table:table-cell>
          <table:table-cell office:value-type="float" office:value="0.736338675022125" calcext:value-type="float">
            <text:p>0.736338675022125</text:p>
          </table:table-cell>
          <table:table-cell office:value-type="float" office:value="1.19219255447388" calcext:value-type="float">
            <text:p>1.19219255447388</text:p>
          </table:table-cell>
          <table:table-cell office:value-type="float" office:value="0.0158881545066834" calcext:value-type="float">
            <text:p>0.0158881545066834</text:p>
          </table:table-cell>
          <table:table-cell office:value-type="float" office:value="0.0691141858696938" calcext:value-type="float">
            <text:p>0.0691141858696938</text:p>
          </table:table-cell>
          <table:table-cell office:value-type="float" office:value="0.416263401508331" calcext:value-type="float">
            <text:p>0.416263401508331</text:p>
          </table:table-cell>
          <table:table-cell office:value-type="float" office:value="1.19430720806122" calcext:value-type="float">
            <text:p>1.19430720806122</text:p>
          </table:table-cell>
          <table:table-cell office:value-type="float" office:value="-0.00701754540205002" calcext:value-type="float">
            <text:p>-0.00701754540205002</text:p>
          </table:table-cell>
          <table:table-cell office:value-type="float" office:value="0.070873536169529" calcext:value-type="float">
            <text:p>0.0708735361695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QRT(([.J144]-[.F144])^2+([.K144]-[.G144])^2)" office:value-type="float" office:value="0.523021772484785" calcext:value-type="float">
            <text:p>0.523021772484785</text:p>
          </table:table-cell>
          <table:table-cell table:formula="of:=SQRT(([.R144]-[.N144])^2+([.S144]-[.O144])^2)" office:value-type="float" office:value="0.31983293066282" calcext:value-type="float">
            <text:p>0.31983293066282</text:p>
          </table:table-cell>
          <table:table-cell table:formula="of:=SQRT(([.R144]-[.F144])^2+([.S144]-[.G144])^2)" office:value-type="float" office:value="0.990419409926814" calcext:value-type="float">
            <text:p>0.990419409926814</text:p>
          </table:table-cell>
          <table:table-cell table:formula="of:=SQRT(([.N144]-[.J144])^2+([.O144]-[.K144])^2)" office:value-type="float" office:value="0.978986819798031" calcext:value-type="float">
            <text:p>0.978986819798031</text:p>
          </table:table-cell>
          <table:table-cell office:value-type="float" office:value="0.817783713340759" calcext:value-type="float">
            <text:p>0.817783713340759</text:p>
          </table:table-cell>
          <table:table-cell office:value-type="float" office:value="0.289222180843353" calcext:value-type="float">
            <text:p>0.289222180843353</text:p>
          </table:table-cell>
          <table:table-cell office:value-type="float" office:value="-1.06526958942413" calcext:value-type="float">
            <text:p>-1.06526958942413</text:p>
          </table:table-cell>
          <table:table-cell office:value-type="float" office:value="0.999307930469513" calcext:value-type="float">
            <text:p>0.999307930469513</text:p>
          </table:table-cell>
          <table:table-cell office:value-type="float" office:value="0.295566737651825" calcext:value-type="float">
            <text:p>0.295566737651825</text:p>
          </table:table-cell>
          <table:table-cell office:value-type="float" office:value="0.318225711584091" calcext:value-type="float">
            <text:p>0.318225711584091</text:p>
          </table:table-cell>
          <table:table-cell office:value-type="float" office:value="-1.00617301464081" calcext:value-type="float">
            <text:p>-1.00617301464081</text:p>
          </table:table-cell>
          <table:table-cell office:value-type="float" office:value="0.999451994895935" calcext:value-type="float">
            <text:p>0.999451994895935</text:p>
          </table:table-cell>
          <table:table-cell office:value-type="float" office:value="0.735974490642548" calcext:value-type="float">
            <text:p>0.735974490642548</text:p>
          </table:table-cell>
          <table:table-cell office:value-type="float" office:value="1.19255757331848" calcext:value-type="float">
            <text:p>1.19255757331848</text:p>
          </table:table-cell>
          <table:table-cell office:value-type="float" office:value="0.0171644855290651" calcext:value-type="float">
            <text:p>0.0171644855290651</text:p>
          </table:table-cell>
          <table:table-cell office:value-type="float" office:value="0.0702894479036331" calcext:value-type="float">
            <text:p>0.0702894479036331</text:p>
          </table:table-cell>
          <table:table-cell office:value-type="float" office:value="0.416147768497467" calcext:value-type="float">
            <text:p>0.416147768497467</text:p>
          </table:table-cell>
          <table:table-cell office:value-type="float" office:value="1.1945503950119" calcext:value-type="float">
            <text:p>1.1945503950119</text:p>
          </table:table-cell>
          <table:table-cell office:value-type="float" office:value="-0.00843686796724796" calcext:value-type="float">
            <text:p>-0.00843686796724796</text:p>
          </table:table-cell>
          <table:table-cell office:value-type="float" office:value="0.0716485381126404" calcext:value-type="float">
            <text:p>0.07164853811264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QRT(([.J145]-[.F145])^2+([.K145]-[.G145])^2)" office:value-type="float" office:value="0.519728115017" calcext:value-type="float">
            <text:p>0.519728115017</text:p>
          </table:table-cell>
          <table:table-cell table:formula="of:=SQRT(([.R145]-[.N145])^2+([.S145]-[.O145])^2)" office:value-type="float" office:value="0.320119990086549" calcext:value-type="float">
            <text:p>0.320119990086549</text:p>
          </table:table-cell>
          <table:table-cell table:formula="of:=SQRT(([.R145]-[.F145])^2+([.S145]-[.G145])^2)" office:value-type="float" office:value="0.977185176308474" calcext:value-type="float">
            <text:p>0.977185176308474</text:p>
          </table:table-cell>
          <table:table-cell table:formula="of:=SQRT(([.N145]-[.J145])^2+([.O145]-[.K145])^2)" office:value-type="float" office:value="0.973787704687076" calcext:value-type="float">
            <text:p>0.973787704687076</text:p>
          </table:table-cell>
          <table:table-cell office:value-type="float" office:value="0.817628741264343" calcext:value-type="float">
            <text:p>0.817628741264343</text:p>
          </table:table-cell>
          <table:table-cell office:value-type="float" office:value="0.28892195224762" calcext:value-type="float">
            <text:p>0.28892195224762</text:p>
          </table:table-cell>
          <table:table-cell office:value-type="float" office:value="-0.786111533641815" calcext:value-type="float">
            <text:p>-0.786111533641815</text:p>
          </table:table-cell>
          <table:table-cell office:value-type="float" office:value="0.999290466308594" calcext:value-type="float">
            <text:p>0.999290466308594</text:p>
          </table:table-cell>
          <table:table-cell office:value-type="float" office:value="0.298521101474762" calcext:value-type="float">
            <text:p>0.298521101474762</text:p>
          </table:table-cell>
          <table:table-cell office:value-type="float" office:value="0.314310371875763" calcext:value-type="float">
            <text:p>0.314310371875763</text:p>
          </table:table-cell>
          <table:table-cell office:value-type="float" office:value="-0.6916543841362" calcext:value-type="float">
            <text:p>-0.6916543841362</text:p>
          </table:table-cell>
          <table:table-cell office:value-type="float" office:value="0.999446749687195" calcext:value-type="float">
            <text:p>0.999446749687195</text:p>
          </table:table-cell>
          <table:table-cell office:value-type="float" office:value="0.735567688941956" calcext:value-type="float">
            <text:p>0.735567688941956</text:p>
          </table:table-cell>
          <table:table-cell office:value-type="float" office:value="1.18451309204102" calcext:value-type="float">
            <text:p>1.18451309204102</text:p>
          </table:table-cell>
          <table:table-cell office:value-type="float" office:value="0.0180767215788364" calcext:value-type="float">
            <text:p>0.0180767215788364</text:p>
          </table:table-cell>
          <table:table-cell office:value-type="float" office:value="0.0679271146655083" calcext:value-type="float">
            <text:p>0.0679271146655083</text:p>
          </table:table-cell>
          <table:table-cell office:value-type="float" office:value="0.415486574172974" calcext:value-type="float">
            <text:p>0.415486574172974</text:p>
          </table:table-cell>
          <table:table-cell office:value-type="float" office:value="1.17952430248261" calcext:value-type="float">
            <text:p>1.17952430248261</text:p>
          </table:table-cell>
          <table:table-cell office:value-type="float" office:value="-0.0091356672346592" calcext:value-type="float">
            <text:p>-0.0091356672346592</text:p>
          </table:table-cell>
          <table:table-cell office:value-type="float" office:value="0.0697004646062851" calcext:value-type="float">
            <text:p>0.06970046460628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QRT(([.J146]-[.F146])^2+([.K146]-[.G146])^2)" office:value-type="float" office:value="0.521244871655052" calcext:value-type="float">
            <text:p>0.521244871655052</text:p>
          </table:table-cell>
          <table:table-cell table:formula="of:=SQRT(([.R146]-[.N146])^2+([.S146]-[.O146])^2)" office:value-type="float" office:value="0.32006305824749" calcext:value-type="float">
            <text:p>0.32006305824749</text:p>
          </table:table-cell>
          <table:table-cell table:formula="of:=SQRT(([.R146]-[.F146])^2+([.S146]-[.G146])^2)" office:value-type="float" office:value="0.976096793122867" calcext:value-type="float">
            <text:p>0.976096793122867</text:p>
          </table:table-cell>
          <table:table-cell table:formula="of:=SQRT(([.N146]-[.J146])^2+([.O146]-[.K146])^2)" office:value-type="float" office:value="0.966395086972533" calcext:value-type="float">
            <text:p>0.966395086972533</text:p>
          </table:table-cell>
          <table:table-cell office:value-type="float" office:value="0.81805408000946" calcext:value-type="float">
            <text:p>0.81805408000946</text:p>
          </table:table-cell>
          <table:table-cell office:value-type="float" office:value="0.291490584611893" calcext:value-type="float">
            <text:p>0.291490584611893</text:p>
          </table:table-cell>
          <table:table-cell office:value-type="float" office:value="-0.789399027824402" calcext:value-type="float">
            <text:p>-0.789399027824402</text:p>
          </table:table-cell>
          <table:table-cell office:value-type="float" office:value="0.999313175678253" calcext:value-type="float">
            <text:p>0.999313175678253</text:p>
          </table:table-cell>
          <table:table-cell office:value-type="float" office:value="0.297749578952789" calcext:value-type="float">
            <text:p>0.297749578952789</text:p>
          </table:table-cell>
          <table:table-cell office:value-type="float" office:value="0.322786629199982" calcext:value-type="float">
            <text:p>0.322786629199982</text:p>
          </table:table-cell>
          <table:table-cell office:value-type="float" office:value="-0.796681046485901" calcext:value-type="float">
            <text:p>-0.796681046485901</text:p>
          </table:table-cell>
          <table:table-cell office:value-type="float" office:value="0.999460756778717" calcext:value-type="float">
            <text:p>0.999460756778717</text:p>
          </table:table-cell>
          <table:table-cell office:value-type="float" office:value="0.734716296195984" calcext:value-type="float">
            <text:p>0.734716296195984</text:p>
          </table:table-cell>
          <table:table-cell office:value-type="float" office:value="1.18474924564362" calcext:value-type="float">
            <text:p>1.18474924564362</text:p>
          </table:table-cell>
          <table:table-cell office:value-type="float" office:value="0.022234383970499" calcext:value-type="float">
            <text:p>0.022234383970499</text:p>
          </table:table-cell>
          <table:table-cell office:value-type="float" office:value="0.0698803588747978" calcext:value-type="float">
            <text:p>0.0698803588747978</text:p>
          </table:table-cell>
          <table:table-cell office:value-type="float" office:value="0.41468358039856" calcext:value-type="float">
            <text:p>0.41468358039856</text:p>
          </table:table-cell>
          <table:table-cell office:value-type="float" office:value="1.18034219741821" calcext:value-type="float">
            <text:p>1.18034219741821</text:p>
          </table:table-cell>
          <table:table-cell office:value-type="float" office:value="-0.0130495559424162" calcext:value-type="float">
            <text:p>-0.0130495559424162</text:p>
          </table:table-cell>
          <table:table-cell office:value-type="float" office:value="0.0709580779075623" calcext:value-type="float">
            <text:p>0.07095807790756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QRT(([.J147]-[.F147])^2+([.K147]-[.G147])^2)" office:value-type="float" office:value="0.520526729339706" calcext:value-type="float">
            <text:p>0.520526729339706</text:p>
          </table:table-cell>
          <table:table-cell table:formula="of:=SQRT(([.R147]-[.N147])^2+([.S147]-[.O147])^2)" office:value-type="float" office:value="0.318639258244951" calcext:value-type="float">
            <text:p>0.318639258244951</text:p>
          </table:table-cell>
          <table:table-cell table:formula="of:=SQRT(([.R147]-[.F147])^2+([.S147]-[.G147])^2)" office:value-type="float" office:value="0.977019692090477" calcext:value-type="float">
            <text:p>0.977019692090477</text:p>
          </table:table-cell>
          <table:table-cell table:formula="of:=SQRT(([.N147]-[.J147])^2+([.O147]-[.K147])^2)" office:value-type="float" office:value="0.965205318068922" calcext:value-type="float">
            <text:p>0.965205318068922</text:p>
          </table:table-cell>
          <table:table-cell office:value-type="float" office:value="0.817818522453308" calcext:value-type="float">
            <text:p>0.817818522453308</text:p>
          </table:table-cell>
          <table:table-cell office:value-type="float" office:value="0.290645003318787" calcext:value-type="float">
            <text:p>0.290645003318787</text:p>
          </table:table-cell>
          <table:table-cell office:value-type="float" office:value="-0.758867800235748" calcext:value-type="float">
            <text:p>-0.758867800235748</text:p>
          </table:table-cell>
          <table:table-cell office:value-type="float" office:value="0.999341309070587" calcext:value-type="float">
            <text:p>0.999341309070587</text:p>
          </table:table-cell>
          <table:table-cell office:value-type="float" office:value="0.298282206058502" calcext:value-type="float">
            <text:p>0.298282206058502</text:p>
          </table:table-cell>
          <table:table-cell office:value-type="float" office:value="0.32274004817009" calcext:value-type="float">
            <text:p>0.32274004817009</text:p>
          </table:table-cell>
          <table:table-cell office:value-type="float" office:value="-0.723469495773315" calcext:value-type="float">
            <text:p>-0.723469495773315</text:p>
          </table:table-cell>
          <table:table-cell office:value-type="float" office:value="0.999475121498108" calcext:value-type="float">
            <text:p>0.999475121498108</text:p>
          </table:table-cell>
          <table:table-cell office:value-type="float" office:value="0.733953237533569" calcext:value-type="float">
            <text:p>0.733953237533569</text:p>
          </table:table-cell>
          <table:table-cell office:value-type="float" office:value="1.18402516841888" calcext:value-type="float">
            <text:p>1.18402516841888</text:p>
          </table:table-cell>
          <table:table-cell office:value-type="float" office:value="0.0221078563481569" calcext:value-type="float">
            <text:p>0.0221078563481569</text:p>
          </table:table-cell>
          <table:table-cell office:value-type="float" office:value="0.0695352703332901" calcext:value-type="float">
            <text:p>0.0695352703332901</text:p>
          </table:table-cell>
          <table:table-cell office:value-type="float" office:value="0.415329217910767" calcext:value-type="float">
            <text:p>0.415329217910767</text:p>
          </table:table-cell>
          <table:table-cell office:value-type="float" office:value="1.18090891838074" calcext:value-type="float">
            <text:p>1.18090891838074</text:p>
          </table:table-cell>
          <table:table-cell office:value-type="float" office:value="-0.0129268718883395" calcext:value-type="float">
            <text:p>-0.0129268718883395</text:p>
          </table:table-cell>
          <table:table-cell office:value-type="float" office:value="0.070347785949707" calcext:value-type="float">
            <text:p>0.0703477859497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QRT(([.J148]-[.F148])^2+([.K148]-[.G148])^2)" office:value-type="float" office:value="0.51853194347902" calcext:value-type="float">
            <text:p>0.51853194347902</text:p>
          </table:table-cell>
          <table:table-cell table:formula="of:=SQRT(([.R148]-[.N148])^2+([.S148]-[.O148])^2)" office:value-type="float" office:value="0.318116339925148" calcext:value-type="float">
            <text:p>0.318116339925148</text:p>
          </table:table-cell>
          <table:table-cell table:formula="of:=SQRT(([.R148]-[.F148])^2+([.S148]-[.G148])^2)" office:value-type="float" office:value="0.976352984498061" calcext:value-type="float">
            <text:p>0.976352984498061</text:p>
          </table:table-cell>
          <table:table-cell table:formula="of:=SQRT(([.N148]-[.J148])^2+([.O148]-[.K148])^2)" office:value-type="float" office:value="0.962421094335963" calcext:value-type="float">
            <text:p>0.962421094335963</text:p>
          </table:table-cell>
          <table:table-cell office:value-type="float" office:value="0.816107749938965" calcext:value-type="float">
            <text:p>0.816107749938965</text:p>
          </table:table-cell>
          <table:table-cell office:value-type="float" office:value="0.289030134677887" calcext:value-type="float">
            <text:p>0.289030134677887</text:p>
          </table:table-cell>
          <table:table-cell office:value-type="float" office:value="-0.649366617202759" calcext:value-type="float">
            <text:p>-0.649366617202759</text:p>
          </table:table-cell>
          <table:table-cell office:value-type="float" office:value="0.999338924884796" calcext:value-type="float">
            <text:p>0.999338924884796</text:p>
          </table:table-cell>
          <table:table-cell office:value-type="float" office:value="0.298587739467621" calcext:value-type="float">
            <text:p>0.298587739467621</text:p>
          </table:table-cell>
          <table:table-cell office:value-type="float" office:value="0.321409374475479" calcext:value-type="float">
            <text:p>0.321409374475479</text:p>
          </table:table-cell>
          <table:table-cell office:value-type="float" office:value="-0.583683848381043" calcext:value-type="float">
            <text:p>-0.583683848381043</text:p>
          </table:table-cell>
          <table:table-cell office:value-type="float" office:value="0.999475240707398" calcext:value-type="float">
            <text:p>0.999475240707398</text:p>
          </table:table-cell>
          <table:table-cell office:value-type="float" office:value="0.729399383068085" calcext:value-type="float">
            <text:p>0.729399383068085</text:p>
          </table:table-cell>
          <table:table-cell office:value-type="float" office:value="1.18202292919159" calcext:value-type="float">
            <text:p>1.18202292919159</text:p>
          </table:table-cell>
          <table:table-cell office:value-type="float" office:value="0.0220341365784407" calcext:value-type="float">
            <text:p>0.0220341365784407</text:p>
          </table:table-cell>
          <table:table-cell office:value-type="float" office:value="0.0678586885333061" calcext:value-type="float">
            <text:p>0.0678586885333061</text:p>
          </table:table-cell>
          <table:table-cell office:value-type="float" office:value="0.411314964294434" calcext:value-type="float">
            <text:p>0.411314964294434</text:p>
          </table:table-cell>
          <table:table-cell office:value-type="float" office:value="1.1775164604187" calcext:value-type="float">
            <text:p>1.1775164604187</text:p>
          </table:table-cell>
          <table:table-cell office:value-type="float" office:value="-0.0128569956868887" calcext:value-type="float">
            <text:p>-0.0128569956868887</text:p>
          </table:table-cell>
          <table:table-cell office:value-type="float" office:value="0.0691129192709923" calcext:value-type="float">
            <text:p>0.06911291927099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QRT(([.J149]-[.F149])^2+([.K149]-[.G149])^2)" office:value-type="float" office:value="0.524352908631297" calcext:value-type="float">
            <text:p>0.524352908631297</text:p>
          </table:table-cell>
          <table:table-cell table:formula="of:=SQRT(([.R149]-[.N149])^2+([.S149]-[.O149])^2)" office:value-type="float" office:value="0.317898360867522" calcext:value-type="float">
            <text:p>0.317898360867522</text:p>
          </table:table-cell>
          <table:table-cell table:formula="of:=SQRT(([.R149]-[.F149])^2+([.S149]-[.G149])^2)" office:value-type="float" office:value="0.976761220835116" calcext:value-type="float">
            <text:p>0.976761220835116</text:p>
          </table:table-cell>
          <table:table-cell table:formula="of:=SQRT(([.N149]-[.J149])^2+([.O149]-[.K149])^2)" office:value-type="float" office:value="0.962691800994345" calcext:value-type="float">
            <text:p>0.962691800994345</text:p>
          </table:table-cell>
          <table:table-cell office:value-type="float" office:value="0.817282497882843" calcext:value-type="float">
            <text:p>0.817282497882843</text:p>
          </table:table-cell>
          <table:table-cell office:value-type="float" office:value="0.290932029485703" calcext:value-type="float">
            <text:p>0.290932029485703</text:p>
          </table:table-cell>
          <table:table-cell office:value-type="float" office:value="-0.887317061424255" calcext:value-type="float">
            <text:p>-0.887317061424255</text:p>
          </table:table-cell>
          <table:table-cell office:value-type="float" office:value="0.999353528022766" calcext:value-type="float">
            <text:p>0.999353528022766</text:p>
          </table:table-cell>
          <table:table-cell office:value-type="float" office:value="0.293938368558884" calcext:value-type="float">
            <text:p>0.293938368558884</text:p>
          </table:table-cell>
          <table:table-cell office:value-type="float" office:value="0.323441952466965" calcext:value-type="float">
            <text:p>0.323441952466965</text:p>
          </table:table-cell>
          <table:table-cell office:value-type="float" office:value="-0.877370476722717" calcext:value-type="float">
            <text:p>-0.877370476722717</text:p>
          </table:table-cell>
          <table:table-cell office:value-type="float" office:value="0.999486446380615" calcext:value-type="float">
            <text:p>0.999486446380615</text:p>
          </table:table-cell>
          <table:table-cell office:value-type="float" office:value="0.729217171669006" calcext:value-type="float">
            <text:p>0.729217171669006</text:p>
          </table:table-cell>
          <table:table-cell office:value-type="float" office:value="1.18210828304291" calcext:value-type="float">
            <text:p>1.18210828304291</text:p>
          </table:table-cell>
          <table:table-cell office:value-type="float" office:value="0.021202240139246" calcext:value-type="float">
            <text:p>0.021202240139246</text:p>
          </table:table-cell>
          <table:table-cell office:value-type="float" office:value="0.0721993446350098" calcext:value-type="float">
            <text:p>0.0721993446350098</text:p>
          </table:table-cell>
          <table:table-cell office:value-type="float" office:value="0.411330878734589" calcext:value-type="float">
            <text:p>0.411330878734589</text:p>
          </table:table-cell>
          <table:table-cell office:value-type="float" office:value="1.17933833599091" calcext:value-type="float">
            <text:p>1.17933833599091</text:p>
          </table:table-cell>
          <table:table-cell office:value-type="float" office:value="-0.0121919848024845" calcext:value-type="float">
            <text:p>-0.0121919848024845</text:p>
          </table:table-cell>
          <table:table-cell office:value-type="float" office:value="0.0731362923979759" calcext:value-type="float">
            <text:p>0.07313629239797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QRT(([.J150]-[.F150])^2+([.K150]-[.G150])^2)" office:value-type="float" office:value="0.524334459612691" calcext:value-type="float">
            <text:p>0.524334459612691</text:p>
          </table:table-cell>
          <table:table-cell table:formula="of:=SQRT(([.R150]-[.N150])^2+([.S150]-[.O150])^2)" office:value-type="float" office:value="0.317959624606991" calcext:value-type="float">
            <text:p>0.317959624606991</text:p>
          </table:table-cell>
          <table:table-cell table:formula="of:=SQRT(([.R150]-[.F150])^2+([.S150]-[.G150])^2)" office:value-type="float" office:value="0.975013819629231" calcext:value-type="float">
            <text:p>0.975013819629231</text:p>
          </table:table-cell>
          <table:table-cell table:formula="of:=SQRT(([.N150]-[.J150])^2+([.O150]-[.K150])^2)" office:value-type="float" office:value="0.961515229096861" calcext:value-type="float">
            <text:p>0.961515229096861</text:p>
          </table:table-cell>
          <table:table-cell office:value-type="float" office:value="0.817303061485291" calcext:value-type="float">
            <text:p>0.817303061485291</text:p>
          </table:table-cell>
          <table:table-cell office:value-type="float" office:value="0.290474712848663" calcext:value-type="float">
            <text:p>0.290474712848663</text:p>
          </table:table-cell>
          <table:table-cell office:value-type="float" office:value="-0.877264976501465" calcext:value-type="float">
            <text:p>-0.877264976501465</text:p>
          </table:table-cell>
          <table:table-cell office:value-type="float" office:value="0.999364018440247" calcext:value-type="float">
            <text:p>0.999364018440247</text:p>
          </table:table-cell>
          <table:table-cell office:value-type="float" office:value="0.293920993804932" calcext:value-type="float">
            <text:p>0.293920993804932</text:p>
          </table:table-cell>
          <table:table-cell office:value-type="float" office:value="0.322063267230988" calcext:value-type="float">
            <text:p>0.322063267230988</text:p>
          </table:table-cell>
          <table:table-cell office:value-type="float" office:value="-0.848413646221161" calcext:value-type="float">
            <text:p>-0.848413646221161</text:p>
          </table:table-cell>
          <table:table-cell office:value-type="float" office:value="0.999491095542908" calcext:value-type="float">
            <text:p>0.999491095542908</text:p>
          </table:table-cell>
          <table:table-cell office:value-type="float" office:value="0.729209542274475" calcext:value-type="float">
            <text:p>0.729209542274475</text:p>
          </table:table-cell>
          <table:table-cell office:value-type="float" office:value="1.17940533161163" calcext:value-type="float">
            <text:p>1.17940533161163</text:p>
          </table:table-cell>
          <table:table-cell office:value-type="float" office:value="0.020424610003829" calcext:value-type="float">
            <text:p>0.020424610003829</text:p>
          </table:table-cell>
          <table:table-cell office:value-type="float" office:value="0.072498269379139" calcext:value-type="float">
            <text:p>0.072498269379139</text:p>
          </table:table-cell>
          <table:table-cell office:value-type="float" office:value="0.411259651184082" calcext:value-type="float">
            <text:p>0.411259651184082</text:p>
          </table:table-cell>
          <table:table-cell office:value-type="float" office:value="1.17691743373871" calcext:value-type="float">
            <text:p>1.17691743373871</text:p>
          </table:table-cell>
          <table:table-cell office:value-type="float" office:value="-0.0115498127415776" calcext:value-type="float">
            <text:p>-0.0115498127415776</text:p>
          </table:table-cell>
          <table:table-cell office:value-type="float" office:value="0.0731205940246582" calcext:value-type="float">
            <text:p>0.0731205940246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([.J151]-[.F151])^2+([.K151]-[.G151])^2)" office:value-type="float" office:value="0.526937756329297" calcext:value-type="float">
            <text:p>0.526937756329297</text:p>
          </table:table-cell>
          <table:table-cell table:formula="of:=SQRT(([.R151]-[.N151])^2+([.S151]-[.O151])^2)" office:value-type="float" office:value="0.317432953125981" calcext:value-type="float">
            <text:p>0.317432953125981</text:p>
          </table:table-cell>
          <table:table-cell table:formula="of:=SQRT(([.R151]-[.F151])^2+([.S151]-[.G151])^2)" office:value-type="float" office:value="0.975825667023647" calcext:value-type="float">
            <text:p>0.975825667023647</text:p>
          </table:table-cell>
          <table:table-cell table:formula="of:=SQRT(([.N151]-[.J151])^2+([.O151]-[.K151])^2)" office:value-type="float" office:value="0.960558169952045" calcext:value-type="float">
            <text:p>0.960558169952045</text:p>
          </table:table-cell>
          <table:table-cell office:value-type="float" office:value="0.817376017570496" calcext:value-type="float">
            <text:p>0.817376017570496</text:p>
          </table:table-cell>
          <table:table-cell office:value-type="float" office:value="0.290304124355316" calcext:value-type="float">
            <text:p>0.290304124355316</text:p>
          </table:table-cell>
          <table:table-cell office:value-type="float" office:value="-0.978807628154755" calcext:value-type="float">
            <text:p>-0.978807628154755</text:p>
          </table:table-cell>
          <table:table-cell office:value-type="float" office:value="0.999384582042694" calcext:value-type="float">
            <text:p>0.999384582042694</text:p>
          </table:table-cell>
          <table:table-cell office:value-type="float" office:value="0.291416198015213" calcext:value-type="float">
            <text:p>0.291416198015213</text:p>
          </table:table-cell>
          <table:table-cell office:value-type="float" office:value="0.322392553091049" calcext:value-type="float">
            <text:p>0.322392553091049</text:p>
          </table:table-cell>
          <table:table-cell office:value-type="float" office:value="-0.921018123626709" calcext:value-type="float">
            <text:p>-0.921018123626709</text:p>
          </table:table-cell>
          <table:table-cell office:value-type="float" office:value="0.999499619007111" calcext:value-type="float">
            <text:p>0.999499619007111</text:p>
          </table:table-cell>
          <table:table-cell office:value-type="float" office:value="0.727926254272461" calcext:value-type="float">
            <text:p>0.727926254272461</text:p>
          </table:table-cell>
          <table:table-cell office:value-type="float" office:value="1.17803907394409" calcext:value-type="float">
            <text:p>1.17803907394409</text:p>
          </table:table-cell>
          <table:table-cell office:value-type="float" office:value="0.0160667784512043" calcext:value-type="float">
            <text:p>0.0160667784512043</text:p>
          </table:table-cell>
          <table:table-cell office:value-type="float" office:value="0.0739386975765228" calcext:value-type="float">
            <text:p>0.0739386975765228</text:p>
          </table:table-cell>
          <table:table-cell office:value-type="float" office:value="0.410494267940521" calcext:value-type="float">
            <text:p>0.410494267940521</text:p>
          </table:table-cell>
          <table:table-cell office:value-type="float" office:value="1.17725563049316" calcext:value-type="float">
            <text:p>1.17725563049316</text:p>
          </table:table-cell>
          <table:table-cell office:value-type="float" office:value="-0.00718616787344217" calcext:value-type="float">
            <text:p>-0.00718616787344217</text:p>
          </table:table-cell>
          <table:table-cell office:value-type="float" office:value="0.0738778114318848" calcext:value-type="float">
            <text:p>0.07387781143188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QRT(([.J152]-[.F152])^2+([.K152]-[.G152])^2)" office:value-type="float" office:value="0.528010370262696" calcext:value-type="float">
            <text:p>0.528010370262696</text:p>
          </table:table-cell>
          <table:table-cell table:formula="of:=SQRT(([.R152]-[.N152])^2+([.S152]-[.O152])^2)" office:value-type="float" office:value="0.318599190348616" calcext:value-type="float">
            <text:p>0.318599190348616</text:p>
          </table:table-cell>
          <table:table-cell table:formula="of:=SQRT(([.R152]-[.F152])^2+([.S152]-[.G152])^2)" office:value-type="float" office:value="0.981457059673836" calcext:value-type="float">
            <text:p>0.981457059673836</text:p>
          </table:table-cell>
          <table:table-cell table:formula="of:=SQRT(([.N152]-[.J152])^2+([.O152]-[.K152])^2)" office:value-type="float" office:value="0.963520007230623" calcext:value-type="float">
            <text:p>0.963520007230623</text:p>
          </table:table-cell>
          <table:table-cell office:value-type="float" office:value="0.81734037399292" calcext:value-type="float">
            <text:p>0.81734037399292</text:p>
          </table:table-cell>
          <table:table-cell office:value-type="float" office:value="0.290221601724625" calcext:value-type="float">
            <text:p>0.290221601724625</text:p>
          </table:table-cell>
          <table:table-cell office:value-type="float" office:value="-0.793191075325012" calcext:value-type="float">
            <text:p>-0.793191075325012</text:p>
          </table:table-cell>
          <table:table-cell office:value-type="float" office:value="0.99941211938858" calcext:value-type="float">
            <text:p>0.99941211938858</text:p>
          </table:table-cell>
          <table:table-cell office:value-type="float" office:value="0.290318191051483" calcext:value-type="float">
            <text:p>0.290318191051483</text:p>
          </table:table-cell>
          <table:table-cell office:value-type="float" office:value="0.322510451078415" calcext:value-type="float">
            <text:p>0.322510451078415</text:p>
          </table:table-cell>
          <table:table-cell office:value-type="float" office:value="-0.80284309387207" calcext:value-type="float">
            <text:p>-0.80284309387207</text:p>
          </table:table-cell>
          <table:table-cell office:value-type="float" office:value="0.999516129493713" calcext:value-type="float">
            <text:p>0.999516129493713</text:p>
          </table:table-cell>
          <table:table-cell office:value-type="float" office:value="0.727181792259216" calcext:value-type="float">
            <text:p>0.727181792259216</text:p>
          </table:table-cell>
          <table:table-cell office:value-type="float" office:value="1.18130087852478" calcext:value-type="float">
            <text:p>1.18130087852478</text:p>
          </table:table-cell>
          <table:table-cell office:value-type="float" office:value="0.018744083121419" calcext:value-type="float">
            <text:p>0.018744083121419</text:p>
          </table:table-cell>
          <table:table-cell office:value-type="float" office:value="0.07259701192379" calcext:value-type="float">
            <text:p>0.07259701192379</text:p>
          </table:table-cell>
          <table:table-cell office:value-type="float" office:value="0.408584892749786" calcext:value-type="float">
            <text:p>0.408584892749786</text:p>
          </table:table-cell>
          <table:table-cell office:value-type="float" office:value="1.18250906467438" calcext:value-type="float">
            <text:p>1.18250906467438</text:p>
          </table:table-cell>
          <table:table-cell office:value-type="float" office:value="-0.00956145767122507" calcext:value-type="float">
            <text:p>-0.00956145767122507</text:p>
          </table:table-cell>
          <table:table-cell office:value-type="float" office:value="0.0724489763379097" calcext:value-type="float">
            <text:p>0.07244897633790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QRT(([.J153]-[.F153])^2+([.K153]-[.G153])^2)" office:value-type="float" office:value="0.523785841467349" calcext:value-type="float">
            <text:p>0.523785841467349</text:p>
          </table:table-cell>
          <table:table-cell table:formula="of:=SQRT(([.R153]-[.N153])^2+([.S153]-[.O153])^2)" office:value-type="float" office:value="0.319956891011645" calcext:value-type="float">
            <text:p>0.319956891011645</text:p>
          </table:table-cell>
          <table:table-cell table:formula="of:=SQRT(([.R153]-[.F153])^2+([.S153]-[.G153])^2)" office:value-type="float" office:value="0.977022421278771" calcext:value-type="float">
            <text:p>0.977022421278771</text:p>
          </table:table-cell>
          <table:table-cell table:formula="of:=SQRT(([.N153]-[.J153])^2+([.O153]-[.K153])^2)" office:value-type="float" office:value="0.969893345429245" calcext:value-type="float">
            <text:p>0.969893345429245</text:p>
          </table:table-cell>
          <table:table-cell office:value-type="float" office:value="0.815620124340057" calcext:value-type="float">
            <text:p>0.815620124340057</text:p>
          </table:table-cell>
          <table:table-cell office:value-type="float" office:value="0.287267327308655" calcext:value-type="float">
            <text:p>0.287267327308655</text:p>
          </table:table-cell>
          <table:table-cell office:value-type="float" office:value="-0.709192991256714" calcext:value-type="float">
            <text:p>-0.709192991256714</text:p>
          </table:table-cell>
          <table:table-cell office:value-type="float" office:value="0.999278724193573" calcext:value-type="float">
            <text:p>0.999278724193573</text:p>
          </table:table-cell>
          <table:table-cell office:value-type="float" office:value="0.292325735092163" calcext:value-type="float">
            <text:p>0.292325735092163</text:p>
          </table:table-cell>
          <table:table-cell office:value-type="float" office:value="0.309951901435852" calcext:value-type="float">
            <text:p>0.309951901435852</text:p>
          </table:table-cell>
          <table:table-cell office:value-type="float" office:value="-0.671261608600617" calcext:value-type="float">
            <text:p>-0.671261608600617</text:p>
          </table:table-cell>
          <table:table-cell office:value-type="float" office:value="0.999459028244019" calcext:value-type="float">
            <text:p>0.999459028244019</text:p>
          </table:table-cell>
          <table:table-cell office:value-type="float" office:value="0.728665471076965" calcext:value-type="float">
            <text:p>0.728665471076965</text:p>
          </table:table-cell>
          <table:table-cell office:value-type="float" office:value="1.1761509180069" calcext:value-type="float">
            <text:p>1.1761509180069</text:p>
          </table:table-cell>
          <table:table-cell office:value-type="float" office:value="0.0184234846383333" calcext:value-type="float">
            <text:p>0.0184234846383333</text:p>
          </table:table-cell>
          <table:table-cell office:value-type="float" office:value="0.0719155594706535" calcext:value-type="float">
            <text:p>0.0719155594706535</text:p>
          </table:table-cell>
          <table:table-cell office:value-type="float" office:value="0.408709198236465" calcext:value-type="float">
            <text:p>0.408709198236465</text:p>
          </table:table-cell>
          <table:table-cell office:value-type="float" office:value="1.17552196979523" calcext:value-type="float">
            <text:p>1.17552196979523</text:p>
          </table:table-cell>
          <table:table-cell office:value-type="float" office:value="-0.00914117135107517" calcext:value-type="float">
            <text:p>-0.00914117135107517</text:p>
          </table:table-cell>
          <table:table-cell office:value-type="float" office:value="0.0732282474637032" calcext:value-type="float">
            <text:p>0.07322824746370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QRT(([.J154]-[.F154])^2+([.K154]-[.G154])^2)" office:value-type="float" office:value="0.525798140287369" calcext:value-type="float">
            <text:p>0.525798140287369</text:p>
          </table:table-cell>
          <table:table-cell table:formula="of:=SQRT(([.R154]-[.N154])^2+([.S154]-[.O154])^2)" office:value-type="float" office:value="0.318905612793268" calcext:value-type="float">
            <text:p>0.318905612793268</text:p>
          </table:table-cell>
          <table:table-cell table:formula="of:=SQRT(([.R154]-[.F154])^2+([.S154]-[.G154])^2)" office:value-type="float" office:value="0.976805795181313" calcext:value-type="float">
            <text:p>0.976805795181313</text:p>
          </table:table-cell>
          <table:table-cell table:formula="of:=SQRT(([.N154]-[.J154])^2+([.O154]-[.K154])^2)" office:value-type="float" office:value="0.967682350085443" calcext:value-type="float">
            <text:p>0.967682350085443</text:p>
          </table:table-cell>
          <table:table-cell office:value-type="float" office:value="0.815638661384583" calcext:value-type="float">
            <text:p>0.815638661384583</text:p>
          </table:table-cell>
          <table:table-cell office:value-type="float" office:value="0.287518352270126" calcext:value-type="float">
            <text:p>0.287518352270126</text:p>
          </table:table-cell>
          <table:table-cell office:value-type="float" office:value="-0.818239212036133" calcext:value-type="float">
            <text:p>-0.818239212036133</text:p>
          </table:table-cell>
          <table:table-cell office:value-type="float" office:value="0.999305307865143" calcext:value-type="float">
            <text:p>0.999305307865143</text:p>
          </table:table-cell>
          <table:table-cell office:value-type="float" office:value="0.290444493293762" calcext:value-type="float">
            <text:p>0.290444493293762</text:p>
          </table:table-cell>
          <table:table-cell office:value-type="float" office:value="0.312712997198105" calcext:value-type="float">
            <text:p>0.312712997198105</text:p>
          </table:table-cell>
          <table:table-cell office:value-type="float" office:value="-0.817552864551544" calcext:value-type="float">
            <text:p>-0.817552864551544</text:p>
          </table:table-cell>
          <table:table-cell office:value-type="float" office:value="0.999471247196198" calcext:value-type="float">
            <text:p>0.999471247196198</text:p>
          </table:table-cell>
          <table:table-cell office:value-type="float" office:value="0.728356778621674" calcext:value-type="float">
            <text:p>0.728356778621674</text:p>
          </table:table-cell>
          <table:table-cell office:value-type="float" office:value="1.17563939094543" calcext:value-type="float">
            <text:p>1.17563939094543</text:p>
          </table:table-cell>
          <table:table-cell office:value-type="float" office:value="0.018401462584734" calcext:value-type="float">
            <text:p>0.018401462584734</text:p>
          </table:table-cell>
          <table:table-cell office:value-type="float" office:value="0.0724091827869415" calcext:value-type="float">
            <text:p>0.0724091827869415</text:p>
          </table:table-cell>
          <table:table-cell office:value-type="float" office:value="0.409451246261597" calcext:value-type="float">
            <text:p>0.409451246261597</text:p>
          </table:table-cell>
          <table:table-cell office:value-type="float" office:value="1.17586588859558" calcext:value-type="float">
            <text:p>1.17586588859558</text:p>
          </table:table-cell>
          <table:table-cell office:value-type="float" office:value="-0.00912369042634964" calcext:value-type="float">
            <text:p>-0.00912369042634964</text:p>
          </table:table-cell>
          <table:table-cell office:value-type="float" office:value="0.073453463613987" calcext:value-type="float">
            <text:p>0.0734534636139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QRT(([.J155]-[.F155])^2+([.K155]-[.G155])^2)" office:value-type="float" office:value="0.524649894188753" calcext:value-type="float">
            <text:p>0.524649894188753</text:p>
          </table:table-cell>
          <table:table-cell table:formula="of:=SQRT(([.R155]-[.N155])^2+([.S155]-[.O155])^2)" office:value-type="float" office:value="0.319006485248478" calcext:value-type="float">
            <text:p>0.319006485248478</text:p>
          </table:table-cell>
          <table:table-cell table:formula="of:=SQRT(([.R155]-[.F155])^2+([.S155]-[.G155])^2)" office:value-type="float" office:value="0.97776559060727" calcext:value-type="float">
            <text:p>0.97776559060727</text:p>
          </table:table-cell>
          <table:table-cell table:formula="of:=SQRT(([.N155]-[.J155])^2+([.O155]-[.K155])^2)" office:value-type="float" office:value="0.969141232301769" calcext:value-type="float">
            <text:p>0.969141232301769</text:p>
          </table:table-cell>
          <table:table-cell office:value-type="float" office:value="0.815693855285645" calcext:value-type="float">
            <text:p>0.815693855285645</text:p>
          </table:table-cell>
          <table:table-cell office:value-type="float" office:value="0.285837441682816" calcext:value-type="float">
            <text:p>0.285837441682816</text:p>
          </table:table-cell>
          <table:table-cell office:value-type="float" office:value="-0.790224552154541" calcext:value-type="float">
            <text:p>-0.790224552154541</text:p>
          </table:table-cell>
          <table:table-cell office:value-type="float" office:value="0.999306976795197" calcext:value-type="float">
            <text:p>0.999306976795197</text:p>
          </table:table-cell>
          <table:table-cell office:value-type="float" office:value="0.291648775339127" calcext:value-type="float">
            <text:p>0.291648775339127</text:p>
          </table:table-cell>
          <table:table-cell office:value-type="float" office:value="0.311022073030472" calcext:value-type="float">
            <text:p>0.311022073030472</text:p>
          </table:table-cell>
          <table:table-cell office:value-type="float" office:value="-0.712167918682098" calcext:value-type="float">
            <text:p>-0.712167918682098</text:p>
          </table:table-cell>
          <table:table-cell office:value-type="float" office:value="0.999478757381439" calcext:value-type="float">
            <text:p>0.999478757381439</text:p>
          </table:table-cell>
          <table:table-cell office:value-type="float" office:value="0.729120314121246" calcext:value-type="float">
            <text:p>0.729120314121246</text:p>
          </table:table-cell>
          <table:table-cell office:value-type="float" office:value="1.17580723762512" calcext:value-type="float">
            <text:p>1.17580723762512</text:p>
          </table:table-cell>
          <table:table-cell office:value-type="float" office:value="0.0158461332321167" calcext:value-type="float">
            <text:p>0.0158461332321167</text:p>
          </table:table-cell>
          <table:table-cell office:value-type="float" office:value="0.0712794363498688" calcext:value-type="float">
            <text:p>0.0712794363498688</text:p>
          </table:table-cell>
          <table:table-cell office:value-type="float" office:value="0.410113960504532" calcext:value-type="float">
            <text:p>0.410113960504532</text:p>
          </table:table-cell>
          <table:table-cell office:value-type="float" office:value="1.17551743984222" calcext:value-type="float">
            <text:p>1.17551743984222</text:p>
          </table:table-cell>
          <table:table-cell office:value-type="float" office:value="-0.00669165700674057" calcext:value-type="float">
            <text:p>-0.00669165700674057</text:p>
          </table:table-cell>
          <table:table-cell office:value-type="float" office:value="0.0728126093745232" calcext:value-type="float">
            <text:p>0.07281260937452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QRT(([.J156]-[.F156])^2+([.K156]-[.G156])^2)" office:value-type="float" office:value="0.522895232426131" calcext:value-type="float">
            <text:p>0.522895232426131</text:p>
          </table:table-cell>
          <table:table-cell table:formula="of:=SQRT(([.R156]-[.N156])^2+([.S156]-[.O156])^2)" office:value-type="float" office:value="0.31747216512715" calcext:value-type="float">
            <text:p>0.31747216512715</text:p>
          </table:table-cell>
          <table:table-cell table:formula="of:=SQRT(([.R156]-[.F156])^2+([.S156]-[.G156])^2)" office:value-type="float" office:value="0.979413202111575" calcext:value-type="float">
            <text:p>0.979413202111575</text:p>
          </table:table-cell>
          <table:table-cell table:formula="of:=SQRT(([.N156]-[.J156])^2+([.O156]-[.K156])^2)" office:value-type="float" office:value="0.970542664450221" calcext:value-type="float">
            <text:p>0.970542664450221</text:p>
          </table:table-cell>
          <table:table-cell office:value-type="float" office:value="0.815543651580811" calcext:value-type="float">
            <text:p>0.815543651580811</text:p>
          </table:table-cell>
          <table:table-cell office:value-type="float" office:value="0.282958954572678" calcext:value-type="float">
            <text:p>0.282958954572678</text:p>
          </table:table-cell>
          <table:table-cell office:value-type="float" office:value="-0.769278645515442" calcext:value-type="float">
            <text:p>-0.769278645515442</text:p>
          </table:table-cell>
          <table:table-cell office:value-type="float" office:value="0.999312400817871" calcext:value-type="float">
            <text:p>0.999312400817871</text:p>
          </table:table-cell>
          <table:table-cell office:value-type="float" office:value="0.293296039104462" calcext:value-type="float">
            <text:p>0.293296039104462</text:p>
          </table:table-cell>
          <table:table-cell office:value-type="float" office:value="0.308975398540497" calcext:value-type="float">
            <text:p>0.308975398540497</text:p>
          </table:table-cell>
          <table:table-cell office:value-type="float" office:value="-0.705941081047058" calcext:value-type="float">
            <text:p>-0.705941081047058</text:p>
          </table:table-cell>
          <table:table-cell office:value-type="float" office:value="0.999475598335266" calcext:value-type="float">
            <text:p>0.999475598335266</text:p>
          </table:table-cell>
          <table:table-cell office:value-type="float" office:value="0.730172038078308" calcext:value-type="float">
            <text:p>0.730172038078308</text:p>
          </table:table-cell>
          <table:table-cell office:value-type="float" office:value="1.17563128471375" calcext:value-type="float">
            <text:p>1.17563128471375</text:p>
          </table:table-cell>
          <table:table-cell office:value-type="float" office:value="0.015506942756474" calcext:value-type="float">
            <text:p>0.015506942756474</text:p>
          </table:table-cell>
          <table:table-cell office:value-type="float" office:value="0.069523461163044" calcext:value-type="float">
            <text:p>0.069523461163044</text:p>
          </table:table-cell>
          <table:table-cell office:value-type="float" office:value="0.41269987821579" calcext:value-type="float">
            <text:p>0.41269987821579</text:p>
          </table:table-cell>
          <table:table-cell office:value-type="float" office:value="1.17568910121918" calcext:value-type="float">
            <text:p>1.17568910121918</text:p>
          </table:table-cell>
          <table:table-cell office:value-type="float" office:value="-0.00632379855960608" calcext:value-type="float">
            <text:p>-0.00632379855960608</text:p>
          </table:table-cell>
          <table:table-cell office:value-type="float" office:value="0.0710538327693939" calcext:value-type="float">
            <text:p>0.07105383276939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QRT(([.J157]-[.F157])^2+([.K157]-[.G157])^2)" office:value-type="float" office:value="0.523875929467944" calcext:value-type="float">
            <text:p>0.523875929467944</text:p>
          </table:table-cell>
          <table:table-cell table:formula="of:=SQRT(([.R157]-[.N157])^2+([.S157]-[.O157])^2)" office:value-type="float" office:value="0.318977674754594" calcext:value-type="float">
            <text:p>0.318977674754594</text:p>
          </table:table-cell>
          <table:table-cell table:formula="of:=SQRT(([.R157]-[.F157])^2+([.S157]-[.G157])^2)" office:value-type="float" office:value="0.979710999617397" calcext:value-type="float">
            <text:p>0.979710999617397</text:p>
          </table:table-cell>
          <table:table-cell table:formula="of:=SQRT(([.N157]-[.J157])^2+([.O157]-[.K157])^2)" office:value-type="float" office:value="0.96832904437468" calcext:value-type="float">
            <text:p>0.96832904437468</text:p>
          </table:table-cell>
          <table:table-cell office:value-type="float" office:value="0.815741062164307" calcext:value-type="float">
            <text:p>0.815741062164307</text:p>
          </table:table-cell>
          <table:table-cell office:value-type="float" office:value="0.282965958118439" calcext:value-type="float">
            <text:p>0.282965958118439</text:p>
          </table:table-cell>
          <table:table-cell office:value-type="float" office:value="-0.863183379173279" calcext:value-type="float">
            <text:p>-0.863183379173279</text:p>
          </table:table-cell>
          <table:table-cell office:value-type="float" office:value="0.999330878257752" calcext:value-type="float">
            <text:p>0.999330878257752</text:p>
          </table:table-cell>
          <table:table-cell office:value-type="float" office:value="0.292593628168106" calcext:value-type="float">
            <text:p>0.292593628168106</text:p>
          </table:table-cell>
          <table:table-cell office:value-type="float" office:value="0.310583919286728" calcext:value-type="float">
            <text:p>0.310583919286728</text:p>
          </table:table-cell>
          <table:table-cell office:value-type="float" office:value="-0.795629978179932" calcext:value-type="float">
            <text:p>-0.795629978179932</text:p>
          </table:table-cell>
          <table:table-cell office:value-type="float" office:value="0.999482929706574" calcext:value-type="float">
            <text:p>0.999482929706574</text:p>
          </table:table-cell>
          <table:table-cell office:value-type="float" office:value="0.730109512805939" calcext:value-type="float">
            <text:p>0.730109512805939</text:p>
          </table:table-cell>
          <table:table-cell office:value-type="float" office:value="1.17443633079529" calcext:value-type="float">
            <text:p>1.17443633079529</text:p>
          </table:table-cell>
          <table:table-cell office:value-type="float" office:value="0.0156621374189854" calcext:value-type="float">
            <text:p>0.0156621374189854</text:p>
          </table:table-cell>
          <table:table-cell office:value-type="float" office:value="0.0690958499908447" calcext:value-type="float">
            <text:p>0.0690958499908447</text:p>
          </table:table-cell>
          <table:table-cell office:value-type="float" office:value="0.4111328125" calcext:value-type="float">
            <text:p>0.4111328125</text:p>
          </table:table-cell>
          <table:table-cell office:value-type="float" office:value="1.17522478103638" calcext:value-type="float">
            <text:p>1.17522478103638</text:p>
          </table:table-cell>
          <table:table-cell office:value-type="float" office:value="-0.00647241482511163" calcext:value-type="float">
            <text:p>-0.00647241482511163</text:p>
          </table:table-cell>
          <table:table-cell office:value-type="float" office:value="0.0701724290847778" calcext:value-type="float">
            <text:p>0.07017242908477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QRT(([.J158]-[.F158])^2+([.K158]-[.G158])^2)" office:value-type="float" office:value="0.528629556926917" calcext:value-type="float">
            <text:p>0.528629556926917</text:p>
          </table:table-cell>
          <table:table-cell table:formula="of:=SQRT(([.R158]-[.N158])^2+([.S158]-[.O158])^2)" office:value-type="float" office:value="0.31998411454166" calcext:value-type="float">
            <text:p>0.31998411454166</text:p>
          </table:table-cell>
          <table:table-cell table:formula="of:=SQRT(([.R158]-[.F158])^2+([.S158]-[.G158])^2)" office:value-type="float" office:value="0.982527232530638" calcext:value-type="float">
            <text:p>0.982527232530638</text:p>
          </table:table-cell>
          <table:table-cell table:formula="of:=SQRT(([.N158]-[.J158])^2+([.O158]-[.K158])^2)" office:value-type="float" office:value="0.965386635571793" calcext:value-type="float">
            <text:p>0.965386635571793</text:p>
          </table:table-cell>
          <table:table-cell office:value-type="float" office:value="0.81847494840622" calcext:value-type="float">
            <text:p>0.81847494840622</text:p>
          </table:table-cell>
          <table:table-cell office:value-type="float" office:value="0.284955650568008" calcext:value-type="float">
            <text:p>0.284955650568008</text:p>
          </table:table-cell>
          <table:table-cell office:value-type="float" office:value="-0.916831493377686" calcext:value-type="float">
            <text:p>-0.916831493377686</text:p>
          </table:table-cell>
          <table:table-cell office:value-type="float" office:value="0.999345719814301" calcext:value-type="float">
            <text:p>0.999345719814301</text:p>
          </table:table-cell>
          <table:table-cell office:value-type="float" office:value="0.290990442037582" calcext:value-type="float">
            <text:p>0.290990442037582</text:p>
          </table:table-cell>
          <table:table-cell office:value-type="float" office:value="0.319730699062347" calcext:value-type="float">
            <text:p>0.319730699062347</text:p>
          </table:table-cell>
          <table:table-cell office:value-type="float" office:value="-0.927655696868897" calcext:value-type="float">
            <text:p>-0.927655696868897</text:p>
          </table:table-cell>
          <table:table-cell office:value-type="float" office:value="0.999494731426239" calcext:value-type="float">
            <text:p>0.999494731426239</text:p>
          </table:table-cell>
          <table:table-cell office:value-type="float" office:value="0.731064856052399" calcext:value-type="float">
            <text:p>0.731064856052399</text:p>
          </table:table-cell>
          <table:table-cell office:value-type="float" office:value="1.17897796630859" calcext:value-type="float">
            <text:p>1.17897796630859</text:p>
          </table:table-cell>
          <table:table-cell office:value-type="float" office:value="0.0174683518707752" calcext:value-type="float">
            <text:p>0.0174683518707752</text:p>
          </table:table-cell>
          <table:table-cell office:value-type="float" office:value="0.0706282332539558" calcext:value-type="float">
            <text:p>0.0706282332539558</text:p>
          </table:table-cell>
          <table:table-cell office:value-type="float" office:value="0.411080747842789" calcext:value-type="float">
            <text:p>0.411080747842789</text:p>
          </table:table-cell>
          <table:table-cell office:value-type="float" office:value="1.17904162406921" calcext:value-type="float">
            <text:p>1.17904162406921</text:p>
          </table:table-cell>
          <table:table-cell office:value-type="float" office:value="-0.00819547101855278" calcext:value-type="float">
            <text:p>-0.00819547101855278</text:p>
          </table:table-cell>
          <table:table-cell office:value-type="float" office:value="0.0720108598470688" calcext:value-type="float">
            <text:p>0.07201085984706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QRT(([.J159]-[.F159])^2+([.K159]-[.G159])^2)" office:value-type="float" office:value="0.528168380985101" calcext:value-type="float">
            <text:p>0.528168380985101</text:p>
          </table:table-cell>
          <table:table-cell table:formula="of:=SQRT(([.R159]-[.N159])^2+([.S159]-[.O159])^2)" office:value-type="float" office:value="0.321128723716112" calcext:value-type="float">
            <text:p>0.321128723716112</text:p>
          </table:table-cell>
          <table:table-cell table:formula="of:=SQRT(([.R159]-[.F159])^2+([.S159]-[.G159])^2)" office:value-type="float" office:value="0.984574332573792" calcext:value-type="float">
            <text:p>0.984574332573792</text:p>
          </table:table-cell>
          <table:table-cell table:formula="of:=SQRT(([.N159]-[.J159])^2+([.O159]-[.K159])^2)" office:value-type="float" office:value="0.972728546418603" calcext:value-type="float">
            <text:p>0.972728546418603</text:p>
          </table:table-cell>
          <table:table-cell office:value-type="float" office:value="0.818404197692871" calcext:value-type="float">
            <text:p>0.818404197692871</text:p>
          </table:table-cell>
          <table:table-cell office:value-type="float" office:value="0.282683223485947" calcext:value-type="float">
            <text:p>0.282683223485947</text:p>
          </table:table-cell>
          <table:table-cell office:value-type="float" office:value="-0.895880341529846" calcext:value-type="float">
            <text:p>-0.895880341529846</text:p>
          </table:table-cell>
          <table:table-cell office:value-type="float" office:value="0.999343574047089" calcext:value-type="float">
            <text:p>0.999343574047089</text:p>
          </table:table-cell>
          <table:table-cell office:value-type="float" office:value="0.291109263896942" calcext:value-type="float">
            <text:p>0.291109263896942</text:p>
          </table:table-cell>
          <table:table-cell office:value-type="float" office:value="0.313045889139175" calcext:value-type="float">
            <text:p>0.313045889139175</text:p>
          </table:table-cell>
          <table:table-cell office:value-type="float" office:value="-0.901135563850403" calcext:value-type="float">
            <text:p>-0.901135563850403</text:p>
          </table:table-cell>
          <table:table-cell office:value-type="float" office:value="0.999503672122955" calcext:value-type="float">
            <text:p>0.999503672122955</text:p>
          </table:table-cell>
          <table:table-cell office:value-type="float" office:value="0.732300341129303" calcext:value-type="float">
            <text:p>0.732300341129303</text:p>
          </table:table-cell>
          <table:table-cell office:value-type="float" office:value="1.17996644973755" calcext:value-type="float">
            <text:p>1.17996644973755</text:p>
          </table:table-cell>
          <table:table-cell office:value-type="float" office:value="0.0175045449286699" calcext:value-type="float">
            <text:p>0.0175045449286699</text:p>
          </table:table-cell>
          <table:table-cell office:value-type="float" office:value="0.0705703273415566" calcext:value-type="float">
            <text:p>0.0705703273415566</text:p>
          </table:table-cell>
          <table:table-cell office:value-type="float" office:value="0.411172807216644" calcext:value-type="float">
            <text:p>0.411172807216644</text:p>
          </table:table-cell>
          <table:table-cell office:value-type="float" office:value="1.17909228801727" calcext:value-type="float">
            <text:p>1.17909228801727</text:p>
          </table:table-cell>
          <table:table-cell office:value-type="float" office:value="-0.00825965963304043" calcext:value-type="float">
            <text:p>-0.00825965963304043</text:p>
          </table:table-cell>
          <table:table-cell office:value-type="float" office:value="0.0723487660288811" calcext:value-type="float">
            <text:p>0.07234876602888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QRT(([.J160]-[.F160])^2+([.K160]-[.G160])^2)" office:value-type="float" office:value="0.529985303265719" calcext:value-type="float">
            <text:p>0.529985303265719</text:p>
          </table:table-cell>
          <table:table-cell table:formula="of:=SQRT(([.R160]-[.N160])^2+([.S160]-[.O160])^2)" office:value-type="float" office:value="0.322629887991635" calcext:value-type="float">
            <text:p>0.322629887991635</text:p>
          </table:table-cell>
          <table:table-cell table:formula="of:=SQRT(([.R160]-[.F160])^2+([.S160]-[.G160])^2)" office:value-type="float" office:value="0.988906823167145" calcext:value-type="float">
            <text:p>0.988906823167145</text:p>
          </table:table-cell>
          <table:table-cell table:formula="of:=SQRT(([.N160]-[.J160])^2+([.O160]-[.K160])^2)" office:value-type="float" office:value="0.977673744423892" calcext:value-type="float">
            <text:p>0.977673744423892</text:p>
          </table:table-cell>
          <table:table-cell office:value-type="float" office:value="0.819409191608429" calcext:value-type="float">
            <text:p>0.819409191608429</text:p>
          </table:table-cell>
          <table:table-cell office:value-type="float" office:value="0.28284165263176" calcext:value-type="float">
            <text:p>0.28284165263176</text:p>
          </table:table-cell>
          <table:table-cell office:value-type="float" office:value="-0.909304320812225" calcext:value-type="float">
            <text:p>-0.909304320812225</text:p>
          </table:table-cell>
          <table:table-cell office:value-type="float" office:value="0.999378025531769" calcext:value-type="float">
            <text:p>0.999378025531769</text:p>
          </table:table-cell>
          <table:table-cell office:value-type="float" office:value="0.290283530950546" calcext:value-type="float">
            <text:p>0.290283530950546</text:p>
          </table:table-cell>
          <table:table-cell office:value-type="float" office:value="0.313015431165695" calcext:value-type="float">
            <text:p>0.313015431165695</text:p>
          </table:table-cell>
          <table:table-cell office:value-type="float" office:value="-0.889010727405548" calcext:value-type="float">
            <text:p>-0.889010727405548</text:p>
          </table:table-cell>
          <table:table-cell office:value-type="float" office:value="0.999520480632782" calcext:value-type="float">
            <text:p>0.999520480632782</text:p>
          </table:table-cell>
          <table:table-cell office:value-type="float" office:value="0.731423079967499" calcext:value-type="float">
            <text:p>0.731423079967499</text:p>
          </table:table-cell>
          <table:table-cell office:value-type="float" office:value="1.18550717830658" calcext:value-type="float">
            <text:p>1.18550717830658</text:p>
          </table:table-cell>
          <table:table-cell office:value-type="float" office:value="0.0175117924809456" calcext:value-type="float">
            <text:p>0.0175117924809456</text:p>
          </table:table-cell>
          <table:table-cell office:value-type="float" office:value="0.0705354511737824" calcext:value-type="float">
            <text:p>0.0705354511737824</text:p>
          </table:table-cell>
          <table:table-cell office:value-type="float" office:value="0.408807426691055" calcext:value-type="float">
            <text:p>0.408807426691055</text:p>
          </table:table-cell>
          <table:table-cell office:value-type="float" office:value="1.18247652053833" calcext:value-type="float">
            <text:p>1.18247652053833</text:p>
          </table:table-cell>
          <table:table-cell office:value-type="float" office:value="-0.00826316792517901" calcext:value-type="float">
            <text:p>-0.00826316792517901</text:p>
          </table:table-cell>
          <table:table-cell office:value-type="float" office:value="0.0716233178973198" calcext:value-type="float">
            <text:p>0.07162331789731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QRT(([.J161]-[.F161])^2+([.K161]-[.G161])^2)" office:value-type="float" office:value="0.534795195727478" calcext:value-type="float">
            <text:p>0.534795195727478</text:p>
          </table:table-cell>
          <table:table-cell table:formula="of:=SQRT(([.R161]-[.N161])^2+([.S161]-[.O161])^2)" office:value-type="float" office:value="0.326808213831512" calcext:value-type="float">
            <text:p>0.326808213831512</text:p>
          </table:table-cell>
          <table:table-cell table:formula="of:=SQRT(([.R161]-[.F161])^2+([.S161]-[.G161])^2)" office:value-type="float" office:value="0.998252851809835" calcext:value-type="float">
            <text:p>0.998252851809835</text:p>
          </table:table-cell>
          <table:table-cell table:formula="of:=SQRT(([.N161]-[.J161])^2+([.O161]-[.K161])^2)" office:value-type="float" office:value="0.982522288916038" calcext:value-type="float">
            <text:p>0.982522288916038</text:p>
          </table:table-cell>
          <table:table-cell office:value-type="float" office:value="0.819346427917481" calcext:value-type="float">
            <text:p>0.819346427917481</text:p>
          </table:table-cell>
          <table:table-cell office:value-type="float" office:value="0.281932473182678" calcext:value-type="float">
            <text:p>0.281932473182678</text:p>
          </table:table-cell>
          <table:table-cell office:value-type="float" office:value="-0.912115395069122" calcext:value-type="float">
            <text:p>-0.912115395069122</text:p>
          </table:table-cell>
          <table:table-cell office:value-type="float" office:value="0.999399542808533" calcext:value-type="float">
            <text:p>0.999399542808533</text:p>
          </table:table-cell>
          <table:table-cell office:value-type="float" office:value="0.285547226667404" calcext:value-type="float">
            <text:p>0.285547226667404</text:p>
          </table:table-cell>
          <table:table-cell office:value-type="float" office:value="0.314556300640106" calcext:value-type="float">
            <text:p>0.314556300640106</text:p>
          </table:table-cell>
          <table:table-cell office:value-type="float" office:value="-0.889139533042908" calcext:value-type="float">
            <text:p>-0.889139533042908</text:p>
          </table:table-cell>
          <table:table-cell office:value-type="float" office:value="0.999524891376495" calcext:value-type="float">
            <text:p>0.999524891376495</text:p>
          </table:table-cell>
          <table:table-cell office:value-type="float" office:value="0.731144905090332" calcext:value-type="float">
            <text:p>0.731144905090332</text:p>
          </table:table-cell>
          <table:table-cell office:value-type="float" office:value="1.19022333621979" calcext:value-type="float">
            <text:p>1.19022333621979</text:p>
          </table:table-cell>
          <table:table-cell office:value-type="float" office:value="0.0171728655695915" calcext:value-type="float">
            <text:p>0.0171728655695915</text:p>
          </table:table-cell>
          <table:table-cell office:value-type="float" office:value="0.069657027721405" calcext:value-type="float">
            <text:p>0.069657027721405</text:p>
          </table:table-cell>
          <table:table-cell office:value-type="float" office:value="0.404336929321289" calcext:value-type="float">
            <text:p>0.404336929321289</text:p>
          </table:table-cell>
          <table:table-cell office:value-type="float" office:value="1.18982887268066" calcext:value-type="float">
            <text:p>1.18982887268066</text:p>
          </table:table-cell>
          <table:table-cell office:value-type="float" office:value="-0.00780996214598417" calcext:value-type="float">
            <text:p>-0.00780996214598417</text:p>
          </table:table-cell>
          <table:table-cell office:value-type="float" office:value="0.0701175034046173" calcext:value-type="float">
            <text:p>0.07011750340461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QRT(([.J162]-[.F162])^2+([.K162]-[.G162])^2)" office:value-type="float" office:value="0.536814933922913" calcext:value-type="float">
            <text:p>0.536814933922913</text:p>
          </table:table-cell>
          <table:table-cell table:formula="of:=SQRT(([.R162]-[.N162])^2+([.S162]-[.O162])^2)" office:value-type="float" office:value="0.332983809337292" calcext:value-type="float">
            <text:p>0.332983809337292</text:p>
          </table:table-cell>
          <table:table-cell table:formula="of:=SQRT(([.R162]-[.F162])^2+([.S162]-[.G162])^2)" office:value-type="float" office:value="1.00640732102081" calcext:value-type="float">
            <text:p>1.00640732102081</text:p>
          </table:table-cell>
          <table:table-cell table:formula="of:=SQRT(([.N162]-[.J162])^2+([.O162]-[.K162])^2)" office:value-type="float" office:value="0.993665368127541" calcext:value-type="float">
            <text:p>0.993665368127541</text:p>
          </table:table-cell>
          <table:table-cell office:value-type="float" office:value="0.82133275270462" calcext:value-type="float">
            <text:p>0.82133275270462</text:p>
          </table:table-cell>
          <table:table-cell office:value-type="float" office:value="0.280095994472504" calcext:value-type="float">
            <text:p>0.280095994472504</text:p>
          </table:table-cell>
          <table:table-cell office:value-type="float" office:value="-0.860816955566406" calcext:value-type="float">
            <text:p>-0.860816955566406</text:p>
          </table:table-cell>
          <table:table-cell office:value-type="float" office:value="0.99938029050827" calcext:value-type="float">
            <text:p>0.99938029050827</text:p>
          </table:table-cell>
          <table:table-cell office:value-type="float" office:value="0.285613089799881" calcext:value-type="float">
            <text:p>0.285613089799881</text:p>
          </table:table-cell>
          <table:table-cell office:value-type="float" office:value="0.31437012553215" calcext:value-type="float">
            <text:p>0.31437012553215</text:p>
          </table:table-cell>
          <table:table-cell office:value-type="float" office:value="-0.827048659324646" calcext:value-type="float">
            <text:p>-0.827048659324646</text:p>
          </table:table-cell>
          <table:table-cell office:value-type="float" office:value="0.999529778957367" calcext:value-type="float">
            <text:p>0.999529778957367</text:p>
          </table:table-cell>
          <table:table-cell office:value-type="float" office:value="0.738970756530762" calcext:value-type="float">
            <text:p>0.738970756530762</text:p>
          </table:table-cell>
          <table:table-cell office:value-type="float" office:value="1.19858598709106" calcext:value-type="float">
            <text:p>1.19858598709106</text:p>
          </table:table-cell>
          <table:table-cell office:value-type="float" office:value="0.018588662147522" calcext:value-type="float">
            <text:p>0.018588662147522</text:p>
          </table:table-cell>
          <table:table-cell office:value-type="float" office:value="0.0692969858646393" calcext:value-type="float">
            <text:p>0.0692969858646393</text:p>
          </table:table-cell>
          <table:table-cell office:value-type="float" office:value="0.405991733074188" calcext:value-type="float">
            <text:p>0.405991733074188</text:p>
          </table:table-cell>
          <table:table-cell office:value-type="float" office:value="1.19680070877075" calcext:value-type="float">
            <text:p>1.19680070877075</text:p>
          </table:table-cell>
          <table:table-cell office:value-type="float" office:value="-0.00933612231165171" calcext:value-type="float">
            <text:p>-0.00933612231165171</text:p>
          </table:table-cell>
          <table:table-cell office:value-type="float" office:value="0.0706543773412705" calcext:value-type="float">
            <text:p>0.07065437734127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QRT(([.J163]-[.F163])^2+([.K163]-[.G163])^2)" office:value-type="float" office:value="0.536691761727634" calcext:value-type="float">
            <text:p>0.536691761727634</text:p>
          </table:table-cell>
          <table:table-cell table:formula="of:=SQRT(([.R163]-[.N163])^2+([.S163]-[.O163])^2)" office:value-type="float" office:value="0.332672216667839" calcext:value-type="float">
            <text:p>0.332672216667839</text:p>
          </table:table-cell>
          <table:table-cell table:formula="of:=SQRT(([.R163]-[.F163])^2+([.S163]-[.G163])^2)" office:value-type="float" office:value="1.02843286808135" calcext:value-type="float">
            <text:p>1.02843286808135</text:p>
          </table:table-cell>
          <table:table-cell table:formula="of:=SQRT(([.N163]-[.J163])^2+([.O163]-[.K163])^2)" office:value-type="float" office:value="1.00604953355343" calcext:value-type="float">
            <text:p>1.00604953355343</text:p>
          </table:table-cell>
          <table:table-cell office:value-type="float" office:value="0.8207146525383" calcext:value-type="float">
            <text:p>0.8207146525383</text:p>
          </table:table-cell>
          <table:table-cell office:value-type="float" office:value="0.275564759969711" calcext:value-type="float">
            <text:p>0.275564759969711</text:p>
          </table:table-cell>
          <table:table-cell office:value-type="float" office:value="-0.842866897583008" calcext:value-type="float">
            <text:p>-0.842866897583008</text:p>
          </table:table-cell>
          <table:table-cell office:value-type="float" office:value="0.999384880065918" calcext:value-type="float">
            <text:p>0.999384880065918</text:p>
          </table:table-cell>
          <table:table-cell office:value-type="float" office:value="0.285429537296295" calcext:value-type="float">
            <text:p>0.285429537296295</text:p>
          </table:table-cell>
          <table:table-cell office:value-type="float" office:value="0.314396351575851" calcext:value-type="float">
            <text:p>0.314396351575851</text:p>
          </table:table-cell>
          <table:table-cell office:value-type="float" office:value="-0.818564534187317" calcext:value-type="float">
            <text:p>-0.818564534187317</text:p>
          </table:table-cell>
          <table:table-cell office:value-type="float" office:value="0.999529600143433" calcext:value-type="float">
            <text:p>0.999529600143433</text:p>
          </table:table-cell>
          <table:table-cell office:value-type="float" office:value="0.738894820213318" calcext:value-type="float">
            <text:p>0.738894820213318</text:p>
          </table:table-cell>
          <table:table-cell office:value-type="float" office:value="1.2124525308609" calcext:value-type="float">
            <text:p>1.2124525308609</text:p>
          </table:table-cell>
          <table:table-cell office:value-type="float" office:value="0.0189080517739058" calcext:value-type="float">
            <text:p>0.0189080517739058</text:p>
          </table:table-cell>
          <table:table-cell office:value-type="float" office:value="0.0676369294524193" calcext:value-type="float">
            <text:p>0.0676369294524193</text:p>
          </table:table-cell>
          <table:table-cell office:value-type="float" office:value="0.406250804662704" calcext:value-type="float">
            <text:p>0.406250804662704</text:p>
          </table:table-cell>
          <table:table-cell office:value-type="float" office:value="1.21678411960602" calcext:value-type="float">
            <text:p>1.21678411960602</text:p>
          </table:table-cell>
          <table:table-cell office:value-type="float" office:value="-0.00968708656728268" calcext:value-type="float">
            <text:p>-0.00968708656728268</text:p>
          </table:table-cell>
          <table:table-cell office:value-type="float" office:value="0.0689413323998451" calcext:value-type="float">
            <text:p>0.06894133239984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QRT(([.J164]-[.F164])^2+([.K164]-[.G164])^2)" office:value-type="float" office:value="0.536592455379304" calcext:value-type="float">
            <text:p>0.536592455379304</text:p>
          </table:table-cell>
          <table:table-cell table:formula="of:=SQRT(([.R164]-[.N164])^2+([.S164]-[.O164])^2)" office:value-type="float" office:value="0.332106332113383" calcext:value-type="float">
            <text:p>0.332106332113383</text:p>
          </table:table-cell>
          <table:table-cell table:formula="of:=SQRT(([.R164]-[.F164])^2+([.S164]-[.G164])^2)" office:value-type="float" office:value="1.03947153663003" calcext:value-type="float">
            <text:p>1.03947153663003</text:p>
          </table:table-cell>
          <table:table-cell table:formula="of:=SQRT(([.N164]-[.J164])^2+([.O164]-[.K164])^2)" office:value-type="float" office:value="1.02088939981847" calcext:value-type="float">
            <text:p>1.02088939981847</text:p>
          </table:table-cell>
          <table:table-cell office:value-type="float" office:value="0.820611119270325" calcext:value-type="float">
            <text:p>0.820611119270325</text:p>
          </table:table-cell>
          <table:table-cell office:value-type="float" office:value="0.275397092103958" calcext:value-type="float">
            <text:p>0.275397092103958</text:p>
          </table:table-cell>
          <table:table-cell office:value-type="float" office:value="-0.712449610233307" calcext:value-type="float">
            <text:p>-0.712449610233307</text:p>
          </table:table-cell>
          <table:table-cell office:value-type="float" office:value="0.999393880367279" calcext:value-type="float">
            <text:p>0.999393880367279</text:p>
          </table:table-cell>
          <table:table-cell office:value-type="float" office:value="0.285466551780701" calcext:value-type="float">
            <text:p>0.285466551780701</text:p>
          </table:table-cell>
          <table:table-cell office:value-type="float" office:value="0.314789414405823" calcext:value-type="float">
            <text:p>0.314789414405823</text:p>
          </table:table-cell>
          <table:table-cell office:value-type="float" office:value="-0.623943865299225" calcext:value-type="float">
            <text:p>-0.623943865299225</text:p>
          </table:table-cell>
          <table:table-cell office:value-type="float" office:value="0.999531269073486" calcext:value-type="float">
            <text:p>0.999531269073486</text:p>
          </table:table-cell>
          <table:table-cell office:value-type="float" office:value="0.737922310829163" calcext:value-type="float">
            <text:p>0.737922310829163</text:p>
          </table:table-cell>
          <table:table-cell office:value-type="float" office:value="1.22993910312653" calcext:value-type="float">
            <text:p>1.22993910312653</text:p>
          </table:table-cell>
          <table:table-cell office:value-type="float" office:value="0.0138610620051622" calcext:value-type="float">
            <text:p>0.0138610620051622</text:p>
          </table:table-cell>
          <table:table-cell office:value-type="float" office:value="0.0676721185445786" calcext:value-type="float">
            <text:p>0.0676721185445786</text:p>
          </table:table-cell>
          <table:table-cell office:value-type="float" office:value="0.405818998813629" calcext:value-type="float">
            <text:p>0.405818998813629</text:p>
          </table:table-cell>
          <table:table-cell office:value-type="float" office:value="1.22852277755737" calcext:value-type="float">
            <text:p>1.22852277755737</text:p>
          </table:table-cell>
          <table:table-cell office:value-type="float" office:value="-0.00479880580678582" calcext:value-type="float">
            <text:p>-0.00479880580678582</text:p>
          </table:table-cell>
          <table:table-cell office:value-type="float" office:value="0.069174699485302" calcext:value-type="float">
            <text:p>0.0691746994853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QRT(([.J165]-[.F165])^2+([.K165]-[.G165])^2)" office:value-type="float" office:value="0.536274609950847" calcext:value-type="float">
            <text:p>0.536274609950847</text:p>
          </table:table-cell>
          <table:table-cell table:formula="of:=SQRT(([.R165]-[.N165])^2+([.S165]-[.O165])^2)" office:value-type="float" office:value="0.331399856445506" calcext:value-type="float">
            <text:p>0.331399856445506</text:p>
          </table:table-cell>
          <table:table-cell table:formula="of:=SQRT(([.R165]-[.F165])^2+([.S165]-[.G165])^2)" office:value-type="float" office:value="1.03654393665015" calcext:value-type="float">
            <text:p>1.03654393665015</text:p>
          </table:table-cell>
          <table:table-cell table:formula="of:=SQRT(([.N165]-[.J165])^2+([.O165]-[.K165])^2)" office:value-type="float" office:value="1.02440166969149" calcext:value-type="float">
            <text:p>1.02440166969149</text:p>
          </table:table-cell>
          <table:table-cell office:value-type="float" office:value="0.820496559143066" calcext:value-type="float">
            <text:p>0.820496559143066</text:p>
          </table:table-cell>
          <table:table-cell office:value-type="float" office:value="0.275391787290573" calcext:value-type="float">
            <text:p>0.275391787290573</text:p>
          </table:table-cell>
          <table:table-cell office:value-type="float" office:value="-0.676736235618591" calcext:value-type="float">
            <text:p>-0.676736235618591</text:p>
          </table:table-cell>
          <table:table-cell office:value-type="float" office:value="0.999366521835327" calcext:value-type="float">
            <text:p>0.999366521835327</text:p>
          </table:table-cell>
          <table:table-cell office:value-type="float" office:value="0.285494089126587" calcext:value-type="float">
            <text:p>0.285494089126587</text:p>
          </table:table-cell>
          <table:table-cell office:value-type="float" office:value="0.312308102846146" calcext:value-type="float">
            <text:p>0.312308102846146</text:p>
          </table:table-cell>
          <table:table-cell office:value-type="float" office:value="-0.53987842798233" calcext:value-type="float">
            <text:p>-0.53987842798233</text:p>
          </table:table-cell>
          <table:table-cell office:value-type="float" office:value="0.999515533447266" calcext:value-type="float">
            <text:p>0.999515533447266</text:p>
          </table:table-cell>
          <table:table-cell office:value-type="float" office:value="0.741498112678528" calcext:value-type="float">
            <text:p>0.741498112678528</text:p>
          </table:table-cell>
          <table:table-cell office:value-type="float" office:value="1.22961890697479" calcext:value-type="float">
            <text:p>1.22961890697479</text:p>
          </table:table-cell>
          <table:table-cell office:value-type="float" office:value="-0.00543189700692892" calcext:value-type="float">
            <text:p>-0.00543189700692892</text:p>
          </table:table-cell>
          <table:table-cell office:value-type="float" office:value="0.0658365488052368" calcext:value-type="float">
            <text:p>0.0658365488052368</text:p>
          </table:table-cell>
          <table:table-cell office:value-type="float" office:value="0.410106837749481" calcext:value-type="float">
            <text:p>0.410106837749481</text:p>
          </table:table-cell>
          <table:table-cell office:value-type="float" office:value="1.22723400592804" calcext:value-type="float">
            <text:p>1.22723400592804</text:p>
          </table:table-cell>
          <table:table-cell office:value-type="float" office:value="0.0150964362546802" calcext:value-type="float">
            <text:p>0.0150964362546802</text:p>
          </table:table-cell>
          <table:table-cell office:value-type="float" office:value="0.0677004382014275" calcext:value-type="float">
            <text:p>0.06770043820142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QRT(([.J166]-[.F166])^2+([.K166]-[.G166])^2)" office:value-type="float" office:value="0.534363328300138" calcext:value-type="float">
            <text:p>0.534363328300138</text:p>
          </table:table-cell>
          <table:table-cell table:formula="of:=SQRT(([.R166]-[.N166])^2+([.S166]-[.O166])^2)" office:value-type="float" office:value="0.330795754781527" calcext:value-type="float">
            <text:p>0.330795754781527</text:p>
          </table:table-cell>
          <table:table-cell table:formula="of:=SQRT(([.R166]-[.F166])^2+([.S166]-[.G166])^2)" office:value-type="float" office:value="1.0402430978879" calcext:value-type="float">
            <text:p>1.0402430978879</text:p>
          </table:table-cell>
          <table:table-cell table:formula="of:=SQRT(([.N166]-[.J166])^2+([.O166]-[.K166])^2)" office:value-type="float" office:value="1.02006627377191" calcext:value-type="float">
            <text:p>1.02006627377191</text:p>
          </table:table-cell>
          <table:table-cell office:value-type="float" office:value="0.816046893596649" calcext:value-type="float">
            <text:p>0.816046893596649</text:p>
          </table:table-cell>
          <table:table-cell office:value-type="float" office:value="0.269126087427139" calcext:value-type="float">
            <text:p>0.269126087427139</text:p>
          </table:table-cell>
          <table:table-cell office:value-type="float" office:value="-0.709432721138001" calcext:value-type="float">
            <text:p>-0.709432721138001</text:p>
          </table:table-cell>
          <table:table-cell office:value-type="float" office:value="0.999395847320557" calcext:value-type="float">
            <text:p>0.999395847320557</text:p>
          </table:table-cell>
          <table:table-cell office:value-type="float" office:value="0.283432811498642" calcext:value-type="float">
            <text:p>0.283432811498642</text:p>
          </table:table-cell>
          <table:table-cell office:value-type="float" office:value="0.312328010797501" calcext:value-type="float">
            <text:p>0.312328010797501</text:p>
          </table:table-cell>
          <table:table-cell office:value-type="float" office:value="-0.620088398456574" calcext:value-type="float">
            <text:p>-0.620088398456574</text:p>
          </table:table-cell>
          <table:table-cell office:value-type="float" office:value="0.999525904655457" calcext:value-type="float">
            <text:p>0.999525904655457</text:p>
          </table:table-cell>
          <table:table-cell office:value-type="float" office:value="0.740250051021576" calcext:value-type="float">
            <text:p>0.740250051021576</text:p>
          </table:table-cell>
          <table:table-cell office:value-type="float" office:value="1.22438788414001" calcext:value-type="float">
            <text:p>1.22438788414001</text:p>
          </table:table-cell>
          <table:table-cell office:value-type="float" office:value="-0.000243626796873286" calcext:value-type="float">
            <text:p>-0.000243626796873286</text:p>
          </table:table-cell>
          <table:table-cell office:value-type="float" office:value="0.0639371648430824" calcext:value-type="float">
            <text:p>0.0639371648430824</text:p>
          </table:table-cell>
          <table:table-cell office:value-type="float" office:value="0.409461826086044" calcext:value-type="float">
            <text:p>0.409461826086044</text:p>
          </table:table-cell>
          <table:table-cell office:value-type="float" office:value="1.22661983966827" calcext:value-type="float">
            <text:p>1.22661983966827</text:p>
          </table:table-cell>
          <table:table-cell office:value-type="float" office:value="0.0101634804159403" calcext:value-type="float">
            <text:p>0.0101634804159403</text:p>
          </table:table-cell>
          <table:table-cell office:value-type="float" office:value="0.0655441358685494" calcext:value-type="float">
            <text:p>0.065544135868549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QRT(([.J167]-[.F167])^2+([.K167]-[.G167])^2)" office:value-type="float" office:value="0.534927793925187" calcext:value-type="float">
            <text:p>0.534927793925187</text:p>
          </table:table-cell>
          <table:table-cell table:formula="of:=SQRT(([.R167]-[.N167])^2+([.S167]-[.O167])^2)" office:value-type="float" office:value="0.323998535558081" calcext:value-type="float">
            <text:p>0.323998535558081</text:p>
          </table:table-cell>
          <table:table-cell table:formula="of:=SQRT(([.R167]-[.F167])^2+([.S167]-[.G167])^2)" office:value-type="float" office:value="1.01008791737607" calcext:value-type="float">
            <text:p>1.01008791737607</text:p>
          </table:table-cell>
          <table:table-cell table:formula="of:=SQRT(([.N167]-[.J167])^2+([.O167]-[.K167])^2)" office:value-type="float" office:value="1.01848314196496" calcext:value-type="float">
            <text:p>1.01848314196496</text:p>
          </table:table-cell>
          <table:table-cell office:value-type="float" office:value="0.816605269908905" calcext:value-type="float">
            <text:p>0.816605269908905</text:p>
          </table:table-cell>
          <table:table-cell office:value-type="float" office:value="0.266600102186203" calcext:value-type="float">
            <text:p>0.266600102186203</text:p>
          </table:table-cell>
          <table:table-cell office:value-type="float" office:value="-0.718404650688171" calcext:value-type="float">
            <text:p>-0.718404650688171</text:p>
          </table:table-cell>
          <table:table-cell office:value-type="float" office:value="0.999370336532593" calcext:value-type="float">
            <text:p>0.999370336532593</text:p>
          </table:table-cell>
          <table:table-cell office:value-type="float" office:value="0.28345912694931" calcext:value-type="float">
            <text:p>0.28345912694931</text:p>
          </table:table-cell>
          <table:table-cell office:value-type="float" office:value="0.310222744941711" calcext:value-type="float">
            <text:p>0.310222744941711</text:p>
          </table:table-cell>
          <table:table-cell office:value-type="float" office:value="-0.633776962757111" calcext:value-type="float">
            <text:p>-0.633776962757111</text:p>
          </table:table-cell>
          <table:table-cell office:value-type="float" office:value="0.999529361724854" calcext:value-type="float">
            <text:p>0.999529361724854</text:p>
          </table:table-cell>
          <table:table-cell office:value-type="float" office:value="0.740649342536926" calcext:value-type="float">
            <text:p>0.740649342536926</text:p>
          </table:table-cell>
          <table:table-cell office:value-type="float" office:value="1.2203243970871" calcext:value-type="float">
            <text:p>1.2203243970871</text:p>
          </table:table-cell>
          <table:table-cell office:value-type="float" office:value="0.0219173487275839" calcext:value-type="float">
            <text:p>0.0219173487275839</text:p>
          </table:table-cell>
          <table:table-cell office:value-type="float" office:value="0.064202107489109" calcext:value-type="float">
            <text:p>0.064202107489109</text:p>
          </table:table-cell>
          <table:table-cell office:value-type="float" office:value="0.417675822973251" calcext:value-type="float">
            <text:p>0.417675822973251</text:p>
          </table:table-cell>
          <table:table-cell office:value-type="float" office:value="1.19457256793976" calcext:value-type="float">
            <text:p>1.19457256793976</text:p>
          </table:table-cell>
          <table:table-cell office:value-type="float" office:value="-0.0123114297166467" calcext:value-type="float">
            <text:p>-0.0123114297166467</text:p>
          </table:table-cell>
          <table:table-cell office:value-type="float" office:value="0.0667566061019898" calcext:value-type="float">
            <text:p>0.06675660610198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QRT(([.J168]-[.F168])^2+([.K168]-[.G168])^2)" office:value-type="float" office:value="0.536977898591181" calcext:value-type="float">
            <text:p>0.536977898591181</text:p>
          </table:table-cell>
          <table:table-cell table:formula="of:=SQRT(([.R168]-[.N168])^2+([.S168]-[.O168])^2)" office:value-type="float" office:value="0.325809426149628" calcext:value-type="float">
            <text:p>0.325809426149628</text:p>
          </table:table-cell>
          <table:table-cell table:formula="of:=SQRT(([.R168]-[.F168])^2+([.S168]-[.G168])^2)" office:value-type="float" office:value="1.01142604284438" calcext:value-type="float">
            <text:p>1.01142604284438</text:p>
          </table:table-cell>
          <table:table-cell table:formula="of:=SQRT(([.N168]-[.J168])^2+([.O168]-[.K168])^2)" office:value-type="float" office:value="1.00556834505651" calcext:value-type="float">
            <text:p>1.00556834505651</text:p>
          </table:table-cell>
          <table:table-cell office:value-type="float" office:value="0.817188739776611" calcext:value-type="float">
            <text:p>0.817188739776611</text:p>
          </table:table-cell>
          <table:table-cell office:value-type="float" office:value="0.26422855257988" calcext:value-type="float">
            <text:p>0.26422855257988</text:p>
          </table:table-cell>
          <table:table-cell office:value-type="float" office:value="-1.06203007698059" calcext:value-type="float">
            <text:p>-1.06203007698059</text:p>
          </table:table-cell>
          <table:table-cell office:value-type="float" office:value="0.999374747276306" calcext:value-type="float">
            <text:p>0.999374747276306</text:p>
          </table:table-cell>
          <table:table-cell office:value-type="float" office:value="0.282191336154938" calcext:value-type="float">
            <text:p>0.282191336154938</text:p>
          </table:table-cell>
          <table:table-cell office:value-type="float" office:value="0.310305029153824" calcext:value-type="float">
            <text:p>0.310305029153824</text:p>
          </table:table-cell>
          <table:table-cell office:value-type="float" office:value="-1.01048398017883" calcext:value-type="float">
            <text:p>-1.01048398017883</text:p>
          </table:table-cell>
          <table:table-cell office:value-type="float" office:value="0.999518930912018" calcext:value-type="float">
            <text:p>0.999518930912018</text:p>
          </table:table-cell>
          <table:table-cell office:value-type="float" office:value="0.740375578403473" calcext:value-type="float">
            <text:p>0.740375578403473</text:p>
          </table:table-cell>
          <table:table-cell office:value-type="float" office:value="1.20542228221893" calcext:value-type="float">
            <text:p>1.20542228221893</text:p>
          </table:table-cell>
          <table:table-cell office:value-type="float" office:value="0.021850373595953" calcext:value-type="float">
            <text:p>0.021850373595953</text:p>
          </table:table-cell>
          <table:table-cell office:value-type="float" office:value="0.0643829181790352" calcext:value-type="float">
            <text:p>0.0643829181790352</text:p>
          </table:table-cell>
          <table:table-cell office:value-type="float" office:value="0.41483536362648" calcext:value-type="float">
            <text:p>0.41483536362648</text:p>
          </table:table-cell>
          <table:table-cell office:value-type="float" office:value="1.19218027591705" calcext:value-type="float">
            <text:p>1.19218027591705</text:p>
          </table:table-cell>
          <table:table-cell office:value-type="float" office:value="-0.0122512448579073" calcext:value-type="float">
            <text:p>-0.0122512448579073</text:p>
          </table:table-cell>
          <table:table-cell office:value-type="float" office:value="0.066317729651928" calcext:value-type="float">
            <text:p>0.0663177296519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QRT(([.J169]-[.F169])^2+([.K169]-[.G169])^2)" office:value-type="float" office:value="0.54515682716402" calcext:value-type="float">
            <text:p>0.54515682716402</text:p>
          </table:table-cell>
          <table:table-cell table:formula="of:=SQRT(([.R169]-[.N169])^2+([.S169]-[.O169])^2)" office:value-type="float" office:value="0.325220339574409" calcext:value-type="float">
            <text:p>0.325220339574409</text:p>
          </table:table-cell>
          <table:table-cell table:formula="of:=SQRT(([.R169]-[.F169])^2+([.S169]-[.G169])^2)" office:value-type="float" office:value="1.01367963536978" calcext:value-type="float">
            <text:p>1.01367963536978</text:p>
          </table:table-cell>
          <table:table-cell table:formula="of:=SQRT(([.N169]-[.J169])^2+([.O169]-[.K169])^2)" office:value-type="float" office:value="0.99985292658832" calcext:value-type="float">
            <text:p>0.99985292658832</text:p>
          </table:table-cell>
          <table:table-cell office:value-type="float" office:value="0.816963315010071" calcext:value-type="float">
            <text:p>0.816963315010071</text:p>
          </table:table-cell>
          <table:table-cell office:value-type="float" office:value="0.262305080890656" calcext:value-type="float">
            <text:p>0.262305080890656</text:p>
          </table:table-cell>
          <table:table-cell office:value-type="float" office:value="-0.993987739086151" calcext:value-type="float">
            <text:p>-0.993987739086151</text:p>
          </table:table-cell>
          <table:table-cell office:value-type="float" office:value="0.999363005161285" calcext:value-type="float">
            <text:p>0.999363005161285</text:p>
          </table:table-cell>
          <table:table-cell office:value-type="float" office:value="0.274204879999161" calcext:value-type="float">
            <text:p>0.274204879999161</text:p>
          </table:table-cell>
          <table:table-cell office:value-type="float" office:value="0.313385874032974" calcext:value-type="float">
            <text:p>0.313385874032974</text:p>
          </table:table-cell>
          <table:table-cell office:value-type="float" office:value="-0.990085601806641" calcext:value-type="float">
            <text:p>-0.990085601806641</text:p>
          </table:table-cell>
          <table:table-cell office:value-type="float" office:value="0.999498128890991" calcext:value-type="float">
            <text:p>0.999498128890991</text:p>
          </table:table-cell>
          <table:table-cell office:value-type="float" office:value="0.739161968231201" calcext:value-type="float">
            <text:p>0.739161968231201</text:p>
          </table:table-cell>
          <table:table-cell office:value-type="float" office:value="1.19855296611786" calcext:value-type="float">
            <text:p>1.19855296611786</text:p>
          </table:table-cell>
          <table:table-cell office:value-type="float" office:value="0.0209459755569696" calcext:value-type="float">
            <text:p>0.0209459755569696</text:p>
          </table:table-cell>
          <table:table-cell office:value-type="float" office:value="0.0647020936012268" calcext:value-type="float">
            <text:p>0.0647020936012268</text:p>
          </table:table-cell>
          <table:table-cell office:value-type="float" office:value="0.413998931646347" calcext:value-type="float">
            <text:p>0.413998931646347</text:p>
          </table:table-cell>
          <table:table-cell office:value-type="float" office:value="1.19244813919067" calcext:value-type="float">
            <text:p>1.19244813919067</text:p>
          </table:table-cell>
          <table:table-cell office:value-type="float" office:value="-0.0112399384379387" calcext:value-type="float">
            <text:p>-0.0112399384379387</text:p>
          </table:table-cell>
          <table:table-cell office:value-type="float" office:value="0.0660862624645233" calcext:value-type="float">
            <text:p>0.06608626246452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QRT(([.J170]-[.F170])^2+([.K170]-[.G170])^2)" office:value-type="float" office:value="0.546236544164453" calcext:value-type="float">
            <text:p>0.546236544164453</text:p>
          </table:table-cell>
          <table:table-cell table:formula="of:=SQRT(([.R170]-[.N170])^2+([.S170]-[.O170])^2)" office:value-type="float" office:value="0.327698455769918" calcext:value-type="float">
            <text:p>0.327698455769918</text:p>
          </table:table-cell>
          <table:table-cell table:formula="of:=SQRT(([.R170]-[.F170])^2+([.S170]-[.G170])^2)" office:value-type="float" office:value="1.01887940277555" calcext:value-type="float">
            <text:p>1.01887940277555</text:p>
          </table:table-cell>
          <table:table-cell table:formula="of:=SQRT(([.N170]-[.J170])^2+([.O170]-[.K170])^2)" office:value-type="float" office:value="1.00479695415665" calcext:value-type="float">
            <text:p>1.00479695415665</text:p>
          </table:table-cell>
          <table:table-cell office:value-type="float" office:value="0.81825715303421" calcext:value-type="float">
            <text:p>0.81825715303421</text:p>
          </table:table-cell>
          <table:table-cell office:value-type="float" office:value="0.262341171503067" calcext:value-type="float">
            <text:p>0.262341171503067</text:p>
          </table:table-cell>
          <table:table-cell office:value-type="float" office:value="-0.936976790428162" calcext:value-type="float">
            <text:p>-0.936976790428162</text:p>
          </table:table-cell>
          <table:table-cell office:value-type="float" office:value="0.999366581439972" calcext:value-type="float">
            <text:p>0.999366581439972</text:p>
          </table:table-cell>
          <table:table-cell office:value-type="float" office:value="0.274377405643463" calcext:value-type="float">
            <text:p>0.274377405643463</text:p>
          </table:table-cell>
          <table:table-cell office:value-type="float" office:value="0.313028275966644" calcext:value-type="float">
            <text:p>0.313028275966644</text:p>
          </table:table-cell>
          <table:table-cell office:value-type="float" office:value="-0.953037738800049" calcext:value-type="float">
            <text:p>-0.953037738800049</text:p>
          </table:table-cell>
          <table:table-cell office:value-type="float" office:value="0.99950510263443" calcext:value-type="float">
            <text:p>0.99950510263443</text:p>
          </table:table-cell>
          <table:table-cell office:value-type="float" office:value="0.739138603210449" calcext:value-type="float">
            <text:p>0.739138603210449</text:p>
          </table:table-cell>
          <table:table-cell office:value-type="float" office:value="1.20387840270996" calcext:value-type="float">
            <text:p>1.20387840270996</text:p>
          </table:table-cell>
          <table:table-cell office:value-type="float" office:value="0.024571105837822" calcext:value-type="float">
            <text:p>0.024571105837822</text:p>
          </table:table-cell>
          <table:table-cell office:value-type="float" office:value="0.0654601454734802" calcext:value-type="float">
            <text:p>0.0654601454734802</text:p>
          </table:table-cell>
          <table:table-cell office:value-type="float" office:value="0.41152286529541" calcext:value-type="float">
            <text:p>0.41152286529541</text:p>
          </table:table-cell>
          <table:table-cell office:value-type="float" office:value="1.19651591777802" calcext:value-type="float">
            <text:p>1.19651591777802</text:p>
          </table:table-cell>
          <table:table-cell office:value-type="float" office:value="-0.0149705912917852" calcext:value-type="float">
            <text:p>-0.0149705912917852</text:p>
          </table:table-cell>
          <table:table-cell office:value-type="float" office:value="0.0671280100941658" calcext:value-type="float">
            <text:p>0.06712801009416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QRT(([.J171]-[.F171])^2+([.K171]-[.G171])^2)" office:value-type="float" office:value="0.545370912190026" calcext:value-type="float">
            <text:p>0.545370912190026</text:p>
          </table:table-cell>
          <table:table-cell table:formula="of:=SQRT(([.R171]-[.N171])^2+([.S171]-[.O171])^2)" office:value-type="float" office:value="0.327423473352415" calcext:value-type="float">
            <text:p>0.327423473352415</text:p>
          </table:table-cell>
          <table:table-cell table:formula="of:=SQRT(([.R171]-[.F171])^2+([.S171]-[.G171])^2)" office:value-type="float" office:value="1.02008498388545" calcext:value-type="float">
            <text:p>1.02008498388545</text:p>
          </table:table-cell>
          <table:table-cell table:formula="of:=SQRT(([.N171]-[.J171])^2+([.O171]-[.K171])^2)" office:value-type="float" office:value="1.00285563982258" calcext:value-type="float">
            <text:p>1.00285563982258</text:p>
          </table:table-cell>
          <table:table-cell office:value-type="float" office:value="0.818293571472168" calcext:value-type="float">
            <text:p>0.818293571472168</text:p>
          </table:table-cell>
          <table:table-cell office:value-type="float" office:value="0.260857939720154" calcext:value-type="float">
            <text:p>0.260857939720154</text:p>
          </table:table-cell>
          <table:table-cell office:value-type="float" office:value="-0.802574157714844" calcext:value-type="float">
            <text:p>-0.802574157714844</text:p>
          </table:table-cell>
          <table:table-cell office:value-type="float" office:value="0.999384522438049" calcext:value-type="float">
            <text:p>0.999384522438049</text:p>
          </table:table-cell>
          <table:table-cell office:value-type="float" office:value="0.275367021560669" calcext:value-type="float">
            <text:p>0.275367021560669</text:p>
          </table:table-cell>
          <table:table-cell office:value-type="float" office:value="0.312435001134872" calcext:value-type="float">
            <text:p>0.312435001134872</text:p>
          </table:table-cell>
          <table:table-cell office:value-type="float" office:value="-0.801641464233398" calcext:value-type="float">
            <text:p>-0.801641464233398</text:p>
          </table:table-cell>
          <table:table-cell office:value-type="float" office:value="0.99951297044754" calcext:value-type="float">
            <text:p>0.99951297044754</text:p>
          </table:table-cell>
          <table:table-cell office:value-type="float" office:value="0.739098429679871" calcext:value-type="float">
            <text:p>0.739098429679871</text:p>
          </table:table-cell>
          <table:table-cell office:value-type="float" office:value="1.2016327381134" calcext:value-type="float">
            <text:p>1.2016327381134</text:p>
          </table:table-cell>
          <table:table-cell office:value-type="float" office:value="0.0248938538134098" calcext:value-type="float">
            <text:p>0.0248938538134098</text:p>
          </table:table-cell>
          <table:table-cell office:value-type="float" office:value="0.0642914324998856" calcext:value-type="float">
            <text:p>0.0642914324998856</text:p>
          </table:table-cell>
          <table:table-cell office:value-type="float" office:value="0.411716520786285" calcext:value-type="float">
            <text:p>0.411716520786285</text:p>
          </table:table-cell>
          <table:table-cell office:value-type="float" office:value="1.19641578197479" calcext:value-type="float">
            <text:p>1.19641578197479</text:p>
          </table:table-cell>
          <table:table-cell office:value-type="float" office:value="-0.0152788665145636" calcext:value-type="float">
            <text:p>-0.0152788665145636</text:p>
          </table:table-cell>
          <table:table-cell office:value-type="float" office:value="0.065842367708683" calcext:value-type="float">
            <text:p>0.0658423677086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QRT(([.J172]-[.F172])^2+([.K172]-[.G172])^2)" office:value-type="float" office:value="0.552976809924371" calcext:value-type="float">
            <text:p>0.552976809924371</text:p>
          </table:table-cell>
          <table:table-cell table:formula="of:=SQRT(([.R172]-[.N172])^2+([.S172]-[.O172])^2)" office:value-type="float" office:value="0.331691606010364" calcext:value-type="float">
            <text:p>0.331691606010364</text:p>
          </table:table-cell>
          <table:table-cell table:formula="of:=SQRT(([.R172]-[.F172])^2+([.S172]-[.G172])^2)" office:value-type="float" office:value="1.02247857773584" calcext:value-type="float">
            <text:p>1.02247857773584</text:p>
          </table:table-cell>
          <table:table-cell table:formula="of:=SQRT(([.N172]-[.J172])^2+([.O172]-[.K172])^2)" office:value-type="float" office:value="1.00313106571794" calcext:value-type="float">
            <text:p>1.00313106571794</text:p>
          </table:table-cell>
          <table:table-cell office:value-type="float" office:value="0.819957375526428" calcext:value-type="float">
            <text:p>0.819957375526428</text:p>
          </table:table-cell>
          <table:table-cell office:value-type="float" office:value="0.267815947532654" calcext:value-type="float">
            <text:p>0.267815947532654</text:p>
          </table:table-cell>
          <table:table-cell office:value-type="float" office:value="-1.18337225914001" calcext:value-type="float">
            <text:p>-1.18337225914001</text:p>
          </table:table-cell>
          <table:table-cell office:value-type="float" office:value="0.999380767345429" calcext:value-type="float">
            <text:p>0.999380767345429</text:p>
          </table:table-cell>
          <table:table-cell office:value-type="float" office:value="0.269455134868622" calcext:value-type="float">
            <text:p>0.269455134868622</text:p>
          </table:table-cell>
          <table:table-cell office:value-type="float" office:value="0.320071429014206" calcext:value-type="float">
            <text:p>0.320071429014206</text:p>
          </table:table-cell>
          <table:table-cell office:value-type="float" office:value="-1.15928614139557" calcext:value-type="float">
            <text:p>-1.15928614139557</text:p>
          </table:table-cell>
          <table:table-cell office:value-type="float" office:value="0.999500393867493" calcext:value-type="float">
            <text:p>0.999500393867493</text:p>
          </table:table-cell>
          <table:table-cell office:value-type="float" office:value="0.739042639732361" calcext:value-type="float">
            <text:p>0.739042639732361</text:p>
          </table:table-cell>
          <table:table-cell office:value-type="float" office:value="1.20650219917297" calcext:value-type="float">
            <text:p>1.20650219917297</text:p>
          </table:table-cell>
          <table:table-cell office:value-type="float" office:value="0.0247431825846434" calcext:value-type="float">
            <text:p>0.0247431825846434</text:p>
          </table:table-cell>
          <table:table-cell office:value-type="float" office:value="0.0640884935855866" calcext:value-type="float">
            <text:p>0.0640884935855866</text:p>
          </table:table-cell>
          <table:table-cell office:value-type="float" office:value="0.40736597776413" calcext:value-type="float">
            <text:p>0.40736597776413</text:p>
          </table:table-cell>
          <table:table-cell office:value-type="float" office:value="1.20335364341736" calcext:value-type="float">
            <text:p>1.20335364341736</text:p>
          </table:table-cell>
          <table:table-cell office:value-type="float" office:value="-0.0151557354256511" calcext:value-type="float">
            <text:p>-0.0151557354256511</text:p>
          </table:table-cell>
          <table:table-cell office:value-type="float" office:value="0.0652481988072395" calcext:value-type="float">
            <text:p>0.06524819880723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QRT(([.J173]-[.F173])^2+([.K173]-[.G173])^2)" office:value-type="float" office:value="0.551033017184768" calcext:value-type="float">
            <text:p>0.551033017184768</text:p>
          </table:table-cell>
          <table:table-cell table:formula="of:=SQRT(([.R173]-[.N173])^2+([.S173]-[.O173])^2)" office:value-type="float" office:value="0.330184852178199" calcext:value-type="float">
            <text:p>0.330184852178199</text:p>
          </table:table-cell>
          <table:table-cell table:formula="of:=SQRT(([.R173]-[.F173])^2+([.S173]-[.G173])^2)" office:value-type="float" office:value="1.02789496354282" calcext:value-type="float">
            <text:p>1.02789496354282</text:p>
          </table:table-cell>
          <table:table-cell table:formula="of:=SQRT(([.N173]-[.J173])^2+([.O173]-[.K173])^2)" office:value-type="float" office:value="1.00447334720812" calcext:value-type="float">
            <text:p>1.00447334720812</text:p>
          </table:table-cell>
          <table:table-cell office:value-type="float" office:value="0.819392800331116" calcext:value-type="float">
            <text:p>0.819392800331116</text:p>
          </table:table-cell>
          <table:table-cell office:value-type="float" office:value="0.264878869056702" calcext:value-type="float">
            <text:p>0.264878869056702</text:p>
          </table:table-cell>
          <table:table-cell office:value-type="float" office:value="-0.745115637779236" calcext:value-type="float">
            <text:p>-0.745115637779236</text:p>
          </table:table-cell>
          <table:table-cell office:value-type="float" office:value="0.999416172504425" calcext:value-type="float">
            <text:p>0.999416172504425</text:p>
          </table:table-cell>
          <table:table-cell office:value-type="float" office:value="0.271036386489868" calcext:value-type="float">
            <text:p>0.271036386489868</text:p>
          </table:table-cell>
          <table:table-cell office:value-type="float" office:value="0.31912487745285" calcext:value-type="float">
            <text:p>0.31912487745285</text:p>
          </table:table-cell>
          <table:table-cell office:value-type="float" office:value="-0.721430420875549" calcext:value-type="float">
            <text:p>-0.721430420875549</text:p>
          </table:table-cell>
          <table:table-cell office:value-type="float" office:value="0.999518513679504" calcext:value-type="float">
            <text:p>0.999518513679504</text:p>
          </table:table-cell>
          <table:table-cell office:value-type="float" office:value="0.738605082035065" calcext:value-type="float">
            <text:p>0.738605082035065</text:p>
          </table:table-cell>
          <table:table-cell office:value-type="float" office:value="1.2081390619278" calcext:value-type="float">
            <text:p>1.2081390619278</text:p>
          </table:table-cell>
          <table:table-cell office:value-type="float" office:value="0.0233613420277834" calcext:value-type="float">
            <text:p>0.0233613420277834</text:p>
          </table:table-cell>
          <table:table-cell office:value-type="float" office:value="0.0615493543446064" calcext:value-type="float">
            <text:p>0.0615493543446064</text:p>
          </table:table-cell>
          <table:table-cell office:value-type="float" office:value="0.40842205286026" calcext:value-type="float">
            <text:p>0.40842205286026</text:p>
          </table:table-cell>
          <table:table-cell office:value-type="float" office:value="1.20704185962677" calcext:value-type="float">
            <text:p>1.20704185962677</text:p>
          </table:table-cell>
          <table:table-cell office:value-type="float" office:value="-0.0137969953939319" calcext:value-type="float">
            <text:p>-0.0137969953939319</text:p>
          </table:table-cell>
          <table:table-cell office:value-type="float" office:value="0.0624761842191219" calcext:value-type="float">
            <text:p>0.06247618421912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QRT(([.J174]-[.F174])^2+([.K174]-[.G174])^2)" office:value-type="float" office:value="0.549806816002605" calcext:value-type="float">
            <text:p>0.549806816002605</text:p>
          </table:table-cell>
          <table:table-cell table:formula="of:=SQRT(([.R174]-[.N174])^2+([.S174]-[.O174])^2)" office:value-type="float" office:value="0.331810987488837" calcext:value-type="float">
            <text:p>0.331810987488837</text:p>
          </table:table-cell>
          <table:table-cell table:formula="of:=SQRT(([.R174]-[.F174])^2+([.S174]-[.G174])^2)" office:value-type="float" office:value="1.03289472234042" calcext:value-type="float">
            <text:p>1.03289472234042</text:p>
          </table:table-cell>
          <table:table-cell table:formula="of:=SQRT(([.N174]-[.J174])^2+([.O174]-[.K174])^2)" office:value-type="float" office:value="1.00993336886837" calcext:value-type="float">
            <text:p>1.00993336886837</text:p>
          </table:table-cell>
          <table:table-cell office:value-type="float" office:value="0.819687962532044" calcext:value-type="float">
            <text:p>0.819687962532044</text:p>
          </table:table-cell>
          <table:table-cell office:value-type="float" office:value="0.264277189970017" calcext:value-type="float">
            <text:p>0.264277189970017</text:p>
          </table:table-cell>
          <table:table-cell office:value-type="float" office:value="-0.743688523769379" calcext:value-type="float">
            <text:p>-0.743688523769379</text:p>
          </table:table-cell>
          <table:table-cell office:value-type="float" office:value="0.999444127082825" calcext:value-type="float">
            <text:p>0.999444127082825</text:p>
          </table:table-cell>
          <table:table-cell office:value-type="float" office:value="0.272551715373993" calcext:value-type="float">
            <text:p>0.272551715373993</text:p>
          </table:table-cell>
          <table:table-cell office:value-type="float" office:value="0.318401694297791" calcext:value-type="float">
            <text:p>0.318401694297791</text:p>
          </table:table-cell>
          <table:table-cell office:value-type="float" office:value="-0.687797784805298" calcext:value-type="float">
            <text:p>-0.687797784805298</text:p>
          </table:table-cell>
          <table:table-cell office:value-type="float" office:value="0.999540567398071" calcext:value-type="float">
            <text:p>0.999540567398071</text:p>
          </table:table-cell>
          <table:table-cell office:value-type="float" office:value="0.738532900810242" calcext:value-type="float">
            <text:p>0.738532900810242</text:p>
          </table:table-cell>
          <table:table-cell office:value-type="float" office:value="1.21440780162811" calcext:value-type="float">
            <text:p>1.21440780162811</text:p>
          </table:table-cell>
          <table:table-cell office:value-type="float" office:value="0.0233218688517809" calcext:value-type="float">
            <text:p>0.0233218688517809</text:p>
          </table:table-cell>
          <table:table-cell office:value-type="float" office:value="0.060198187828064" calcext:value-type="float">
            <text:p>0.060198187828064</text:p>
          </table:table-cell>
          <table:table-cell office:value-type="float" office:value="0.406739085912704" calcext:value-type="float">
            <text:p>0.406739085912704</text:p>
          </table:table-cell>
          <table:table-cell office:value-type="float" office:value="1.21103203296661" calcext:value-type="float">
            <text:p>1.21103203296661</text:p>
          </table:table-cell>
          <table:table-cell office:value-type="float" office:value="-0.0137356910854578" calcext:value-type="float">
            <text:p>-0.0137356910854578</text:p>
          </table:table-cell>
          <table:table-cell office:value-type="float" office:value="0.0612364932894707" calcext:value-type="float">
            <text:p>0.06123649328947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QRT(([.J175]-[.F175])^2+([.K175]-[.G175])^2)" office:value-type="float" office:value="0.549590769728862" calcext:value-type="float">
            <text:p>0.549590769728862</text:p>
          </table:table-cell>
          <table:table-cell table:formula="of:=SQRT(([.R175]-[.N175])^2+([.S175]-[.O175])^2)" office:value-type="float" office:value="0.331746896925637" calcext:value-type="float">
            <text:p>0.331746896925637</text:p>
          </table:table-cell>
          <table:table-cell table:formula="of:=SQRT(([.R175]-[.F175])^2+([.S175]-[.G175])^2)" office:value-type="float" office:value="1.03633079329196" calcext:value-type="float">
            <text:p>1.03633079329196</text:p>
          </table:table-cell>
          <table:table-cell table:formula="of:=SQRT(([.N175]-[.J175])^2+([.O175]-[.K175])^2)" office:value-type="float" office:value="1.00977603826202" calcext:value-type="float">
            <text:p>1.00977603826202</text:p>
          </table:table-cell>
          <table:table-cell office:value-type="float" office:value="0.819764792919159" calcext:value-type="float">
            <text:p>0.819764792919159</text:p>
          </table:table-cell>
          <table:table-cell office:value-type="float" office:value="0.261726498603821" calcext:value-type="float">
            <text:p>0.261726498603821</text:p>
          </table:table-cell>
          <table:table-cell office:value-type="float" office:value="-0.810988783836365" calcext:value-type="float">
            <text:p>-0.810988783836365</text:p>
          </table:table-cell>
          <table:table-cell office:value-type="float" office:value="0.999465703964233" calcext:value-type="float">
            <text:p>0.999465703964233</text:p>
          </table:table-cell>
          <table:table-cell office:value-type="float" office:value="0.273084849119186" calcext:value-type="float">
            <text:p>0.273084849119186</text:p>
          </table:table-cell>
          <table:table-cell office:value-type="float" office:value="0.318215906620026" calcext:value-type="float">
            <text:p>0.318215906620026</text:p>
          </table:table-cell>
          <table:table-cell office:value-type="float" office:value="-0.731513261795044" calcext:value-type="float">
            <text:p>-0.731513261795044</text:p>
          </table:table-cell>
          <table:table-cell office:value-type="float" office:value="0.999545216560364" calcext:value-type="float">
            <text:p>0.999545216560364</text:p>
          </table:table-cell>
          <table:table-cell office:value-type="float" office:value="0.73847907781601" calcext:value-type="float">
            <text:p>0.73847907781601</text:p>
          </table:table-cell>
          <table:table-cell office:value-type="float" office:value="1.2143497467041" calcext:value-type="float">
            <text:p>1.2143497467041</text:p>
          </table:table-cell>
          <table:table-cell office:value-type="float" office:value="0.0125478832051158" calcext:value-type="float">
            <text:p>0.0125478832051158</text:p>
          </table:table-cell>
          <table:table-cell office:value-type="float" office:value="0.0590569563210011" calcext:value-type="float">
            <text:p>0.0590569563210011</text:p>
          </table:table-cell>
          <table:table-cell office:value-type="float" office:value="0.406739175319672" calcext:value-type="float">
            <text:p>0.406739175319672</text:p>
          </table:table-cell>
          <table:table-cell office:value-type="float" office:value="1.21219551563263" calcext:value-type="float">
            <text:p>1.21219551563263</text:p>
          </table:table-cell>
          <table:table-cell office:value-type="float" office:value="-0.00252415519207716" calcext:value-type="float">
            <text:p>-0.00252415519207716</text:p>
          </table:table-cell>
          <table:table-cell office:value-type="float" office:value="0.0593711324036121" calcext:value-type="float">
            <text:p>0.05937113240361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QRT(([.J176]-[.F176])^2+([.K176]-[.G176])^2)" office:value-type="float" office:value="0.546891543622772" calcext:value-type="float">
            <text:p>0.546891543622772</text:p>
          </table:table-cell>
          <table:table-cell table:formula="of:=SQRT(([.R176]-[.N176])^2+([.S176]-[.O176])^2)" office:value-type="float" office:value="0.331962573636955" calcext:value-type="float">
            <text:p>0.331962573636955</text:p>
          </table:table-cell>
          <table:table-cell table:formula="of:=SQRT(([.R176]-[.F176])^2+([.S176]-[.G176])^2)" office:value-type="float" office:value="1.03726167654004" calcext:value-type="float">
            <text:p>1.03726167654004</text:p>
          </table:table-cell>
          <table:table-cell table:formula="of:=SQRT(([.N176]-[.J176])^2+([.O176]-[.K176])^2)" office:value-type="float" office:value="1.0164795208343" calcext:value-type="float">
            <text:p>1.0164795208343</text:p>
          </table:table-cell>
          <table:table-cell office:value-type="float" office:value="0.820667088031769" calcext:value-type="float">
            <text:p>0.820667088031769</text:p>
          </table:table-cell>
          <table:table-cell office:value-type="float" office:value="0.261014521121979" calcext:value-type="float">
            <text:p>0.261014521121979</text:p>
          </table:table-cell>
          <table:table-cell office:value-type="float" office:value="-0.596000492572784" calcext:value-type="float">
            <text:p>-0.596000492572784</text:p>
          </table:table-cell>
          <table:table-cell office:value-type="float" office:value="0.999488949775696" calcext:value-type="float">
            <text:p>0.999488949775696</text:p>
          </table:table-cell>
          <table:table-cell office:value-type="float" office:value="0.276085078716278" calcext:value-type="float">
            <text:p>0.276085078716278</text:p>
          </table:table-cell>
          <table:table-cell office:value-type="float" office:value="0.311222046613693" calcext:value-type="float">
            <text:p>0.311222046613693</text:p>
          </table:table-cell>
          <table:table-cell office:value-type="float" office:value="-0.653278648853302" calcext:value-type="float">
            <text:p>-0.653278648853302</text:p>
          </table:table-cell>
          <table:table-cell office:value-type="float" office:value="0.999562740325928" calcext:value-type="float">
            <text:p>0.999562740325928</text:p>
          </table:table-cell>
          <table:table-cell office:value-type="float" office:value="0.738449573516846" calcext:value-type="float">
            <text:p>0.738449573516846</text:p>
          </table:table-cell>
          <table:table-cell office:value-type="float" office:value="1.21645665168762" calcext:value-type="float">
            <text:p>1.21645665168762</text:p>
          </table:table-cell>
          <table:table-cell office:value-type="float" office:value="0.0402914769947529" calcext:value-type="float">
            <text:p>0.0402914769947529</text:p>
          </table:table-cell>
          <table:table-cell office:value-type="float" office:value="0.0599552728235722" calcext:value-type="float">
            <text:p>0.0599552728235722</text:p>
          </table:table-cell>
          <table:table-cell office:value-type="float" office:value="0.406516790390015" calcext:value-type="float">
            <text:p>0.406516790390015</text:p>
          </table:table-cell>
          <table:table-cell office:value-type="float" office:value="1.21200942993164" calcext:value-type="float">
            <text:p>1.21200942993164</text:p>
          </table:table-cell>
          <table:table-cell office:value-type="float" office:value="-0.0307707134634256" calcext:value-type="float">
            <text:p>-0.0307707134634256</text:p>
          </table:table-cell>
          <table:table-cell office:value-type="float" office:value="0.0608698986470699" calcext:value-type="float">
            <text:p>0.06086989864706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QRT(([.J177]-[.F177])^2+([.K177]-[.G177])^2)" office:value-type="float" office:value="0.544056539246776" calcext:value-type="float">
            <text:p>0.544056539246776</text:p>
          </table:table-cell>
          <table:table-cell table:formula="of:=SQRT(([.R177]-[.N177])^2+([.S177]-[.O177])^2)" office:value-type="float" office:value="0.328712081606011" calcext:value-type="float">
            <text:p>0.328712081606011</text:p>
          </table:table-cell>
          <table:table-cell table:formula="of:=SQRT(([.R177]-[.F177])^2+([.S177]-[.G177])^2)" office:value-type="float" office:value="1.03825331572061" calcext:value-type="float">
            <text:p>1.03825331572061</text:p>
          </table:table-cell>
          <table:table-cell table:formula="of:=SQRT(([.N177]-[.J177])^2+([.O177]-[.K177])^2)" office:value-type="float" office:value="1.01857642517745" calcext:value-type="float">
            <text:p>1.01857642517745</text:p>
          </table:table-cell>
          <table:table-cell office:value-type="float" office:value="0.82261860370636" calcext:value-type="float">
            <text:p>0.82261860370636</text:p>
          </table:table-cell>
          <table:table-cell office:value-type="float" office:value="0.260838955640793" calcext:value-type="float">
            <text:p>0.260838955640793</text:p>
          </table:table-cell>
          <table:table-cell office:value-type="float" office:value="-0.595787763595581" calcext:value-type="float">
            <text:p>-0.595787763595581</text:p>
          </table:table-cell>
          <table:table-cell office:value-type="float" office:value="0.999514043331146" calcext:value-type="float">
            <text:p>0.999514043331146</text:p>
          </table:table-cell>
          <table:table-cell office:value-type="float" office:value="0.280687183141708" calcext:value-type="float">
            <text:p>0.280687183141708</text:p>
          </table:table-cell>
          <table:table-cell office:value-type="float" office:value="0.30887907743454" calcext:value-type="float">
            <text:p>0.30887907743454</text:p>
          </table:table-cell>
          <table:table-cell office:value-type="float" office:value="-0.606495141983032" calcext:value-type="float">
            <text:p>-0.606495141983032</text:p>
          </table:table-cell>
          <table:table-cell office:value-type="float" office:value="0.999578893184662" calcext:value-type="float">
            <text:p>0.999578893184662</text:p>
          </table:table-cell>
          <table:table-cell office:value-type="float" office:value="0.73853212594986" calcext:value-type="float">
            <text:p>0.73853212594986</text:p>
          </table:table-cell>
          <table:table-cell office:value-type="float" office:value="1.21875596046448" calcext:value-type="float">
            <text:p>1.21875596046448</text:p>
          </table:table-cell>
          <table:table-cell office:value-type="float" office:value="0.0389442667365074" calcext:value-type="float">
            <text:p>0.0389442667365074</text:p>
          </table:table-cell>
          <table:table-cell office:value-type="float" office:value="0.059217344969511" calcext:value-type="float">
            <text:p>0.059217344969511</text:p>
          </table:table-cell>
          <table:table-cell office:value-type="float" office:value="0.409861743450165" calcext:value-type="float">
            <text:p>0.409861743450165</text:p>
          </table:table-cell>
          <table:table-cell office:value-type="float" office:value="1.21352028846741" calcext:value-type="float">
            <text:p>1.21352028846741</text:p>
          </table:table-cell>
          <table:table-cell office:value-type="float" office:value="-0.0293969251215458" calcext:value-type="float">
            <text:p>-0.0293969251215458</text:p>
          </table:table-cell>
          <table:table-cell office:value-type="float" office:value="0.0600203163921833" calcext:value-type="float">
            <text:p>0.06002031639218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QRT(([.J178]-[.F178])^2+([.K178]-[.G178])^2)" office:value-type="float" office:value="0.540762004739733" calcext:value-type="float">
            <text:p>0.540762004739733</text:p>
          </table:table-cell>
          <table:table-cell table:formula="of:=SQRT(([.R178]-[.N178])^2+([.S178]-[.O178])^2)" office:value-type="float" office:value="0.328460273845199" calcext:value-type="float">
            <text:p>0.328460273845199</text:p>
          </table:table-cell>
          <table:table-cell table:formula="of:=SQRT(([.R178]-[.F178])^2+([.S178]-[.G178])^2)" office:value-type="float" office:value="1.04916087562756" calcext:value-type="float">
            <text:p>1.04916087562756</text:p>
          </table:table-cell>
          <table:table-cell table:formula="of:=SQRT(([.N178]-[.J178])^2+([.O178]-[.K178])^2)" office:value-type="float" office:value="1.03575460637158" calcext:value-type="float">
            <text:p>1.03575460637158</text:p>
          </table:table-cell>
          <table:table-cell office:value-type="float" office:value="0.824028134346008" calcext:value-type="float">
            <text:p>0.824028134346008</text:p>
          </table:table-cell>
          <table:table-cell office:value-type="float" office:value="0.260835468769074" calcext:value-type="float">
            <text:p>0.260835468769074</text:p>
          </table:table-cell>
          <table:table-cell office:value-type="float" office:value="-0.548157155513763" calcext:value-type="float">
            <text:p>-0.548157155513763</text:p>
          </table:table-cell>
          <table:table-cell office:value-type="float" office:value="0.999531030654907" calcext:value-type="float">
            <text:p>0.999531030654907</text:p>
          </table:table-cell>
          <table:table-cell office:value-type="float" office:value="0.285180419683456" calcext:value-type="float">
            <text:p>0.285180419683456</text:p>
          </table:table-cell>
          <table:table-cell office:value-type="float" office:value="0.306296288967133" calcext:value-type="float">
            <text:p>0.306296288967133</text:p>
          </table:table-cell>
          <table:table-cell office:value-type="float" office:value="-0.511456966400147" calcext:value-type="float">
            <text:p>-0.511456966400147</text:p>
          </table:table-cell>
          <table:table-cell office:value-type="float" office:value="0.999585807323456" calcext:value-type="float">
            <text:p>0.999585807323456</text:p>
          </table:table-cell>
          <table:table-cell office:value-type="float" office:value="0.739229500293732" calcext:value-type="float">
            <text:p>0.739229500293732</text:p>
          </table:table-cell>
          <table:table-cell office:value-type="float" office:value="1.23722434043884" calcext:value-type="float">
            <text:p>1.23722434043884</text:p>
          </table:table-cell>
          <table:table-cell office:value-type="float" office:value="0.038572870194912" calcext:value-type="float">
            <text:p>0.038572870194912</text:p>
          </table:table-cell>
          <table:table-cell office:value-type="float" office:value="0.0580008178949356" calcext:value-type="float">
            <text:p>0.0580008178949356</text:p>
          </table:table-cell>
          <table:table-cell office:value-type="float" office:value="0.410986810922623" calcext:value-type="float">
            <text:p>0.410986810922623</text:p>
          </table:table-cell>
          <table:table-cell office:value-type="float" office:value="1.22527074813843" calcext:value-type="float">
            <text:p>1.22527074813843</text:p>
          </table:table-cell>
          <table:table-cell office:value-type="float" office:value="-0.0289980135858059" calcext:value-type="float">
            <text:p>-0.0289980135858059</text:p>
          </table:table-cell>
          <table:table-cell office:value-type="float" office:value="0.0589289925992489" calcext:value-type="float">
            <text:p>0.05892899259924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QRT(([.J179]-[.F179])^2+([.K179]-[.G179])^2)" office:value-type="float" office:value="0.538583674233623" calcext:value-type="float">
            <text:p>0.538583674233623</text:p>
          </table:table-cell>
          <table:table-cell table:formula="of:=SQRT(([.R179]-[.N179])^2+([.S179]-[.O179])^2)" office:value-type="float" office:value="0.326107030162866" calcext:value-type="float">
            <text:p>0.326107030162866</text:p>
          </table:table-cell>
          <table:table-cell table:formula="of:=SQRT(([.R179]-[.F179])^2+([.S179]-[.G179])^2)" office:value-type="float" office:value="1.05633153112302" calcext:value-type="float">
            <text:p>1.05633153112302</text:p>
          </table:table-cell>
          <table:table-cell table:formula="of:=SQRT(([.N179]-[.J179])^2+([.O179]-[.K179])^2)" office:value-type="float" office:value="1.04606870352352" calcext:value-type="float">
            <text:p>1.04606870352352</text:p>
          </table:table-cell>
          <table:table-cell office:value-type="float" office:value="0.825225353240967" calcext:value-type="float">
            <text:p>0.825225353240967</text:p>
          </table:table-cell>
          <table:table-cell office:value-type="float" office:value="0.255727857351303" calcext:value-type="float">
            <text:p>0.255727857351303</text:p>
          </table:table-cell>
          <table:table-cell office:value-type="float" office:value="-0.577028810977936" calcext:value-type="float">
            <text:p>-0.577028810977936</text:p>
          </table:table-cell>
          <table:table-cell office:value-type="float" office:value="0.999540269374847" calcext:value-type="float">
            <text:p>0.999540269374847</text:p>
          </table:table-cell>
          <table:table-cell office:value-type="float" office:value="0.288500934839249" calcext:value-type="float">
            <text:p>0.288500934839249</text:p>
          </table:table-cell>
          <table:table-cell office:value-type="float" office:value="0.300441086292267" calcext:value-type="float">
            <text:p>0.300441086292267</text:p>
          </table:table-cell>
          <table:table-cell office:value-type="float" office:value="-0.483860582113266" calcext:value-type="float">
            <text:p>-0.483860582113266</text:p>
          </table:table-cell>
          <table:table-cell office:value-type="float" office:value="0.999588489532471" calcext:value-type="float">
            <text:p>0.999588489532471</text:p>
          </table:table-cell>
          <table:table-cell office:value-type="float" office:value="0.739257216453552" calcext:value-type="float">
            <text:p>0.739257216453552</text:p>
          </table:table-cell>
          <table:table-cell office:value-type="float" office:value="1.24441063404083" calcext:value-type="float">
            <text:p>1.24441063404083</text:p>
          </table:table-cell>
          <table:table-cell office:value-type="float" office:value="0.0195156671106815" calcext:value-type="float">
            <text:p>0.0195156671106815</text:p>
          </table:table-cell>
          <table:table-cell office:value-type="float" office:value="0.0556190051138401" calcext:value-type="float">
            <text:p>0.0556190051138401</text:p>
          </table:table-cell>
          <table:table-cell office:value-type="float" office:value="0.413536965847015" calcext:value-type="float">
            <text:p>0.413536965847015</text:p>
          </table:table-cell>
          <table:table-cell office:value-type="float" office:value="1.22853255271912" calcext:value-type="float">
            <text:p>1.22853255271912</text:p>
          </table:table-cell>
          <table:table-cell office:value-type="float" office:value="-0.00947387330234051" calcext:value-type="float">
            <text:p>-0.00947387330234051</text:p>
          </table:table-cell>
          <table:table-cell office:value-type="float" office:value="0.0567355491220951" calcext:value-type="float">
            <text:p>0.05673554912209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QRT(([.J180]-[.F180])^2+([.K180]-[.G180])^2)" office:value-type="float" office:value="0.53917433167468" calcext:value-type="float">
            <text:p>0.53917433167468</text:p>
          </table:table-cell>
          <table:table-cell table:formula="of:=SQRT(([.R180]-[.N180])^2+([.S180]-[.O180])^2)" office:value-type="float" office:value="0.327311244348781" calcext:value-type="float">
            <text:p>0.327311244348781</text:p>
          </table:table-cell>
          <table:table-cell table:formula="of:=SQRT(([.R180]-[.F180])^2+([.S180]-[.G180])^2)" office:value-type="float" office:value="1.05919598113366" calcext:value-type="float">
            <text:p>1.05919598113366</text:p>
          </table:table-cell>
          <table:table-cell table:formula="of:=SQRT(([.N180]-[.J180])^2+([.O180]-[.K180])^2)" office:value-type="float" office:value="1.0495996599255" calcext:value-type="float">
            <text:p>1.0495996599255</text:p>
          </table:table-cell>
          <table:table-cell office:value-type="float" office:value="0.825872123241425" calcext:value-type="float">
            <text:p>0.825872123241425</text:p>
          </table:table-cell>
          <table:table-cell office:value-type="float" office:value="0.252709209918976" calcext:value-type="float">
            <text:p>0.252709209918976</text:p>
          </table:table-cell>
          <table:table-cell office:value-type="float" office:value="-0.5176802277565" calcext:value-type="float">
            <text:p>-0.5176802277565</text:p>
          </table:table-cell>
          <table:table-cell office:value-type="float" office:value="0.999556958675385" calcext:value-type="float">
            <text:p>0.999556958675385</text:p>
          </table:table-cell>
          <table:table-cell office:value-type="float" office:value="0.288494557142258" calcext:value-type="float">
            <text:p>0.288494557142258</text:p>
          </table:table-cell>
          <table:table-cell office:value-type="float" office:value="0.29669001698494" calcext:value-type="float">
            <text:p>0.29669001698494</text:p>
          </table:table-cell>
          <table:table-cell office:value-type="float" office:value="-0.433589935302734" calcext:value-type="float">
            <text:p>-0.433589935302734</text:p>
          </table:table-cell>
          <table:table-cell office:value-type="float" office:value="0.999598920345306" calcext:value-type="float">
            <text:p>0.999598920345306</text:p>
          </table:table-cell>
          <table:table-cell office:value-type="float" office:value="0.740381836891174" calcext:value-type="float">
            <text:p>0.740381836891174</text:p>
          </table:table-cell>
          <table:table-cell office:value-type="float" office:value="1.2440322637558" calcext:value-type="float">
            <text:p>1.2440322637558</text:p>
          </table:table-cell>
          <table:table-cell office:value-type="float" office:value="0.014564573764801" calcext:value-type="float">
            <text:p>0.014564573764801</text:p>
          </table:table-cell>
          <table:table-cell office:value-type="float" office:value="0.0555448159575462" calcext:value-type="float">
            <text:p>0.0555448159575462</text:p>
          </table:table-cell>
          <table:table-cell office:value-type="float" office:value="0.41344827413559" calcext:value-type="float">
            <text:p>0.41344827413559</text:p>
          </table:table-cell>
          <table:table-cell office:value-type="float" office:value="1.22831296920776" calcext:value-type="float">
            <text:p>1.22831296920776</text:p>
          </table:table-cell>
          <table:table-cell office:value-type="float" office:value="-0.00445100711658597" calcext:value-type="float">
            <text:p>-0.00445100711658597</text:p>
          </table:table-cell>
          <table:table-cell office:value-type="float" office:value="0.0565119683742523" calcext:value-type="float">
            <text:p>0.05651196837425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QRT(([.J181]-[.F181])^2+([.K181]-[.G181])^2)" office:value-type="float" office:value="0.540862315703978" calcext:value-type="float">
            <text:p>0.540862315703978</text:p>
          </table:table-cell>
          <table:table-cell table:formula="of:=SQRT(([.R181]-[.N181])^2+([.S181]-[.O181])^2)" office:value-type="float" office:value="0.325000345276019" calcext:value-type="float">
            <text:p>0.325000345276019</text:p>
          </table:table-cell>
          <table:table-cell table:formula="of:=SQRT(([.R181]-[.F181])^2+([.S181]-[.G181])^2)" office:value-type="float" office:value="1.06556186286913" calcext:value-type="float">
            <text:p>1.06556186286913</text:p>
          </table:table-cell>
          <table:table-cell table:formula="of:=SQRT(([.N181]-[.J181])^2+([.O181]-[.K181])^2)" office:value-type="float" office:value="1.05394895804626" calcext:value-type="float">
            <text:p>1.05394895804626</text:p>
          </table:table-cell>
          <table:table-cell office:value-type="float" office:value="0.829568982124329" calcext:value-type="float">
            <text:p>0.829568982124329</text:p>
          </table:table-cell>
          <table:table-cell office:value-type="float" office:value="0.252305299043655" calcext:value-type="float">
            <text:p>0.252305299043655</text:p>
          </table:table-cell>
          <table:table-cell office:value-type="float" office:value="-0.571349561214447" calcext:value-type="float">
            <text:p>-0.571349561214447</text:p>
          </table:table-cell>
          <table:table-cell office:value-type="float" office:value="0.999571561813355" calcext:value-type="float">
            <text:p>0.999571561813355</text:p>
          </table:table-cell>
          <table:table-cell office:value-type="float" office:value="0.290546357631683" calcext:value-type="float">
            <text:p>0.290546357631683</text:p>
          </table:table-cell>
          <table:table-cell office:value-type="float" office:value="0.296877205371857" calcext:value-type="float">
            <text:p>0.296877205371857</text:p>
          </table:table-cell>
          <table:table-cell office:value-type="float" office:value="-0.475282818078995" calcext:value-type="float">
            <text:p>-0.475282818078995</text:p>
          </table:table-cell>
          <table:table-cell office:value-type="float" office:value="0.999600470066071" calcext:value-type="float">
            <text:p>0.999600470066071</text:p>
          </table:table-cell>
          <table:table-cell office:value-type="float" office:value="0.739242911338806" calcext:value-type="float">
            <text:p>0.739242911338806</text:p>
          </table:table-cell>
          <table:table-cell office:value-type="float" office:value="1.25054371356964" calcext:value-type="float">
            <text:p>1.25054371356964</text:p>
          </table:table-cell>
          <table:table-cell office:value-type="float" office:value="0.00429397169500589" calcext:value-type="float">
            <text:p>0.00429397169500589</text:p>
          </table:table-cell>
          <table:table-cell office:value-type="float" office:value="0.0541502125561237" calcext:value-type="float">
            <text:p>0.0541502125561237</text:p>
          </table:table-cell>
          <table:table-cell office:value-type="float" office:value="0.414675384759903" calcext:value-type="float">
            <text:p>0.414675384759903</text:p>
          </table:table-cell>
          <table:table-cell office:value-type="float" office:value="1.23377633094788" calcext:value-type="float">
            <text:p>1.23377633094788</text:p>
          </table:table-cell>
          <table:table-cell office:value-type="float" office:value="0.00535102328285575" calcext:value-type="float">
            <text:p>0.00535102328285575</text:p>
          </table:table-cell>
          <table:table-cell office:value-type="float" office:value="0.055256363004446" calcext:value-type="float">
            <text:p>0.0552563630044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QRT(([.J182]-[.F182])^2+([.K182]-[.G182])^2)" office:value-type="float" office:value="0.539615154128928" calcext:value-type="float">
            <text:p>0.539615154128928</text:p>
          </table:table-cell>
          <table:table-cell table:formula="of:=SQRT(([.R182]-[.N182])^2+([.S182]-[.O182])^2)" office:value-type="float" office:value="0.321113686603478" calcext:value-type="float">
            <text:p>0.321113686603478</text:p>
          </table:table-cell>
          <table:table-cell table:formula="of:=SQRT(([.R182]-[.F182])^2+([.S182]-[.G182])^2)" office:value-type="float" office:value="1.07001198442994" calcext:value-type="float">
            <text:p>1.07001198442994</text:p>
          </table:table-cell>
          <table:table-cell table:formula="of:=SQRT(([.N182]-[.J182])^2+([.O182]-[.K182])^2)" office:value-type="float" office:value="1.05317041538095" calcext:value-type="float">
            <text:p>1.05317041538095</text:p>
          </table:table-cell>
          <table:table-cell office:value-type="float" office:value="0.827857196331024" calcext:value-type="float">
            <text:p>0.827857196331024</text:p>
          </table:table-cell>
          <table:table-cell office:value-type="float" office:value="0.247436553239822" calcext:value-type="float">
            <text:p>0.247436553239822</text:p>
          </table:table-cell>
          <table:table-cell office:value-type="float" office:value="-0.550031781196594" calcext:value-type="float">
            <text:p>-0.550031781196594</text:p>
          </table:table-cell>
          <table:table-cell office:value-type="float" office:value="0.999585926532745" calcext:value-type="float">
            <text:p>0.999585926532745</text:p>
          </table:table-cell>
          <table:table-cell office:value-type="float" office:value="0.290545165538788" calcext:value-type="float">
            <text:p>0.290545165538788</text:p>
          </table:table-cell>
          <table:table-cell office:value-type="float" office:value="0.297239124774933" calcext:value-type="float">
            <text:p>0.297239124774933</text:p>
          </table:table-cell>
          <table:table-cell office:value-type="float" office:value="-0.461491733789444" calcext:value-type="float">
            <text:p>-0.461491733789444</text:p>
          </table:table-cell>
          <table:table-cell office:value-type="float" office:value="0.9996098279953" calcext:value-type="float">
            <text:p>0.9996098279953</text:p>
          </table:table-cell>
          <table:table-cell office:value-type="float" office:value="0.739440321922302" calcext:value-type="float">
            <text:p>0.739440321922302</text:p>
          </table:table-cell>
          <table:table-cell office:value-type="float" office:value="1.24995160102844" calcext:value-type="float">
            <text:p>1.24995160102844</text:p>
          </table:table-cell>
          <table:table-cell office:value-type="float" office:value="0.00137497042305768" calcext:value-type="float">
            <text:p>0.00137497042305768</text:p>
          </table:table-cell>
          <table:table-cell office:value-type="float" office:value="0.0511395633220673" calcext:value-type="float">
            <text:p>0.0511395633220673</text:p>
          </table:table-cell>
          <table:table-cell office:value-type="float" office:value="0.41862553358078" calcext:value-type="float">
            <text:p>0.41862553358078</text:p>
          </table:table-cell>
          <table:table-cell office:value-type="float" office:value="1.23609983921051" calcext:value-type="float">
            <text:p>1.23609983921051</text:p>
          </table:table-cell>
          <table:table-cell office:value-type="float" office:value="0.00840000342577696" calcext:value-type="float">
            <text:p>0.00840000342577696</text:p>
          </table:table-cell>
          <table:table-cell office:value-type="float" office:value="0.052202582359314" calcext:value-type="float">
            <text:p>0.0522025823593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QRT(([.J183]-[.F183])^2+([.K183]-[.G183])^2)" office:value-type="float" office:value="0.538569362574689" calcext:value-type="float">
            <text:p>0.538569362574689</text:p>
          </table:table-cell>
          <table:table-cell table:formula="of:=SQRT(([.R183]-[.N183])^2+([.S183]-[.O183])^2)" office:value-type="float" office:value="0.319559865184867" calcext:value-type="float">
            <text:p>0.319559865184867</text:p>
          </table:table-cell>
          <table:table-cell table:formula="of:=SQRT(([.R183]-[.F183])^2+([.S183]-[.G183])^2)" office:value-type="float" office:value="1.05573958573574" calcext:value-type="float">
            <text:p>1.05573958573574</text:p>
          </table:table-cell>
          <table:table-cell table:formula="of:=SQRT(([.N183]-[.J183])^2+([.O183]-[.K183])^2)" office:value-type="float" office:value="1.05384446353884" calcext:value-type="float">
            <text:p>1.05384446353884</text:p>
          </table:table-cell>
          <table:table-cell office:value-type="float" office:value="0.827881932258606" calcext:value-type="float">
            <text:p>0.827881932258606</text:p>
          </table:table-cell>
          <table:table-cell office:value-type="float" office:value="0.247314035892487" calcext:value-type="float">
            <text:p>0.247314035892487</text:p>
          </table:table-cell>
          <table:table-cell office:value-type="float" office:value="-0.369154542684555" calcext:value-type="float">
            <text:p>-0.369154542684555</text:p>
          </table:table-cell>
          <table:table-cell office:value-type="float" office:value="0.999594569206238" calcext:value-type="float">
            <text:p>0.999594569206238</text:p>
          </table:table-cell>
          <table:table-cell office:value-type="float" office:value="0.29148280620575" calcext:value-type="float">
            <text:p>0.29148280620575</text:p>
          </table:table-cell>
          <table:table-cell office:value-type="float" office:value="0.295614510774612" calcext:value-type="float">
            <text:p>0.295614510774612</text:p>
          </table:table-cell>
          <table:table-cell office:value-type="float" office:value="-0.225987270474434" calcext:value-type="float">
            <text:p>-0.225987270474434</text:p>
          </table:table-cell>
          <table:table-cell office:value-type="float" office:value="0.999605357646942" calcext:value-type="float">
            <text:p>0.999605357646942</text:p>
          </table:table-cell>
          <table:table-cell office:value-type="float" office:value="0.738489508628845" calcext:value-type="float">
            <text:p>0.738489508628845</text:p>
          </table:table-cell>
          <table:table-cell office:value-type="float" office:value="1.24995887279511" calcext:value-type="float">
            <text:p>1.24995887279511</text:p>
          </table:table-cell>
          <table:table-cell office:value-type="float" office:value="0.00179365312214941" calcext:value-type="float">
            <text:p>0.00179365312214941</text:p>
          </table:table-cell>
          <table:table-cell office:value-type="float" office:value="0.0538828372955322" calcext:value-type="float">
            <text:p>0.0538828372955322</text:p>
          </table:table-cell>
          <table:table-cell office:value-type="float" office:value="0.420228630304337" calcext:value-type="float">
            <text:p>0.420228630304337</text:p>
          </table:table-cell>
          <table:table-cell office:value-type="float" office:value="1.22117483615875" calcext:value-type="float">
            <text:p>1.22117483615875</text:p>
          </table:table-cell>
          <table:table-cell office:value-type="float" office:value="0.00797273591160774" calcext:value-type="float">
            <text:p>0.00797273591160774</text:p>
          </table:table-cell>
          <table:table-cell office:value-type="float" office:value="0.0551000349223614" calcext:value-type="float">
            <text:p>0.05510003492236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QRT(([.J184]-[.F184])^2+([.K184]-[.G184])^2)" office:value-type="float" office:value="0.537739134902262" calcext:value-type="float">
            <text:p>0.537739134902262</text:p>
          </table:table-cell>
          <table:table-cell table:formula="of:=SQRT(([.R184]-[.N184])^2+([.S184]-[.O184])^2)" office:value-type="float" office:value="0.320495821675154" calcext:value-type="float">
            <text:p>0.320495821675154</text:p>
          </table:table-cell>
          <table:table-cell table:formula="of:=SQRT(([.R184]-[.F184])^2+([.S184]-[.G184])^2)" office:value-type="float" office:value="1.05776318294472" calcext:value-type="float">
            <text:p>1.05776318294472</text:p>
          </table:table-cell>
          <table:table-cell table:formula="of:=SQRT(([.N184]-[.J184])^2+([.O184]-[.K184])^2)" office:value-type="float" office:value="1.05670404674843" calcext:value-type="float">
            <text:p>1.05670404674843</text:p>
          </table:table-cell>
          <table:table-cell office:value-type="float" office:value="0.82796847820282" calcext:value-type="float">
            <text:p>0.82796847820282</text:p>
          </table:table-cell>
          <table:table-cell office:value-type="float" office:value="0.248978093266487" calcext:value-type="float">
            <text:p>0.248978093266487</text:p>
          </table:table-cell>
          <table:table-cell office:value-type="float" office:value="-0.561848342418671" calcext:value-type="float">
            <text:p>-0.561848342418671</text:p>
          </table:table-cell>
          <table:table-cell office:value-type="float" office:value="0.999602377414703" calcext:value-type="float">
            <text:p>0.999602377414703</text:p>
          </table:table-cell>
          <table:table-cell office:value-type="float" office:value="0.292175710201263" calcext:value-type="float">
            <text:p>0.292175710201263</text:p>
          </table:table-cell>
          <table:table-cell office:value-type="float" office:value="0.294688999652863" calcext:value-type="float">
            <text:p>0.294688999652863</text:p>
          </table:table-cell>
          <table:table-cell office:value-type="float" office:value="-0.284091144800186" calcext:value-type="float">
            <text:p>-0.284091144800186</text:p>
          </table:table-cell>
          <table:table-cell office:value-type="float" office:value="0.999602735042572" calcext:value-type="float">
            <text:p>0.999602735042572</text:p>
          </table:table-cell>
          <table:table-cell office:value-type="float" office:value="0.738694190979004" calcext:value-type="float">
            <text:p>0.738694190979004</text:p>
          </table:table-cell>
          <table:table-cell office:value-type="float" office:value="1.25241792201996" calcext:value-type="float">
            <text:p>1.25241792201996</text:p>
          </table:table-cell>
          <table:table-cell office:value-type="float" office:value="-0.0157959666103125" calcext:value-type="float">
            <text:p>-0.0157959666103125</text:p>
          </table:table-cell>
          <table:table-cell office:value-type="float" office:value="0.0543961636722088" calcext:value-type="float">
            <text:p>0.0543961636722088</text:p>
          </table:table-cell>
          <table:table-cell office:value-type="float" office:value="0.419403463602066" calcext:value-type="float">
            <text:p>0.419403463602066</text:p>
          </table:table-cell>
          <table:table-cell office:value-type="float" office:value="1.22465097904205" calcext:value-type="float">
            <text:p>1.22465097904205</text:p>
          </table:table-cell>
          <table:table-cell office:value-type="float" office:value="0.0254492126405239" calcext:value-type="float">
            <text:p>0.0254492126405239</text:p>
          </table:table-cell>
          <table:table-cell office:value-type="float" office:value="0.055439867079258" calcext:value-type="float">
            <text:p>0.0554398670792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QRT(([.J185]-[.F185])^2+([.K185]-[.G185])^2)" office:value-type="float" office:value="0.535981525525633" calcext:value-type="float">
            <text:p>0.535981525525633</text:p>
          </table:table-cell>
          <table:table-cell table:formula="of:=SQRT(([.R185]-[.N185])^2+([.S185]-[.O185])^2)" office:value-type="float" office:value="0.319377552149731" calcext:value-type="float">
            <text:p>0.319377552149731</text:p>
          </table:table-cell>
          <table:table-cell table:formula="of:=SQRT(([.R185]-[.F185])^2+([.S185]-[.G185])^2)" office:value-type="float" office:value="1.07082547101812" calcext:value-type="float">
            <text:p>1.07082547101812</text:p>
          </table:table-cell>
          <table:table-cell table:formula="of:=SQRT(([.N185]-[.J185])^2+([.O185]-[.K185])^2)" office:value-type="float" office:value="1.0658319611388" calcext:value-type="float">
            <text:p>1.0658319611388</text:p>
          </table:table-cell>
          <table:table-cell office:value-type="float" office:value="0.828632712364197" calcext:value-type="float">
            <text:p>0.828632712364197</text:p>
          </table:table-cell>
          <table:table-cell office:value-type="float" office:value="0.251453429460526" calcext:value-type="float">
            <text:p>0.251453429460526</text:p>
          </table:table-cell>
          <table:table-cell office:value-type="float" office:value="-0.548423886299133" calcext:value-type="float">
            <text:p>-0.548423886299133</text:p>
          </table:table-cell>
          <table:table-cell office:value-type="float" office:value="0.999607026576996" calcext:value-type="float">
            <text:p>0.999607026576996</text:p>
          </table:table-cell>
          <table:table-cell office:value-type="float" office:value="0.294533520936966" calcext:value-type="float">
            <text:p>0.294533520936966</text:p>
          </table:table-cell>
          <table:table-cell office:value-type="float" office:value="0.296333819627762" calcext:value-type="float">
            <text:p>0.296333819627762</text:p>
          </table:table-cell>
          <table:table-cell office:value-type="float" office:value="-0.380431711673737" calcext:value-type="float">
            <text:p>-0.380431711673737</text:p>
          </table:table-cell>
          <table:table-cell office:value-type="float" office:value="0.999608278274536" calcext:value-type="float">
            <text:p>0.999608278274536</text:p>
          </table:table-cell>
          <table:table-cell office:value-type="float" office:value="0.738526463508606" calcext:value-type="float">
            <text:p>0.738526463508606</text:p>
          </table:table-cell>
          <table:table-cell office:value-type="float" office:value="1.26528584957123" calcext:value-type="float">
            <text:p>1.26528584957123</text:p>
          </table:table-cell>
          <table:table-cell office:value-type="float" office:value="-0.0141350422054529" calcext:value-type="float">
            <text:p>-0.0141350422054529</text:p>
          </table:table-cell>
          <table:table-cell office:value-type="float" office:value="0.0542707704007626" calcext:value-type="float">
            <text:p>0.0542707704007626</text:p>
          </table:table-cell>
          <table:table-cell office:value-type="float" office:value="0.420053392648697" calcext:value-type="float">
            <text:p>0.420053392648697</text:p>
          </table:table-cell>
          <table:table-cell office:value-type="float" office:value="1.24126660823822" calcext:value-type="float">
            <text:p>1.24126660823822</text:p>
          </table:table-cell>
          <table:table-cell office:value-type="float" office:value="0.0237776096910238" calcext:value-type="float">
            <text:p>0.0237776096910238</text:p>
          </table:table-cell>
          <table:table-cell office:value-type="float" office:value="0.055898804217577" calcext:value-type="float">
            <text:p>0.0558988042175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QRT(([.J186]-[.F186])^2+([.K186]-[.G186])^2)" office:value-type="float" office:value="0.536202939287506" calcext:value-type="float">
            <text:p>0.536202939287506</text:p>
          </table:table-cell>
          <table:table-cell table:formula="of:=SQRT(([.R186]-[.N186])^2+([.S186]-[.O186])^2)" office:value-type="float" office:value="0.319158250415821" calcext:value-type="float">
            <text:p>0.319158250415821</text:p>
          </table:table-cell>
          <table:table-cell table:formula="of:=SQRT(([.R186]-[.F186])^2+([.S186]-[.G186])^2)" office:value-type="float" office:value="1.07326047649335" calcext:value-type="float">
            <text:p>1.07326047649335</text:p>
          </table:table-cell>
          <table:table-cell table:formula="of:=SQRT(([.N186]-[.J186])^2+([.O186]-[.K186])^2)" office:value-type="float" office:value="1.06545192341452" calcext:value-type="float">
            <text:p>1.06545192341452</text:p>
          </table:table-cell>
          <table:table-cell office:value-type="float" office:value="0.828845024108887" calcext:value-type="float">
            <text:p>0.828845024108887</text:p>
          </table:table-cell>
          <table:table-cell office:value-type="float" office:value="0.251453518867493" calcext:value-type="float">
            <text:p>0.251453518867493</text:p>
          </table:table-cell>
          <table:table-cell office:value-type="float" office:value="-0.544358015060425" calcext:value-type="float">
            <text:p>-0.544358015060425</text:p>
          </table:table-cell>
          <table:table-cell office:value-type="float" office:value="0.999601662158966" calcext:value-type="float">
            <text:p>0.999601662158966</text:p>
          </table:table-cell>
          <table:table-cell office:value-type="float" office:value="0.294526070356369" calcext:value-type="float">
            <text:p>0.294526070356369</text:p>
          </table:table-cell>
          <table:table-cell office:value-type="float" office:value="0.296362847089767" calcext:value-type="float">
            <text:p>0.296362847089767</text:p>
          </table:table-cell>
          <table:table-cell office:value-type="float" office:value="-0.408661603927612" calcext:value-type="float">
            <text:p>-0.408661603927612</text:p>
          </table:table-cell>
          <table:table-cell office:value-type="float" office:value="0.999595582485199" calcext:value-type="float">
            <text:p>0.999595582485199</text:p>
          </table:table-cell>
          <table:table-cell office:value-type="float" office:value="0.738691806793213" calcext:value-type="float">
            <text:p>0.738691806793213</text:p>
          </table:table-cell>
          <table:table-cell office:value-type="float" office:value="1.26481759548187" calcext:value-type="float">
            <text:p>1.26481759548187</text:p>
          </table:table-cell>
          <table:table-cell office:value-type="float" office:value="-0.0133439050987363" calcext:value-type="float">
            <text:p>-0.0133439050987363</text:p>
          </table:table-cell>
          <table:table-cell office:value-type="float" office:value="0.0537213496863842" calcext:value-type="float">
            <text:p>0.0537213496863842</text:p>
          </table:table-cell>
          <table:table-cell office:value-type="float" office:value="0.420220941305161" calcext:value-type="float">
            <text:p>0.420220941305161</text:p>
          </table:table-cell>
          <table:table-cell office:value-type="float" office:value="1.24388206005096" calcext:value-type="float">
            <text:p>1.24388206005096</text:p>
          </table:table-cell>
          <table:table-cell office:value-type="float" office:value="0.0229194946587086" calcext:value-type="float">
            <text:p>0.0229194946587086</text:p>
          </table:table-cell>
          <table:table-cell office:value-type="float" office:value="0.0553852394223213" calcext:value-type="float">
            <text:p>0.05538523942232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QRT(([.J187]-[.F187])^2+([.K187]-[.G187])^2)" office:value-type="float" office:value="0.534986570632108" calcext:value-type="float">
            <text:p>0.534986570632108</text:p>
          </table:table-cell>
          <table:table-cell table:formula="of:=SQRT(([.R187]-[.N187])^2+([.S187]-[.O187])^2)" office:value-type="float" office:value="0.317457733882479" calcext:value-type="float">
            <text:p>0.317457733882479</text:p>
          </table:table-cell>
          <table:table-cell table:formula="of:=SQRT(([.R187]-[.F187])^2+([.S187]-[.G187])^2)" office:value-type="float" office:value="1.07172135045643" calcext:value-type="float">
            <text:p>1.07172135045643</text:p>
          </table:table-cell>
          <table:table-cell table:formula="of:=SQRT(([.N187]-[.J187])^2+([.O187]-[.K187])^2)" office:value-type="float" office:value="1.06116435244806" calcext:value-type="float">
            <text:p>1.06116435244806</text:p>
          </table:table-cell>
          <table:table-cell office:value-type="float" office:value="0.828073143959045" calcext:value-type="float">
            <text:p>0.828073143959045</text:p>
          </table:table-cell>
          <table:table-cell office:value-type="float" office:value="0.25190457701683" calcext:value-type="float">
            <text:p>0.25190457701683</text:p>
          </table:table-cell>
          <table:table-cell office:value-type="float" office:value="-0.553156971931458" calcext:value-type="float">
            <text:p>-0.553156971931458</text:p>
          </table:table-cell>
          <table:table-cell office:value-type="float" office:value="0.999589800834656" calcext:value-type="float">
            <text:p>0.999589800834656</text:p>
          </table:table-cell>
          <table:table-cell office:value-type="float" office:value="0.294953435659409" calcext:value-type="float">
            <text:p>0.294953435659409</text:p>
          </table:table-cell>
          <table:table-cell office:value-type="float" office:value="0.296558886766434" calcext:value-type="float">
            <text:p>0.296558886766434</text:p>
          </table:table-cell>
          <table:table-cell office:value-type="float" office:value="-0.465887546539307" calcext:value-type="float">
            <text:p>-0.465887546539307</text:p>
          </table:table-cell>
          <table:table-cell office:value-type="float" office:value="0.999575912952423" calcext:value-type="float">
            <text:p>0.999575912952423</text:p>
          </table:table-cell>
          <table:table-cell office:value-type="float" office:value="0.737047851085663" calcext:value-type="float">
            <text:p>0.737047851085663</text:p>
          </table:table-cell>
          <table:table-cell office:value-type="float" office:value="1.26124656200409" calcext:value-type="float">
            <text:p>1.26124656200409</text:p>
          </table:table-cell>
          <table:table-cell office:value-type="float" office:value="-0.0105651775375009" calcext:value-type="float">
            <text:p>-0.0105651775375009</text:p>
          </table:table-cell>
          <table:table-cell office:value-type="float" office:value="0.0528523325920105" calcext:value-type="float">
            <text:p>0.0528523325920105</text:p>
          </table:table-cell>
          <table:table-cell office:value-type="float" office:value="0.420118153095245" calcext:value-type="float">
            <text:p>0.420118153095245</text:p>
          </table:table-cell>
          <table:table-cell office:value-type="float" office:value="1.24294412136078" calcext:value-type="float">
            <text:p>1.24294412136078</text:p>
          </table:table-cell>
          <table:table-cell office:value-type="float" office:value="0.0202139709144831" calcext:value-type="float">
            <text:p>0.0202139709144831</text:p>
          </table:table-cell>
          <table:table-cell office:value-type="float" office:value="0.0544887185096741" calcext:value-type="float">
            <text:p>0.05448871850967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QRT(([.J188]-[.F188])^2+([.K188]-[.G188])^2)" office:value-type="float" office:value="0.532518676721541" calcext:value-type="float">
            <text:p>0.532518676721541</text:p>
          </table:table-cell>
          <table:table-cell table:formula="of:=SQRT(([.R188]-[.N188])^2+([.S188]-[.O188])^2)" office:value-type="float" office:value="0.323707775109338" calcext:value-type="float">
            <text:p>0.323707775109338</text:p>
          </table:table-cell>
          <table:table-cell table:formula="of:=SQRT(([.R188]-[.F188])^2+([.S188]-[.G188])^2)" office:value-type="float" office:value="1.06242094397879" calcext:value-type="float">
            <text:p>1.06242094397879</text:p>
          </table:table-cell>
          <table:table-cell table:formula="of:=SQRT(([.N188]-[.J188])^2+([.O188]-[.K188])^2)" office:value-type="float" office:value="1.06078138011371" calcext:value-type="float">
            <text:p>1.06078138011371</text:p>
          </table:table-cell>
          <table:table-cell office:value-type="float" office:value="0.828432857990265" calcext:value-type="float">
            <text:p>0.828432857990265</text:p>
          </table:table-cell>
          <table:table-cell office:value-type="float" office:value="0.262204080820084" calcext:value-type="float">
            <text:p>0.262204080820084</text:p>
          </table:table-cell>
          <table:table-cell office:value-type="float" office:value="-0.483938604593277" calcext:value-type="float">
            <text:p>-0.483938604593277</text:p>
          </table:table-cell>
          <table:table-cell office:value-type="float" office:value="0.999605238437653" calcext:value-type="float">
            <text:p>0.999605238437653</text:p>
          </table:table-cell>
          <table:table-cell office:value-type="float" office:value="0.296937197446823" calcext:value-type="float">
            <text:p>0.296937197446823</text:p>
          </table:table-cell>
          <table:table-cell office:value-type="float" office:value="0.295196563005447" calcext:value-type="float">
            <text:p>0.295196563005447</text:p>
          </table:table-cell>
          <table:table-cell office:value-type="float" office:value="-0.428526729345322" calcext:value-type="float">
            <text:p>-0.428526729345322</text:p>
          </table:table-cell>
          <table:table-cell office:value-type="float" office:value="0.99959009885788" calcext:value-type="float">
            <text:p>0.99959009885788</text:p>
          </table:table-cell>
          <table:table-cell office:value-type="float" office:value="0.736048817634583" calcext:value-type="float">
            <text:p>0.736048817634583</text:p>
          </table:table-cell>
          <table:table-cell office:value-type="float" office:value="1.26082491874695" calcext:value-type="float">
            <text:p>1.26082491874695</text:p>
          </table:table-cell>
          <table:table-cell office:value-type="float" office:value="0.00875261519104242" calcext:value-type="float">
            <text:p>0.00875261519104242</text:p>
          </table:table-cell>
          <table:table-cell office:value-type="float" office:value="0.0535021014511585" calcext:value-type="float">
            <text:p>0.0535021014511585</text:p>
          </table:table-cell>
          <table:table-cell office:value-type="float" office:value="0.413009077310562" calcext:value-type="float">
            <text:p>0.413009077310562</text:p>
          </table:table-cell>
          <table:table-cell office:value-type="float" office:value="1.24003911018372" calcext:value-type="float">
            <text:p>1.24003911018372</text:p>
          </table:table-cell>
          <table:table-cell office:value-type="float" office:value="0.000575954676605761" calcext:value-type="float">
            <text:p>0.000575954676605761</text:p>
          </table:table-cell>
          <table:table-cell office:value-type="float" office:value="0.055026937276125" calcext:value-type="float">
            <text:p>0.055026937276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QRT(([.J189]-[.F189])^2+([.K189]-[.G189])^2)" office:value-type="float" office:value="0.531543985302367" calcext:value-type="float">
            <text:p>0.531543985302367</text:p>
          </table:table-cell>
          <table:table-cell table:formula="of:=SQRT(([.R189]-[.N189])^2+([.S189]-[.O189])^2)" office:value-type="float" office:value="0.323296579146954" calcext:value-type="float">
            <text:p>0.323296579146954</text:p>
          </table:table-cell>
          <table:table-cell table:formula="of:=SQRT(([.R189]-[.F189])^2+([.S189]-[.G189])^2)" office:value-type="float" office:value="1.06215789074205" calcext:value-type="float">
            <text:p>1.06215789074205</text:p>
          </table:table-cell>
          <table:table-cell table:formula="of:=SQRT(([.N189]-[.J189])^2+([.O189]-[.K189])^2)" office:value-type="float" office:value="1.05197149488717" calcext:value-type="float">
            <text:p>1.05197149488717</text:p>
          </table:table-cell>
          <table:table-cell office:value-type="float" office:value="0.827808558940888" calcext:value-type="float">
            <text:p>0.827808558940888</text:p>
          </table:table-cell>
          <table:table-cell office:value-type="float" office:value="0.261454194784164" calcext:value-type="float">
            <text:p>0.261454194784164</text:p>
          </table:table-cell>
          <table:table-cell office:value-type="float" office:value="-0.678349852561951" calcext:value-type="float">
            <text:p>-0.678349852561951</text:p>
          </table:table-cell>
          <table:table-cell office:value-type="float" office:value="0.99957287311554" calcext:value-type="float">
            <text:p>0.99957287311554</text:p>
          </table:table-cell>
          <table:table-cell office:value-type="float" office:value="0.29747074842453" calcext:value-type="float">
            <text:p>0.29747074842453</text:p>
          </table:table-cell>
          <table:table-cell office:value-type="float" office:value="0.297242671251297" calcext:value-type="float">
            <text:p>0.297242671251297</text:p>
          </table:table-cell>
          <table:table-cell office:value-type="float" office:value="-0.619614243507385" calcext:value-type="float">
            <text:p>-0.619614243507385</text:p>
          </table:table-cell>
          <table:table-cell office:value-type="float" office:value="0.999560415744782" calcext:value-type="float">
            <text:p>0.999560415744782</text:p>
          </table:table-cell>
          <table:table-cell office:value-type="float" office:value="0.736297965049744" calcext:value-type="float">
            <text:p>0.736297965049744</text:p>
          </table:table-cell>
          <table:table-cell office:value-type="float" office:value="1.25331521034241" calcext:value-type="float">
            <text:p>1.25331521034241</text:p>
          </table:table-cell>
          <table:table-cell office:value-type="float" office:value="0.00589721370488405" calcext:value-type="float">
            <text:p>0.00589721370488405</text:p>
          </table:table-cell>
          <table:table-cell office:value-type="float" office:value="0.0534572042524815" calcext:value-type="float">
            <text:p>0.0534572042524815</text:p>
          </table:table-cell>
          <table:table-cell office:value-type="float" office:value="0.413301318883896" calcext:value-type="float">
            <text:p>0.413301318883896</text:p>
          </table:table-cell>
          <table:table-cell office:value-type="float" office:value="1.2393923997879" calcext:value-type="float">
            <text:p>1.2393923997879</text:p>
          </table:table-cell>
          <table:table-cell office:value-type="float" office:value="0.00372174195945263" calcext:value-type="float">
            <text:p>0.00372174195945263</text:p>
          </table:table-cell>
          <table:table-cell office:value-type="float" office:value="0.0544738247990608" calcext:value-type="float">
            <text:p>0.05447382479906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QRT(([.J190]-[.F190])^2+([.K190]-[.G190])^2)" office:value-type="float" office:value="0.534261561638479" calcext:value-type="float">
            <text:p>0.534261561638479</text:p>
          </table:table-cell>
          <table:table-cell table:formula="of:=SQRT(([.R190]-[.N190])^2+([.S190]-[.O190])^2)" office:value-type="float" office:value="0.327882909888077" calcext:value-type="float">
            <text:p>0.327882909888077</text:p>
          </table:table-cell>
          <table:table-cell table:formula="of:=SQRT(([.R190]-[.F190])^2+([.S190]-[.G190])^2)" office:value-type="float" office:value="1.06167818266374" calcext:value-type="float">
            <text:p>1.06167818266374</text:p>
          </table:table-cell>
          <table:table-cell table:formula="of:=SQRT(([.N190]-[.J190])^2+([.O190]-[.K190])^2)" office:value-type="float" office:value="1.05364722057341" calcext:value-type="float">
            <text:p>1.05364722057341</text:p>
          </table:table-cell>
          <table:table-cell office:value-type="float" office:value="0.827864170074463" calcext:value-type="float">
            <text:p>0.827864170074463</text:p>
          </table:table-cell>
          <table:table-cell office:value-type="float" office:value="0.263680636882782" calcext:value-type="float">
            <text:p>0.263680636882782</text:p>
          </table:table-cell>
          <table:table-cell office:value-type="float" office:value="-0.533205628395081" calcext:value-type="float">
            <text:p>-0.533205628395081</text:p>
          </table:table-cell>
          <table:table-cell office:value-type="float" office:value="0.999578714370728" calcext:value-type="float">
            <text:p>0.999578714370728</text:p>
          </table:table-cell>
          <table:table-cell office:value-type="float" office:value="0.294615745544434" calcext:value-type="float">
            <text:p>0.294615745544434</text:p>
          </table:table-cell>
          <table:table-cell office:value-type="float" office:value="0.296567320823669" calcext:value-type="float">
            <text:p>0.296567320823669</text:p>
          </table:table-cell>
          <table:table-cell office:value-type="float" office:value="-0.573394477367401" calcext:value-type="float">
            <text:p>-0.573394477367401</text:p>
          </table:table-cell>
          <table:table-cell office:value-type="float" office:value="0.99956887960434" calcext:value-type="float">
            <text:p>0.99956887960434</text:p>
          </table:table-cell>
          <table:table-cell office:value-type="float" office:value="0.736422777175903" calcext:value-type="float">
            <text:p>0.736422777175903</text:p>
          </table:table-cell>
          <table:table-cell office:value-type="float" office:value="1.25311267375946" calcext:value-type="float">
            <text:p>1.25311267375946</text:p>
          </table:table-cell>
          <table:table-cell office:value-type="float" office:value="0.0218173377215862" calcext:value-type="float">
            <text:p>0.0218173377215862</text:p>
          </table:table-cell>
          <table:table-cell office:value-type="float" office:value="0.0521098487079144" calcext:value-type="float">
            <text:p>0.0521098487079144</text:p>
          </table:table-cell>
          <table:table-cell office:value-type="float" office:value="0.408836513757706" calcext:value-type="float">
            <text:p>0.408836513757706</text:p>
          </table:table-cell>
          <table:table-cell office:value-type="float" office:value="1.23916840553284" calcext:value-type="float">
            <text:p>1.23916840553284</text:p>
          </table:table-cell>
          <table:table-cell office:value-type="float" office:value="-0.0113985957577825" calcext:value-type="float">
            <text:p>-0.0113985957577825</text:p>
          </table:table-cell>
          <table:table-cell office:value-type="float" office:value="0.053602434694767" calcext:value-type="float">
            <text:p>0.0536024346947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QRT(([.J191]-[.F191])^2+([.K191]-[.G191])^2)" office:value-type="float" office:value="0.53378277917145" calcext:value-type="float">
            <text:p>0.53378277917145</text:p>
          </table:table-cell>
          <table:table-cell table:formula="of:=SQRT(([.R191]-[.N191])^2+([.S191]-[.O191])^2)" office:value-type="float" office:value="0.321578158372463" calcext:value-type="float">
            <text:p>0.321578158372463</text:p>
          </table:table-cell>
          <table:table-cell table:formula="of:=SQRT(([.R191]-[.F191])^2+([.S191]-[.G191])^2)" office:value-type="float" office:value="1.05885557889228" calcext:value-type="float">
            <text:p>1.05885557889228</text:p>
          </table:table-cell>
          <table:table-cell table:formula="of:=SQRT(([.N191]-[.J191])^2+([.O191]-[.K191])^2)" office:value-type="float" office:value="1.05261594176062" calcext:value-type="float">
            <text:p>1.05261594176062</text:p>
          </table:table-cell>
          <table:table-cell office:value-type="float" office:value="0.827364325523377" calcext:value-type="float">
            <text:p>0.827364325523377</text:p>
          </table:table-cell>
          <table:table-cell office:value-type="float" office:value="0.263001680374146" calcext:value-type="float">
            <text:p>0.263001680374146</text:p>
          </table:table-cell>
          <table:table-cell office:value-type="float" office:value="-0.530088186264038" calcext:value-type="float">
            <text:p>-0.530088186264038</text:p>
          </table:table-cell>
          <table:table-cell office:value-type="float" office:value="0.999553263187408" calcext:value-type="float">
            <text:p>0.999553263187408</text:p>
          </table:table-cell>
          <table:table-cell office:value-type="float" office:value="0.294665515422821" calcext:value-type="float">
            <text:p>0.294665515422821</text:p>
          </table:table-cell>
          <table:table-cell office:value-type="float" office:value="0.297002166509628" calcext:value-type="float">
            <text:p>0.297002166509628</text:p>
          </table:table-cell>
          <table:table-cell office:value-type="float" office:value="-0.560290396213532" calcext:value-type="float">
            <text:p>-0.560290396213532</text:p>
          </table:table-cell>
          <table:table-cell office:value-type="float" office:value="0.999551236629486" calcext:value-type="float">
            <text:p>0.999551236629486</text:p>
          </table:table-cell>
          <table:table-cell office:value-type="float" office:value="0.738235831260681" calcext:value-type="float">
            <text:p>0.738235831260681</text:p>
          </table:table-cell>
          <table:table-cell office:value-type="float" office:value="1.25159406661987" calcext:value-type="float">
            <text:p>1.25159406661987</text:p>
          </table:table-cell>
          <table:table-cell office:value-type="float" office:value="0.0211282335221767" calcext:value-type="float">
            <text:p>0.0211282335221767</text:p>
          </table:table-cell>
          <table:table-cell office:value-type="float" office:value="0.0518458671867847" calcext:value-type="float">
            <text:p>0.0518458671867847</text:p>
          </table:table-cell>
          <table:table-cell office:value-type="float" office:value="0.416901916265488" calcext:value-type="float">
            <text:p>0.416901916265488</text:p>
          </table:table-cell>
          <table:table-cell office:value-type="float" office:value="1.23906302452087" calcext:value-type="float">
            <text:p>1.23906302452087</text:p>
          </table:table-cell>
          <table:table-cell office:value-type="float" office:value="-0.010757664218545" calcext:value-type="float">
            <text:p>-0.010757664218545</text:p>
          </table:table-cell>
          <table:table-cell office:value-type="float" office:value="0.0535969473421574" calcext:value-type="float">
            <text:p>0.053596947342157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QRT(([.J192]-[.F192])^2+([.K192]-[.G192])^2)" office:value-type="float" office:value="0.533862647937778" calcext:value-type="float">
            <text:p>0.533862647937778</text:p>
          </table:table-cell>
          <table:table-cell table:formula="of:=SQRT(([.R192]-[.N192])^2+([.S192]-[.O192])^2)" office:value-type="float" office:value="0.326391942199453" calcext:value-type="float">
            <text:p>0.326391942199453</text:p>
          </table:table-cell>
          <table:table-cell table:formula="of:=SQRT(([.R192]-[.F192])^2+([.S192]-[.G192])^2)" office:value-type="float" office:value="1.06143763987672" calcext:value-type="float">
            <text:p>1.06143763987672</text:p>
          </table:table-cell>
          <table:table-cell table:formula="of:=SQRT(([.N192]-[.J192])^2+([.O192]-[.K192])^2)" office:value-type="float" office:value="1.06737204685169" calcext:value-type="float">
            <text:p>1.06737204685169</text:p>
          </table:table-cell>
          <table:table-cell office:value-type="float" office:value="0.827915847301483" calcext:value-type="float">
            <text:p>0.827915847301483</text:p>
          </table:table-cell>
          <table:table-cell office:value-type="float" office:value="0.273030072450638" calcext:value-type="float">
            <text:p>0.273030072450638</text:p>
          </table:table-cell>
          <table:table-cell office:value-type="float" office:value="-0.466428697109222" calcext:value-type="float">
            <text:p>-0.466428697109222</text:p>
          </table:table-cell>
          <table:table-cell office:value-type="float" office:value="0.999536275863648" calcext:value-type="float">
            <text:p>0.999536275863648</text:p>
          </table:table-cell>
          <table:table-cell office:value-type="float" office:value="0.2946697473526" calcext:value-type="float">
            <text:p>0.2946697473526</text:p>
          </table:table-cell>
          <table:table-cell office:value-type="float" office:value="0.2986800968647" calcext:value-type="float">
            <text:p>0.2986800968647</text:p>
          </table:table-cell>
          <table:table-cell office:value-type="float" office:value="-0.447785317897797" calcext:value-type="float">
            <text:p>-0.447785317897797</text:p>
          </table:table-cell>
          <table:table-cell office:value-type="float" office:value="0.999543070793152" calcext:value-type="float">
            <text:p>0.999543070793152</text:p>
          </table:table-cell>
          <table:table-cell office:value-type="float" office:value="0.738660275936127" calcext:value-type="float">
            <text:p>0.738660275936127</text:p>
          </table:table-cell>
          <table:table-cell office:value-type="float" office:value="1.269327044487" calcext:value-type="float">
            <text:p>1.269327044487</text:p>
          </table:table-cell>
          <table:table-cell office:value-type="float" office:value="0.0255071315914392" calcext:value-type="float">
            <text:p>0.0255071315914392</text:p>
          </table:table-cell>
          <table:table-cell office:value-type="float" office:value="0.0522962212562561" calcext:value-type="float">
            <text:p>0.0522962212562561</text:p>
          </table:table-cell>
          <table:table-cell office:value-type="float" office:value="0.412844240665436" calcext:value-type="float">
            <text:p>0.412844240665436</text:p>
          </table:table-cell>
          <table:table-cell office:value-type="float" office:value="1.2499463558197" calcext:value-type="float">
            <text:p>1.2499463558197</text:p>
          </table:table-cell>
          <table:table-cell office:value-type="float" office:value="-0.0153364930301905" calcext:value-type="float">
            <text:p>-0.0153364930301905</text:p>
          </table:table-cell>
          <table:table-cell office:value-type="float" office:value="0.054631307721138" calcext:value-type="float">
            <text:p>0.0546313077211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QRT(([.J193]-[.F193])^2+([.K193]-[.G193])^2)" office:value-type="float" office:value="0.532835011223684" calcext:value-type="float">
            <text:p>0.532835011223684</text:p>
          </table:table-cell>
          <table:table-cell table:formula="of:=SQRT(([.R193]-[.N193])^2+([.S193]-[.O193])^2)" office:value-type="float" office:value="0.327232477652706" calcext:value-type="float">
            <text:p>0.327232477652706</text:p>
          </table:table-cell>
          <table:table-cell table:formula="of:=SQRT(([.R193]-[.F193])^2+([.S193]-[.G193])^2)" office:value-type="float" office:value="1.05941894090164" calcext:value-type="float">
            <text:p>1.05941894090164</text:p>
          </table:table-cell>
          <table:table-cell table:formula="of:=SQRT(([.N193]-[.J193])^2+([.O193]-[.K193])^2)" office:value-type="float" office:value="1.06863081661208" calcext:value-type="float">
            <text:p>1.06863081661208</text:p>
          </table:table-cell>
          <table:table-cell office:value-type="float" office:value="0.828159034252167" calcext:value-type="float">
            <text:p>0.828159034252167</text:p>
          </table:table-cell>
          <table:table-cell office:value-type="float" office:value="0.272918581962585" calcext:value-type="float">
            <text:p>0.272918581962585</text:p>
          </table:table-cell>
          <table:table-cell office:value-type="float" office:value="-0.462105423212051" calcext:value-type="float">
            <text:p>-0.462105423212051</text:p>
          </table:table-cell>
          <table:table-cell office:value-type="float" office:value="0.999518096446991" calcext:value-type="float">
            <text:p>0.999518096446991</text:p>
          </table:table-cell>
          <table:table-cell office:value-type="float" office:value="0.295933812856674" calcext:value-type="float">
            <text:p>0.295933812856674</text:p>
          </table:table-cell>
          <table:table-cell office:value-type="float" office:value="0.298403143882751" calcext:value-type="float">
            <text:p>0.298403143882751</text:p>
          </table:table-cell>
          <table:table-cell office:value-type="float" office:value="-0.388640820980072" calcext:value-type="float">
            <text:p>-0.388640820980072</text:p>
          </table:table-cell>
          <table:table-cell office:value-type="float" office:value="0.999533355236054" calcext:value-type="float">
            <text:p>0.999533355236054</text:p>
          </table:table-cell>
          <table:table-cell office:value-type="float" office:value="0.744095921516419" calcext:value-type="float">
            <text:p>0.744095921516419</text:p>
          </table:table-cell>
          <table:table-cell office:value-type="float" office:value="1.26851785182953" calcext:value-type="float">
            <text:p>1.26851785182953</text:p>
          </table:table-cell>
          <table:table-cell office:value-type="float" office:value="0.0181544460356236" calcext:value-type="float">
            <text:p>0.0181544460356236</text:p>
          </table:table-cell>
          <table:table-cell office:value-type="float" office:value="0.0524632446467876" calcext:value-type="float">
            <text:p>0.0524632446467876</text:p>
          </table:table-cell>
          <table:table-cell office:value-type="float" office:value="0.41741806268692" calcext:value-type="float">
            <text:p>0.41741806268692</text:p>
          </table:table-cell>
          <table:table-cell office:value-type="float" office:value="1.24947392940521" calcext:value-type="float">
            <text:p>1.24947392940521</text:p>
          </table:table-cell>
          <table:table-cell office:value-type="float" office:value="-0.00753363221883774" calcext:value-type="float">
            <text:p>-0.00753363221883774</text:p>
          </table:table-cell>
          <table:table-cell office:value-type="float" office:value="0.0552055202424526" calcext:value-type="float">
            <text:p>0.05520552024245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QRT(([.J194]-[.F194])^2+([.K194]-[.G194])^2)" office:value-type="float" office:value="0.535993817701256" calcext:value-type="float">
            <text:p>0.535993817701256</text:p>
          </table:table-cell>
          <table:table-cell table:formula="of:=SQRT(([.R194]-[.N194])^2+([.S194]-[.O194])^2)" office:value-type="float" office:value="0.324082058439835" calcext:value-type="float">
            <text:p>0.324082058439835</text:p>
          </table:table-cell>
          <table:table-cell table:formula="of:=SQRT(([.R194]-[.F194])^2+([.S194]-[.G194])^2)" office:value-type="float" office:value="1.05846280690005" calcext:value-type="float">
            <text:p>1.05846280690005</text:p>
          </table:table-cell>
          <table:table-cell table:formula="of:=SQRT(([.N194]-[.J194])^2+([.O194]-[.K194])^2)" office:value-type="float" office:value="1.05303668488772" calcext:value-type="float">
            <text:p>1.05303668488772</text:p>
          </table:table-cell>
          <table:table-cell office:value-type="float" office:value="0.827044665813446" calcext:value-type="float">
            <text:p>0.827044665813446</text:p>
          </table:table-cell>
          <table:table-cell office:value-type="float" office:value="0.274813026189804" calcext:value-type="float">
            <text:p>0.274813026189804</text:p>
          </table:table-cell>
          <table:table-cell office:value-type="float" office:value="-0.546512007713318" calcext:value-type="float">
            <text:p>-0.546512007713318</text:p>
          </table:table-cell>
          <table:table-cell office:value-type="float" office:value="0.999528527259827" calcext:value-type="float">
            <text:p>0.999528527259827</text:p>
          </table:table-cell>
          <table:table-cell office:value-type="float" office:value="0.292188972234726" calcext:value-type="float">
            <text:p>0.292188972234726</text:p>
          </table:table-cell>
          <table:table-cell office:value-type="float" office:value="0.309723764657974" calcext:value-type="float">
            <text:p>0.309723764657974</text:p>
          </table:table-cell>
          <table:table-cell office:value-type="float" office:value="-0.513277471065521" calcext:value-type="float">
            <text:p>-0.513277471065521</text:p>
          </table:table-cell>
          <table:table-cell office:value-type="float" office:value="0.999547839164734" calcext:value-type="float">
            <text:p>0.999547839164734</text:p>
          </table:table-cell>
          <table:table-cell office:value-type="float" office:value="0.737628757953644" calcext:value-type="float">
            <text:p>0.737628757953644</text:p>
          </table:table-cell>
          <table:table-cell office:value-type="float" office:value="1.26390910148621" calcext:value-type="float">
            <text:p>1.26390910148621</text:p>
          </table:table-cell>
          <table:table-cell office:value-type="float" office:value="0.0183736141771078" calcext:value-type="float">
            <text:p>0.0183736141771078</text:p>
          </table:table-cell>
          <table:table-cell office:value-type="float" office:value="0.0549441650509834" calcext:value-type="float">
            <text:p>0.0549441650509834</text:p>
          </table:table-cell>
          <table:table-cell office:value-type="float" office:value="0.413875907659531" calcext:value-type="float">
            <text:p>0.413875907659531</text:p>
          </table:table-cell>
          <table:table-cell office:value-type="float" office:value="1.2493052482605" calcext:value-type="float">
            <text:p>1.2493052482605</text:p>
          </table:table-cell>
          <table:table-cell office:value-type="float" office:value="-0.00798997469246388" calcext:value-type="float">
            <text:p>-0.00798997469246388</text:p>
          </table:table-cell>
          <table:table-cell office:value-type="float" office:value="0.0575654916465282" calcext:value-type="float">
            <text:p>0.05756549164652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QRT(([.J195]-[.F195])^2+([.K195]-[.G195])^2)" office:value-type="float" office:value="0.534740469243468" calcext:value-type="float">
            <text:p>0.534740469243468</text:p>
          </table:table-cell>
          <table:table-cell table:formula="of:=SQRT(([.R195]-[.N195])^2+([.S195]-[.O195])^2)" office:value-type="float" office:value="0.324605091883614" calcext:value-type="float">
            <text:p>0.324605091883614</text:p>
          </table:table-cell>
          <table:table-cell table:formula="of:=SQRT(([.R195]-[.F195])^2+([.S195]-[.G195])^2)" office:value-type="float" office:value="1.06425706697178" calcext:value-type="float">
            <text:p>1.06425706697178</text:p>
          </table:table-cell>
          <table:table-cell table:formula="of:=SQRT(([.N195]-[.J195])^2+([.O195]-[.K195])^2)" office:value-type="float" office:value="1.06233536315099" calcext:value-type="float">
            <text:p>1.06233536315099</text:p>
          </table:table-cell>
          <table:table-cell office:value-type="float" office:value="0.827119827270508" calcext:value-type="float">
            <text:p>0.827119827270508</text:p>
          </table:table-cell>
          <table:table-cell office:value-type="float" office:value="0.276895374059677" calcext:value-type="float">
            <text:p>0.276895374059677</text:p>
          </table:table-cell>
          <table:table-cell office:value-type="float" office:value="-0.553035199642181" calcext:value-type="float">
            <text:p>-0.553035199642181</text:p>
          </table:table-cell>
          <table:table-cell office:value-type="float" office:value="0.999529004096985" calcext:value-type="float">
            <text:p>0.999529004096985</text:p>
          </table:table-cell>
          <table:table-cell office:value-type="float" office:value="0.293378174304962" calcext:value-type="float">
            <text:p>0.293378174304962</text:p>
          </table:table-cell>
          <table:table-cell office:value-type="float" office:value="0.309563666582108" calcext:value-type="float">
            <text:p>0.309563666582108</text:p>
          </table:table-cell>
          <table:table-cell office:value-type="float" office:value="-0.51033353805542" calcext:value-type="float">
            <text:p>-0.51033353805542</text:p>
          </table:table-cell>
          <table:table-cell office:value-type="float" office:value="0.999553859233856" calcext:value-type="float">
            <text:p>0.999553859233856</text:p>
          </table:table-cell>
          <table:table-cell office:value-type="float" office:value="0.738055229187012" calcext:value-type="float">
            <text:p>0.738055229187012</text:p>
          </table:table-cell>
          <table:table-cell office:value-type="float" office:value="1.27435314655304" calcext:value-type="float">
            <text:p>1.27435314655304</text:p>
          </table:table-cell>
          <table:table-cell office:value-type="float" office:value="0.0151745127514005" calcext:value-type="float">
            <text:p>0.0151745127514005</text:p>
          </table:table-cell>
          <table:table-cell office:value-type="float" office:value="0.0558077394962311" calcext:value-type="float">
            <text:p>0.0558077394962311</text:p>
          </table:table-cell>
          <table:table-cell office:value-type="float" office:value="0.413880258798599" calcext:value-type="float">
            <text:p>0.413880258798599</text:p>
          </table:table-cell>
          <table:table-cell office:value-type="float" office:value="1.257648229599" calcext:value-type="float">
            <text:p>1.257648229599</text:p>
          </table:table-cell>
          <table:table-cell office:value-type="float" office:value="-0.00521337939426303" calcext:value-type="float">
            <text:p>-0.00521337939426303</text:p>
          </table:table-cell>
          <table:table-cell office:value-type="float" office:value="0.0587767884135246" calcext:value-type="float">
            <text:p>0.05877678841352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QRT(([.J196]-[.F196])^2+([.K196]-[.G196])^2)" office:value-type="float" office:value="0.534088874419855" calcext:value-type="float">
            <text:p>0.534088874419855</text:p>
          </table:table-cell>
          <table:table-cell table:formula="of:=SQRT(([.R196]-[.N196])^2+([.S196]-[.O196])^2)" office:value-type="float" office:value="0.325215750910293" calcext:value-type="float">
            <text:p>0.325215750910293</text:p>
          </table:table-cell>
          <table:table-cell table:formula="of:=SQRT(([.R196]-[.F196])^2+([.S196]-[.G196])^2)" office:value-type="float" office:value="1.06264614435427" calcext:value-type="float">
            <text:p>1.06264614435427</text:p>
          </table:table-cell>
          <table:table-cell table:formula="of:=SQRT(([.N196]-[.J196])^2+([.O196]-[.K196])^2)" office:value-type="float" office:value="1.06109948166954" calcext:value-type="float">
            <text:p>1.06109948166954</text:p>
          </table:table-cell>
          <table:table-cell office:value-type="float" office:value="0.826147675514221" calcext:value-type="float">
            <text:p>0.826147675514221</text:p>
          </table:table-cell>
          <table:table-cell office:value-type="float" office:value="0.276987284421921" calcext:value-type="float">
            <text:p>0.276987284421921</text:p>
          </table:table-cell>
          <table:table-cell office:value-type="float" office:value="-0.552623152732849" calcext:value-type="float">
            <text:p>-0.552623152732849</text:p>
          </table:table-cell>
          <table:table-cell office:value-type="float" office:value="0.999527156352997" calcext:value-type="float">
            <text:p>0.999527156352997</text:p>
          </table:table-cell>
          <table:table-cell office:value-type="float" office:value="0.293027877807617" calcext:value-type="float">
            <text:p>0.293027877807617</text:p>
          </table:table-cell>
          <table:table-cell office:value-type="float" office:value="0.309146374464035" calcext:value-type="float">
            <text:p>0.309146374464035</text:p>
          </table:table-cell>
          <table:table-cell office:value-type="float" office:value="-0.465358167886734" calcext:value-type="float">
            <text:p>-0.465358167886734</text:p>
          </table:table-cell>
          <table:table-cell office:value-type="float" office:value="0.999551057815552" calcext:value-type="float">
            <text:p>0.999551057815552</text:p>
          </table:table-cell>
          <table:table-cell office:value-type="float" office:value="0.738612055778503" calcext:value-type="float">
            <text:p>0.738612055778503</text:p>
          </table:table-cell>
          <table:table-cell office:value-type="float" office:value="1.27215564250946" calcext:value-type="float">
            <text:p>1.27215564250946</text:p>
          </table:table-cell>
          <table:table-cell office:value-type="float" office:value="0.010887099429965" calcext:value-type="float">
            <text:p>0.010887099429965</text:p>
          </table:table-cell>
          <table:table-cell office:value-type="float" office:value="0.0549254789948463" calcext:value-type="float">
            <text:p>0.0549254789948463</text:p>
          </table:table-cell>
          <table:table-cell office:value-type="float" office:value="0.413780152797699" calcext:value-type="float">
            <text:p>0.413780152797699</text:p>
          </table:table-cell>
          <table:table-cell office:value-type="float" office:value="1.25635945796967" calcext:value-type="float">
            <text:p>1.25635945796967</text:p>
          </table:table-cell>
          <table:table-cell office:value-type="float" office:value="-0.0004597874940373" calcext:value-type="float">
            <text:p>-0.0004597874940373</text:p>
          </table:table-cell>
          <table:table-cell office:value-type="float" office:value="0.0579123198986054" calcext:value-type="float">
            <text:p>0.05791231989860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QRT(([.J197]-[.F197])^2+([.K197]-[.G197])^2)" office:value-type="float" office:value="0.532737158017882" calcext:value-type="float">
            <text:p>0.532737158017882</text:p>
          </table:table-cell>
          <table:table-cell table:formula="of:=SQRT(([.R197]-[.N197])^2+([.S197]-[.O197])^2)" office:value-type="float" office:value="0.325454573789376" calcext:value-type="float">
            <text:p>0.325454573789376</text:p>
          </table:table-cell>
          <table:table-cell table:formula="of:=SQRT(([.R197]-[.F197])^2+([.S197]-[.G197])^2)" office:value-type="float" office:value="1.06240835385508" calcext:value-type="float">
            <text:p>1.06240835385508</text:p>
          </table:table-cell>
          <table:table-cell table:formula="of:=SQRT(([.N197]-[.J197])^2+([.O197]-[.K197])^2)" office:value-type="float" office:value="1.05621040860488" calcext:value-type="float">
            <text:p>1.05621040860488</text:p>
          </table:table-cell>
          <table:table-cell office:value-type="float" office:value="0.824590682983398" calcext:value-type="float">
            <text:p>0.824590682983398</text:p>
          </table:table-cell>
          <table:table-cell office:value-type="float" office:value="0.276044100522995" calcext:value-type="float">
            <text:p>0.276044100522995</text:p>
          </table:table-cell>
          <table:table-cell office:value-type="float" office:value="-0.552488803863525" calcext:value-type="float">
            <text:p>-0.552488803863525</text:p>
          </table:table-cell>
          <table:table-cell office:value-type="float" office:value="0.999537825584412" calcext:value-type="float">
            <text:p>0.999537825584412</text:p>
          </table:table-cell>
          <table:table-cell office:value-type="float" office:value="0.293050527572632" calcext:value-type="float">
            <text:p>0.293050527572632</text:p>
          </table:table-cell>
          <table:table-cell office:value-type="float" office:value="0.311736434698105" calcext:value-type="float">
            <text:p>0.311736434698105</text:p>
          </table:table-cell>
          <table:table-cell office:value-type="float" office:value="-0.486635625362396" calcext:value-type="float">
            <text:p>-0.486635625362396</text:p>
          </table:table-cell>
          <table:table-cell office:value-type="float" office:value="0.999561727046967" calcext:value-type="float">
            <text:p>0.999561727046967</text:p>
          </table:table-cell>
          <table:table-cell office:value-type="float" office:value="0.738907098770142" calcext:value-type="float">
            <text:p>0.738907098770142</text:p>
          </table:table-cell>
          <table:table-cell office:value-type="float" office:value="1.26922917366028" calcext:value-type="float">
            <text:p>1.26922917366028</text:p>
          </table:table-cell>
          <table:table-cell office:value-type="float" office:value="0.0133859273046255" calcext:value-type="float">
            <text:p>0.0133859273046255</text:p>
          </table:table-cell>
          <table:table-cell office:value-type="float" office:value="0.0540345311164856" calcext:value-type="float">
            <text:p>0.0540345311164856</text:p>
          </table:table-cell>
          <table:table-cell office:value-type="float" office:value="0.413730055093765" calcext:value-type="float">
            <text:p>0.413730055093765</text:p>
          </table:table-cell>
          <table:table-cell office:value-type="float" office:value="1.25579154491425" calcext:value-type="float">
            <text:p>1.25579154491425</text:p>
          </table:table-cell>
          <table:table-cell office:value-type="float" office:value="-0.00285707344301045" calcext:value-type="float">
            <text:p>-0.00285707344301045</text:p>
          </table:table-cell>
          <table:table-cell office:value-type="float" office:value="0.0568719319999218" calcext:value-type="float">
            <text:p>0.05687193199992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QRT(([.J198]-[.F198])^2+([.K198]-[.G198])^2)" office:value-type="float" office:value="0.5316004769806" calcext:value-type="float">
            <text:p>0.5316004769806</text:p>
          </table:table-cell>
          <table:table-cell table:formula="of:=SQRT(([.R198]-[.N198])^2+([.S198]-[.O198])^2)" office:value-type="float" office:value="0.325048040942557" calcext:value-type="float">
            <text:p>0.325048040942557</text:p>
          </table:table-cell>
          <table:table-cell table:formula="of:=SQRT(([.R198]-[.F198])^2+([.S198]-[.G198])^2)" office:value-type="float" office:value="1.05891620694524" calcext:value-type="float">
            <text:p>1.05891620694524</text:p>
          </table:table-cell>
          <table:table-cell table:formula="of:=SQRT(([.N198]-[.J198])^2+([.O198]-[.K198])^2)" office:value-type="float" office:value="1.04881383739081" calcext:value-type="float">
            <text:p>1.04881383739081</text:p>
          </table:table-cell>
          <table:table-cell office:value-type="float" office:value="0.823288798332214" calcext:value-type="float">
            <text:p>0.823288798332214</text:p>
          </table:table-cell>
          <table:table-cell office:value-type="float" office:value="0.27654692530632" calcext:value-type="float">
            <text:p>0.27654692530632</text:p>
          </table:table-cell>
          <table:table-cell office:value-type="float" office:value="-0.539893329143524" calcext:value-type="float">
            <text:p>-0.539893329143524</text:p>
          </table:table-cell>
          <table:table-cell office:value-type="float" office:value="0.999536097049713" calcext:value-type="float">
            <text:p>0.999536097049713</text:p>
          </table:table-cell>
          <table:table-cell office:value-type="float" office:value="0.293005853891373" calcext:value-type="float">
            <text:p>0.293005853891373</text:p>
          </table:table-cell>
          <table:table-cell office:value-type="float" office:value="0.313951015472412" calcext:value-type="float">
            <text:p>0.313951015472412</text:p>
          </table:table-cell>
          <table:table-cell office:value-type="float" office:value="-0.464178264141083" calcext:value-type="float">
            <text:p>-0.464178264141083</text:p>
          </table:table-cell>
          <table:table-cell office:value-type="float" office:value="0.999558568000794" calcext:value-type="float">
            <text:p>0.999558568000794</text:p>
          </table:table-cell>
          <table:table-cell office:value-type="float" office:value="0.737243473529816" calcext:value-type="float">
            <text:p>0.737243473529816</text:p>
          </table:table-cell>
          <table:table-cell office:value-type="float" office:value="1.26403701305389" calcext:value-type="float">
            <text:p>1.26403701305389</text:p>
          </table:table-cell>
          <table:table-cell office:value-type="float" office:value="0.0134203005582094" calcext:value-type="float">
            <text:p>0.0134203005582094</text:p>
          </table:table-cell>
          <table:table-cell office:value-type="float" office:value="0.053755160421133" calcext:value-type="float">
            <text:p>0.053755160421133</text:p>
          </table:table-cell>
          <table:table-cell office:value-type="float" office:value="0.412400424480438" calcext:value-type="float">
            <text:p>0.412400424480438</text:p>
          </table:table-cell>
          <table:table-cell office:value-type="float" office:value="1.25249481201172" calcext:value-type="float">
            <text:p>1.25249481201172</text:p>
          </table:table-cell>
          <table:table-cell office:value-type="float" office:value="-0.0029432182200253" calcext:value-type="float">
            <text:p>-0.0029432182200253</text:p>
          </table:table-cell>
          <table:table-cell office:value-type="float" office:value="0.0566445365548134" calcext:value-type="float">
            <text:p>0.05664453655481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QRT(([.J199]-[.F199])^2+([.K199]-[.G199])^2)" office:value-type="float" office:value="0.531763018219871" calcext:value-type="float">
            <text:p>0.531763018219871</text:p>
          </table:table-cell>
          <table:table-cell table:formula="of:=SQRT(([.R199]-[.N199])^2+([.S199]-[.O199])^2)" office:value-type="float" office:value="0.326642400452713" calcext:value-type="float">
            <text:p>0.326642400452713</text:p>
          </table:table-cell>
          <table:table-cell table:formula="of:=SQRT(([.R199]-[.F199])^2+([.S199]-[.G199])^2)" office:value-type="float" office:value="1.05429081398103" calcext:value-type="float">
            <text:p>1.05429081398103</text:p>
          </table:table-cell>
          <table:table-cell table:formula="of:=SQRT(([.N199]-[.J199])^2+([.O199]-[.K199])^2)" office:value-type="float" office:value="1.04689522600938" calcext:value-type="float">
            <text:p>1.04689522600938</text:p>
          </table:table-cell>
          <table:table-cell office:value-type="float" office:value="0.823717296123505" calcext:value-type="float">
            <text:p>0.823717296123505</text:p>
          </table:table-cell>
          <table:table-cell office:value-type="float" office:value="0.279327750205994" calcext:value-type="float">
            <text:p>0.279327750205994</text:p>
          </table:table-cell>
          <table:table-cell office:value-type="float" office:value="-0.727871060371399" calcext:value-type="float">
            <text:p>-0.727871060371399</text:p>
          </table:table-cell>
          <table:table-cell office:value-type="float" office:value="0.99949038028717" calcext:value-type="float">
            <text:p>0.99949038028717</text:p>
          </table:table-cell>
          <table:table-cell office:value-type="float" office:value="0.29307433962822" calcext:value-type="float">
            <text:p>0.29307433962822</text:p>
          </table:table-cell>
          <table:table-cell office:value-type="float" office:value="0.31382355093956" calcext:value-type="float">
            <text:p>0.31382355093956</text:p>
          </table:table-cell>
          <table:table-cell office:value-type="float" office:value="-0.590287506580353" calcext:value-type="float">
            <text:p>-0.590287506580353</text:p>
          </table:table-cell>
          <table:table-cell office:value-type="float" office:value="0.999544084072113" calcext:value-type="float">
            <text:p>0.999544084072113</text:p>
          </table:table-cell>
          <table:table-cell office:value-type="float" office:value="0.738638758659363" calcext:value-type="float">
            <text:p>0.738638758659363</text:p>
          </table:table-cell>
          <table:table-cell office:value-type="float" office:value="1.26116824150085" calcext:value-type="float">
            <text:p>1.26116824150085</text:p>
          </table:table-cell>
          <table:table-cell office:value-type="float" office:value="0.000537784653715789" calcext:value-type="float">
            <text:p>0.000537784653715789</text:p>
          </table:table-cell>
          <table:table-cell office:value-type="float" office:value="0.0531407780945301" calcext:value-type="float">
            <text:p>0.0531407780945301</text:p>
          </table:table-cell>
          <table:table-cell office:value-type="float" office:value="0.412187904119492" calcext:value-type="float">
            <text:p>0.412187904119492</text:p>
          </table:table-cell>
          <table:table-cell office:value-type="float" office:value="1.24998354911804" calcext:value-type="float">
            <text:p>1.24998354911804</text:p>
          </table:table-cell>
          <table:table-cell office:value-type="float" office:value="0.00973345711827278" calcext:value-type="float">
            <text:p>0.00973345711827278</text:p>
          </table:table-cell>
          <table:table-cell office:value-type="float" office:value="0.0562787353992462" calcext:value-type="float">
            <text:p>0.05627873539924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QRT(([.J200]-[.F200])^2+([.K200]-[.G200])^2)" office:value-type="float" office:value="0.534845054667549" calcext:value-type="float">
            <text:p>0.534845054667549</text:p>
          </table:table-cell>
          <table:table-cell table:formula="of:=SQRT(([.R200]-[.N200])^2+([.S200]-[.O200])^2)" office:value-type="float" office:value="0.322222200817852" calcext:value-type="float">
            <text:p>0.322222200817852</text:p>
          </table:table-cell>
          <table:table-cell table:formula="of:=SQRT(([.R200]-[.F200])^2+([.S200]-[.G200])^2)" office:value-type="float" office:value="1.04706162593846" calcext:value-type="float">
            <text:p>1.04706162593846</text:p>
          </table:table-cell>
          <table:table-cell table:formula="of:=SQRT(([.N200]-[.J200])^2+([.O200]-[.K200])^2)" office:value-type="float" office:value="1.04070403317703" calcext:value-type="float">
            <text:p>1.04070403317703</text:p>
          </table:table-cell>
          <table:table-cell office:value-type="float" office:value="0.823739886283875" calcext:value-type="float">
            <text:p>0.823739886283875</text:p>
          </table:table-cell>
          <table:table-cell office:value-type="float" office:value="0.291119873523712" calcext:value-type="float">
            <text:p>0.291119873523712</text:p>
          </table:table-cell>
          <table:table-cell office:value-type="float" office:value="-0.756277322769165" calcext:value-type="float">
            <text:p>-0.756277322769165</text:p>
          </table:table-cell>
          <table:table-cell office:value-type="float" office:value="0.999494791030884" calcext:value-type="float">
            <text:p>0.999494791030884</text:p>
          </table:table-cell>
          <table:table-cell office:value-type="float" office:value="0.28973862528801" calcext:value-type="float">
            <text:p>0.28973862528801</text:p>
          </table:table-cell>
          <table:table-cell office:value-type="float" office:value="0.321151286363602" calcext:value-type="float">
            <text:p>0.321151286363602</text:p>
          </table:table-cell>
          <table:table-cell office:value-type="float" office:value="-0.685299336910248" calcext:value-type="float">
            <text:p>-0.685299336910248</text:p>
          </table:table-cell>
          <table:table-cell office:value-type="float" office:value="0.999546110630035" calcext:value-type="float">
            <text:p>0.999546110630035</text:p>
          </table:table-cell>
          <table:table-cell office:value-type="float" office:value="0.731973052024841" calcext:value-type="float">
            <text:p>0.731973052024841</text:p>
          </table:table-cell>
          <table:table-cell office:value-type="float" office:value="1.2632200717926" calcext:value-type="float">
            <text:p>1.2632200717926</text:p>
          </table:table-cell>
          <table:table-cell office:value-type="float" office:value="-0.00447660405188799" calcext:value-type="float">
            <text:p>-0.00447660405188799</text:p>
          </table:table-cell>
          <table:table-cell office:value-type="float" office:value="0.054629560559988" calcext:value-type="float">
            <text:p>0.054629560559988</text:p>
          </table:table-cell>
          <table:table-cell office:value-type="float" office:value="0.409915059804916" calcext:value-type="float">
            <text:p>0.409915059804916</text:p>
          </table:table-cell>
          <table:table-cell office:value-type="float" office:value="1.25293433666229" calcext:value-type="float">
            <text:p>1.25293433666229</text:p>
          </table:table-cell>
          <table:table-cell office:value-type="float" office:value="0.0142045021057129" calcext:value-type="float">
            <text:p>0.0142045021057129</text:p>
          </table:table-cell>
          <table:table-cell office:value-type="float" office:value="0.0573296435177326" calcext:value-type="float">
            <text:p>0.05732964351773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([.J201]-[.F201])^2+([.K201]-[.G201])^2)" office:value-type="float" office:value="0.534850269453722" calcext:value-type="float">
            <text:p>0.534850269453722</text:p>
          </table:table-cell>
          <table:table-cell table:formula="of:=SQRT(([.R201]-[.N201])^2+([.S201]-[.O201])^2)" office:value-type="float" office:value="0.324949751383904" calcext:value-type="float">
            <text:p>0.324949751383904</text:p>
          </table:table-cell>
          <table:table-cell table:formula="of:=SQRT(([.R201]-[.F201])^2+([.S201]-[.G201])^2)" office:value-type="float" office:value="1.04759578668582" calcext:value-type="float">
            <text:p>1.04759578668582</text:p>
          </table:table-cell>
          <table:table-cell table:formula="of:=SQRT(([.N201]-[.J201])^2+([.O201]-[.K201])^2)" office:value-type="float" office:value="1.04401905678938" calcext:value-type="float">
            <text:p>1.04401905678938</text:p>
          </table:table-cell>
          <table:table-cell office:value-type="float" office:value="0.82365882396698" calcext:value-type="float">
            <text:p>0.82365882396698</text:p>
          </table:table-cell>
          <table:table-cell office:value-type="float" office:value="0.290628999471664" calcext:value-type="float">
            <text:p>0.290628999471664</text:p>
          </table:table-cell>
          <table:table-cell office:value-type="float" office:value="-0.58337789773941" calcext:value-type="float">
            <text:p>-0.58337789773941</text:p>
          </table:table-cell>
          <table:table-cell office:value-type="float" office:value="0.999457538127899" calcext:value-type="float">
            <text:p>0.999457538127899</text:p>
          </table:table-cell>
          <table:table-cell office:value-type="float" office:value="0.289490282535553" calcext:value-type="float">
            <text:p>0.289490282535553</text:p>
          </table:table-cell>
          <table:table-cell office:value-type="float" office:value="0.317624926567078" calcext:value-type="float">
            <text:p>0.317624926567078</text:p>
          </table:table-cell>
          <table:table-cell office:value-type="float" office:value="-0.650496006011963" calcext:value-type="float">
            <text:p>-0.650496006011963</text:p>
          </table:table-cell>
          <table:table-cell office:value-type="float" office:value="0.99951308965683" calcext:value-type="float">
            <text:p>0.99951308965683</text:p>
          </table:table-cell>
          <table:table-cell office:value-type="float" office:value="0.731657147407532" calcext:value-type="float">
            <text:p>0.731657147407532</text:p>
          </table:table-cell>
          <table:table-cell office:value-type="float" office:value="1.26338613033295" calcext:value-type="float">
            <text:p>1.26338613033295</text:p>
          </table:table-cell>
          <table:table-cell office:value-type="float" office:value="0.00277661788277328" calcext:value-type="float">
            <text:p>0.00277661788277328</text:p>
          </table:table-cell>
          <table:table-cell office:value-type="float" office:value="0.0569298826158047" calcext:value-type="float">
            <text:p>0.0569298826158047</text:p>
          </table:table-cell>
          <table:table-cell office:value-type="float" office:value="0.406915277242661" calcext:value-type="float">
            <text:p>0.406915277242661</text:p>
          </table:table-cell>
          <table:table-cell office:value-type="float" office:value="1.25176465511322" calcext:value-type="float">
            <text:p>1.25176465511322</text:p>
          </table:table-cell>
          <table:table-cell office:value-type="float" office:value="0.00714773824438453" calcext:value-type="float">
            <text:p>0.00714773824438453</text:p>
          </table:table-cell>
          <table:table-cell office:value-type="float" office:value="0.060309361666441" calcext:value-type="float">
            <text:p>0.0603093616664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QRT(([.J202]-[.F202])^2+([.K202]-[.G202])^2)" office:value-type="float" office:value="0.534956751723397" calcext:value-type="float">
            <text:p>0.534956751723397</text:p>
          </table:table-cell>
          <table:table-cell table:formula="of:=SQRT(([.R202]-[.N202])^2+([.S202]-[.O202])^2)" office:value-type="float" office:value="0.326441549523159" calcext:value-type="float">
            <text:p>0.326441549523159</text:p>
          </table:table-cell>
          <table:table-cell table:formula="of:=SQRT(([.R202]-[.F202])^2+([.S202]-[.G202])^2)" office:value-type="float" office:value="1.04125888465851" calcext:value-type="float">
            <text:p>1.04125888465851</text:p>
          </table:table-cell>
          <table:table-cell table:formula="of:=SQRT(([.N202]-[.J202])^2+([.O202]-[.K202])^2)" office:value-type="float" office:value="1.0429220329609" calcext:value-type="float">
            <text:p>1.0429220329609</text:p>
          </table:table-cell>
          <table:table-cell office:value-type="float" office:value="0.824436366558075" calcext:value-type="float">
            <text:p>0.824436366558075</text:p>
          </table:table-cell>
          <table:table-cell office:value-type="float" office:value="0.291865944862366" calcext:value-type="float">
            <text:p>0.291865944862366</text:p>
          </table:table-cell>
          <table:table-cell office:value-type="float" office:value="-0.549877882003784" calcext:value-type="float">
            <text:p>-0.549877882003784</text:p>
          </table:table-cell>
          <table:table-cell office:value-type="float" office:value="0.9994335770607" calcext:value-type="float">
            <text:p>0.9994335770607</text:p>
          </table:table-cell>
          <table:table-cell office:value-type="float" office:value="0.290075719356537" calcext:value-type="float">
            <text:p>0.290075719356537</text:p>
          </table:table-cell>
          <table:table-cell office:value-type="float" office:value="0.317113220691681" calcext:value-type="float">
            <text:p>0.317113220691681</text:p>
          </table:table-cell>
          <table:table-cell office:value-type="float" office:value="-0.572285175323486" calcext:value-type="float">
            <text:p>-0.572285175323486</text:p>
          </table:table-cell>
          <table:table-cell office:value-type="float" office:value="0.999512076377869" calcext:value-type="float">
            <text:p>0.999512076377869</text:p>
          </table:table-cell>
          <table:table-cell office:value-type="float" office:value="0.732999324798584" calcext:value-type="float">
            <text:p>0.732999324798584</text:p>
          </table:table-cell>
          <table:table-cell office:value-type="float" office:value="1.26130867004395" calcext:value-type="float">
            <text:p>1.26130867004395</text:p>
          </table:table-cell>
          <table:table-cell office:value-type="float" office:value="0.00762040447443724" calcext:value-type="float">
            <text:p>0.00762040447443724</text:p>
          </table:table-cell>
          <table:table-cell office:value-type="float" office:value="0.0580345652997494" calcext:value-type="float">
            <text:p>0.0580345652997494</text:p>
          </table:table-cell>
          <table:table-cell office:value-type="float" office:value="0.406928449869156" calcext:value-type="float">
            <text:p>0.406928449869156</text:p>
          </table:table-cell>
          <table:table-cell office:value-type="float" office:value="1.24575650691986" calcext:value-type="float">
            <text:p>1.24575650691986</text:p>
          </table:table-cell>
          <table:table-cell office:value-type="float" office:value="0.00215298659168184" calcext:value-type="float">
            <text:p>0.00215298659168184</text:p>
          </table:table-cell>
          <table:table-cell office:value-type="float" office:value="0.0623042099177837" calcext:value-type="float">
            <text:p>0.06230420991778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QRT(([.J203]-[.F203])^2+([.K203]-[.G203])^2)" office:value-type="float" office:value="0.534483797470538" calcext:value-type="float">
            <text:p>0.534483797470538</text:p>
          </table:table-cell>
          <table:table-cell table:formula="of:=SQRT(([.R203]-[.N203])^2+([.S203]-[.O203])^2)" office:value-type="float" office:value="0.32474063669918" calcext:value-type="float">
            <text:p>0.32474063669918</text:p>
          </table:table-cell>
          <table:table-cell table:formula="of:=SQRT(([.R203]-[.F203])^2+([.S203]-[.G203])^2)" office:value-type="float" office:value="1.04141199267523" calcext:value-type="float">
            <text:p>1.04141199267523</text:p>
          </table:table-cell>
          <table:table-cell table:formula="of:=SQRT(([.N203]-[.J203])^2+([.O203]-[.K203])^2)" office:value-type="float" office:value="1.03952484742673" calcext:value-type="float">
            <text:p>1.03952484742673</text:p>
          </table:table-cell>
          <table:table-cell office:value-type="float" office:value="0.824707806110382" calcext:value-type="float">
            <text:p>0.824707806110382</text:p>
          </table:table-cell>
          <table:table-cell office:value-type="float" office:value="0.29171285033226" calcext:value-type="float">
            <text:p>0.29171285033226</text:p>
          </table:table-cell>
          <table:table-cell office:value-type="float" office:value="-0.67561811208725" calcext:value-type="float">
            <text:p>-0.67561811208725</text:p>
          </table:table-cell>
          <table:table-cell office:value-type="float" office:value="0.999412715435028" calcext:value-type="float">
            <text:p>0.999412715435028</text:p>
          </table:table-cell>
          <table:table-cell office:value-type="float" office:value="0.290932476520538" calcext:value-type="float">
            <text:p>0.290932476520538</text:p>
          </table:table-cell>
          <table:table-cell office:value-type="float" office:value="0.319223344326019" calcext:value-type="float">
            <text:p>0.319223344326019</text:p>
          </table:table-cell>
          <table:table-cell office:value-type="float" office:value="-0.639471411705017" calcext:value-type="float">
            <text:p>-0.639471411705017</text:p>
          </table:table-cell>
          <table:table-cell office:value-type="float" office:value="0.999498128890991" calcext:value-type="float">
            <text:p>0.999498128890991</text:p>
          </table:table-cell>
          <table:table-cell office:value-type="float" office:value="0.731414258480072" calcext:value-type="float">
            <text:p>0.731414258480072</text:p>
          </table:table-cell>
          <table:table-cell office:value-type="float" office:value="1.26081120967865" calcext:value-type="float">
            <text:p>1.26081120967865</text:p>
          </table:table-cell>
          <table:table-cell office:value-type="float" office:value="0.0014004404656589" calcext:value-type="float">
            <text:p>0.0014004404656589</text:p>
          </table:table-cell>
          <table:table-cell office:value-type="float" office:value="0.0575821250677109" calcext:value-type="float">
            <text:p>0.0575821250677109</text:p>
          </table:table-cell>
          <table:table-cell office:value-type="float" office:value="0.407025665044785" calcext:value-type="float">
            <text:p>0.407025665044785</text:p>
          </table:table-cell>
          <table:table-cell office:value-type="float" office:value="1.24569427967072" calcext:value-type="float">
            <text:p>1.24569427967072</text:p>
          </table:table-cell>
          <table:table-cell office:value-type="float" office:value="0.0084950402379036" calcext:value-type="float">
            <text:p>0.0084950402379036</text:p>
          </table:table-cell>
          <table:table-cell office:value-type="float" office:value="0.061550073325634" calcext:value-type="float">
            <text:p>0.0615500733256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QRT(([.J204]-[.F204])^2+([.K204]-[.G204])^2)" office:value-type="float" office:value="0.533421150923546" calcext:value-type="float">
            <text:p>0.533421150923546</text:p>
          </table:table-cell>
          <table:table-cell table:formula="of:=SQRT(([.R204]-[.N204])^2+([.S204]-[.O204])^2)" office:value-type="float" office:value="0.323901100123307" calcext:value-type="float">
            <text:p>0.323901100123307</text:p>
          </table:table-cell>
          <table:table-cell table:formula="of:=SQRT(([.R204]-[.F204])^2+([.S204]-[.G204])^2)" office:value-type="float" office:value="1.04017433429157" calcext:value-type="float">
            <text:p>1.04017433429157</text:p>
          </table:table-cell>
          <table:table-cell table:formula="of:=SQRT(([.N204]-[.J204])^2+([.O204]-[.K204])^2)" office:value-type="float" office:value="1.04052051955482" calcext:value-type="float">
            <text:p>1.04052051955482</text:p>
          </table:table-cell>
          <table:table-cell office:value-type="float" office:value="0.824365735054016" calcext:value-type="float">
            <text:p>0.824365735054016</text:p>
          </table:table-cell>
          <table:table-cell office:value-type="float" office:value="0.291377484798431" calcext:value-type="float">
            <text:p>0.291377484798431</text:p>
          </table:table-cell>
          <table:table-cell office:value-type="float" office:value="-0.646845459938049" calcext:value-type="float">
            <text:p>-0.646845459938049</text:p>
          </table:table-cell>
          <table:table-cell office:value-type="float" office:value="0.999359667301178" calcext:value-type="float">
            <text:p>0.999359667301178</text:p>
          </table:table-cell>
          <table:table-cell office:value-type="float" office:value="0.291647225618362" calcext:value-type="float">
            <text:p>0.291647225618362</text:p>
          </table:table-cell>
          <table:table-cell office:value-type="float" office:value="0.31874743103981" calcext:value-type="float">
            <text:p>0.31874743103981</text:p>
          </table:table-cell>
          <table:table-cell office:value-type="float" office:value="-0.538867890834808" calcext:value-type="float">
            <text:p>-0.538867890834808</text:p>
          </table:table-cell>
          <table:table-cell office:value-type="float" office:value="0.999467790126801" calcext:value-type="float">
            <text:p>0.999467790126801</text:p>
          </table:table-cell>
          <table:table-cell office:value-type="float" office:value="0.734009683132172" calcext:value-type="float">
            <text:p>0.734009683132172</text:p>
          </table:table-cell>
          <table:table-cell office:value-type="float" office:value="1.26055335998535" calcext:value-type="float">
            <text:p>1.26055335998535</text:p>
          </table:table-cell>
          <table:table-cell office:value-type="float" office:value="-0.00115346000529826" calcext:value-type="float">
            <text:p>-0.00115346000529826</text:p>
          </table:table-cell>
          <table:table-cell office:value-type="float" office:value="0.057055551558733" calcext:value-type="float">
            <text:p>0.057055551558733</text:p>
          </table:table-cell>
          <table:table-cell office:value-type="float" office:value="0.410451591014862" calcext:value-type="float">
            <text:p>0.410451591014862</text:p>
          </table:table-cell>
          <table:table-cell office:value-type="float" office:value="1.24565088748932" calcext:value-type="float">
            <text:p>1.24565088748932</text:p>
          </table:table-cell>
          <table:table-cell office:value-type="float" office:value="0.0111965900287032" calcext:value-type="float">
            <text:p>0.0111965900287032</text:p>
          </table:table-cell>
          <table:table-cell office:value-type="float" office:value="0.0616669580340385" calcext:value-type="float">
            <text:p>0.06166695803403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QRT(([.J205]-[.F205])^2+([.K205]-[.G205])^2)" office:value-type="float" office:value="0.536356986901316" calcext:value-type="float">
            <text:p>0.536356986901316</text:p>
          </table:table-cell>
          <table:table-cell table:formula="of:=SQRT(([.R205]-[.N205])^2+([.S205]-[.O205])^2)" office:value-type="float" office:value="0.326622201835365" calcext:value-type="float">
            <text:p>0.326622201835365</text:p>
          </table:table-cell>
          <table:table-cell table:formula="of:=SQRT(([.R205]-[.F205])^2+([.S205]-[.G205])^2)" office:value-type="float" office:value="1.03849902385852" calcext:value-type="float">
            <text:p>1.03849902385852</text:p>
          </table:table-cell>
          <table:table-cell table:formula="of:=SQRT(([.N205]-[.J205])^2+([.O205]-[.K205])^2)" office:value-type="float" office:value="1.03454403477999" calcext:value-type="float">
            <text:p>1.03454403477999</text:p>
          </table:table-cell>
          <table:table-cell office:value-type="float" office:value="0.823800444602966" calcext:value-type="float">
            <text:p>0.823800444602966</text:p>
          </table:table-cell>
          <table:table-cell office:value-type="float" office:value="0.294240295886993" calcext:value-type="float">
            <text:p>0.294240295886993</text:p>
          </table:table-cell>
          <table:table-cell office:value-type="float" office:value="-0.750615477561951" calcext:value-type="float">
            <text:p>-0.750615477561951</text:p>
          </table:table-cell>
          <table:table-cell office:value-type="float" office:value="0.999374806880951" calcext:value-type="float">
            <text:p>0.999374806880951</text:p>
          </table:table-cell>
          <table:table-cell office:value-type="float" office:value="0.288191497325897" calcext:value-type="float">
            <text:p>0.288191497325897</text:p>
          </table:table-cell>
          <table:table-cell office:value-type="float" office:value="0.322557657957077" calcext:value-type="float">
            <text:p>0.322557657957077</text:p>
          </table:table-cell>
          <table:table-cell office:value-type="float" office:value="-0.621385812759399" calcext:value-type="float">
            <text:p>-0.621385812759399</text:p>
          </table:table-cell>
          <table:table-cell office:value-type="float" office:value="0.999470293521881" calcext:value-type="float">
            <text:p>0.999470293521881</text:p>
          </table:table-cell>
          <table:table-cell office:value-type="float" office:value="0.733167767524719" calcext:value-type="float">
            <text:p>0.733167767524719</text:p>
          </table:table-cell>
          <table:table-cell office:value-type="float" office:value="1.25651562213898" calcext:value-type="float">
            <text:p>1.25651562213898</text:p>
          </table:table-cell>
          <table:table-cell office:value-type="float" office:value="-0.00154661503620446" calcext:value-type="float">
            <text:p>-0.00154661503620446</text:p>
          </table:table-cell>
          <table:table-cell office:value-type="float" office:value="0.057296346873045" calcext:value-type="float">
            <text:p>0.057296346873045</text:p>
          </table:table-cell>
          <table:table-cell office:value-type="float" office:value="0.406737744808197" calcext:value-type="float">
            <text:p>0.406737744808197</text:p>
          </table:table-cell>
          <table:table-cell office:value-type="float" office:value="1.24531280994415" calcext:value-type="float">
            <text:p>1.24531280994415</text:p>
          </table:table-cell>
          <table:table-cell office:value-type="float" office:value="0.011568701826036" calcext:value-type="float">
            <text:p>0.011568701826036</text:p>
          </table:table-cell>
          <table:table-cell office:value-type="float" office:value="0.0610732287168503" calcext:value-type="float">
            <text:p>0.06107322871685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QRT(([.J206]-[.F206])^2+([.K206]-[.G206])^2)" office:value-type="float" office:value="0.533522999176678" calcext:value-type="float">
            <text:p>0.533522999176678</text:p>
          </table:table-cell>
          <table:table-cell table:formula="of:=SQRT(([.R206]-[.N206])^2+([.S206]-[.O206])^2)" office:value-type="float" office:value="0.326842790525558" calcext:value-type="float">
            <text:p>0.326842790525558</text:p>
          </table:table-cell>
          <table:table-cell table:formula="of:=SQRT(([.R206]-[.F206])^2+([.S206]-[.G206])^2)" office:value-type="float" office:value="1.03095586889303" calcext:value-type="float">
            <text:p>1.03095586889303</text:p>
          </table:table-cell>
          <table:table-cell table:formula="of:=SQRT(([.N206]-[.J206])^2+([.O206]-[.K206])^2)" office:value-type="float" office:value="1.02306501427053" calcext:value-type="float">
            <text:p>1.02306501427053</text:p>
          </table:table-cell>
          <table:table-cell office:value-type="float" office:value="0.823075473308563" calcext:value-type="float">
            <text:p>0.823075473308563</text:p>
          </table:table-cell>
          <table:table-cell office:value-type="float" office:value="0.290562927722931" calcext:value-type="float">
            <text:p>0.290562927722931</text:p>
          </table:table-cell>
          <table:table-cell office:value-type="float" office:value="-0.746762633323669" calcext:value-type="float">
            <text:p>-0.746762633323669</text:p>
          </table:table-cell>
          <table:table-cell office:value-type="float" office:value="0.999375402927399" calcext:value-type="float">
            <text:p>0.999375402927399</text:p>
          </table:table-cell>
          <table:table-cell office:value-type="float" office:value="0.290417939424515" calcext:value-type="float">
            <text:p>0.290417939424515</text:p>
          </table:table-cell>
          <table:table-cell office:value-type="float" office:value="0.320939600467682" calcext:value-type="float">
            <text:p>0.320939600467682</text:p>
          </table:table-cell>
          <table:table-cell office:value-type="float" office:value="-0.635141849517822" calcext:value-type="float">
            <text:p>-0.635141849517822</text:p>
          </table:table-cell>
          <table:table-cell office:value-type="float" office:value="0.999478936195374" calcext:value-type="float">
            <text:p>0.999478936195374</text:p>
          </table:table-cell>
          <table:table-cell office:value-type="float" office:value="0.734623610973358" calcext:value-type="float">
            <text:p>0.734623610973358</text:p>
          </table:table-cell>
          <table:table-cell office:value-type="float" office:value="1.24253785610199" calcext:value-type="float">
            <text:p>1.24253785610199</text:p>
          </table:table-cell>
          <table:table-cell office:value-type="float" office:value="-0.00233880849555135" calcext:value-type="float">
            <text:p>-0.00233880849555135</text:p>
          </table:table-cell>
          <table:table-cell office:value-type="float" office:value="0.056234959512949" calcext:value-type="float">
            <text:p>0.056234959512949</text:p>
          </table:table-cell>
          <table:table-cell office:value-type="float" office:value="0.407886683940887" calcext:value-type="float">
            <text:p>0.407886683940887</text:p>
          </table:table-cell>
          <table:table-cell office:value-type="float" office:value="1.234219789505" calcext:value-type="float">
            <text:p>1.234219789505</text:p>
          </table:table-cell>
          <table:table-cell office:value-type="float" office:value="0.0122801344841719" calcext:value-type="float">
            <text:p>0.0122801344841719</text:p>
          </table:table-cell>
          <table:table-cell office:value-type="float" office:value="0.0601364187896252" calcext:value-type="float">
            <text:p>0.06013641878962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QRT(([.J207]-[.F207])^2+([.K207]-[.G207])^2)" office:value-type="float" office:value="0.534113698667079" calcext:value-type="float">
            <text:p>0.534113698667079</text:p>
          </table:table-cell>
          <table:table-cell table:formula="of:=SQRT(([.R207]-[.N207])^2+([.S207]-[.O207])^2)" office:value-type="float" office:value="0.325060137658758" calcext:value-type="float">
            <text:p>0.325060137658758</text:p>
          </table:table-cell>
          <table:table-cell table:formula="of:=SQRT(([.R207]-[.F207])^2+([.S207]-[.G207])^2)" office:value-type="float" office:value="1.02924306685385" calcext:value-type="float">
            <text:p>1.02924306685385</text:p>
          </table:table-cell>
          <table:table-cell table:formula="of:=SQRT(([.N207]-[.J207])^2+([.O207]-[.K207])^2)" office:value-type="float" office:value="1.0129854136112" calcext:value-type="float">
            <text:p>1.0129854136112</text:p>
          </table:table-cell>
          <table:table-cell office:value-type="float" office:value="0.821845412254334" calcext:value-type="float">
            <text:p>0.821845412254334</text:p>
          </table:table-cell>
          <table:table-cell office:value-type="float" office:value="0.290224373340607" calcext:value-type="float">
            <text:p>0.290224373340607</text:p>
          </table:table-cell>
          <table:table-cell office:value-type="float" office:value="-0.739328742027283" calcext:value-type="float">
            <text:p>-0.739328742027283</text:p>
          </table:table-cell>
          <table:table-cell office:value-type="float" office:value="0.99937903881073" calcext:value-type="float">
            <text:p>0.99937903881073</text:p>
          </table:table-cell>
          <table:table-cell office:value-type="float" office:value="0.288850963115692" calcext:value-type="float">
            <text:p>0.288850963115692</text:p>
          </table:table-cell>
          <table:table-cell office:value-type="float" office:value="0.324783891439438" calcext:value-type="float">
            <text:p>0.324783891439438</text:p>
          </table:table-cell>
          <table:table-cell office:value-type="float" office:value="-0.657550096511841" calcext:value-type="float">
            <text:p>-0.657550096511841</text:p>
          </table:table-cell>
          <table:table-cell office:value-type="float" office:value="0.999476671218872" calcext:value-type="float">
            <text:p>0.999476671218872</text:p>
          </table:table-cell>
          <table:table-cell office:value-type="float" office:value="0.735233843326569" calcext:value-type="float">
            <text:p>0.735233843326569</text:p>
          </table:table-cell>
          <table:table-cell office:value-type="float" office:value="1.23411428928375" calcext:value-type="float">
            <text:p>1.23411428928375</text:p>
          </table:table-cell>
          <table:table-cell office:value-type="float" office:value="-0.000700173550285399" calcext:value-type="float">
            <text:p>-0.000700173550285399</text:p>
          </table:table-cell>
          <table:table-cell office:value-type="float" office:value="0.0572163611650467" calcext:value-type="float">
            <text:p>0.0572163611650467</text:p>
          </table:table-cell>
          <table:table-cell office:value-type="float" office:value="0.410174190998077" calcext:value-type="float">
            <text:p>0.410174190998077</text:p>
          </table:table-cell>
          <table:table-cell office:value-type="float" office:value="1.23355257511139" calcext:value-type="float">
            <text:p>1.23355257511139</text:p>
          </table:table-cell>
          <table:table-cell office:value-type="float" office:value="0.0104687055572867" calcext:value-type="float">
            <text:p>0.0104687055572867</text:p>
          </table:table-cell>
          <table:table-cell office:value-type="float" office:value="0.0605042539536953" calcext:value-type="float">
            <text:p>0.06050425395369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QRT(([.J208]-[.F208])^2+([.K208]-[.G208])^2)" office:value-type="float" office:value="0.536479037734756" calcext:value-type="float">
            <text:p>0.536479037734756</text:p>
          </table:table-cell>
          <table:table-cell table:formula="of:=SQRT(([.R208]-[.N208])^2+([.S208]-[.O208])^2)" office:value-type="float" office:value="0.329372242075465" calcext:value-type="float">
            <text:p>0.329372242075465</text:p>
          </table:table-cell>
          <table:table-cell table:formula="of:=SQRT(([.R208]-[.F208])^2+([.S208]-[.G208])^2)" office:value-type="float" office:value="1.03172694835049" calcext:value-type="float">
            <text:p>1.03172694835049</text:p>
          </table:table-cell>
          <table:table-cell table:formula="of:=SQRT(([.N208]-[.J208])^2+([.O208]-[.K208])^2)" office:value-type="float" office:value="1.01801315301567" calcext:value-type="float">
            <text:p>1.01801315301567</text:p>
          </table:table-cell>
          <table:table-cell office:value-type="float" office:value="0.821476459503174" calcext:value-type="float">
            <text:p>0.821476459503174</text:p>
          </table:table-cell>
          <table:table-cell office:value-type="float" office:value="0.29128959774971" calcext:value-type="float">
            <text:p>0.29128959774971</text:p>
          </table:table-cell>
          <table:table-cell office:value-type="float" office:value="-0.786851823329926" calcext:value-type="float">
            <text:p>-0.786851823329926</text:p>
          </table:table-cell>
          <table:table-cell office:value-type="float" office:value="0.999379992485046" calcext:value-type="float">
            <text:p>0.999379992485046</text:p>
          </table:table-cell>
          <table:table-cell office:value-type="float" office:value="0.286038219928741" calcext:value-type="float">
            <text:p>0.286038219928741</text:p>
          </table:table-cell>
          <table:table-cell office:value-type="float" office:value="0.324690937995911" calcext:value-type="float">
            <text:p>0.324690937995911</text:p>
          </table:table-cell>
          <table:table-cell office:value-type="float" office:value="-0.71664559841156" calcext:value-type="float">
            <text:p>-0.71664559841156</text:p>
          </table:table-cell>
          <table:table-cell office:value-type="float" office:value="0.99947601556778" calcext:value-type="float">
            <text:p>0.99947601556778</text:p>
          </table:table-cell>
          <table:table-cell office:value-type="float" office:value="0.733464300632477" calcext:value-type="float">
            <text:p>0.733464300632477</text:p>
          </table:table-cell>
          <table:table-cell office:value-type="float" office:value="1.23910915851593" calcext:value-type="float">
            <text:p>1.23910915851593</text:p>
          </table:table-cell>
          <table:table-cell office:value-type="float" office:value="0.00228138919919729" calcext:value-type="float">
            <text:p>0.00228138919919729</text:p>
          </table:table-cell>
          <table:table-cell office:value-type="float" office:value="0.0582106150686741" calcext:value-type="float">
            <text:p>0.0582106150686741</text:p>
          </table:table-cell>
          <table:table-cell office:value-type="float" office:value="0.404119819402695" calcext:value-type="float">
            <text:p>0.404119819402695</text:p>
          </table:table-cell>
          <table:table-cell office:value-type="float" office:value="1.23483288288116" calcext:value-type="float">
            <text:p>1.23483288288116</text:p>
          </table:table-cell>
          <table:table-cell office:value-type="float" office:value="0.00726301874965429" calcext:value-type="float">
            <text:p>0.00726301874965429</text:p>
          </table:table-cell>
          <table:table-cell office:value-type="float" office:value="0.0613052882254124" calcext:value-type="float">
            <text:p>0.06130528822541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QRT(([.J209]-[.F209])^2+([.K209]-[.G209])^2)" office:value-type="float" office:value="0.531835052192051" calcext:value-type="float">
            <text:p>0.531835052192051</text:p>
          </table:table-cell>
          <table:table-cell table:formula="of:=SQRT(([.R209]-[.N209])^2+([.S209]-[.O209])^2)" office:value-type="float" office:value="0.33008034020533" calcext:value-type="float">
            <text:p>0.33008034020533</text:p>
          </table:table-cell>
          <table:table-cell table:formula="of:=SQRT(([.R209]-[.F209])^2+([.S209]-[.G209])^2)" office:value-type="float" office:value="1.02655218860698" calcext:value-type="float">
            <text:p>1.02655218860698</text:p>
          </table:table-cell>
          <table:table-cell table:formula="of:=SQRT(([.N209]-[.J209])^2+([.O209]-[.K209])^2)" office:value-type="float" office:value="1.01842978742566" calcext:value-type="float">
            <text:p>1.01842978742566</text:p>
          </table:table-cell>
          <table:table-cell office:value-type="float" office:value="0.821587204933167" calcext:value-type="float">
            <text:p>0.821587204933167</text:p>
          </table:table-cell>
          <table:table-cell office:value-type="float" office:value="0.291260302066803" calcext:value-type="float">
            <text:p>0.291260302066803</text:p>
          </table:table-cell>
          <table:table-cell office:value-type="float" office:value="-0.701449513435364" calcext:value-type="float">
            <text:p>-0.701449513435364</text:p>
          </table:table-cell>
          <table:table-cell office:value-type="float" office:value="0.999255478382111" calcext:value-type="float">
            <text:p>0.999255478382111</text:p>
          </table:table-cell>
          <table:table-cell office:value-type="float" office:value="0.290712296962738" calcext:value-type="float">
            <text:p>0.290712296962738</text:p>
          </table:table-cell>
          <table:table-cell office:value-type="float" office:value="0.323203295469284" calcext:value-type="float">
            <text:p>0.323203295469284</text:p>
          </table:table-cell>
          <table:table-cell office:value-type="float" office:value="-0.566921472549439" calcext:value-type="float">
            <text:p>-0.566921472549439</text:p>
          </table:table-cell>
          <table:table-cell office:value-type="float" office:value="0.999421775341034" calcext:value-type="float">
            <text:p>0.999421775341034</text:p>
          </table:table-cell>
          <table:table-cell office:value-type="float" office:value="0.738543391227722" calcext:value-type="float">
            <text:p>0.738543391227722</text:p>
          </table:table-cell>
          <table:table-cell office:value-type="float" office:value="1.23788714408875" calcext:value-type="float">
            <text:p>1.23788714408875</text:p>
          </table:table-cell>
          <table:table-cell office:value-type="float" office:value="-0.00514697888866067" calcext:value-type="float">
            <text:p>-0.00514697888866067</text:p>
          </table:table-cell>
          <table:table-cell office:value-type="float" office:value="0.0574576184153557" calcext:value-type="float">
            <text:p>0.0574576184153557</text:p>
          </table:table-cell>
          <table:table-cell office:value-type="float" office:value="0.408533960580826" calcext:value-type="float">
            <text:p>0.408533960580826</text:p>
          </table:table-cell>
          <table:table-cell office:value-type="float" office:value="1.23104560375214" calcext:value-type="float">
            <text:p>1.23104560375214</text:p>
          </table:table-cell>
          <table:table-cell office:value-type="float" office:value="0.0148795619606972" calcext:value-type="float">
            <text:p>0.0148795619606972</text:p>
          </table:table-cell>
          <table:table-cell office:value-type="float" office:value="0.0610663704574108" calcext:value-type="float">
            <text:p>0.06106637045741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QRT(([.J210]-[.F210])^2+([.K210]-[.G210])^2)" office:value-type="float" office:value="0.534777437407153" calcext:value-type="float">
            <text:p>0.534777437407153</text:p>
          </table:table-cell>
          <table:table-cell table:formula="of:=SQRT(([.R210]-[.N210])^2+([.S210]-[.O210])^2)" office:value-type="float" office:value="0.329200033637559" calcext:value-type="float">
            <text:p>0.329200033637559</text:p>
          </table:table-cell>
          <table:table-cell table:formula="of:=SQRT(([.R210]-[.F210])^2+([.S210]-[.G210])^2)" office:value-type="float" office:value="1.03120306468356" calcext:value-type="float">
            <text:p>1.03120306468356</text:p>
          </table:table-cell>
          <table:table-cell table:formula="of:=SQRT(([.N210]-[.J210])^2+([.O210]-[.K210])^2)" office:value-type="float" office:value="1.01695643456232" calcext:value-type="float">
            <text:p>1.01695643456232</text:p>
          </table:table-cell>
          <table:table-cell office:value-type="float" office:value="0.820629000663757" calcext:value-type="float">
            <text:p>0.820629000663757</text:p>
          </table:table-cell>
          <table:table-cell office:value-type="float" office:value="0.291202753782272" calcext:value-type="float">
            <text:p>0.291202753782272</text:p>
          </table:table-cell>
          <table:table-cell office:value-type="float" office:value="-0.66273033618927" calcext:value-type="float">
            <text:p>-0.66273033618927</text:p>
          </table:table-cell>
          <table:table-cell office:value-type="float" office:value="0.999277472496033" calcext:value-type="float">
            <text:p>0.999277472496033</text:p>
          </table:table-cell>
          <table:table-cell office:value-type="float" office:value="0.287058979272842" calcext:value-type="float">
            <text:p>0.287058979272842</text:p>
          </table:table-cell>
          <table:table-cell office:value-type="float" office:value="0.327118486166" calcext:value-type="float">
            <text:p>0.327118486166</text:p>
          </table:table-cell>
          <table:table-cell office:value-type="float" office:value="-0.542695045471191" calcext:value-type="float">
            <text:p>-0.542695045471191</text:p>
          </table:table-cell>
          <table:table-cell office:value-type="float" office:value="0.999432146549225" calcext:value-type="float">
            <text:p>0.999432146549225</text:p>
          </table:table-cell>
          <table:table-cell office:value-type="float" office:value="0.738874971866608" calcext:value-type="float">
            <text:p>0.738874971866608</text:p>
          </table:table-cell>
          <table:table-cell office:value-type="float" office:value="1.23819625377655" calcext:value-type="float">
            <text:p>1.23819625377655</text:p>
          </table:table-cell>
          <table:table-cell office:value-type="float" office:value="-0.00744541268795729" calcext:value-type="float">
            <text:p>-0.00744541268795729</text:p>
          </table:table-cell>
          <table:table-cell office:value-type="float" office:value="0.0567809157073498" calcext:value-type="float">
            <text:p>0.0567809157073498</text:p>
          </table:table-cell>
          <table:table-cell office:value-type="float" office:value="0.409677177667618" calcext:value-type="float">
            <text:p>0.409677177667618</text:p>
          </table:table-cell>
          <table:table-cell office:value-type="float" office:value="1.23698198795319" calcext:value-type="float">
            <text:p>1.23698198795319</text:p>
          </table:table-cell>
          <table:table-cell office:value-type="float" office:value="0.0171533785760403" calcext:value-type="float">
            <text:p>0.0171533785760403</text:p>
          </table:table-cell>
          <table:table-cell office:value-type="float" office:value="0.0602712593972683" calcext:value-type="float">
            <text:p>0.06027125939726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QRT(([.J211]-[.F211])^2+([.K211]-[.G211])^2)" office:value-type="float" office:value="0.534155685519462" calcext:value-type="float">
            <text:p>0.534155685519462</text:p>
          </table:table-cell>
          <table:table-cell table:formula="of:=SQRT(([.R211]-[.N211])^2+([.S211]-[.O211])^2)" office:value-type="float" office:value="0.332631044798598" calcext:value-type="float">
            <text:p>0.332631044798598</text:p>
          </table:table-cell>
          <table:table-cell table:formula="of:=SQRT(([.R211]-[.F211])^2+([.S211]-[.G211])^2)" office:value-type="float" office:value="1.02881667703217" calcext:value-type="float">
            <text:p>1.02881667703217</text:p>
          </table:table-cell>
          <table:table-cell table:formula="of:=SQRT(([.N211]-[.J211])^2+([.O211]-[.K211])^2)" office:value-type="float" office:value="1.02333098629015" calcext:value-type="float">
            <text:p>1.02333098629015</text:p>
          </table:table-cell>
          <table:table-cell office:value-type="float" office:value="0.820441603660584" calcext:value-type="float">
            <text:p>0.820441603660584</text:p>
          </table:table-cell>
          <table:table-cell office:value-type="float" office:value="0.291153758764267" calcext:value-type="float">
            <text:p>0.291153758764267</text:p>
          </table:table-cell>
          <table:table-cell office:value-type="float" office:value="-0.584898054599762" calcext:value-type="float">
            <text:p>-0.584898054599762</text:p>
          </table:table-cell>
          <table:table-cell office:value-type="float" office:value="0.99921315908432" calcext:value-type="float">
            <text:p>0.99921315908432</text:p>
          </table:table-cell>
          <table:table-cell office:value-type="float" office:value="0.28707167506218" calcext:value-type="float">
            <text:p>0.28707167506218</text:p>
          </table:table-cell>
          <table:table-cell office:value-type="float" office:value="0.320116072893143" calcext:value-type="float">
            <text:p>0.320116072893143</text:p>
          </table:table-cell>
          <table:table-cell office:value-type="float" office:value="-0.524471044540405" calcext:value-type="float">
            <text:p>-0.524471044540405</text:p>
          </table:table-cell>
          <table:table-cell office:value-type="float" office:value="0.999440491199493" calcext:value-type="float">
            <text:p>0.999440491199493</text:p>
          </table:table-cell>
          <table:table-cell office:value-type="float" office:value="0.738864839076996" calcext:value-type="float">
            <text:p>0.738864839076996</text:p>
          </table:table-cell>
          <table:table-cell office:value-type="float" office:value="1.23831498622894" calcext:value-type="float">
            <text:p>1.23831498622894</text:p>
          </table:table-cell>
          <table:table-cell office:value-type="float" office:value="0.0108719188719988" calcext:value-type="float">
            <text:p>0.0108719188719988</text:p>
          </table:table-cell>
          <table:table-cell office:value-type="float" office:value="0.0621920116245747" calcext:value-type="float">
            <text:p>0.0621920116245747</text:p>
          </table:table-cell>
          <table:table-cell office:value-type="float" office:value="0.406277477741241" calcext:value-type="float">
            <text:p>0.406277477741241</text:p>
          </table:table-cell>
          <table:table-cell office:value-type="float" office:value="1.23292434215546" calcext:value-type="float">
            <text:p>1.23292434215546</text:p>
          </table:table-cell>
          <table:table-cell office:value-type="float" office:value="-0.00189692690037191" calcext:value-type="float">
            <text:p>-0.00189692690037191</text:p>
          </table:table-cell>
          <table:table-cell office:value-type="float" office:value="0.0690615996718407" calcext:value-type="float">
            <text:p>0.06906159967184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QRT(([.J212]-[.F212])^2+([.K212]-[.G212])^2)" office:value-type="float" office:value="0.528219933849358" calcext:value-type="float">
            <text:p>0.528219933849358</text:p>
          </table:table-cell>
          <table:table-cell table:formula="of:=SQRT(([.R212]-[.N212])^2+([.S212]-[.O212])^2)" office:value-type="float" office:value="0.331504883429452" calcext:value-type="float">
            <text:p>0.331504883429452</text:p>
          </table:table-cell>
          <table:table-cell table:formula="of:=SQRT(([.R212]-[.F212])^2+([.S212]-[.G212])^2)" office:value-type="float" office:value="1.00622594122492" calcext:value-type="float">
            <text:p>1.00622594122492</text:p>
          </table:table-cell>
          <table:table-cell table:formula="of:=SQRT(([.N212]-[.J212])^2+([.O212]-[.K212])^2)" office:value-type="float" office:value="1.01085151584333" calcext:value-type="float">
            <text:p>1.01085151584333</text:p>
          </table:table-cell>
          <table:table-cell office:value-type="float" office:value="0.820456862449646" calcext:value-type="float">
            <text:p>0.820456862449646</text:p>
          </table:table-cell>
          <table:table-cell office:value-type="float" office:value="0.290565133094788" calcext:value-type="float">
            <text:p>0.290565133094788</text:p>
          </table:table-cell>
          <table:table-cell office:value-type="float" office:value="-0.759076952934265" calcext:value-type="float">
            <text:p>-0.759076952934265</text:p>
          </table:table-cell>
          <table:table-cell office:value-type="float" office:value="0.999228239059448" calcext:value-type="float">
            <text:p>0.999228239059448</text:p>
          </table:table-cell>
          <table:table-cell office:value-type="float" office:value="0.292843997478485" calcext:value-type="float">
            <text:p>0.292843997478485</text:p>
          </table:table-cell>
          <table:table-cell office:value-type="float" office:value="0.315882384777069" calcext:value-type="float">
            <text:p>0.315882384777069</text:p>
          </table:table-cell>
          <table:table-cell office:value-type="float" office:value="-0.682850241661072" calcext:value-type="float">
            <text:p>-0.682850241661072</text:p>
          </table:table-cell>
          <table:table-cell office:value-type="float" office:value="0.99945467710495" calcext:value-type="float">
            <text:p>0.99945467710495</text:p>
          </table:table-cell>
          <table:table-cell office:value-type="float" office:value="0.737516403198242" calcext:value-type="float">
            <text:p>0.737516403198242</text:p>
          </table:table-cell>
          <table:table-cell office:value-type="float" office:value="1.22367489337921" calcext:value-type="float">
            <text:p>1.22367489337921</text:p>
          </table:table-cell>
          <table:table-cell office:value-type="float" office:value="0.0105551322922111" calcext:value-type="float">
            <text:p>0.0105551322922111</text:p>
          </table:table-cell>
          <table:table-cell office:value-type="float" office:value="0.0622663609683514" calcext:value-type="float">
            <text:p>0.0622663609683514</text:p>
          </table:table-cell>
          <table:table-cell office:value-type="float" office:value="0.406399011611939" calcext:value-type="float">
            <text:p>0.406399011611939</text:p>
          </table:table-cell>
          <table:table-cell office:value-type="float" office:value="1.20765113830566" calcext:value-type="float">
            <text:p>1.20765113830566</text:p>
          </table:table-cell>
          <table:table-cell office:value-type="float" office:value="-0.00155425793491304" calcext:value-type="float">
            <text:p>-0.00155425793491304</text:p>
          </table:table-cell>
          <table:table-cell office:value-type="float" office:value="0.0688460916280747" calcext:value-type="float">
            <text:p>0.06884609162807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QRT(([.J213]-[.F213])^2+([.K213]-[.G213])^2)" office:value-type="float" office:value="0.533787776420426" calcext:value-type="float">
            <text:p>0.533787776420426</text:p>
          </table:table-cell>
          <table:table-cell table:formula="of:=SQRT(([.R213]-[.N213])^2+([.S213]-[.O213])^2)" office:value-type="float" office:value="0.331084257214982" calcext:value-type="float">
            <text:p>0.331084257214982</text:p>
          </table:table-cell>
          <table:table-cell table:formula="of:=SQRT(([.R213]-[.F213])^2+([.S213]-[.G213])^2)" office:value-type="float" office:value="0.998963576523881" calcext:value-type="float">
            <text:p>0.998963576523881</text:p>
          </table:table-cell>
          <table:table-cell table:formula="of:=SQRT(([.N213]-[.J213])^2+([.O213]-[.K213])^2)" office:value-type="float" office:value="0.998689647524667" calcext:value-type="float">
            <text:p>0.998689647524667</text:p>
          </table:table-cell>
          <table:table-cell office:value-type="float" office:value="0.822795033454895" calcext:value-type="float">
            <text:p>0.822795033454895</text:p>
          </table:table-cell>
          <table:table-cell office:value-type="float" office:value="0.300090730190277" calcext:value-type="float">
            <text:p>0.300090730190277</text:p>
          </table:table-cell>
          <table:table-cell office:value-type="float" office:value="-1.1322306394577" calcext:value-type="float">
            <text:p>-1.1322306394577</text:p>
          </table:table-cell>
          <table:table-cell office:value-type="float" office:value="0.999251782894135" calcext:value-type="float">
            <text:p>0.999251782894135</text:p>
          </table:table-cell>
          <table:table-cell office:value-type="float" office:value="0.289661020040512" calcext:value-type="float">
            <text:p>0.289661020040512</text:p>
          </table:table-cell>
          <table:table-cell office:value-type="float" office:value="0.326501220464706" calcext:value-type="float">
            <text:p>0.326501220464706</text:p>
          </table:table-cell>
          <table:table-cell office:value-type="float" office:value="-1.06918883323669" calcext:value-type="float">
            <text:p>-1.06918883323669</text:p>
          </table:table-cell>
          <table:table-cell office:value-type="float" office:value="0.999446988105774" calcext:value-type="float">
            <text:p>0.999446988105774</text:p>
          </table:table-cell>
          <table:table-cell office:value-type="float" office:value="0.73732191324234" calcext:value-type="float">
            <text:p>0.73732191324234</text:p>
          </table:table-cell>
          <table:table-cell office:value-type="float" office:value="1.21923899650574" calcext:value-type="float">
            <text:p>1.21923899650574</text:p>
          </table:table-cell>
          <table:table-cell office:value-type="float" office:value="0.0103666698560119" calcext:value-type="float">
            <text:p>0.0103666698560119</text:p>
          </table:table-cell>
          <table:table-cell office:value-type="float" office:value="0.063094824552536" calcext:value-type="float">
            <text:p>0.063094824552536</text:p>
          </table:table-cell>
          <table:table-cell office:value-type="float" office:value="0.406423568725586" calcext:value-type="float">
            <text:p>0.406423568725586</text:p>
          </table:table-cell>
          <table:table-cell office:value-type="float" office:value="1.20814526081085" calcext:value-type="float">
            <text:p>1.20814526081085</text:p>
          </table:table-cell>
          <table:table-cell office:value-type="float" office:value="-0.00132744235452265" calcext:value-type="float">
            <text:p>-0.00132744235452265</text:p>
          </table:table-cell>
          <table:table-cell office:value-type="float" office:value="0.0682029873132706" calcext:value-type="float">
            <text:p>0.06820298731327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QRT(([.J214]-[.F214])^2+([.K214]-[.G214])^2)" office:value-type="float" office:value="0.531900825258013" calcext:value-type="float">
            <text:p>0.531900825258013</text:p>
          </table:table-cell>
          <table:table-cell table:formula="of:=SQRT(([.R214]-[.N214])^2+([.S214]-[.O214])^2)" office:value-type="float" office:value="0.329923289175953" calcext:value-type="float">
            <text:p>0.329923289175953</text:p>
          </table:table-cell>
          <table:table-cell table:formula="of:=SQRT(([.R214]-[.F214])^2+([.S214]-[.G214])^2)" office:value-type="float" office:value="0.994902338101314" calcext:value-type="float">
            <text:p>0.994902338101314</text:p>
          </table:table-cell>
          <table:table-cell table:formula="of:=SQRT(([.N214]-[.J214])^2+([.O214]-[.K214])^2)" office:value-type="float" office:value="0.988198468126615" calcext:value-type="float">
            <text:p>0.988198468126615</text:p>
          </table:table-cell>
          <table:table-cell office:value-type="float" office:value="0.820770740509033" calcext:value-type="float">
            <text:p>0.820770740509033</text:p>
          </table:table-cell>
          <table:table-cell office:value-type="float" office:value="0.297323733568192" calcext:value-type="float">
            <text:p>0.297323733568192</text:p>
          </table:table-cell>
          <table:table-cell office:value-type="float" office:value="-0.939110636711121" calcext:value-type="float">
            <text:p>-0.939110636711121</text:p>
          </table:table-cell>
          <table:table-cell office:value-type="float" office:value="0.999252378940582" calcext:value-type="float">
            <text:p>0.999252378940582</text:p>
          </table:table-cell>
          <table:table-cell office:value-type="float" office:value="0.289659082889557" calcext:value-type="float">
            <text:p>0.289659082889557</text:p>
          </table:table-cell>
          <table:table-cell office:value-type="float" office:value="0.326287418603897" calcext:value-type="float">
            <text:p>0.326287418603897</text:p>
          </table:table-cell>
          <table:table-cell office:value-type="float" office:value="-0.888173460960388" calcext:value-type="float">
            <text:p>-0.888173460960388</text:p>
          </table:table-cell>
          <table:table-cell office:value-type="float" office:value="0.99945068359375" calcext:value-type="float">
            <text:p>0.99945068359375</text:p>
          </table:table-cell>
          <table:table-cell office:value-type="float" office:value="0.73734849691391" calcext:value-type="float">
            <text:p>0.73734849691391</text:p>
          </table:table-cell>
          <table:table-cell office:value-type="float" office:value="1.20725870132446" calcext:value-type="float">
            <text:p>1.20725870132446</text:p>
          </table:table-cell>
          <table:table-cell office:value-type="float" office:value="0.0120880315080285" calcext:value-type="float">
            <text:p>0.0120880315080285</text:p>
          </table:table-cell>
          <table:table-cell office:value-type="float" office:value="0.0629166066646576" calcext:value-type="float">
            <text:p>0.0629166066646576</text:p>
          </table:table-cell>
          <table:table-cell office:value-type="float" office:value="0.407462269067764" calcext:value-type="float">
            <text:p>0.407462269067764</text:p>
          </table:table-cell>
          <table:table-cell office:value-type="float" office:value="1.20231366157532" calcext:value-type="float">
            <text:p>1.20231366157532</text:p>
          </table:table-cell>
          <table:table-cell office:value-type="float" office:value="-0.00286944536492229" calcext:value-type="float">
            <text:p>-0.00286944536492229</text:p>
          </table:table-cell>
          <table:table-cell office:value-type="float" office:value="0.0674420073628426" calcext:value-type="float">
            <text:p>0.06744200736284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QRT(([.J215]-[.F215])^2+([.K215]-[.G215])^2)" office:value-type="float" office:value="0.532720354352132" calcext:value-type="float">
            <text:p>0.532720354352132</text:p>
          </table:table-cell>
          <table:table-cell table:formula="of:=SQRT(([.R215]-[.N215])^2+([.S215]-[.O215])^2)" office:value-type="float" office:value="0.329404949143824" calcext:value-type="float">
            <text:p>0.329404949143824</text:p>
          </table:table-cell>
          <table:table-cell table:formula="of:=SQRT(([.R215]-[.F215])^2+([.S215]-[.G215])^2)" office:value-type="float" office:value="0.995456208873382" calcext:value-type="float">
            <text:p>0.995456208873382</text:p>
          </table:table-cell>
          <table:table-cell table:formula="of:=SQRT(([.N215]-[.J215])^2+([.O215]-[.K215])^2)" office:value-type="float" office:value="0.986824806823086" calcext:value-type="float">
            <text:p>0.986824806823086</text:p>
          </table:table-cell>
          <table:table-cell office:value-type="float" office:value="0.820056438446045" calcext:value-type="float">
            <text:p>0.820056438446045</text:p>
          </table:table-cell>
          <table:table-cell office:value-type="float" office:value="0.297347187995911" calcext:value-type="float">
            <text:p>0.297347187995911</text:p>
          </table:table-cell>
          <table:table-cell office:value-type="float" office:value="-0.897554218769074" calcext:value-type="float">
            <text:p>-0.897554218769074</text:p>
          </table:table-cell>
          <table:table-cell office:value-type="float" office:value="0.999280691146851" calcext:value-type="float">
            <text:p>0.999280691146851</text:p>
          </table:table-cell>
          <table:table-cell office:value-type="float" office:value="0.28821662068367" calcext:value-type="float">
            <text:p>0.28821662068367</text:p>
          </table:table-cell>
          <table:table-cell office:value-type="float" office:value="0.327963918447495" calcext:value-type="float">
            <text:p>0.327963918447495</text:p>
          </table:table-cell>
          <table:table-cell office:value-type="float" office:value="-0.864765346050263" calcext:value-type="float">
            <text:p>-0.864765346050263</text:p>
          </table:table-cell>
          <table:table-cell office:value-type="float" office:value="0.999475479125977" calcext:value-type="float">
            <text:p>0.999475479125977</text:p>
          </table:table-cell>
          <table:table-cell office:value-type="float" office:value="0.737144410610199" calcext:value-type="float">
            <text:p>0.737144410610199</text:p>
          </table:table-cell>
          <table:table-cell office:value-type="float" office:value="1.20676255226135" calcext:value-type="float">
            <text:p>1.20676255226135</text:p>
          </table:table-cell>
          <table:table-cell office:value-type="float" office:value="0.0125150457024574" calcext:value-type="float">
            <text:p>0.0125150457024574</text:p>
          </table:table-cell>
          <table:table-cell office:value-type="float" office:value="0.0655030533671379" calcext:value-type="float">
            <text:p>0.0655030533671379</text:p>
          </table:table-cell>
          <table:table-cell office:value-type="float" office:value="0.407756567001343" calcext:value-type="float">
            <text:p>0.407756567001343</text:p>
          </table:table-cell>
          <table:table-cell office:value-type="float" office:value="1.2034056186676" calcext:value-type="float">
            <text:p>1.2034056186676</text:p>
          </table:table-cell>
          <table:table-cell office:value-type="float" office:value="-0.00333869829773903" calcext:value-type="float">
            <text:p>-0.00333869829773903</text:p>
          </table:table-cell>
          <table:table-cell office:value-type="float" office:value="0.0698372572660446" calcext:value-type="float">
            <text:p>0.06983725726604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QRT(([.J216]-[.F216])^2+([.K216]-[.G216])^2)" office:value-type="float" office:value="0.52975095101116" calcext:value-type="float">
            <text:p>0.52975095101116</text:p>
          </table:table-cell>
          <table:table-cell table:formula="of:=SQRT(([.R216]-[.N216])^2+([.S216]-[.O216])^2)" office:value-type="float" office:value="0.328218503386119" calcext:value-type="float">
            <text:p>0.328218503386119</text:p>
          </table:table-cell>
          <table:table-cell table:formula="of:=SQRT(([.R216]-[.F216])^2+([.S216]-[.G216])^2)" office:value-type="float" office:value="1.00511898871644" calcext:value-type="float">
            <text:p>1.00511898871644</text:p>
          </table:table-cell>
          <table:table-cell table:formula="of:=SQRT(([.N216]-[.J216])^2+([.O216]-[.K216])^2)" office:value-type="float" office:value="0.988943719106119" calcext:value-type="float">
            <text:p>0.988943719106119</text:p>
          </table:table-cell>
          <table:table-cell office:value-type="float" office:value="0.816548526287079" calcext:value-type="float">
            <text:p>0.816548526287079</text:p>
          </table:table-cell>
          <table:table-cell office:value-type="float" office:value="0.286273777484894" calcext:value-type="float">
            <text:p>0.286273777484894</text:p>
          </table:table-cell>
          <table:table-cell office:value-type="float" office:value="-0.678261458873749" calcext:value-type="float">
            <text:p>-0.678261458873749</text:p>
          </table:table-cell>
          <table:table-cell office:value-type="float" office:value="0.999292850494385" calcext:value-type="float">
            <text:p>0.999292850494385</text:p>
          </table:table-cell>
          <table:table-cell office:value-type="float" office:value="0.288191556930542" calcext:value-type="float">
            <text:p>0.288191556930542</text:p>
          </table:table-cell>
          <table:table-cell office:value-type="float" office:value="0.324679285287857" calcext:value-type="float">
            <text:p>0.324679285287857</text:p>
          </table:table-cell>
          <table:table-cell office:value-type="float" office:value="-0.757003724575043" calcext:value-type="float">
            <text:p>-0.757003724575043</text:p>
          </table:table-cell>
          <table:table-cell office:value-type="float" office:value="0.999490976333618" calcext:value-type="float">
            <text:p>0.999490976333618</text:p>
          </table:table-cell>
          <table:table-cell office:value-type="float" office:value="0.735182881355286" calcext:value-type="float">
            <text:p>0.735182881355286</text:p>
          </table:table-cell>
          <table:table-cell office:value-type="float" office:value="1.20684051513672" calcext:value-type="float">
            <text:p>1.20684051513672</text:p>
          </table:table-cell>
          <table:table-cell office:value-type="float" office:value="0.0294800102710724" calcext:value-type="float">
            <text:p>0.0294800102710724</text:p>
          </table:table-cell>
          <table:table-cell office:value-type="float" office:value="0.064768560230732" calcext:value-type="float">
            <text:p>0.064768560230732</text:p>
          </table:table-cell>
          <table:table-cell office:value-type="float" office:value="0.406975328922272" calcext:value-type="float">
            <text:p>0.406975328922272</text:p>
          </table:table-cell>
          <table:table-cell office:value-type="float" office:value="1.20415937900543" calcext:value-type="float">
            <text:p>1.20415937900543</text:p>
          </table:table-cell>
          <table:table-cell office:value-type="float" office:value="-0.0203544832766056" calcext:value-type="float">
            <text:p>-0.0203544832766056</text:p>
          </table:table-cell>
          <table:table-cell office:value-type="float" office:value="0.0695281401276588" calcext:value-type="float">
            <text:p>0.06952814012765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QRT(([.J217]-[.F217])^2+([.K217]-[.G217])^2)" office:value-type="float" office:value="0.529595953529494" calcext:value-type="float">
            <text:p>0.529595953529494</text:p>
          </table:table-cell>
          <table:table-cell table:formula="of:=SQRT(([.R217]-[.N217])^2+([.S217]-[.O217])^2)" office:value-type="float" office:value="0.327098542192163" calcext:value-type="float">
            <text:p>0.327098542192163</text:p>
          </table:table-cell>
          <table:table-cell table:formula="of:=SQRT(([.R217]-[.F217])^2+([.S217]-[.G217])^2)" office:value-type="float" office:value="1.00101096503533" calcext:value-type="float">
            <text:p>1.00101096503533</text:p>
          </table:table-cell>
          <table:table-cell table:formula="of:=SQRT(([.N217]-[.J217])^2+([.O217]-[.K217])^2)" office:value-type="float" office:value="0.986771946630282" calcext:value-type="float">
            <text:p>0.986771946630282</text:p>
          </table:table-cell>
          <table:table-cell office:value-type="float" office:value="0.816557288169861" calcext:value-type="float">
            <text:p>0.816557288169861</text:p>
          </table:table-cell>
          <table:table-cell office:value-type="float" office:value="0.285464733839035" calcext:value-type="float">
            <text:p>0.285464733839035</text:p>
          </table:table-cell>
          <table:table-cell office:value-type="float" office:value="-0.607062160968781" calcext:value-type="float">
            <text:p>-0.607062160968781</text:p>
          </table:table-cell>
          <table:table-cell office:value-type="float" office:value="0.999292492866516" calcext:value-type="float">
            <text:p>0.999292492866516</text:p>
          </table:table-cell>
          <table:table-cell office:value-type="float" office:value="0.288271903991699" calcext:value-type="float">
            <text:p>0.288271903991699</text:p>
          </table:table-cell>
          <table:table-cell office:value-type="float" office:value="0.32269948720932" calcext:value-type="float">
            <text:p>0.32269948720932</text:p>
          </table:table-cell>
          <table:table-cell office:value-type="float" office:value="-0.603567719459534" calcext:value-type="float">
            <text:p>-0.603567719459534</text:p>
          </table:table-cell>
          <table:table-cell office:value-type="float" office:value="0.999494969844818" calcext:value-type="float">
            <text:p>0.999494969844818</text:p>
          </table:table-cell>
          <table:table-cell office:value-type="float" office:value="0.732881426811218" calcext:value-type="float">
            <text:p>0.732881426811218</text:p>
          </table:table-cell>
          <table:table-cell office:value-type="float" office:value="1.2036315202713" calcext:value-type="float">
            <text:p>1.2036315202713</text:p>
          </table:table-cell>
          <table:table-cell office:value-type="float" office:value="0.0282673425972462" calcext:value-type="float">
            <text:p>0.0282673425972462</text:p>
          </table:table-cell>
          <table:table-cell office:value-type="float" office:value="0.0644118562340736" calcext:value-type="float">
            <text:p>0.0644118562340736</text:p>
          </table:table-cell>
          <table:table-cell office:value-type="float" office:value="0.405825853347778" calcext:value-type="float">
            <text:p>0.405825853347778</text:p>
          </table:table-cell>
          <table:table-cell office:value-type="float" office:value="1.19832980632782" calcext:value-type="float">
            <text:p>1.19832980632782</text:p>
          </table:table-cell>
          <table:table-cell office:value-type="float" office:value="-0.0190913416445255" calcext:value-type="float">
            <text:p>-0.0190913416445255</text:p>
          </table:table-cell>
          <table:table-cell office:value-type="float" office:value="0.0697422549128532" calcext:value-type="float">
            <text:p>0.06974225491285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QRT(([.J218]-[.F218])^2+([.K218]-[.G218])^2)" office:value-type="float" office:value="0.531384377864517" calcext:value-type="float">
            <text:p>0.531384377864517</text:p>
          </table:table-cell>
          <table:table-cell table:formula="of:=SQRT(([.R218]-[.N218])^2+([.S218]-[.O218])^2)" office:value-type="float" office:value="0.32481224846201" calcext:value-type="float">
            <text:p>0.32481224846201</text:p>
          </table:table-cell>
          <table:table-cell table:formula="of:=SQRT(([.R218]-[.F218])^2+([.S218]-[.G218])^2)" office:value-type="float" office:value="0.996987194511681" calcext:value-type="float">
            <text:p>0.996987194511681</text:p>
          </table:table-cell>
          <table:table-cell table:formula="of:=SQRT(([.N218]-[.J218])^2+([.O218]-[.K218])^2)" office:value-type="float" office:value="0.980055478922478" calcext:value-type="float">
            <text:p>0.980055478922478</text:p>
          </table:table-cell>
          <table:table-cell office:value-type="float" office:value="0.817081570625305" calcext:value-type="float">
            <text:p>0.817081570625305</text:p>
          </table:table-cell>
          <table:table-cell office:value-type="float" office:value="0.289537638425827" calcext:value-type="float">
            <text:p>0.289537638425827</text:p>
          </table:table-cell>
          <table:table-cell office:value-type="float" office:value="-0.98282516002655" calcext:value-type="float">
            <text:p>-0.98282516002655</text:p>
          </table:table-cell>
          <table:table-cell office:value-type="float" office:value="0.99929267168045" calcext:value-type="float">
            <text:p>0.99929267168045</text:p>
          </table:table-cell>
          <table:table-cell office:value-type="float" office:value="0.287084758281708" calcext:value-type="float">
            <text:p>0.287084758281708</text:p>
          </table:table-cell>
          <table:table-cell office:value-type="float" office:value="0.327913880348206" calcext:value-type="float">
            <text:p>0.327913880348206</text:p>
          </table:table-cell>
          <table:table-cell office:value-type="float" office:value="-0.993979752063751" calcext:value-type="float">
            <text:p>-0.993979752063751</text:p>
          </table:table-cell>
          <table:table-cell office:value-type="float" office:value="0.999478220939636" calcext:value-type="float">
            <text:p>0.999478220939636</text:p>
          </table:table-cell>
          <table:table-cell office:value-type="float" office:value="0.729252815246582" calcext:value-type="float">
            <text:p>0.729252815246582</text:p>
          </table:table-cell>
          <table:table-cell office:value-type="float" office:value="1.20255446434021" calcext:value-type="float">
            <text:p>1.20255446434021</text:p>
          </table:table-cell>
          <table:table-cell office:value-type="float" office:value="0.0275826752185822" calcext:value-type="float">
            <text:p>0.0275826752185822</text:p>
          </table:table-cell>
          <table:table-cell office:value-type="float" office:value="0.0657830908894539" calcext:value-type="float">
            <text:p>0.0657830908894539</text:p>
          </table:table-cell>
          <table:table-cell office:value-type="float" office:value="0.404485642910004" calcext:value-type="float">
            <text:p>0.404485642910004</text:p>
          </table:table-cell>
          <table:table-cell office:value-type="float" office:value="1.19714331626892" calcext:value-type="float">
            <text:p>1.19714331626892</text:p>
          </table:table-cell>
          <table:table-cell office:value-type="float" office:value="-0.0183504968881607" calcext:value-type="float">
            <text:p>-0.0183504968881607</text:p>
          </table:table-cell>
          <table:table-cell office:value-type="float" office:value="0.0702066570520401" calcext:value-type="float">
            <text:p>0.07020665705204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QRT(([.J219]-[.F219])^2+([.K219]-[.G219])^2)" office:value-type="float" office:value="0.529982598445875" calcext:value-type="float">
            <text:p>0.529982598445875</text:p>
          </table:table-cell>
          <table:table-cell table:formula="of:=SQRT(([.R219]-[.N219])^2+([.S219]-[.O219])^2)" office:value-type="float" office:value="0.325326672472385" calcext:value-type="float">
            <text:p>0.325326672472385</text:p>
          </table:table-cell>
          <table:table-cell table:formula="of:=SQRT(([.R219]-[.F219])^2+([.S219]-[.G219])^2)" office:value-type="float" office:value="0.996860742904878" calcext:value-type="float">
            <text:p>0.996860742904878</text:p>
          </table:table-cell>
          <table:table-cell table:formula="of:=SQRT(([.N219]-[.J219])^2+([.O219]-[.K219])^2)" office:value-type="float" office:value="0.978769731841609" calcext:value-type="float">
            <text:p>0.978769731841609</text:p>
          </table:table-cell>
          <table:table-cell office:value-type="float" office:value="0.816821277141571" calcext:value-type="float">
            <text:p>0.816821277141571</text:p>
          </table:table-cell>
          <table:table-cell office:value-type="float" office:value="0.288790047168732" calcext:value-type="float">
            <text:p>0.288790047168732</text:p>
          </table:table-cell>
          <table:table-cell office:value-type="float" office:value="-0.911624252796173" calcext:value-type="float">
            <text:p>-0.911624252796173</text:p>
          </table:table-cell>
          <table:table-cell office:value-type="float" office:value="0.999305784702301" calcext:value-type="float">
            <text:p>0.999305784702301</text:p>
          </table:table-cell>
          <table:table-cell office:value-type="float" office:value="0.288225144147873" calcext:value-type="float">
            <text:p>0.288225144147873</text:p>
          </table:table-cell>
          <table:table-cell office:value-type="float" office:value="0.327100396156311" calcext:value-type="float">
            <text:p>0.327100396156311</text:p>
          </table:table-cell>
          <table:table-cell office:value-type="float" office:value="-0.927830338478088" calcext:value-type="float">
            <text:p>-0.927830338478088</text:p>
          </table:table-cell>
          <table:table-cell office:value-type="float" office:value="0.999488770961762" calcext:value-type="float">
            <text:p>0.999488770961762</text:p>
          </table:table-cell>
          <table:table-cell office:value-type="float" office:value="0.729961752891541" calcext:value-type="float">
            <text:p>0.729961752891541</text:p>
          </table:table-cell>
          <table:table-cell office:value-type="float" office:value="1.20051836967468" calcext:value-type="float">
            <text:p>1.20051836967468</text:p>
          </table:table-cell>
          <table:table-cell office:value-type="float" office:value="0.0213549919426441" calcext:value-type="float">
            <text:p>0.0213549919426441</text:p>
          </table:table-cell>
          <table:table-cell office:value-type="float" office:value="0.0644881203770638" calcext:value-type="float">
            <text:p>0.0644881203770638</text:p>
          </table:table-cell>
          <table:table-cell office:value-type="float" office:value="0.40466046333313" calcext:value-type="float">
            <text:p>0.40466046333313</text:p>
          </table:table-cell>
          <table:table-cell office:value-type="float" office:value="1.1964545249939" calcext:value-type="float">
            <text:p>1.1964545249939</text:p>
          </table:table-cell>
          <table:table-cell office:value-type="float" office:value="-0.0119314212352037" calcext:value-type="float">
            <text:p>-0.0119314212352037</text:p>
          </table:table-cell>
          <table:table-cell office:value-type="float" office:value="0.0686787739396095" calcext:value-type="float">
            <text:p>0.06867877393960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QRT(([.J220]-[.F220])^2+([.K220]-[.G220])^2)" office:value-type="float" office:value="0.528548375220477" calcext:value-type="float">
            <text:p>0.528548375220477</text:p>
          </table:table-cell>
          <table:table-cell table:formula="of:=SQRT(([.R220]-[.N220])^2+([.S220]-[.O220])^2)" office:value-type="float" office:value="0.321985406406266" calcext:value-type="float">
            <text:p>0.321985406406266</text:p>
          </table:table-cell>
          <table:table-cell table:formula="of:=SQRT(([.R220]-[.F220])^2+([.S220]-[.G220])^2)" office:value-type="float" office:value="0.991225024662565" calcext:value-type="float">
            <text:p>0.991225024662565</text:p>
          </table:table-cell>
          <table:table-cell table:formula="of:=SQRT(([.N220]-[.J220])^2+([.O220]-[.K220])^2)" office:value-type="float" office:value="0.966779488490163" calcext:value-type="float">
            <text:p>0.966779488490163</text:p>
          </table:table-cell>
          <table:table-cell office:value-type="float" office:value="0.81395035982132" calcext:value-type="float">
            <text:p>0.81395035982132</text:p>
          </table:table-cell>
          <table:table-cell office:value-type="float" office:value="0.288255006074905" calcext:value-type="float">
            <text:p>0.288255006074905</text:p>
          </table:table-cell>
          <table:table-cell office:value-type="float" office:value="-0.900210082530975" calcext:value-type="float">
            <text:p>-0.900210082530975</text:p>
          </table:table-cell>
          <table:table-cell office:value-type="float" office:value="0.999301493167877" calcext:value-type="float">
            <text:p>0.999301493167877</text:p>
          </table:table-cell>
          <table:table-cell office:value-type="float" office:value="0.286878645420074" calcext:value-type="float">
            <text:p>0.286878645420074</text:p>
          </table:table-cell>
          <table:table-cell office:value-type="float" office:value="0.327736556529999" calcext:value-type="float">
            <text:p>0.327736556529999</text:p>
          </table:table-cell>
          <table:table-cell office:value-type="float" office:value="-0.889170944690704" calcext:value-type="float">
            <text:p>-0.889170944690704</text:p>
          </table:table-cell>
          <table:table-cell office:value-type="float" office:value="0.999484062194824" calcext:value-type="float">
            <text:p>0.999484062194824</text:p>
          </table:table-cell>
          <table:table-cell office:value-type="float" office:value="0.730599999427795" calcext:value-type="float">
            <text:p>0.730599999427795</text:p>
          </table:table-cell>
          <table:table-cell office:value-type="float" office:value="1.18667423725128" calcext:value-type="float">
            <text:p>1.18667423725128</text:p>
          </table:table-cell>
          <table:table-cell office:value-type="float" office:value="0.0214605443179607" calcext:value-type="float">
            <text:p>0.0214605443179607</text:p>
          </table:table-cell>
          <table:table-cell office:value-type="float" office:value="0.0631087124347687" calcext:value-type="float">
            <text:p>0.0631087124347687</text:p>
          </table:table-cell>
          <table:table-cell office:value-type="float" office:value="0.408673673868179" calcext:value-type="float">
            <text:p>0.408673673868179</text:p>
          </table:table-cell>
          <table:table-cell office:value-type="float" office:value="1.19284212589264" calcext:value-type="float">
            <text:p>1.19284212589264</text:p>
          </table:table-cell>
          <table:table-cell office:value-type="float" office:value="-0.0121210496872664" calcext:value-type="float">
            <text:p>-0.0121210496872664</text:p>
          </table:table-cell>
          <table:table-cell office:value-type="float" office:value="0.0669727623462677" calcext:value-type="float">
            <text:p>0.06697276234626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QRT(([.J221]-[.F221])^2+([.K221]-[.G221])^2)" office:value-type="float" office:value="0.5274190027268" calcext:value-type="float">
            <text:p>0.5274190027268</text:p>
          </table:table-cell>
          <table:table-cell table:formula="of:=SQRT(([.R221]-[.N221])^2+([.S221]-[.O221])^2)" office:value-type="float" office:value="0.321292246101044" calcext:value-type="float">
            <text:p>0.321292246101044</text:p>
          </table:table-cell>
          <table:table-cell table:formula="of:=SQRT(([.R221]-[.F221])^2+([.S221]-[.G221])^2)" office:value-type="float" office:value="0.986287969142471" calcext:value-type="float">
            <text:p>0.986287969142471</text:p>
          </table:table-cell>
          <table:table-cell table:formula="of:=SQRT(([.N221]-[.J221])^2+([.O221]-[.K221])^2)" office:value-type="float" office:value="0.969007745558845" calcext:value-type="float">
            <text:p>0.969007745558845</text:p>
          </table:table-cell>
          <table:table-cell office:value-type="float" office:value="0.814574062824249" calcext:value-type="float">
            <text:p>0.814574062824249</text:p>
          </table:table-cell>
          <table:table-cell office:value-type="float" office:value="0.288063704967499" calcext:value-type="float">
            <text:p>0.288063704967499</text:p>
          </table:table-cell>
          <table:table-cell office:value-type="float" office:value="-0.910368323326111" calcext:value-type="float">
            <text:p>-0.910368323326111</text:p>
          </table:table-cell>
          <table:table-cell office:value-type="float" office:value="0.999280869960785" calcext:value-type="float">
            <text:p>0.999280869960785</text:p>
          </table:table-cell>
          <table:table-cell office:value-type="float" office:value="0.288311034440994" calcext:value-type="float">
            <text:p>0.288311034440994</text:p>
          </table:table-cell>
          <table:table-cell office:value-type="float" office:value="0.322963982820511" calcext:value-type="float">
            <text:p>0.322963982820511</text:p>
          </table:table-cell>
          <table:table-cell office:value-type="float" office:value="-0.890583515167236" calcext:value-type="float">
            <text:p>-0.890583515167236</text:p>
          </table:table-cell>
          <table:table-cell office:value-type="float" office:value="0.999491035938263" calcext:value-type="float">
            <text:p>0.999491035938263</text:p>
          </table:table-cell>
          <table:table-cell office:value-type="float" office:value="0.731356203556061" calcext:value-type="float">
            <text:p>0.731356203556061</text:p>
          </table:table-cell>
          <table:table-cell office:value-type="float" office:value="1.18475687503815" calcext:value-type="float">
            <text:p>1.18475687503815</text:p>
          </table:table-cell>
          <table:table-cell office:value-type="float" office:value="0.0221505798399448" calcext:value-type="float">
            <text:p>0.0221505798399448</text:p>
          </table:table-cell>
          <table:table-cell office:value-type="float" office:value="0.0664189755916596" calcext:value-type="float">
            <text:p>0.0664189755916596</text:p>
          </table:table-cell>
          <table:table-cell office:value-type="float" office:value="0.410076439380646" calcext:value-type="float">
            <text:p>0.410076439380646</text:p>
          </table:table-cell>
          <table:table-cell office:value-type="float" office:value="1.18758893013" calcext:value-type="float">
            <text:p>1.18758893013</text:p>
          </table:table-cell>
          <table:table-cell office:value-type="float" office:value="-0.0130325006321073" calcext:value-type="float">
            <text:p>-0.0130325006321073</text:p>
          </table:table-cell>
          <table:table-cell office:value-type="float" office:value="0.0706796497106552" calcext:value-type="float">
            <text:p>0.07067964971065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QRT(([.J222]-[.F222])^2+([.K222]-[.G222])^2)" office:value-type="float" office:value="0.527308254314498" calcext:value-type="float">
            <text:p>0.527308254314498</text:p>
          </table:table-cell>
          <table:table-cell table:formula="of:=SQRT(([.R222]-[.N222])^2+([.S222]-[.O222])^2)" office:value-type="float" office:value="0.322267251834422" calcext:value-type="float">
            <text:p>0.322267251834422</text:p>
          </table:table-cell>
          <table:table-cell table:formula="of:=SQRT(([.R222]-[.F222])^2+([.S222]-[.G222])^2)" office:value-type="float" office:value="0.984897335609117" calcext:value-type="float">
            <text:p>0.984897335609117</text:p>
          </table:table-cell>
          <table:table-cell table:formula="of:=SQRT(([.N222]-[.J222])^2+([.O222]-[.K222])^2)" office:value-type="float" office:value="0.966156755671917" calcext:value-type="float">
            <text:p>0.966156755671917</text:p>
          </table:table-cell>
          <table:table-cell office:value-type="float" office:value="0.814528584480286" calcext:value-type="float">
            <text:p>0.814528584480286</text:p>
          </table:table-cell>
          <table:table-cell office:value-type="float" office:value="0.288206845521927" calcext:value-type="float">
            <text:p>0.288206845521927</text:p>
          </table:table-cell>
          <table:table-cell office:value-type="float" office:value="-0.880903124809265" calcext:value-type="float">
            <text:p>-0.880903124809265</text:p>
          </table:table-cell>
          <table:table-cell office:value-type="float" office:value="0.999278008937836" calcext:value-type="float">
            <text:p>0.999278008937836</text:p>
          </table:table-cell>
          <table:table-cell office:value-type="float" office:value="0.28843480348587" calcext:value-type="float">
            <text:p>0.28843480348587</text:p>
          </table:table-cell>
          <table:table-cell office:value-type="float" office:value="0.323974549770355" calcext:value-type="float">
            <text:p>0.323974549770355</text:p>
          </table:table-cell>
          <table:table-cell office:value-type="float" office:value="-0.855771899223328" calcext:value-type="float">
            <text:p>-0.855771899223328</text:p>
          </table:table-cell>
          <table:table-cell office:value-type="float" office:value="0.999496579170227" calcext:value-type="float">
            <text:p>0.999496579170227</text:p>
          </table:table-cell>
          <table:table-cell office:value-type="float" office:value="0.732504785060883" calcext:value-type="float">
            <text:p>0.732504785060883</text:p>
          </table:table-cell>
          <table:table-cell office:value-type="float" office:value="1.18203091621399" calcext:value-type="float">
            <text:p>1.18203091621399</text:p>
          </table:table-cell>
          <table:table-cell office:value-type="float" office:value="0.0247813798487186" calcext:value-type="float">
            <text:p>0.0247813798487186</text:p>
          </table:table-cell>
          <table:table-cell office:value-type="float" office:value="0.0667970404028893" calcext:value-type="float">
            <text:p>0.0667970404028893</text:p>
          </table:table-cell>
          <table:table-cell office:value-type="float" office:value="0.410265982151032" calcext:value-type="float">
            <text:p>0.410265982151032</text:p>
          </table:table-cell>
          <table:table-cell office:value-type="float" office:value="1.18631291389465" calcext:value-type="float">
            <text:p>1.18631291389465</text:p>
          </table:table-cell>
          <table:table-cell office:value-type="float" office:value="-0.0156396143138409" calcext:value-type="float">
            <text:p>-0.0156396143138409</text:p>
          </table:table-cell>
          <table:table-cell office:value-type="float" office:value="0.0709766000509262" calcext:value-type="float">
            <text:p>0.07097660005092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QRT(([.J223]-[.F223])^2+([.K223]-[.G223])^2)" office:value-type="float" office:value="0.526252923947645" calcext:value-type="float">
            <text:p>0.526252923947645</text:p>
          </table:table-cell>
          <table:table-cell table:formula="of:=SQRT(([.R223]-[.N223])^2+([.S223]-[.O223])^2)" office:value-type="float" office:value="0.322741202009427" calcext:value-type="float">
            <text:p>0.322741202009427</text:p>
          </table:table-cell>
          <table:table-cell table:formula="of:=SQRT(([.R223]-[.F223])^2+([.S223]-[.G223])^2)" office:value-type="float" office:value="0.984213899730471" calcext:value-type="float">
            <text:p>0.984213899730471</text:p>
          </table:table-cell>
          <table:table-cell table:formula="of:=SQRT(([.N223]-[.J223])^2+([.O223]-[.K223])^2)" office:value-type="float" office:value="0.968649426427108" calcext:value-type="float">
            <text:p>0.968649426427108</text:p>
          </table:table-cell>
          <table:table-cell office:value-type="float" office:value="0.815551102161408" calcext:value-type="float">
            <text:p>0.815551102161408</text:p>
          </table:table-cell>
          <table:table-cell office:value-type="float" office:value="0.288513362407684" calcext:value-type="float">
            <text:p>0.288513362407684</text:p>
          </table:table-cell>
          <table:table-cell office:value-type="float" office:value="-0.884623825550079" calcext:value-type="float">
            <text:p>-0.884623825550079</text:p>
          </table:table-cell>
          <table:table-cell office:value-type="float" office:value="0.999231576919556" calcext:value-type="float">
            <text:p>0.999231576919556</text:p>
          </table:table-cell>
          <table:table-cell office:value-type="float" office:value="0.290380656719208" calcext:value-type="float">
            <text:p>0.290380656719208</text:p>
          </table:table-cell>
          <table:table-cell office:value-type="float" office:value="0.322249740362167" calcext:value-type="float">
            <text:p>0.322249740362167</text:p>
          </table:table-cell>
          <table:table-cell office:value-type="float" office:value="-0.839904487133026" calcext:value-type="float">
            <text:p>-0.839904487133026</text:p>
          </table:table-cell>
          <table:table-cell office:value-type="float" office:value="0.999493181705475" calcext:value-type="float">
            <text:p>0.999493181705475</text:p>
          </table:table-cell>
          <table:table-cell office:value-type="float" office:value="0.734993636608124" calcext:value-type="float">
            <text:p>0.734993636608124</text:p>
          </table:table-cell>
          <table:table-cell office:value-type="float" office:value="1.18283152580261" calcext:value-type="float">
            <text:p>1.18283152580261</text:p>
          </table:table-cell>
          <table:table-cell office:value-type="float" office:value="0.0246046930551529" calcext:value-type="float">
            <text:p>0.0246046930551529</text:p>
          </table:table-cell>
          <table:table-cell office:value-type="float" office:value="0.07037103921175" calcext:value-type="float">
            <text:p>0.07037103921175</text:p>
          </table:table-cell>
          <table:table-cell office:value-type="float" office:value="0.412271201610565" calcext:value-type="float">
            <text:p>0.412271201610565</text:p>
          </table:table-cell>
          <table:table-cell office:value-type="float" office:value="1.18631196022034" calcext:value-type="float">
            <text:p>1.18631196022034</text:p>
          </table:table-cell>
          <table:table-cell office:value-type="float" office:value="-0.0154427140951157" calcext:value-type="float">
            <text:p>-0.0154427140951157</text:p>
          </table:table-cell>
          <table:table-cell office:value-type="float" office:value="0.0754716917872429" calcext:value-type="float">
            <text:p>0.07547169178724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QRT(([.J224]-[.F224])^2+([.K224]-[.G224])^2)" office:value-type="float" office:value="0.527055336414963" calcext:value-type="float">
            <text:p>0.527055336414963</text:p>
          </table:table-cell>
          <table:table-cell table:formula="of:=SQRT(([.R224]-[.N224])^2+([.S224]-[.O224])^2)" office:value-type="float" office:value="0.322105423351137" calcext:value-type="float">
            <text:p>0.322105423351137</text:p>
          </table:table-cell>
          <table:table-cell table:formula="of:=SQRT(([.R224]-[.F224])^2+([.S224]-[.G224])^2)" office:value-type="float" office:value="0.985108747563222" calcext:value-type="float">
            <text:p>0.985108747563222</text:p>
          </table:table-cell>
          <table:table-cell table:formula="of:=SQRT(([.N224]-[.J224])^2+([.O224]-[.K224])^2)" office:value-type="float" office:value="0.967028040739552" calcext:value-type="float">
            <text:p>0.967028040739552</text:p>
          </table:table-cell>
          <table:table-cell office:value-type="float" office:value="0.815616965293884" calcext:value-type="float">
            <text:p>0.815616965293884</text:p>
          </table:table-cell>
          <table:table-cell office:value-type="float" office:value="0.288490295410156" calcext:value-type="float">
            <text:p>0.288490295410156</text:p>
          </table:table-cell>
          <table:table-cell office:value-type="float" office:value="-1.10885202884674" calcext:value-type="float">
            <text:p>-1.10885202884674</text:p>
          </table:table-cell>
          <table:table-cell office:value-type="float" office:value="0.999250173568726" calcext:value-type="float">
            <text:p>0.999250173568726</text:p>
          </table:table-cell>
          <table:table-cell office:value-type="float" office:value="0.289774984121323" calcext:value-type="float">
            <text:p>0.289774984121323</text:p>
          </table:table-cell>
          <table:table-cell office:value-type="float" office:value="0.324232965707779" calcext:value-type="float">
            <text:p>0.324232965707779</text:p>
          </table:table-cell>
          <table:table-cell office:value-type="float" office:value="-1.02647042274475" calcext:value-type="float">
            <text:p>-1.02647042274475</text:p>
          </table:table-cell>
          <table:table-cell office:value-type="float" office:value="0.999492466449738" calcext:value-type="float">
            <text:p>0.999492466449738</text:p>
          </table:table-cell>
          <table:table-cell office:value-type="float" office:value="0.73391193151474" calcext:value-type="float">
            <text:p>0.73391193151474</text:p>
          </table:table-cell>
          <table:table-cell office:value-type="float" office:value="1.18323564529419" calcext:value-type="float">
            <text:p>1.18323564529419</text:p>
          </table:table-cell>
          <table:table-cell office:value-type="float" office:value="0.0186152644455433" calcext:value-type="float">
            <text:p>0.0186152644455433</text:p>
          </table:table-cell>
          <table:table-cell office:value-type="float" office:value="0.0711335763335228" calcext:value-type="float">
            <text:p>0.0711335763335228</text:p>
          </table:table-cell>
          <table:table-cell office:value-type="float" office:value="0.411828994750977" calcext:value-type="float">
            <text:p>0.411828994750977</text:p>
          </table:table-cell>
          <table:table-cell office:value-type="float" office:value="1.18704164028168" calcext:value-type="float">
            <text:p>1.18704164028168</text:p>
          </table:table-cell>
          <table:table-cell office:value-type="float" office:value="-0.00948752928525209" calcext:value-type="float">
            <text:p>-0.00948752928525209</text:p>
          </table:table-cell>
          <table:table-cell office:value-type="float" office:value="0.0753908529877663" calcext:value-type="float">
            <text:p>0.07539085298776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QRT(([.J225]-[.F225])^2+([.K225]-[.G225])^2)" office:value-type="float" office:value="0.52599669436081" calcext:value-type="float">
            <text:p>0.52599669436081</text:p>
          </table:table-cell>
          <table:table-cell table:formula="of:=SQRT(([.R225]-[.N225])^2+([.S225]-[.O225])^2)" office:value-type="float" office:value="0.3226879173898" calcext:value-type="float">
            <text:p>0.3226879173898</text:p>
          </table:table-cell>
          <table:table-cell table:formula="of:=SQRT(([.R225]-[.F225])^2+([.S225]-[.G225])^2)" office:value-type="float" office:value="0.980903593513428" calcext:value-type="float">
            <text:p>0.980903593513428</text:p>
          </table:table-cell>
          <table:table-cell table:formula="of:=SQRT(([.N225]-[.J225])^2+([.O225]-[.K225])^2)" office:value-type="float" office:value="0.963194663198958" calcext:value-type="float">
            <text:p>0.963194663198958</text:p>
          </table:table-cell>
          <table:table-cell office:value-type="float" office:value="0.814950466156006" calcext:value-type="float">
            <text:p>0.814950466156006</text:p>
          </table:table-cell>
          <table:table-cell office:value-type="float" office:value="0.28725466132164" calcext:value-type="float">
            <text:p>0.28725466132164</text:p>
          </table:table-cell>
          <table:table-cell office:value-type="float" office:value="-0.779242515563965" calcext:value-type="float">
            <text:p>-0.779242515563965</text:p>
          </table:table-cell>
          <table:table-cell office:value-type="float" office:value="0.999265193939209" calcext:value-type="float">
            <text:p>0.999265193939209</text:p>
          </table:table-cell>
          <table:table-cell office:value-type="float" office:value="0.290233910083771" calcext:value-type="float">
            <text:p>0.290233910083771</text:p>
          </table:table-cell>
          <table:table-cell office:value-type="float" office:value="0.323929697275162" calcext:value-type="float">
            <text:p>0.323929697275162</text:p>
          </table:table-cell>
          <table:table-cell office:value-type="float" office:value="-0.738096415996552" calcext:value-type="float">
            <text:p>-0.738096415996552</text:p>
          </table:table-cell>
          <table:table-cell office:value-type="float" office:value="0.999501764774323" calcext:value-type="float">
            <text:p>0.999501764774323</text:p>
          </table:table-cell>
          <table:table-cell office:value-type="float" office:value="0.733924865722656" calcext:value-type="float">
            <text:p>0.733924865722656</text:p>
          </table:table-cell>
          <table:table-cell office:value-type="float" office:value="1.17884624004364" calcext:value-type="float">
            <text:p>1.17884624004364</text:p>
          </table:table-cell>
          <table:table-cell office:value-type="float" office:value="0.0195132084190846" calcext:value-type="float">
            <text:p>0.0195132084190846</text:p>
          </table:table-cell>
          <table:table-cell office:value-type="float" office:value="0.0689967572689056" calcext:value-type="float">
            <text:p>0.0689967572689056</text:p>
          </table:table-cell>
          <table:table-cell office:value-type="float" office:value="0.411245763301849" calcext:value-type="float">
            <text:p>0.411245763301849</text:p>
          </table:table-cell>
          <table:table-cell office:value-type="float" office:value="1.18123137950897" calcext:value-type="float">
            <text:p>1.18123137950897</text:p>
          </table:table-cell>
          <table:table-cell office:value-type="float" office:value="-0.0102871907874942" calcext:value-type="float">
            <text:p>-0.0102871907874942</text:p>
          </table:table-cell>
          <table:table-cell office:value-type="float" office:value="0.0732381418347359" calcext:value-type="float">
            <text:p>0.07323814183473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QRT(([.J226]-[.F226])^2+([.K226]-[.G226])^2)" office:value-type="float" office:value="0.527844928823925" calcext:value-type="float">
            <text:p>0.527844928823925</text:p>
          </table:table-cell>
          <table:table-cell table:formula="of:=SQRT(([.R226]-[.N226])^2+([.S226]-[.O226])^2)" office:value-type="float" office:value="0.321855611225533" calcext:value-type="float">
            <text:p>0.321855611225533</text:p>
          </table:table-cell>
          <table:table-cell table:formula="of:=SQRT(([.R226]-[.F226])^2+([.S226]-[.G226])^2)" office:value-type="float" office:value="0.98140340921068" calcext:value-type="float">
            <text:p>0.98140340921068</text:p>
          </table:table-cell>
          <table:table-cell table:formula="of:=SQRT(([.N226]-[.J226])^2+([.O226]-[.K226])^2)" office:value-type="float" office:value="0.962388096256813" calcext:value-type="float">
            <text:p>0.962388096256813</text:p>
          </table:table-cell>
          <table:table-cell office:value-type="float" office:value="0.815257251262665" calcext:value-type="float">
            <text:p>0.815257251262665</text:p>
          </table:table-cell>
          <table:table-cell office:value-type="float" office:value="0.28647056221962" calcext:value-type="float">
            <text:p>0.28647056221962</text:p>
          </table:table-cell>
          <table:table-cell office:value-type="float" office:value="-0.941348195075989" calcext:value-type="float">
            <text:p>-0.941348195075989</text:p>
          </table:table-cell>
          <table:table-cell office:value-type="float" office:value="0.999272584915161" calcext:value-type="float">
            <text:p>0.999272584915161</text:p>
          </table:table-cell>
          <table:table-cell office:value-type="float" office:value="0.288741648197174" calcext:value-type="float">
            <text:p>0.288741648197174</text:p>
          </table:table-cell>
          <table:table-cell office:value-type="float" office:value="0.323908358812332" calcext:value-type="float">
            <text:p>0.323908358812332</text:p>
          </table:table-cell>
          <table:table-cell office:value-type="float" office:value="-0.911555171012878" calcext:value-type="float">
            <text:p>-0.911555171012878</text:p>
          </table:table-cell>
          <table:table-cell office:value-type="float" office:value="0.99950122833252" calcext:value-type="float">
            <text:p>0.99950122833252</text:p>
          </table:table-cell>
          <table:table-cell office:value-type="float" office:value="0.733159720897675" calcext:value-type="float">
            <text:p>0.733159720897675</text:p>
          </table:table-cell>
          <table:table-cell office:value-type="float" office:value="1.17753791809082" calcext:value-type="float">
            <text:p>1.17753791809082</text:p>
          </table:table-cell>
          <table:table-cell office:value-type="float" office:value="0.0191623400896788" calcext:value-type="float">
            <text:p>0.0191623400896788</text:p>
          </table:table-cell>
          <table:table-cell office:value-type="float" office:value="0.0704935193061829" calcext:value-type="float">
            <text:p>0.0704935193061829</text:p>
          </table:table-cell>
          <table:table-cell office:value-type="float" office:value="0.411321580410004" calcext:value-type="float">
            <text:p>0.411321580410004</text:p>
          </table:table-cell>
          <table:table-cell office:value-type="float" office:value="1.18089139461517" calcext:value-type="float">
            <text:p>1.18089139461517</text:p>
          </table:table-cell>
          <table:table-cell office:value-type="float" office:value="-0.00997366569936276" calcext:value-type="float">
            <text:p>-0.00997366569936276</text:p>
          </table:table-cell>
          <table:table-cell office:value-type="float" office:value="0.0742236375808716" calcext:value-type="float">
            <text:p>0.07422363758087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QRT(([.J227]-[.F227])^2+([.K227]-[.G227])^2)" office:value-type="float" office:value="0.530859032162099" calcext:value-type="float">
            <text:p>0.530859032162099</text:p>
          </table:table-cell>
          <table:table-cell table:formula="of:=SQRT(([.R227]-[.N227])^2+([.S227]-[.O227])^2)" office:value-type="float" office:value="0.32190611683157" calcext:value-type="float">
            <text:p>0.32190611683157</text:p>
          </table:table-cell>
          <table:table-cell table:formula="of:=SQRT(([.R227]-[.F227])^2+([.S227]-[.G227])^2)" office:value-type="float" office:value="0.982707133819446" calcext:value-type="float">
            <text:p>0.982707133819446</text:p>
          </table:table-cell>
          <table:table-cell table:formula="of:=SQRT(([.N227]-[.J227])^2+([.O227]-[.K227])^2)" office:value-type="float" office:value="0.961805446970954" calcext:value-type="float">
            <text:p>0.961805446970954</text:p>
          </table:table-cell>
          <table:table-cell office:value-type="float" office:value="0.815275311470032" calcext:value-type="float">
            <text:p>0.815275311470032</text:p>
          </table:table-cell>
          <table:table-cell office:value-type="float" office:value="0.287146091461182" calcext:value-type="float">
            <text:p>0.287146091461182</text:p>
          </table:table-cell>
          <table:table-cell office:value-type="float" office:value="-1.01884579658508" calcext:value-type="float">
            <text:p>-1.01884579658508</text:p>
          </table:table-cell>
          <table:table-cell office:value-type="float" office:value="0.999273896217346" calcext:value-type="float">
            <text:p>0.999273896217346</text:p>
          </table:table-cell>
          <table:table-cell office:value-type="float" office:value="0.285881966352463" calcext:value-type="float">
            <text:p>0.285881966352463</text:p>
          </table:table-cell>
          <table:table-cell office:value-type="float" office:value="0.326566874980927" calcext:value-type="float">
            <text:p>0.326566874980927</text:p>
          </table:table-cell>
          <table:table-cell office:value-type="float" office:value="-1.01655077934265" calcext:value-type="float">
            <text:p>-1.01655077934265</text:p>
          </table:table-cell>
          <table:table-cell office:value-type="float" office:value="0.999502241611481" calcext:value-type="float">
            <text:p>0.999502241611481</text:p>
          </table:table-cell>
          <table:table-cell office:value-type="float" office:value="0.733212947845459" calcext:value-type="float">
            <text:p>0.733212947845459</text:p>
          </table:table-cell>
          <table:table-cell office:value-type="float" office:value="1.17801547050476" calcext:value-type="float">
            <text:p>1.17801547050476</text:p>
          </table:table-cell>
          <table:table-cell office:value-type="float" office:value="0.0191472433507442" calcext:value-type="float">
            <text:p>0.0191472433507442</text:p>
          </table:table-cell>
          <table:table-cell office:value-type="float" office:value="0.0700877010822296" calcext:value-type="float">
            <text:p>0.0700877010822296</text:p>
          </table:table-cell>
          <table:table-cell office:value-type="float" office:value="0.411345422267914" calcext:value-type="float">
            <text:p>0.411345422267914</text:p>
          </table:table-cell>
          <table:table-cell office:value-type="float" office:value="1.18299984931946" calcext:value-type="float">
            <text:p>1.18299984931946</text:p>
          </table:table-cell>
          <table:table-cell office:value-type="float" office:value="-0.00995573960244656" calcext:value-type="float">
            <text:p>-0.00995573960244656</text:p>
          </table:table-cell>
          <table:table-cell office:value-type="float" office:value="0.0734355822205544" calcext:value-type="float">
            <text:p>0.07343558222055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QRT(([.J228]-[.F228])^2+([.K228]-[.G228])^2)" office:value-type="float" office:value="0.530789850763178" calcext:value-type="float">
            <text:p>0.530789850763178</text:p>
          </table:table-cell>
          <table:table-cell table:formula="of:=SQRT(([.R228]-[.N228])^2+([.S228]-[.O228])^2)" office:value-type="float" office:value="0.321502389365341" calcext:value-type="float">
            <text:p>0.321502389365341</text:p>
          </table:table-cell>
          <table:table-cell table:formula="of:=SQRT(([.R228]-[.F228])^2+([.S228]-[.G228])^2)" office:value-type="float" office:value="0.983287895833601" calcext:value-type="float">
            <text:p>0.983287895833601</text:p>
          </table:table-cell>
          <table:table-cell table:formula="of:=SQRT(([.N228]-[.J228])^2+([.O228]-[.K228])^2)" office:value-type="float" office:value="0.963058491233265" calcext:value-type="float">
            <text:p>0.963058491233265</text:p>
          </table:table-cell>
          <table:table-cell office:value-type="float" office:value="0.815290749073029" calcext:value-type="float">
            <text:p>0.815290749073029</text:p>
          </table:table-cell>
          <table:table-cell office:value-type="float" office:value="0.286798775196075" calcext:value-type="float">
            <text:p>0.286798775196075</text:p>
          </table:table-cell>
          <table:table-cell office:value-type="float" office:value="-0.981376647949219" calcext:value-type="float">
            <text:p>-0.981376647949219</text:p>
          </table:table-cell>
          <table:table-cell office:value-type="float" office:value="0.999280989170075" calcext:value-type="float">
            <text:p>0.999280989170075</text:p>
          </table:table-cell>
          <table:table-cell office:value-type="float" office:value="0.285895824432373" calcext:value-type="float">
            <text:p>0.285895824432373</text:p>
          </table:table-cell>
          <table:table-cell office:value-type="float" office:value="0.32525497674942" calcext:value-type="float">
            <text:p>0.32525497674942</text:p>
          </table:table-cell>
          <table:table-cell office:value-type="float" office:value="-0.963735401630402" calcext:value-type="float">
            <text:p>-0.963735401630402</text:p>
          </table:table-cell>
          <table:table-cell office:value-type="float" office:value="0.999489307403565" calcext:value-type="float">
            <text:p>0.999489307403565</text:p>
          </table:table-cell>
          <table:table-cell office:value-type="float" office:value="0.732693552970886" calcext:value-type="float">
            <text:p>0.732693552970886</text:p>
          </table:table-cell>
          <table:table-cell office:value-type="float" office:value="1.17839825153351" calcext:value-type="float">
            <text:p>1.17839825153351</text:p>
          </table:table-cell>
          <table:table-cell office:value-type="float" office:value="0.0201413445174694" calcext:value-type="float">
            <text:p>0.0201413445174694</text:p>
          </table:table-cell>
          <table:table-cell office:value-type="float" office:value="0.0703300163149834" calcext:value-type="float">
            <text:p>0.0703300163149834</text:p>
          </table:table-cell>
          <table:table-cell office:value-type="float" office:value="0.411227464675903" calcext:value-type="float">
            <text:p>0.411227464675903</text:p>
          </table:table-cell>
          <table:table-cell office:value-type="float" office:value="1.18322944641113" calcext:value-type="float">
            <text:p>1.18322944641113</text:p>
          </table:table-cell>
          <table:table-cell office:value-type="float" office:value="-0.0109443161636591" calcext:value-type="float">
            <text:p>-0.0109443161636591</text:p>
          </table:table-cell>
          <table:table-cell office:value-type="float" office:value="0.0727089270949364" calcext:value-type="float">
            <text:p>0.07270892709493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QRT(([.J229]-[.F229])^2+([.K229]-[.G229])^2)" office:value-type="float" office:value="0.53076157289574" calcext:value-type="float">
            <text:p>0.53076157289574</text:p>
          </table:table-cell>
          <table:table-cell table:formula="of:=SQRT(([.R229]-[.N229])^2+([.S229]-[.O229])^2)" office:value-type="float" office:value="0.322945901609557" calcext:value-type="float">
            <text:p>0.322945901609557</text:p>
          </table:table-cell>
          <table:table-cell table:formula="of:=SQRT(([.R229]-[.F229])^2+([.S229]-[.G229])^2)" office:value-type="float" office:value="0.985055992447701" calcext:value-type="float">
            <text:p>0.985055992447701</text:p>
          </table:table-cell>
          <table:table-cell table:formula="of:=SQRT(([.N229]-[.J229])^2+([.O229]-[.K229])^2)" office:value-type="float" office:value="0.964929813931149" calcext:value-type="float">
            <text:p>0.964929813931149</text:p>
          </table:table-cell>
          <table:table-cell office:value-type="float" office:value="0.815303444862366" calcext:value-type="float">
            <text:p>0.815303444862366</text:p>
          </table:table-cell>
          <table:table-cell office:value-type="float" office:value="0.286101907491684" calcext:value-type="float">
            <text:p>0.286101907491684</text:p>
          </table:table-cell>
          <table:table-cell office:value-type="float" office:value="-0.964370727539063" calcext:value-type="float">
            <text:p>-0.964370727539063</text:p>
          </table:table-cell>
          <table:table-cell office:value-type="float" office:value="0.999306440353394" calcext:value-type="float">
            <text:p>0.999306440353394</text:p>
          </table:table-cell>
          <table:table-cell office:value-type="float" office:value="0.285901069641113" calcext:value-type="float">
            <text:p>0.285901069641113</text:p>
          </table:table-cell>
          <table:table-cell office:value-type="float" office:value="0.324062049388886" calcext:value-type="float">
            <text:p>0.324062049388886</text:p>
          </table:table-cell>
          <table:table-cell office:value-type="float" office:value="-0.94113290309906" calcext:value-type="float">
            <text:p>-0.94113290309906</text:p>
          </table:table-cell>
          <table:table-cell office:value-type="float" office:value="0.999504745006561" calcext:value-type="float">
            <text:p>0.999504745006561</text:p>
          </table:table-cell>
          <table:table-cell office:value-type="float" office:value="0.732705533504486" calcext:value-type="float">
            <text:p>0.732705533504486</text:p>
          </table:table-cell>
          <table:table-cell office:value-type="float" office:value="1.17931365966797" calcext:value-type="float">
            <text:p>1.17931365966797</text:p>
          </table:table-cell>
          <table:table-cell office:value-type="float" office:value="0.0199434049427509" calcext:value-type="float">
            <text:p>0.0199434049427509</text:p>
          </table:table-cell>
          <table:table-cell office:value-type="float" office:value="0.0688716992735863" calcext:value-type="float">
            <text:p>0.0688716992735863</text:p>
          </table:table-cell>
          <table:table-cell office:value-type="float" office:value="0.409791052341461" calcext:value-type="float">
            <text:p>0.409791052341461</text:p>
          </table:table-cell>
          <table:table-cell office:value-type="float" office:value="1.1838184595108" calcext:value-type="float">
            <text:p>1.1838184595108</text:p>
          </table:table-cell>
          <table:table-cell office:value-type="float" office:value="-0.010704169049859" calcext:value-type="float">
            <text:p>-0.010704169049859</text:p>
          </table:table-cell>
          <table:table-cell office:value-type="float" office:value="0.0708851963281632" calcext:value-type="float">
            <text:p>0.07088519632816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QRT(([.J230]-[.F230])^2+([.K230]-[.G230])^2)" office:value-type="float" office:value="0.532493567048295" calcext:value-type="float">
            <text:p>0.532493567048295</text:p>
          </table:table-cell>
          <table:table-cell table:formula="of:=SQRT(([.R230]-[.N230])^2+([.S230]-[.O230])^2)" office:value-type="float" office:value="0.322746547712661" calcext:value-type="float">
            <text:p>0.322746547712661</text:p>
          </table:table-cell>
          <table:table-cell table:formula="of:=SQRT(([.R230]-[.F230])^2+([.S230]-[.G230])^2)" office:value-type="float" office:value="0.985637400983958" calcext:value-type="float">
            <text:p>0.985637400983958</text:p>
          </table:table-cell>
          <table:table-cell table:formula="of:=SQRT(([.N230]-[.J230])^2+([.O230]-[.K230])^2)" office:value-type="float" office:value="0.964370947726516" calcext:value-type="float">
            <text:p>0.964370947726516</text:p>
          </table:table-cell>
          <table:table-cell office:value-type="float" office:value="0.815314471721649" calcext:value-type="float">
            <text:p>0.815314471721649</text:p>
          </table:table-cell>
          <table:table-cell office:value-type="float" office:value="0.286768913269043" calcext:value-type="float">
            <text:p>0.286768913269043</text:p>
          </table:table-cell>
          <table:table-cell office:value-type="float" office:value="-1.04823112487793" calcext:value-type="float">
            <text:p>-1.04823112487793</text:p>
          </table:table-cell>
          <table:table-cell office:value-type="float" office:value="0.999312222003937" calcext:value-type="float">
            <text:p>0.999312222003937</text:p>
          </table:table-cell>
          <table:table-cell office:value-type="float" office:value="0.284154325723648" calcext:value-type="float">
            <text:p>0.284154325723648</text:p>
          </table:table-cell>
          <table:table-cell office:value-type="float" office:value="0.324429214000702" calcext:value-type="float">
            <text:p>0.324429214000702</text:p>
          </table:table-cell>
          <table:table-cell office:value-type="float" office:value="-1.02258479595184" calcext:value-type="float">
            <text:p>-1.02258479595184</text:p>
          </table:table-cell>
          <table:table-cell office:value-type="float" office:value="0.999499201774597" calcext:value-type="float">
            <text:p>0.999499201774597</text:p>
          </table:table-cell>
          <table:table-cell office:value-type="float" office:value="0.729881644248962" calcext:value-type="float">
            <text:p>0.729881644248962</text:p>
          </table:table-cell>
          <table:table-cell office:value-type="float" office:value="1.17961251735687" calcext:value-type="float">
            <text:p>1.17961251735687</text:p>
          </table:table-cell>
          <table:table-cell office:value-type="float" office:value="0.0194770414382219" calcext:value-type="float">
            <text:p>0.0194770414382219</text:p>
          </table:table-cell>
          <table:table-cell office:value-type="float" office:value="0.0683362483978272" calcext:value-type="float">
            <text:p>0.0683362483978272</text:p>
          </table:table-cell>
          <table:table-cell office:value-type="float" office:value="0.407163947820663" calcext:value-type="float">
            <text:p>0.407163947820663</text:p>
          </table:table-cell>
          <table:table-cell office:value-type="float" office:value="1.18392789363861" calcext:value-type="float">
            <text:p>1.18392789363861</text:p>
          </table:table-cell>
          <table:table-cell office:value-type="float" office:value="-0.0101875243708491" calcext:value-type="float">
            <text:p>-0.0101875243708491</text:p>
          </table:table-cell>
          <table:table-cell office:value-type="float" office:value="0.0698233395814896" calcext:value-type="float">
            <text:p>0.06982333958148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QRT(([.J231]-[.F231])^2+([.K231]-[.G231])^2)" office:value-type="float" office:value="0.532594617562978" calcext:value-type="float">
            <text:p>0.532594617562978</text:p>
          </table:table-cell>
          <table:table-cell table:formula="of:=SQRT(([.R231]-[.N231])^2+([.S231]-[.O231])^2)" office:value-type="float" office:value="0.324575196337164" calcext:value-type="float">
            <text:p>0.324575196337164</text:p>
          </table:table-cell>
          <table:table-cell table:formula="of:=SQRT(([.R231]-[.F231])^2+([.S231]-[.G231])^2)" office:value-type="float" office:value="0.987486100919266" calcext:value-type="float">
            <text:p>0.987486100919266</text:p>
          </table:table-cell>
          <table:table-cell table:formula="of:=SQRT(([.N231]-[.J231])^2+([.O231]-[.K231])^2)" office:value-type="float" office:value="0.966892059360379" calcext:value-type="float">
            <text:p>0.966892059360379</text:p>
          </table:table-cell>
          <table:table-cell office:value-type="float" office:value="0.815503120422363" calcext:value-type="float">
            <text:p>0.815503120422363</text:p>
          </table:table-cell>
          <table:table-cell office:value-type="float" office:value="0.286772876977921" calcext:value-type="float">
            <text:p>0.286772876977921</text:p>
          </table:table-cell>
          <table:table-cell office:value-type="float" office:value="-0.911768138408661" calcext:value-type="float">
            <text:p>-0.911768138408661</text:p>
          </table:table-cell>
          <table:table-cell office:value-type="float" office:value="0.999331295490265" calcext:value-type="float">
            <text:p>0.999331295490265</text:p>
          </table:table-cell>
          <table:table-cell office:value-type="float" office:value="0.284170776605606" calcext:value-type="float">
            <text:p>0.284170776605606</text:p>
          </table:table-cell>
          <table:table-cell office:value-type="float" office:value="0.323419392108917" calcext:value-type="float">
            <text:p>0.323419392108917</text:p>
          </table:table-cell>
          <table:table-cell office:value-type="float" office:value="-0.913775622844696" calcext:value-type="float">
            <text:p>-0.913775622844696</text:p>
          </table:table-cell>
          <table:table-cell office:value-type="float" office:value="0.999516129493713" calcext:value-type="float">
            <text:p>0.999516129493713</text:p>
          </table:table-cell>
          <table:table-cell office:value-type="float" office:value="0.729358494281769" calcext:value-type="float">
            <text:p>0.729358494281769</text:p>
          </table:table-cell>
          <table:table-cell office:value-type="float" office:value="1.18172478675842" calcext:value-type="float">
            <text:p>1.18172478675842</text:p>
          </table:table-cell>
          <table:table-cell office:value-type="float" office:value="0.0212987996637821" calcext:value-type="float">
            <text:p>0.0212987996637821</text:p>
          </table:table-cell>
          <table:table-cell office:value-type="float" office:value="0.0698830112814903" calcext:value-type="float">
            <text:p>0.0698830112814903</text:p>
          </table:table-cell>
          <table:table-cell office:value-type="float" office:value="0.404797852039337" calcext:value-type="float">
            <text:p>0.404797852039337</text:p>
          </table:table-cell>
          <table:table-cell office:value-type="float" office:value="1.1847984790802" calcext:value-type="float">
            <text:p>1.1847984790802</text:p>
          </table:table-cell>
          <table:table-cell office:value-type="float" office:value="-0.0120047507807612" calcext:value-type="float">
            <text:p>-0.0120047507807612</text:p>
          </table:table-cell>
          <table:table-cell office:value-type="float" office:value="0.0715127363801003" calcext:value-type="float">
            <text:p>0.07151273638010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QRT(([.J232]-[.F232])^2+([.K232]-[.G232])^2)" office:value-type="float" office:value="0.536020385237682" calcext:value-type="float">
            <text:p>0.536020385237682</text:p>
          </table:table-cell>
          <table:table-cell table:formula="of:=SQRT(([.R232]-[.N232])^2+([.S232]-[.O232])^2)" office:value-type="float" office:value="0.32503049751208" calcext:value-type="float">
            <text:p>0.32503049751208</text:p>
          </table:table-cell>
          <table:table-cell table:formula="of:=SQRT(([.R232]-[.F232])^2+([.S232]-[.G232])^2)" office:value-type="float" office:value="0.98982906783654" calcext:value-type="float">
            <text:p>0.98982906783654</text:p>
          </table:table-cell>
          <table:table-cell table:formula="of:=SQRT(([.N232]-[.J232])^2+([.O232]-[.K232])^2)" office:value-type="float" office:value="0.972713729405138" calcext:value-type="float">
            <text:p>0.972713729405138</text:p>
          </table:table-cell>
          <table:table-cell office:value-type="float" office:value="0.815486788749695" calcext:value-type="float">
            <text:p>0.815486788749695</text:p>
          </table:table-cell>
          <table:table-cell office:value-type="float" office:value="0.28824719786644" calcext:value-type="float">
            <text:p>0.28824719786644</text:p>
          </table:table-cell>
          <table:table-cell office:value-type="float" office:value="-0.94583398103714" calcext:value-type="float">
            <text:p>-0.94583398103714</text:p>
          </table:table-cell>
          <table:table-cell office:value-type="float" office:value="0.999315798282623" calcext:value-type="float">
            <text:p>0.999315798282623</text:p>
          </table:table-cell>
          <table:table-cell office:value-type="float" office:value="0.280690491199493" calcext:value-type="float">
            <text:p>0.280690491199493</text:p>
          </table:table-cell>
          <table:table-cell office:value-type="float" office:value="0.324451804161072" calcext:value-type="float">
            <text:p>0.324451804161072</text:p>
          </table:table-cell>
          <table:table-cell office:value-type="float" office:value="-0.919235348701477" calcext:value-type="float">
            <text:p>-0.919235348701477</text:p>
          </table:table-cell>
          <table:table-cell office:value-type="float" office:value="0.999509036540985" calcext:value-type="float">
            <text:p>0.999509036540985</text:p>
          </table:table-cell>
          <table:table-cell office:value-type="float" office:value="0.728474497795105" calcext:value-type="float">
            <text:p>0.728474497795105</text:p>
          </table:table-cell>
          <table:table-cell office:value-type="float" office:value="1.18796873092651" calcext:value-type="float">
            <text:p>1.18796873092651</text:p>
          </table:table-cell>
          <table:table-cell office:value-type="float" office:value="0.0172053463757038" calcext:value-type="float">
            <text:p>0.0172053463757038</text:p>
          </table:table-cell>
          <table:table-cell office:value-type="float" office:value="0.0700763016939163" calcext:value-type="float">
            <text:p>0.0700763016939163</text:p>
          </table:table-cell>
          <table:table-cell office:value-type="float" office:value="0.403444111347199" calcext:value-type="float">
            <text:p>0.403444111347199</text:p>
          </table:table-cell>
          <table:table-cell office:value-type="float" office:value="1.18823742866516" calcext:value-type="float">
            <text:p>1.18823742866516</text:p>
          </table:table-cell>
          <table:table-cell office:value-type="float" office:value="-0.00784322433173657" calcext:value-type="float">
            <text:p>-0.00784322433173657</text:p>
          </table:table-cell>
          <table:table-cell office:value-type="float" office:value="0.0718685165047646" calcext:value-type="float">
            <text:p>0.07186851650476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QRT(([.J233]-[.F233])^2+([.K233]-[.G233])^2)" office:value-type="float" office:value="0.532342481258286" calcext:value-type="float">
            <text:p>0.532342481258286</text:p>
          </table:table-cell>
          <table:table-cell table:formula="of:=SQRT(([.R233]-[.N233])^2+([.S233]-[.O233])^2)" office:value-type="float" office:value="0.325016506624745" calcext:value-type="float">
            <text:p>0.325016506624745</text:p>
          </table:table-cell>
          <table:table-cell table:formula="of:=SQRT(([.R233]-[.F233])^2+([.S233]-[.G233])^2)" office:value-type="float" office:value="0.989785202122981" calcext:value-type="float">
            <text:p>0.989785202122981</text:p>
          </table:table-cell>
          <table:table-cell table:formula="of:=SQRT(([.N233]-[.J233])^2+([.O233]-[.K233])^2)" office:value-type="float" office:value="0.971622770035189" calcext:value-type="float">
            <text:p>0.971622770035189</text:p>
          </table:table-cell>
          <table:table-cell office:value-type="float" office:value="0.815235018730164" calcext:value-type="float">
            <text:p>0.815235018730164</text:p>
          </table:table-cell>
          <table:table-cell office:value-type="float" office:value="0.288249850273132" calcext:value-type="float">
            <text:p>0.288249850273132</text:p>
          </table:table-cell>
          <table:table-cell office:value-type="float" office:value="-0.743003487586975" calcext:value-type="float">
            <text:p>-0.743003487586975</text:p>
          </table:table-cell>
          <table:table-cell office:value-type="float" office:value="0.999308347702026" calcext:value-type="float">
            <text:p>0.999308347702026</text:p>
          </table:table-cell>
          <table:table-cell office:value-type="float" office:value="0.284105122089386" calcext:value-type="float">
            <text:p>0.284105122089386</text:p>
          </table:table-cell>
          <table:table-cell office:value-type="float" office:value="0.324160158634186" calcext:value-type="float">
            <text:p>0.324160158634186</text:p>
          </table:table-cell>
          <table:table-cell office:value-type="float" office:value="-0.710331499576569" calcext:value-type="float">
            <text:p>-0.710331499576569</text:p>
          </table:table-cell>
          <table:table-cell office:value-type="float" office:value="0.999510705471039" calcext:value-type="float">
            <text:p>0.999510705471039</text:p>
          </table:table-cell>
          <table:table-cell office:value-type="float" office:value="0.728532195091248" calcext:value-type="float">
            <text:p>0.728532195091248</text:p>
          </table:table-cell>
          <table:table-cell office:value-type="float" office:value="1.18818295001984" calcext:value-type="float">
            <text:p>1.18818295001984</text:p>
          </table:table-cell>
          <table:table-cell office:value-type="float" office:value="0.0183347556740046" calcext:value-type="float">
            <text:p>0.0183347556740046</text:p>
          </table:table-cell>
          <table:table-cell office:value-type="float" office:value="0.0701004937291145" calcext:value-type="float">
            <text:p>0.0701004937291145</text:p>
          </table:table-cell>
          <table:table-cell office:value-type="float" office:value="0.403515726327896" calcext:value-type="float">
            <text:p>0.403515726327896</text:p>
          </table:table-cell>
          <table:table-cell office:value-type="float" office:value="1.18833982944489" calcext:value-type="float">
            <text:p>1.18833982944489</text:p>
          </table:table-cell>
          <table:table-cell office:value-type="float" office:value="-0.00903232861310244" calcext:value-type="float">
            <text:p>-0.00903232861310244</text:p>
          </table:table-cell>
          <table:table-cell office:value-type="float" office:value="0.0725134089589119" calcext:value-type="float">
            <text:p>0.07251340895891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QRT(([.J234]-[.F234])^2+([.K234]-[.G234])^2)" office:value-type="float" office:value="0.534381538773782" calcext:value-type="float">
            <text:p>0.534381538773782</text:p>
          </table:table-cell>
          <table:table-cell table:formula="of:=SQRT(([.R234]-[.N234])^2+([.S234]-[.O234])^2)" office:value-type="float" office:value="0.325302265096585" calcext:value-type="float">
            <text:p>0.325302265096585</text:p>
          </table:table-cell>
          <table:table-cell table:formula="of:=SQRT(([.R234]-[.F234])^2+([.S234]-[.G234])^2)" office:value-type="float" office:value="0.989991559486251" calcext:value-type="float">
            <text:p>0.989991559486251</text:p>
          </table:table-cell>
          <table:table-cell table:formula="of:=SQRT(([.N234]-[.J234])^2+([.O234]-[.K234])^2)" office:value-type="float" office:value="0.971911167965929" calcext:value-type="float">
            <text:p>0.971911167965929</text:p>
          </table:table-cell>
          <table:table-cell office:value-type="float" office:value="0.815243124961853" calcext:value-type="float">
            <text:p>0.815243124961853</text:p>
          </table:table-cell>
          <table:table-cell office:value-type="float" office:value="0.288533389568329" calcext:value-type="float">
            <text:p>0.288533389568329</text:p>
          </table:table-cell>
          <table:table-cell office:value-type="float" office:value="-0.947311103343964" calcext:value-type="float">
            <text:p>-0.947311103343964</text:p>
          </table:table-cell>
          <table:table-cell office:value-type="float" office:value="0.999306082725525" calcext:value-type="float">
            <text:p>0.999306082725525</text:p>
          </table:table-cell>
          <table:table-cell office:value-type="float" office:value="0.282109200954437" calcext:value-type="float">
            <text:p>0.282109200954437</text:p>
          </table:table-cell>
          <table:table-cell office:value-type="float" office:value="0.325027883052826" calcext:value-type="float">
            <text:p>0.325027883052826</text:p>
          </table:table-cell>
          <table:table-cell office:value-type="float" office:value="-0.903563857078552" calcext:value-type="float">
            <text:p>-0.903563857078552</text:p>
          </table:table-cell>
          <table:table-cell office:value-type="float" office:value="0.999521553516388" calcext:value-type="float">
            <text:p>0.999521553516388</text:p>
          </table:table-cell>
          <table:table-cell office:value-type="float" office:value="0.728574633598328" calcext:value-type="float">
            <text:p>0.728574633598328</text:p>
          </table:table-cell>
          <table:table-cell office:value-type="float" office:value="1.18832385540009" calcext:value-type="float">
            <text:p>1.18832385540009</text:p>
          </table:table-cell>
          <table:table-cell office:value-type="float" office:value="0.01792530156672" calcext:value-type="float">
            <text:p>0.01792530156672</text:p>
          </table:table-cell>
          <table:table-cell office:value-type="float" office:value="0.0703354626893997" calcext:value-type="float">
            <text:p>0.0703354626893997</text:p>
          </table:table-cell>
          <table:table-cell office:value-type="float" office:value="0.40327262878418" calcext:value-type="float">
            <text:p>0.40327262878418</text:p>
          </table:table-cell>
          <table:table-cell office:value-type="float" office:value="1.18873536586761" calcext:value-type="float">
            <text:p>1.18873536586761</text:p>
          </table:table-cell>
          <table:table-cell office:value-type="float" office:value="-0.00861627794802189" calcext:value-type="float">
            <text:p>-0.00861627794802189</text:p>
          </table:table-cell>
          <table:table-cell office:value-type="float" office:value="0.0729443356394768" calcext:value-type="float">
            <text:p>0.07294433563947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QRT(([.J235]-[.F235])^2+([.K235]-[.G235])^2)" office:value-type="float" office:value="0.533237159270134" calcext:value-type="float">
            <text:p>0.533237159270134</text:p>
          </table:table-cell>
          <table:table-cell table:formula="of:=SQRT(([.R235]-[.N235])^2+([.S235]-[.O235])^2)" office:value-type="float" office:value="0.327769015513037" calcext:value-type="float">
            <text:p>0.327769015513037</text:p>
          </table:table-cell>
          <table:table-cell table:formula="of:=SQRT(([.R235]-[.F235])^2+([.S235]-[.G235])^2)" office:value-type="float" office:value="0.988873052310019" calcext:value-type="float">
            <text:p>0.988873052310019</text:p>
          </table:table-cell>
          <table:table-cell table:formula="of:=SQRT(([.N235]-[.J235])^2+([.O235]-[.K235])^2)" office:value-type="float" office:value="0.973170459367511" calcext:value-type="float">
            <text:p>0.973170459367511</text:p>
          </table:table-cell>
          <table:table-cell office:value-type="float" office:value="0.814737498760223" calcext:value-type="float">
            <text:p>0.814737498760223</text:p>
          </table:table-cell>
          <table:table-cell office:value-type="float" office:value="0.288025349378586" calcext:value-type="float">
            <text:p>0.288025349378586</text:p>
          </table:table-cell>
          <table:table-cell office:value-type="float" office:value="-0.764776587486267" calcext:value-type="float">
            <text:p>-0.764776587486267</text:p>
          </table:table-cell>
          <table:table-cell office:value-type="float" office:value="0.999294400215149" calcext:value-type="float">
            <text:p>0.999294400215149</text:p>
          </table:table-cell>
          <table:table-cell office:value-type="float" office:value="0.282785207033157" calcext:value-type="float">
            <text:p>0.282785207033157</text:p>
          </table:table-cell>
          <table:table-cell office:value-type="float" office:value="0.325020313262939" calcext:value-type="float">
            <text:p>0.325020313262939</text:p>
          </table:table-cell>
          <table:table-cell office:value-type="float" office:value="-0.746411740779877" calcext:value-type="float">
            <text:p>-0.746411740779877</text:p>
          </table:table-cell>
          <table:table-cell office:value-type="float" office:value="0.99952906370163" calcext:value-type="float">
            <text:p>0.99952906370163</text:p>
          </table:table-cell>
          <table:table-cell office:value-type="float" office:value="0.733388721942902" calcext:value-type="float">
            <text:p>0.733388721942902</text:p>
          </table:table-cell>
          <table:table-cell office:value-type="float" office:value="1.18758463859558" calcext:value-type="float">
            <text:p>1.18758463859558</text:p>
          </table:table-cell>
          <table:table-cell office:value-type="float" office:value="0.0197874996811152" calcext:value-type="float">
            <text:p>0.0197874996811152</text:p>
          </table:table-cell>
          <table:table-cell office:value-type="float" office:value="0.0700774118304253" calcext:value-type="float">
            <text:p>0.0700774118304253</text:p>
          </table:table-cell>
          <table:table-cell office:value-type="float" office:value="0.405620485544205" calcext:value-type="float">
            <text:p>0.405620485544205</text:p>
          </table:table-cell>
          <table:table-cell office:value-type="float" office:value="1.18829929828644" calcext:value-type="float">
            <text:p>1.18829929828644</text:p>
          </table:table-cell>
          <table:table-cell office:value-type="float" office:value="-0.0105695752426982" calcext:value-type="float">
            <text:p>-0.0105695752426982</text:p>
          </table:table-cell>
          <table:table-cell office:value-type="float" office:value="0.0736191421747208" calcext:value-type="float">
            <text:p>0.07361914217472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QRT(([.J236]-[.F236])^2+([.K236]-[.G236])^2)" office:value-type="float" office:value="0.533862574962436" calcext:value-type="float">
            <text:p>0.533862574962436</text:p>
          </table:table-cell>
          <table:table-cell table:formula="of:=SQRT(([.R236]-[.N236])^2+([.S236]-[.O236])^2)" office:value-type="float" office:value="0.326931404891094" calcext:value-type="float">
            <text:p>0.326931404891094</text:p>
          </table:table-cell>
          <table:table-cell table:formula="of:=SQRT(([.R236]-[.F236])^2+([.S236]-[.G236])^2)" office:value-type="float" office:value="0.986853010039544" calcext:value-type="float">
            <text:p>0.986853010039544</text:p>
          </table:table-cell>
          <table:table-cell table:formula="of:=SQRT(([.N236]-[.J236])^2+([.O236]-[.K236])^2)" office:value-type="float" office:value="0.972915374887339" calcext:value-type="float">
            <text:p>0.972915374887339</text:p>
          </table:table-cell>
          <table:table-cell office:value-type="float" office:value="0.815271973609924" calcext:value-type="float">
            <text:p>0.815271973609924</text:p>
          </table:table-cell>
          <table:table-cell office:value-type="float" office:value="0.288966059684753" calcext:value-type="float">
            <text:p>0.288966059684753</text:p>
          </table:table-cell>
          <table:table-cell office:value-type="float" office:value="-0.806284606456757" calcext:value-type="float">
            <text:p>-0.806284606456757</text:p>
          </table:table-cell>
          <table:table-cell office:value-type="float" office:value="0.999316871166229" calcext:value-type="float">
            <text:p>0.999316871166229</text:p>
          </table:table-cell>
          <table:table-cell office:value-type="float" office:value="0.282567232847214" calcext:value-type="float">
            <text:p>0.282567232847214</text:p>
          </table:table-cell>
          <table:table-cell office:value-type="float" office:value="0.324107319116592" calcext:value-type="float">
            <text:p>0.324107319116592</text:p>
          </table:table-cell>
          <table:table-cell office:value-type="float" office:value="-0.774587452411652" calcext:value-type="float">
            <text:p>-0.774587452411652</text:p>
          </table:table-cell>
          <table:table-cell office:value-type="float" office:value="0.999538600444794" calcext:value-type="float">
            <text:p>0.999538600444794</text:p>
          </table:table-cell>
          <table:table-cell office:value-type="float" office:value="0.733173251152039" calcext:value-type="float">
            <text:p>0.733173251152039</text:p>
          </table:table-cell>
          <table:table-cell office:value-type="float" office:value="1.18638253211975" calcext:value-type="float">
            <text:p>1.18638253211975</text:p>
          </table:table-cell>
          <table:table-cell office:value-type="float" office:value="0.0213990677148104" calcext:value-type="float">
            <text:p>0.0213990677148104</text:p>
          </table:table-cell>
          <table:table-cell office:value-type="float" office:value="0.0695391297340393" calcext:value-type="float">
            <text:p>0.0695391297340393</text:p>
          </table:table-cell>
          <table:table-cell office:value-type="float" office:value="0.406242549419403" calcext:value-type="float">
            <text:p>0.406242549419403</text:p>
          </table:table-cell>
          <table:table-cell office:value-type="float" office:value="1.18706059455872" calcext:value-type="float">
            <text:p>1.18706059455872</text:p>
          </table:table-cell>
          <table:table-cell office:value-type="float" office:value="-0.0122493803501129" calcext:value-type="float">
            <text:p>-0.0122493803501129</text:p>
          </table:table-cell>
          <table:table-cell office:value-type="float" office:value="0.0726917907595635" calcext:value-type="float">
            <text:p>0.07269179075956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QRT(([.J237]-[.F237])^2+([.K237]-[.G237])^2)" office:value-type="float" office:value="0.533839868714987" calcext:value-type="float">
            <text:p>0.533839868714987</text:p>
          </table:table-cell>
          <table:table-cell table:formula="of:=SQRT(([.R237]-[.N237])^2+([.S237]-[.O237])^2)" office:value-type="float" office:value="0.326604977880527" calcext:value-type="float">
            <text:p>0.326604977880527</text:p>
          </table:table-cell>
          <table:table-cell table:formula="of:=SQRT(([.R237]-[.F237])^2+([.S237]-[.G237])^2)" office:value-type="float" office:value="0.98792906266549" calcext:value-type="float">
            <text:p>0.98792906266549</text:p>
          </table:table-cell>
          <table:table-cell table:formula="of:=SQRT(([.N237]-[.J237])^2+([.O237]-[.K237])^2)" office:value-type="float" office:value="0.97404599553739" calcext:value-type="float">
            <text:p>0.97404599553739</text:p>
          </table:table-cell>
          <table:table-cell office:value-type="float" office:value="0.815476536750794" calcext:value-type="float">
            <text:p>0.815476536750794</text:p>
          </table:table-cell>
          <table:table-cell office:value-type="float" office:value="0.289475977420807" calcext:value-type="float">
            <text:p>0.289475977420807</text:p>
          </table:table-cell>
          <table:table-cell office:value-type="float" office:value="-0.872526824474335" calcext:value-type="float">
            <text:p>-0.872526824474335</text:p>
          </table:table-cell>
          <table:table-cell office:value-type="float" office:value="0.999336421489716" calcext:value-type="float">
            <text:p>0.999336421489716</text:p>
          </table:table-cell>
          <table:table-cell office:value-type="float" office:value="0.282751768827438" calcext:value-type="float">
            <text:p>0.282751768827438</text:p>
          </table:table-cell>
          <table:table-cell office:value-type="float" office:value="0.323962599039078" calcext:value-type="float">
            <text:p>0.323962599039078</text:p>
          </table:table-cell>
          <table:table-cell office:value-type="float" office:value="-0.831455111503601" calcext:value-type="float">
            <text:p>-0.831455111503601</text:p>
          </table:table-cell>
          <table:table-cell office:value-type="float" office:value="0.999550938606262" calcext:value-type="float">
            <text:p>0.999550938606262</text:p>
          </table:table-cell>
          <table:table-cell office:value-type="float" office:value="0.732919931411743" calcext:value-type="float">
            <text:p>0.732919931411743</text:p>
          </table:table-cell>
          <table:table-cell office:value-type="float" office:value="1.18774163722992" calcext:value-type="float">
            <text:p>1.18774163722992</text:p>
          </table:table-cell>
          <table:table-cell office:value-type="float" office:value="0.0191814452409744" calcext:value-type="float">
            <text:p>0.0191814452409744</text:p>
          </table:table-cell>
          <table:table-cell office:value-type="float" office:value="0.0705279409885407" calcext:value-type="float">
            <text:p>0.0705279409885407</text:p>
          </table:table-cell>
          <table:table-cell office:value-type="float" office:value="0.406316339969635" calcext:value-type="float">
            <text:p>0.406316339969635</text:p>
          </table:table-cell>
          <table:table-cell office:value-type="float" office:value="1.1886932849884" calcext:value-type="float">
            <text:p>1.1886932849884</text:p>
          </table:table-cell>
          <table:table-cell office:value-type="float" office:value="-0.0101476227864623" calcext:value-type="float">
            <text:p>-0.0101476227864623</text:p>
          </table:table-cell>
          <table:table-cell office:value-type="float" office:value="0.0733962580561638" calcext:value-type="float">
            <text:p>0.07339625805616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QRT(([.J238]-[.F238])^2+([.K238]-[.G238])^2)" office:value-type="float" office:value="0.533825903048602" calcext:value-type="float">
            <text:p>0.533825903048602</text:p>
          </table:table-cell>
          <table:table-cell table:formula="of:=SQRT(([.R238]-[.N238])^2+([.S238]-[.O238])^2)" office:value-type="float" office:value="0.323912861999821" calcext:value-type="float">
            <text:p>0.323912861999821</text:p>
          </table:table-cell>
          <table:table-cell table:formula="of:=SQRT(([.R238]-[.F238])^2+([.S238]-[.G238])^2)" office:value-type="float" office:value="0.99386844753369" calcext:value-type="float">
            <text:p>0.99386844753369</text:p>
          </table:table-cell>
          <table:table-cell table:formula="of:=SQRT(([.N238]-[.J238])^2+([.O238]-[.K238])^2)" office:value-type="float" office:value="0.97639141177029" calcext:value-type="float">
            <text:p>0.97639141177029</text:p>
          </table:table-cell>
          <table:table-cell office:value-type="float" office:value="0.815376579761505" calcext:value-type="float">
            <text:p>0.815376579761505</text:p>
          </table:table-cell>
          <table:table-cell office:value-type="float" office:value="0.285049051046371" calcext:value-type="float">
            <text:p>0.285049051046371</text:p>
          </table:table-cell>
          <table:table-cell office:value-type="float" office:value="-0.767306208610535" calcext:value-type="float">
            <text:p>-0.767306208610535</text:p>
          </table:table-cell>
          <table:table-cell office:value-type="float" office:value="0.99930065870285" calcext:value-type="float">
            <text:p>0.99930065870285</text:p>
          </table:table-cell>
          <table:table-cell office:value-type="float" office:value="0.282973855733871" calcext:value-type="float">
            <text:p>0.282973855733871</text:p>
          </table:table-cell>
          <table:table-cell office:value-type="float" office:value="0.324003309011459" calcext:value-type="float">
            <text:p>0.324003309011459</text:p>
          </table:table-cell>
          <table:table-cell office:value-type="float" office:value="-0.806138217449188" calcext:value-type="float">
            <text:p>-0.806138217449188</text:p>
          </table:table-cell>
          <table:table-cell office:value-type="float" office:value="0.999549090862274" calcext:value-type="float">
            <text:p>0.999549090862274</text:p>
          </table:table-cell>
          <table:table-cell office:value-type="float" office:value="0.73769223690033" calcext:value-type="float">
            <text:p>0.73769223690033</text:p>
          </table:table-cell>
          <table:table-cell office:value-type="float" office:value="1.18804693222046" calcext:value-type="float">
            <text:p>1.18804693222046</text:p>
          </table:table-cell>
          <table:table-cell office:value-type="float" office:value="0.0197589620947838" calcext:value-type="float">
            <text:p>0.0197589620947838</text:p>
          </table:table-cell>
          <table:table-cell office:value-type="float" office:value="0.0670105069875717" calcext:value-type="float">
            <text:p>0.0670105069875717</text:p>
          </table:table-cell>
          <table:table-cell office:value-type="float" office:value="0.413837671279907" calcext:value-type="float">
            <text:p>0.413837671279907</text:p>
          </table:table-cell>
          <table:table-cell office:value-type="float" office:value="1.19419205188751" calcext:value-type="float">
            <text:p>1.19419205188751</text:p>
          </table:table-cell>
          <table:table-cell office:value-type="float" office:value="-0.01076849270612" calcext:value-type="float">
            <text:p>-0.01076849270612</text:p>
          </table:table-cell>
          <table:table-cell office:value-type="float" office:value="0.0703558474779129" calcext:value-type="float">
            <text:p>0.07035584747791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QRT(([.J239]-[.F239])^2+([.K239]-[.G239])^2)" office:value-type="float" office:value="0.53366270510155" calcext:value-type="float">
            <text:p>0.53366270510155</text:p>
          </table:table-cell>
          <table:table-cell table:formula="of:=SQRT(([.R239]-[.N239])^2+([.S239]-[.O239])^2)" office:value-type="float" office:value="0.323785502964131" calcext:value-type="float">
            <text:p>0.323785502964131</text:p>
          </table:table-cell>
          <table:table-cell table:formula="of:=SQRT(([.R239]-[.F239])^2+([.S239]-[.G239])^2)" office:value-type="float" office:value="0.997172112772569" calcext:value-type="float">
            <text:p>0.997172112772569</text:p>
          </table:table-cell>
          <table:table-cell table:formula="of:=SQRT(([.N239]-[.J239])^2+([.O239]-[.K239])^2)" office:value-type="float" office:value="0.978438842404172" calcext:value-type="float">
            <text:p>0.978438842404172</text:p>
          </table:table-cell>
          <table:table-cell office:value-type="float" office:value="0.815226674079895" calcext:value-type="float">
            <text:p>0.815226674079895</text:p>
          </table:table-cell>
          <table:table-cell office:value-type="float" office:value="0.282647907733917" calcext:value-type="float">
            <text:p>0.282647907733917</text:p>
          </table:table-cell>
          <table:table-cell office:value-type="float" office:value="-0.924171149730682" calcext:value-type="float">
            <text:p>-0.924171149730682</text:p>
          </table:table-cell>
          <table:table-cell office:value-type="float" office:value="0.99927282333374" calcext:value-type="float">
            <text:p>0.99927282333374</text:p>
          </table:table-cell>
          <table:table-cell office:value-type="float" office:value="0.283118307590485" calcext:value-type="float">
            <text:p>0.283118307590485</text:p>
          </table:table-cell>
          <table:table-cell office:value-type="float" office:value="0.323348879814148" calcext:value-type="float">
            <text:p>0.323348879814148</text:p>
          </table:table-cell>
          <table:table-cell office:value-type="float" office:value="-0.923567295074463" calcext:value-type="float">
            <text:p>-0.923567295074463</text:p>
          </table:table-cell>
          <table:table-cell office:value-type="float" office:value="0.999539911746979" calcext:value-type="float">
            <text:p>0.999539911746979</text:p>
          </table:table-cell>
          <table:table-cell office:value-type="float" office:value="0.737573564052582" calcext:value-type="float">
            <text:p>0.737573564052582</text:p>
          </table:table-cell>
          <table:table-cell office:value-type="float" office:value="1.18984353542328" calcext:value-type="float">
            <text:p>1.18984353542328</text:p>
          </table:table-cell>
          <table:table-cell office:value-type="float" office:value="0.0224268175661564" calcext:value-type="float">
            <text:p>0.0224268175661564</text:p>
          </table:table-cell>
          <table:table-cell office:value-type="float" office:value="0.0696421191096306" calcext:value-type="float">
            <text:p>0.0696421191096306</text:p>
          </table:table-cell>
          <table:table-cell office:value-type="float" office:value="0.413836896419525" calcext:value-type="float">
            <text:p>0.413836896419525</text:p>
          </table:table-cell>
          <table:table-cell office:value-type="float" office:value="1.19546687602997" calcext:value-type="float">
            <text:p>1.19546687602997</text:p>
          </table:table-cell>
          <table:table-cell office:value-type="float" office:value="-0.0135464668273926" calcext:value-type="float">
            <text:p>-0.0135464668273926</text:p>
          </table:table-cell>
          <table:table-cell office:value-type="float" office:value="0.0736560299992561" calcext:value-type="float">
            <text:p>0.07365602999925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QRT(([.J240]-[.F240])^2+([.K240]-[.G240])^2)" office:value-type="float" office:value="0.53542854769055" calcext:value-type="float">
            <text:p>0.53542854769055</text:p>
          </table:table-cell>
          <table:table-cell table:formula="of:=SQRT(([.R240]-[.N240])^2+([.S240]-[.O240])^2)" office:value-type="float" office:value="0.325716516869008" calcext:value-type="float">
            <text:p>0.325716516869008</text:p>
          </table:table-cell>
          <table:table-cell table:formula="of:=SQRT(([.R240]-[.F240])^2+([.S240]-[.G240])^2)" office:value-type="float" office:value="1.00333559025393" calcext:value-type="float">
            <text:p>1.00333559025393</text:p>
          </table:table-cell>
          <table:table-cell table:formula="of:=SQRT(([.N240]-[.J240])^2+([.O240]-[.K240])^2)" office:value-type="float" office:value="0.988738992159384" calcext:value-type="float">
            <text:p>0.988738992159384</text:p>
          </table:table-cell>
          <table:table-cell office:value-type="float" office:value="0.816078841686249" calcext:value-type="float">
            <text:p>0.816078841686249</text:p>
          </table:table-cell>
          <table:table-cell office:value-type="float" office:value="0.283475875854492" calcext:value-type="float">
            <text:p>0.283475875854492</text:p>
          </table:table-cell>
          <table:table-cell office:value-type="float" office:value="-0.947067618370056" calcext:value-type="float">
            <text:p>-0.947067618370056</text:p>
          </table:table-cell>
          <table:table-cell office:value-type="float" office:value="0.999270439147949" calcext:value-type="float">
            <text:p>0.999270439147949</text:p>
          </table:table-cell>
          <table:table-cell office:value-type="float" office:value="0.282104164361954" calcext:value-type="float">
            <text:p>0.282104164361954</text:p>
          </table:table-cell>
          <table:table-cell office:value-type="float" office:value="0.322906494140625" calcext:value-type="float">
            <text:p>0.322906494140625</text:p>
          </table:table-cell>
          <table:table-cell office:value-type="float" office:value="-0.933222413063049" calcext:value-type="float">
            <text:p>-0.933222413063049</text:p>
          </table:table-cell>
          <table:table-cell office:value-type="float" office:value="0.999542236328125" calcext:value-type="float">
            <text:p>0.999542236328125</text:p>
          </table:table-cell>
          <table:table-cell office:value-type="float" office:value="0.737505376338959" calcext:value-type="float">
            <text:p>0.737505376338959</text:p>
          </table:table-cell>
          <table:table-cell office:value-type="float" office:value="1.20052516460419" calcext:value-type="float">
            <text:p>1.20052516460419</text:p>
          </table:table-cell>
          <table:table-cell office:value-type="float" office:value="0.0224047228693962" calcext:value-type="float">
            <text:p>0.0224047228693962</text:p>
          </table:table-cell>
          <table:table-cell office:value-type="float" office:value="0.0703485310077667" calcext:value-type="float">
            <text:p>0.0703485310077667</text:p>
          </table:table-cell>
          <table:table-cell office:value-type="float" office:value="0.411791175603867" calcext:value-type="float">
            <text:p>0.411791175603867</text:p>
          </table:table-cell>
          <table:table-cell office:value-type="float" office:value="1.20175349712372" calcext:value-type="float">
            <text:p>1.20175349712372</text:p>
          </table:table-cell>
          <table:table-cell office:value-type="float" office:value="-0.013500640168786" calcext:value-type="float">
            <text:p>-0.013500640168786</text:p>
          </table:table-cell>
          <table:table-cell office:value-type="float" office:value="0.0746116638183594" calcext:value-type="float">
            <text:p>0.07461166381835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QRT(([.J241]-[.F241])^2+([.K241]-[.G241])^2)" office:value-type="float" office:value="0.531920877074351" calcext:value-type="float">
            <text:p>0.531920877074351</text:p>
          </table:table-cell>
          <table:table-cell table:formula="of:=SQRT(([.R241]-[.N241])^2+([.S241]-[.O241])^2)" office:value-type="float" office:value="0.325399348375585" calcext:value-type="float">
            <text:p>0.325399348375585</text:p>
          </table:table-cell>
          <table:table-cell table:formula="of:=SQRT(([.R241]-[.F241])^2+([.S241]-[.G241])^2)" office:value-type="float" office:value="1.00417464577808" calcext:value-type="float">
            <text:p>1.00417464577808</text:p>
          </table:table-cell>
          <table:table-cell table:formula="of:=SQRT(([.N241]-[.J241])^2+([.O241]-[.K241])^2)" office:value-type="float" office:value="0.987853459046065" calcext:value-type="float">
            <text:p>0.987853459046065</text:p>
          </table:table-cell>
          <table:table-cell office:value-type="float" office:value="0.814449965953827" calcext:value-type="float">
            <text:p>0.814449965953827</text:p>
          </table:table-cell>
          <table:table-cell office:value-type="float" office:value="0.282319813966751" calcext:value-type="float">
            <text:p>0.282319813966751</text:p>
          </table:table-cell>
          <table:table-cell office:value-type="float" office:value="-0.74964052438736" calcext:value-type="float">
            <text:p>-0.74964052438736</text:p>
          </table:table-cell>
          <table:table-cell office:value-type="float" office:value="0.999276161193848" calcext:value-type="float">
            <text:p>0.999276161193848</text:p>
          </table:table-cell>
          <table:table-cell office:value-type="float" office:value="0.284082591533661" calcext:value-type="float">
            <text:p>0.284082591533661</text:p>
          </table:table-cell>
          <table:table-cell office:value-type="float" office:value="0.322943300008774" calcext:value-type="float">
            <text:p>0.322943300008774</text:p>
          </table:table-cell>
          <table:table-cell office:value-type="float" office:value="-0.703283786773682" calcext:value-type="float">
            <text:p>-0.703283786773682</text:p>
          </table:table-cell>
          <table:table-cell office:value-type="float" office:value="0.999545633792877" calcext:value-type="float">
            <text:p>0.999545633792877</text:p>
          </table:table-cell>
          <table:table-cell office:value-type="float" office:value="0.737690091133118" calcext:value-type="float">
            <text:p>0.737690091133118</text:p>
          </table:table-cell>
          <table:table-cell office:value-type="float" office:value="1.20049369335175" calcext:value-type="float">
            <text:p>1.20049369335175</text:p>
          </table:table-cell>
          <table:table-cell office:value-type="float" office:value="0.0206181816756725" calcext:value-type="float">
            <text:p>0.0206181816756725</text:p>
          </table:table-cell>
          <table:table-cell office:value-type="float" office:value="0.0683130994439125" calcext:value-type="float">
            <text:p>0.0683130994439125</text:p>
          </table:table-cell>
          <table:table-cell office:value-type="float" office:value="0.412296622991562" calcext:value-type="float">
            <text:p>0.412296622991562</text:p>
          </table:table-cell>
          <table:table-cell office:value-type="float" office:value="1.20244991779327" calcext:value-type="float">
            <text:p>1.20244991779327</text:p>
          </table:table-cell>
          <table:table-cell office:value-type="float" office:value="-0.0115668708458543" calcext:value-type="float">
            <text:p>-0.0115668708458543</text:p>
          </table:table-cell>
          <table:table-cell office:value-type="float" office:value="0.0724888071417809" calcext:value-type="float">
            <text:p>0.07248880714178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QRT(([.J242]-[.F242])^2+([.K242]-[.G242])^2)" office:value-type="float" office:value="0.531585937259893" calcext:value-type="float">
            <text:p>0.531585937259893</text:p>
          </table:table-cell>
          <table:table-cell table:formula="of:=SQRT(([.R242]-[.N242])^2+([.S242]-[.O242])^2)" office:value-type="float" office:value="0.323360140861651" calcext:value-type="float">
            <text:p>0.323360140861651</text:p>
          </table:table-cell>
          <table:table-cell table:formula="of:=SQRT(([.R242]-[.F242])^2+([.S242]-[.G242])^2)" office:value-type="float" office:value="1.00343645995638" calcext:value-type="float">
            <text:p>1.00343645995638</text:p>
          </table:table-cell>
          <table:table-cell table:formula="of:=SQRT(([.N242]-[.J242])^2+([.O242]-[.K242])^2)" office:value-type="float" office:value="0.986017653074279" calcext:value-type="float">
            <text:p>0.986017653074279</text:p>
          </table:table-cell>
          <table:table-cell office:value-type="float" office:value="0.813329696655273" calcext:value-type="float">
            <text:p>0.813329696655273</text:p>
          </table:table-cell>
          <table:table-cell office:value-type="float" office:value="0.282387405633926" calcext:value-type="float">
            <text:p>0.282387405633926</text:p>
          </table:table-cell>
          <table:table-cell office:value-type="float" office:value="-0.876260578632355" calcext:value-type="float">
            <text:p>-0.876260578632355</text:p>
          </table:table-cell>
          <table:table-cell office:value-type="float" office:value="0.999294638633728" calcext:value-type="float">
            <text:p>0.999294638633728</text:p>
          </table:table-cell>
          <table:table-cell office:value-type="float" office:value="0.283292919397354" calcext:value-type="float">
            <text:p>0.283292919397354</text:p>
          </table:table-cell>
          <table:table-cell office:value-type="float" office:value="0.322941362857819" calcext:value-type="float">
            <text:p>0.322941362857819</text:p>
          </table:table-cell>
          <table:table-cell office:value-type="float" office:value="-0.831510543823242" calcext:value-type="float">
            <text:p>-0.831510543823242</text:p>
          </table:table-cell>
          <table:table-cell office:value-type="float" office:value="0.999552667140961" calcext:value-type="float">
            <text:p>0.999552667140961</text:p>
          </table:table-cell>
          <table:table-cell office:value-type="float" office:value="0.734383225440979" calcext:value-type="float">
            <text:p>0.734383225440979</text:p>
          </table:table-cell>
          <table:table-cell office:value-type="float" office:value="1.19972431659698" calcext:value-type="float">
            <text:p>1.19972431659698</text:p>
          </table:table-cell>
          <table:table-cell office:value-type="float" office:value="0.0206156205385923" calcext:value-type="float">
            <text:p>0.0206156205385923</text:p>
          </table:table-cell>
          <table:table-cell office:value-type="float" office:value="0.0704589709639549" calcext:value-type="float">
            <text:p>0.0704589709639549</text:p>
          </table:table-cell>
          <table:table-cell office:value-type="float" office:value="0.411028802394867" calcext:value-type="float">
            <text:p>0.411028802394867</text:p>
          </table:table-cell>
          <table:table-cell office:value-type="float" office:value="1.20164728164673" calcext:value-type="float">
            <text:p>1.20164728164673</text:p>
          </table:table-cell>
          <table:table-cell office:value-type="float" office:value="-0.0115656638517976" calcext:value-type="float">
            <text:p>-0.0115656638517976</text:p>
          </table:table-cell>
          <table:table-cell office:value-type="float" office:value="0.0743238478899002" calcext:value-type="float">
            <text:p>0.074323847889900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QRT(([.J243]-[.F243])^2+([.K243]-[.G243])^2)" office:value-type="float" office:value="0.53150972462685" calcext:value-type="float">
            <text:p>0.53150972462685</text:p>
          </table:table-cell>
          <table:table-cell table:formula="of:=SQRT(([.R243]-[.N243])^2+([.S243]-[.O243])^2)" office:value-type="float" office:value="0.325505366665536" calcext:value-type="float">
            <text:p>0.325505366665536</text:p>
          </table:table-cell>
          <table:table-cell table:formula="of:=SQRT(([.R243]-[.F243])^2+([.S243]-[.G243])^2)" office:value-type="float" office:value="1.004109709692" calcext:value-type="float">
            <text:p>1.004109709692</text:p>
          </table:table-cell>
          <table:table-cell table:formula="of:=SQRT(([.N243]-[.J243])^2+([.O243]-[.K243])^2)" office:value-type="float" office:value="0.985755484489338" calcext:value-type="float">
            <text:p>0.985755484489338</text:p>
          </table:table-cell>
          <table:table-cell office:value-type="float" office:value="0.81341826915741" calcext:value-type="float">
            <text:p>0.81341826915741</text:p>
          </table:table-cell>
          <table:table-cell office:value-type="float" office:value="0.28349906206131" calcext:value-type="float">
            <text:p>0.28349906206131</text:p>
          </table:table-cell>
          <table:table-cell office:value-type="float" office:value="-0.842134356498718" calcext:value-type="float">
            <text:p>-0.842134356498718</text:p>
          </table:table-cell>
          <table:table-cell office:value-type="float" office:value="0.999311447143555" calcext:value-type="float">
            <text:p>0.999311447143555</text:p>
          </table:table-cell>
          <table:table-cell office:value-type="float" office:value="0.283360779285431" calcext:value-type="float">
            <text:p>0.283360779285431</text:p>
          </table:table-cell>
          <table:table-cell office:value-type="float" office:value="0.322762846946716" calcext:value-type="float">
            <text:p>0.322762846946716</text:p>
          </table:table-cell>
          <table:table-cell office:value-type="float" office:value="-0.78971666097641" calcext:value-type="float">
            <text:p>-0.78971666097641</text:p>
          </table:table-cell>
          <table:table-cell office:value-type="float" office:value="0.999562501907349" calcext:value-type="float">
            <text:p>0.999562501907349</text:p>
          </table:table-cell>
          <table:table-cell office:value-type="float" office:value="0.732168078422546" calcext:value-type="float">
            <text:p>0.732168078422546</text:p>
          </table:table-cell>
          <table:table-cell office:value-type="float" office:value="1.20042216777802" calcext:value-type="float">
            <text:p>1.20042216777802</text:p>
          </table:table-cell>
          <table:table-cell office:value-type="float" office:value="0.0206067990511656" calcext:value-type="float">
            <text:p>0.0206067990511656</text:p>
          </table:table-cell>
          <table:table-cell office:value-type="float" office:value="0.0699084624648094" calcext:value-type="float">
            <text:p>0.0699084624648094</text:p>
          </table:table-cell>
          <table:table-cell office:value-type="float" office:value="0.406664609909058" calcext:value-type="float">
            <text:p>0.406664609909058</text:p>
          </table:table-cell>
          <table:table-cell office:value-type="float" office:value="1.20153379440308" calcext:value-type="float">
            <text:p>1.20153379440308</text:p>
          </table:table-cell>
          <table:table-cell office:value-type="float" office:value="-0.0115526895970106" calcext:value-type="float">
            <text:p>-0.0115526895970106</text:p>
          </table:table-cell>
          <table:table-cell office:value-type="float" office:value="0.0736122652888298" calcext:value-type="float">
            <text:p>0.07361226528882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QRT(([.J244]-[.F244])^2+([.K244]-[.G244])^2)" office:value-type="float" office:value="0.532102895083918" calcext:value-type="float">
            <text:p>0.532102895083918</text:p>
          </table:table-cell>
          <table:table-cell table:formula="of:=SQRT(([.R244]-[.N244])^2+([.S244]-[.O244])^2)" office:value-type="float" office:value="0.32732553070967" calcext:value-type="float">
            <text:p>0.32732553070967</text:p>
          </table:table-cell>
          <table:table-cell table:formula="of:=SQRT(([.R244]-[.F244])^2+([.S244]-[.G244])^2)" office:value-type="float" office:value="1.00266218836797" calcext:value-type="float">
            <text:p>1.00266218836797</text:p>
          </table:table-cell>
          <table:table-cell table:formula="of:=SQRT(([.N244]-[.J244])^2+([.O244]-[.K244])^2)" office:value-type="float" office:value="0.986646126667406" calcext:value-type="float">
            <text:p>0.986646126667406</text:p>
          </table:table-cell>
          <table:table-cell office:value-type="float" office:value="0.814217746257782" calcext:value-type="float">
            <text:p>0.814217746257782</text:p>
          </table:table-cell>
          <table:table-cell office:value-type="float" office:value="0.285709023475647" calcext:value-type="float">
            <text:p>0.285709023475647</text:p>
          </table:table-cell>
          <table:table-cell office:value-type="float" office:value="-0.902034878730774" calcext:value-type="float">
            <text:p>-0.902034878730774</text:p>
          </table:table-cell>
          <table:table-cell office:value-type="float" office:value="0.999313294887543" calcext:value-type="float">
            <text:p>0.999313294887543</text:p>
          </table:table-cell>
          <table:table-cell office:value-type="float" office:value="0.283362567424774" calcext:value-type="float">
            <text:p>0.283362567424774</text:p>
          </table:table-cell>
          <table:table-cell office:value-type="float" office:value="0.322127014398575" calcext:value-type="float">
            <text:p>0.322127014398575</text:p>
          </table:table-cell>
          <table:table-cell office:value-type="float" office:value="-0.816463351249695" calcext:value-type="float">
            <text:p>-0.816463351249695</text:p>
          </table:table-cell>
          <table:table-cell office:value-type="float" office:value="0.999569058418274" calcext:value-type="float">
            <text:p>0.999569058418274</text:p>
          </table:table-cell>
          <table:table-cell office:value-type="float" office:value="0.732464671134949" calcext:value-type="float">
            <text:p>0.732464671134949</text:p>
          </table:table-cell>
          <table:table-cell office:value-type="float" office:value="1.20063591003418" calcext:value-type="float">
            <text:p>1.20063591003418</text:p>
          </table:table-cell>
          <table:table-cell office:value-type="float" office:value="0.0163507349789143" calcext:value-type="float">
            <text:p>0.0163507349789143</text:p>
          </table:table-cell>
          <table:table-cell office:value-type="float" office:value="0.0716443285346031" calcext:value-type="float">
            <text:p>0.0716443285346031</text:p>
          </table:table-cell>
          <table:table-cell office:value-type="float" office:value="0.40513950586319" calcext:value-type="float">
            <text:p>0.40513950586319</text:p>
          </table:table-cell>
          <table:table-cell office:value-type="float" office:value="1.20112502574921" calcext:value-type="float">
            <text:p>1.20112502574921</text:p>
          </table:table-cell>
          <table:table-cell office:value-type="float" office:value="-0.00704588368535042" calcext:value-type="float">
            <text:p>-0.00704588368535042</text:p>
          </table:table-cell>
          <table:table-cell office:value-type="float" office:value="0.0753365755081177" calcext:value-type="float">
            <text:p>0.07533657550811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QRT(([.J245]-[.F245])^2+([.K245]-[.G245])^2)" office:value-type="float" office:value="0.532996772180621" calcext:value-type="float">
            <text:p>0.532996772180621</text:p>
          </table:table-cell>
          <table:table-cell table:formula="of:=SQRT(([.R245]-[.N245])^2+([.S245]-[.O245])^2)" office:value-type="float" office:value="0.327826786268013" calcext:value-type="float">
            <text:p>0.327826786268013</text:p>
          </table:table-cell>
          <table:table-cell table:formula="of:=SQRT(([.R245]-[.F245])^2+([.S245]-[.G245])^2)" office:value-type="float" office:value="1.01065002886317" calcext:value-type="float">
            <text:p>1.01065002886317</text:p>
          </table:table-cell>
          <table:table-cell table:formula="of:=SQRT(([.N245]-[.J245])^2+([.O245]-[.K245])^2)" office:value-type="float" office:value="0.99090340464453" calcext:value-type="float">
            <text:p>0.99090340464453</text:p>
          </table:table-cell>
          <table:table-cell office:value-type="float" office:value="0.813204884529114" calcext:value-type="float">
            <text:p>0.813204884529114</text:p>
          </table:table-cell>
          <table:table-cell office:value-type="float" office:value="0.285701811313629" calcext:value-type="float">
            <text:p>0.285701811313629</text:p>
          </table:table-cell>
          <table:table-cell office:value-type="float" office:value="-0.859366536140442" calcext:value-type="float">
            <text:p>-0.859366536140442</text:p>
          </table:table-cell>
          <table:table-cell office:value-type="float" office:value="0.999342799186707" calcext:value-type="float">
            <text:p>0.999342799186707</text:p>
          </table:table-cell>
          <table:table-cell office:value-type="float" office:value="0.281519770622253" calcext:value-type="float">
            <text:p>0.281519770622253</text:p>
          </table:table-cell>
          <table:table-cell office:value-type="float" office:value="0.32307156920433" calcext:value-type="float">
            <text:p>0.32307156920433</text:p>
          </table:table-cell>
          <table:table-cell office:value-type="float" office:value="-0.733952581882477" calcext:value-type="float">
            <text:p>-0.733952581882477</text:p>
          </table:table-cell>
          <table:table-cell office:value-type="float" office:value="0.999582052230835" calcext:value-type="float">
            <text:p>0.999582052230835</text:p>
          </table:table-cell>
          <table:table-cell office:value-type="float" office:value="0.732809364795685" calcext:value-type="float">
            <text:p>0.732809364795685</text:p>
          </table:table-cell>
          <table:table-cell office:value-type="float" office:value="1.20524346828461" calcext:value-type="float">
            <text:p>1.20524346828461</text:p>
          </table:table-cell>
          <table:table-cell office:value-type="float" office:value="0.002920608734712" calcext:value-type="float">
            <text:p>0.002920608734712</text:p>
          </table:table-cell>
          <table:table-cell office:value-type="float" office:value="0.0711291804909706" calcext:value-type="float">
            <text:p>0.0711291804909706</text:p>
          </table:table-cell>
          <table:table-cell office:value-type="float" office:value="0.405020892620087" calcext:value-type="float">
            <text:p>0.405020892620087</text:p>
          </table:table-cell>
          <table:table-cell office:value-type="float" office:value="1.21025538444519" calcext:value-type="float">
            <text:p>1.21025538444519</text:p>
          </table:table-cell>
          <table:table-cell office:value-type="float" office:value="0.00625483551993966" calcext:value-type="float">
            <text:p>0.00625483551993966</text:p>
          </table:table-cell>
          <table:table-cell office:value-type="float" office:value="0.0747235789895058" calcext:value-type="float">
            <text:p>0.07472357898950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QRT(([.J246]-[.F246])^2+([.K246]-[.G246])^2)" office:value-type="float" office:value="0.529816085428133" calcext:value-type="float">
            <text:p>0.529816085428133</text:p>
          </table:table-cell>
          <table:table-cell table:formula="of:=SQRT(([.R246]-[.N246])^2+([.S246]-[.O246])^2)" office:value-type="float" office:value="0.327845633772236" calcext:value-type="float">
            <text:p>0.327845633772236</text:p>
          </table:table-cell>
          <table:table-cell table:formula="of:=SQRT(([.R246]-[.F246])^2+([.S246]-[.G246])^2)" office:value-type="float" office:value="1.00948565130137" calcext:value-type="float">
            <text:p>1.00948565130137</text:p>
          </table:table-cell>
          <table:table-cell table:formula="of:=SQRT(([.N246]-[.J246])^2+([.O246]-[.K246])^2)" office:value-type="float" office:value="0.996064821964364" calcext:value-type="float">
            <text:p>0.996064821964364</text:p>
          </table:table-cell>
          <table:table-cell office:value-type="float" office:value="0.811248421669006" calcext:value-type="float">
            <text:p>0.811248421669006</text:p>
          </table:table-cell>
          <table:table-cell office:value-type="float" office:value="0.279197573661804" calcext:value-type="float">
            <text:p>0.279197573661804</text:p>
          </table:table-cell>
          <table:table-cell office:value-type="float" office:value="-0.689336776733398" calcext:value-type="float">
            <text:p>-0.689336776733398</text:p>
          </table:table-cell>
          <table:table-cell office:value-type="float" office:value="0.999316871166229" calcext:value-type="float">
            <text:p>0.999316871166229</text:p>
          </table:table-cell>
          <table:table-cell office:value-type="float" office:value="0.282594233751297" calcext:value-type="float">
            <text:p>0.282594233751297</text:p>
          </table:table-cell>
          <table:table-cell office:value-type="float" office:value="0.314266562461853" calcext:value-type="float">
            <text:p>0.314266562461853</text:p>
          </table:table-cell>
          <table:table-cell office:value-type="float" office:value="-0.602777361869812" calcext:value-type="float">
            <text:p>-0.602777361869812</text:p>
          </table:table-cell>
          <table:table-cell office:value-type="float" office:value="0.999569356441498" calcext:value-type="float">
            <text:p>0.999569356441498</text:p>
          </table:table-cell>
          <table:table-cell office:value-type="float" office:value="0.733151018619537" calcext:value-type="float">
            <text:p>0.733151018619537</text:p>
          </table:table-cell>
          <table:table-cell office:value-type="float" office:value="1.20260417461395" calcext:value-type="float">
            <text:p>1.20260417461395</text:p>
          </table:table-cell>
          <table:table-cell office:value-type="float" office:value="0.00345736602321267" calcext:value-type="float">
            <text:p>0.00345736602321267</text:p>
          </table:table-cell>
          <table:table-cell office:value-type="float" office:value="0.070663757622242" calcext:value-type="float">
            <text:p>0.070663757622242</text:p>
          </table:table-cell>
          <table:table-cell office:value-type="float" office:value="0.40530651807785" calcext:value-type="float">
            <text:p>0.40530651807785</text:p>
          </table:table-cell>
          <table:table-cell office:value-type="float" office:value="1.20346617698669" calcext:value-type="float">
            <text:p>1.20346617698669</text:p>
          </table:table-cell>
          <table:table-cell office:value-type="float" office:value="0.00571533711627126" calcext:value-type="float">
            <text:p>0.00571533711627126</text:p>
          </table:table-cell>
          <table:table-cell office:value-type="float" office:value="0.0750397592782974" calcext:value-type="float">
            <text:p>0.07503975927829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QRT(([.J247]-[.F247])^2+([.K247]-[.G247])^2)" office:value-type="float" office:value="0.534256186699763" calcext:value-type="float">
            <text:p>0.534256186699763</text:p>
          </table:table-cell>
          <table:table-cell table:formula="of:=SQRT(([.R247]-[.N247])^2+([.S247]-[.O247])^2)" office:value-type="float" office:value="0.32719399325129" calcext:value-type="float">
            <text:p>0.32719399325129</text:p>
          </table:table-cell>
          <table:table-cell table:formula="of:=SQRT(([.R247]-[.F247])^2+([.S247]-[.G247])^2)" office:value-type="float" office:value="1.00496863486598" calcext:value-type="float">
            <text:p>1.00496863486598</text:p>
          </table:table-cell>
          <table:table-cell table:formula="of:=SQRT(([.N247]-[.J247])^2+([.O247]-[.K247])^2)" office:value-type="float" office:value="0.988982817344221" calcext:value-type="float">
            <text:p>0.988982817344221</text:p>
          </table:table-cell>
          <table:table-cell office:value-type="float" office:value="0.811377882957459" calcext:value-type="float">
            <text:p>0.811377882957459</text:p>
          </table:table-cell>
          <table:table-cell office:value-type="float" office:value="0.278395712375641" calcext:value-type="float">
            <text:p>0.278395712375641</text:p>
          </table:table-cell>
          <table:table-cell office:value-type="float" office:value="-0.974811673164368" calcext:value-type="float">
            <text:p>-0.974811673164368</text:p>
          </table:table-cell>
          <table:table-cell office:value-type="float" office:value="0.999322414398193" calcext:value-type="float">
            <text:p>0.999322414398193</text:p>
          </table:table-cell>
          <table:table-cell office:value-type="float" office:value="0.278331518173218" calcext:value-type="float">
            <text:p>0.278331518173218</text:p>
          </table:table-cell>
          <table:table-cell office:value-type="float" office:value="0.314329624176025" calcext:value-type="float">
            <text:p>0.314329624176025</text:p>
          </table:table-cell>
          <table:table-cell office:value-type="float" office:value="-0.934369921684265" calcext:value-type="float">
            <text:p>-0.934369921684265</text:p>
          </table:table-cell>
          <table:table-cell office:value-type="float" office:value="0.999560058116913" calcext:value-type="float">
            <text:p>0.999560058116913</text:p>
          </table:table-cell>
          <table:table-cell office:value-type="float" office:value="0.733184516429901" calcext:value-type="float">
            <text:p>0.733184516429901</text:p>
          </table:table-cell>
          <table:table-cell office:value-type="float" office:value="1.192507147789" calcext:value-type="float">
            <text:p>1.192507147789</text:p>
          </table:table-cell>
          <table:table-cell office:value-type="float" office:value="0.00426713842898607" calcext:value-type="float">
            <text:p>0.00426713842898607</text:p>
          </table:table-cell>
          <table:table-cell office:value-type="float" office:value="0.0713638067245483" calcext:value-type="float">
            <text:p>0.0713638067245483</text:p>
          </table:table-cell>
          <table:table-cell office:value-type="float" office:value="0.406036525964737" calcext:value-type="float">
            <text:p>0.406036525964737</text:p>
          </table:table-cell>
          <table:table-cell office:value-type="float" office:value="1.19799363613129" calcext:value-type="float">
            <text:p>1.19799363613129</text:p>
          </table:table-cell>
          <table:table-cell office:value-type="float" office:value="0.00485414266586304" calcext:value-type="float">
            <text:p>0.00485414266586304</text:p>
          </table:table-cell>
          <table:table-cell office:value-type="float" office:value="0.0749009847640991" calcext:value-type="float">
            <text:p>0.074900984764099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QRT(([.J248]-[.F248])^2+([.K248]-[.G248])^2)" office:value-type="float" office:value="0.535946886066787" calcext:value-type="float">
            <text:p>0.535946886066787</text:p>
          </table:table-cell>
          <table:table-cell table:formula="of:=SQRT(([.R248]-[.N248])^2+([.S248]-[.O248])^2)" office:value-type="float" office:value="0.327544444680056" calcext:value-type="float">
            <text:p>0.327544444680056</text:p>
          </table:table-cell>
          <table:table-cell table:formula="of:=SQRT(([.R248]-[.F248])^2+([.S248]-[.G248])^2)" office:value-type="float" office:value="1.00652452722026" calcext:value-type="float">
            <text:p>1.00652452722026</text:p>
          </table:table-cell>
          <table:table-cell table:formula="of:=SQRT(([.N248]-[.J248])^2+([.O248]-[.K248])^2)" office:value-type="float" office:value="0.99168634139795" calcext:value-type="float">
            <text:p>0.99168634139795</text:p>
          </table:table-cell>
          <table:table-cell office:value-type="float" office:value="0.812050044536591" calcext:value-type="float">
            <text:p>0.812050044536591</text:p>
          </table:table-cell>
          <table:table-cell office:value-type="float" office:value="0.278163224458694" calcext:value-type="float">
            <text:p>0.278163224458694</text:p>
          </table:table-cell>
          <table:table-cell office:value-type="float" office:value="-0.970285892486572" calcext:value-type="float">
            <text:p>-0.970285892486572</text:p>
          </table:table-cell>
          <table:table-cell office:value-type="float" office:value="0.99932873249054" calcext:value-type="float">
            <text:p>0.99932873249054</text:p>
          </table:table-cell>
          <table:table-cell office:value-type="float" office:value="0.277378171682358" calcext:value-type="float">
            <text:p>0.277378171682358</text:p>
          </table:table-cell>
          <table:table-cell office:value-type="float" office:value="0.315109848976135" calcext:value-type="float">
            <text:p>0.315109848976135</text:p>
          </table:table-cell>
          <table:table-cell office:value-type="float" office:value="-0.92052286863327" calcext:value-type="float">
            <text:p>-0.92052286863327</text:p>
          </table:table-cell>
          <table:table-cell office:value-type="float" office:value="0.999563097953796" calcext:value-type="float">
            <text:p>0.999563097953796</text:p>
          </table:table-cell>
          <table:table-cell office:value-type="float" office:value="0.733205854892731" calcext:value-type="float">
            <text:p>0.733205854892731</text:p>
          </table:table-cell>
          <table:table-cell office:value-type="float" office:value="1.19582712650299" calcext:value-type="float">
            <text:p>1.19582712650299</text:p>
          </table:table-cell>
          <table:table-cell office:value-type="float" office:value="0.00505684781819582" calcext:value-type="float">
            <text:p>0.00505684781819582</text:p>
          </table:table-cell>
          <table:table-cell office:value-type="float" office:value="0.071618102490902" calcext:value-type="float">
            <text:p>0.071618102490902</text:p>
          </table:table-cell>
          <table:table-cell office:value-type="float" office:value="0.40567684173584" calcext:value-type="float">
            <text:p>0.40567684173584</text:p>
          </table:table-cell>
          <table:table-cell office:value-type="float" office:value="1.1990065574646" calcext:value-type="float">
            <text:p>1.1990065574646</text:p>
          </table:table-cell>
          <table:table-cell office:value-type="float" office:value="0.00398570764809847" calcext:value-type="float">
            <text:p>0.00398570764809847</text:p>
          </table:table-cell>
          <table:table-cell office:value-type="float" office:value="0.0750574991106987" calcext:value-type="float">
            <text:p>0.07505749911069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QRT(([.J249]-[.F249])^2+([.K249]-[.G249])^2)" office:value-type="float" office:value="0.537659087210928" calcext:value-type="float">
            <text:p>0.537659087210928</text:p>
          </table:table-cell>
          <table:table-cell table:formula="of:=SQRT(([.R249]-[.N249])^2+([.S249]-[.O249])^2)" office:value-type="float" office:value="0.329007440469872" calcext:value-type="float">
            <text:p>0.329007440469872</text:p>
          </table:table-cell>
          <table:table-cell table:formula="of:=SQRT(([.R249]-[.F249])^2+([.S249]-[.G249])^2)" office:value-type="float" office:value="1.00968481662353" calcext:value-type="float">
            <text:p>1.00968481662353</text:p>
          </table:table-cell>
          <table:table-cell table:formula="of:=SQRT(([.N249]-[.J249])^2+([.O249]-[.K249])^2)" office:value-type="float" office:value="0.994510329566455" calcext:value-type="float">
            <text:p>0.994510329566455</text:p>
          </table:table-cell>
          <table:table-cell office:value-type="float" office:value="0.81381356716156" calcext:value-type="float">
            <text:p>0.81381356716156</text:p>
          </table:table-cell>
          <table:table-cell office:value-type="float" office:value="0.277439564466476" calcext:value-type="float">
            <text:p>0.277439564466476</text:p>
          </table:table-cell>
          <table:table-cell office:value-type="float" office:value="-0.904787659645081" calcext:value-type="float">
            <text:p>-0.904787659645081</text:p>
          </table:table-cell>
          <table:table-cell office:value-type="float" office:value="0.999360620975494" calcext:value-type="float">
            <text:p>0.999360620975494</text:p>
          </table:table-cell>
          <table:table-cell office:value-type="float" office:value="0.277488887310028" calcext:value-type="float">
            <text:p>0.277488887310028</text:p>
          </table:table-cell>
          <table:table-cell office:value-type="float" office:value="0.315296292304993" calcext:value-type="float">
            <text:p>0.315296292304993</text:p>
          </table:table-cell>
          <table:table-cell office:value-type="float" office:value="-0.880271255970001" calcext:value-type="float">
            <text:p>-0.880271255970001</text:p>
          </table:table-cell>
          <table:table-cell office:value-type="float" office:value="0.999583959579468" calcext:value-type="float">
            <text:p>0.999583959579468</text:p>
          </table:table-cell>
          <table:table-cell office:value-type="float" office:value="0.735355854034424" calcext:value-type="float">
            <text:p>0.735355854034424</text:p>
          </table:table-cell>
          <table:table-cell office:value-type="float" office:value="1.19813752174377" calcext:value-type="float">
            <text:p>1.19813752174377</text:p>
          </table:table-cell>
          <table:table-cell office:value-type="float" office:value="0.00909686647355557" calcext:value-type="float">
            <text:p>0.00909686647355557</text:p>
          </table:table-cell>
          <table:table-cell office:value-type="float" office:value="0.0710330903530121" calcext:value-type="float">
            <text:p>0.0710330903530121</text:p>
          </table:table-cell>
          <table:table-cell office:value-type="float" office:value="0.406363248825073" calcext:value-type="float">
            <text:p>0.406363248825073</text:p>
          </table:table-cell>
          <table:table-cell office:value-type="float" office:value="1.20126187801361" calcext:value-type="float">
            <text:p>1.20126187801361</text:p>
          </table:table-cell>
          <table:table-cell office:value-type="float" office:value="-0.000100944831501693" calcext:value-type="float">
            <text:p>-0.000100944831501693</text:p>
          </table:table-cell>
          <table:table-cell office:value-type="float" office:value="0.0743341445922852" calcext:value-type="float">
            <text:p>0.074334144592285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QRT(([.J250]-[.F250])^2+([.K250]-[.G250])^2)" office:value-type="float" office:value="0.537807250622957" calcext:value-type="float">
            <text:p>0.537807250622957</text:p>
          </table:table-cell>
          <table:table-cell table:formula="of:=SQRT(([.R250]-[.N250])^2+([.S250]-[.O250])^2)" office:value-type="float" office:value="0.329833466342078" calcext:value-type="float">
            <text:p>0.329833466342078</text:p>
          </table:table-cell>
          <table:table-cell table:formula="of:=SQRT(([.R250]-[.F250])^2+([.S250]-[.G250])^2)" office:value-type="float" office:value="1.01144839753608" calcext:value-type="float">
            <text:p>1.01144839753608</text:p>
          </table:table-cell>
          <table:table-cell table:formula="of:=SQRT(([.N250]-[.J250])^2+([.O250]-[.K250])^2)" office:value-type="float" office:value="0.996652742554186" calcext:value-type="float">
            <text:p>0.996652742554186</text:p>
          </table:table-cell>
          <table:table-cell office:value-type="float" office:value="0.813791394233704" calcext:value-type="float">
            <text:p>0.813791394233704</text:p>
          </table:table-cell>
          <table:table-cell office:value-type="float" office:value="0.27746444940567" calcext:value-type="float">
            <text:p>0.27746444940567</text:p>
          </table:table-cell>
          <table:table-cell office:value-type="float" office:value="-0.861836791038513" calcext:value-type="float">
            <text:p>-0.861836791038513</text:p>
          </table:table-cell>
          <table:table-cell office:value-type="float" office:value="0.999350965023041" calcext:value-type="float">
            <text:p>0.999350965023041</text:p>
          </table:table-cell>
          <table:table-cell office:value-type="float" office:value="0.277341276407242" calcext:value-type="float">
            <text:p>0.277341276407242</text:p>
          </table:table-cell>
          <table:table-cell office:value-type="float" office:value="0.315647035837173" calcext:value-type="float">
            <text:p>0.315647035837173</text:p>
          </table:table-cell>
          <table:table-cell office:value-type="float" office:value="-0.777799963951111" calcext:value-type="float">
            <text:p>-0.777799963951111</text:p>
          </table:table-cell>
          <table:table-cell office:value-type="float" office:value="0.999576032161713" calcext:value-type="float">
            <text:p>0.999576032161713</text:p>
          </table:table-cell>
          <table:table-cell office:value-type="float" office:value="0.735389471054077" calcext:value-type="float">
            <text:p>0.735389471054077</text:p>
          </table:table-cell>
          <table:table-cell office:value-type="float" office:value="1.20080721378326" calcext:value-type="float">
            <text:p>1.20080721378326</text:p>
          </table:table-cell>
          <table:table-cell office:value-type="float" office:value="0.00925096962600946" calcext:value-type="float">
            <text:p>0.00925096962600946</text:p>
          </table:table-cell>
          <table:table-cell office:value-type="float" office:value="0.0700568333268166" calcext:value-type="float">
            <text:p>0.0700568333268166</text:p>
          </table:table-cell>
          <table:table-cell office:value-type="float" office:value="0.405562460422516" calcext:value-type="float">
            <text:p>0.405562460422516</text:p>
          </table:table-cell>
          <table:table-cell office:value-type="float" office:value="1.20287084579468" calcext:value-type="float">
            <text:p>1.20287084579468</text:p>
          </table:table-cell>
          <table:table-cell office:value-type="float" office:value="-0.000259120366536081" calcext:value-type="float">
            <text:p>-0.000259120366536081</text:p>
          </table:table-cell>
          <table:table-cell office:value-type="float" office:value="0.073142908513546" calcext:value-type="float">
            <text:p>0.0731429085135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([.J251]-[.F251])^2+([.K251]-[.G251])^2)" office:value-type="float" office:value="0.537847768592013" calcext:value-type="float">
            <text:p>0.537847768592013</text:p>
          </table:table-cell>
          <table:table-cell table:formula="of:=SQRT(([.R251]-[.N251])^2+([.S251]-[.O251])^2)" office:value-type="float" office:value="0.329962759004007" calcext:value-type="float">
            <text:p>0.329962759004007</text:p>
          </table:table-cell>
          <table:table-cell table:formula="of:=SQRT(([.R251]-[.F251])^2+([.S251]-[.G251])^2)" office:value-type="float" office:value="1.02365537072814" calcext:value-type="float">
            <text:p>1.02365537072814</text:p>
          </table:table-cell>
          <table:table-cell table:formula="of:=SQRT(([.N251]-[.J251])^2+([.O251]-[.K251])^2)" office:value-type="float" office:value="1.0064189185112" calcext:value-type="float">
            <text:p>1.0064189185112</text:p>
          </table:table-cell>
          <table:table-cell office:value-type="float" office:value="0.814068973064423" calcext:value-type="float">
            <text:p>0.814068973064423</text:p>
          </table:table-cell>
          <table:table-cell office:value-type="float" office:value="0.277650505304337" calcext:value-type="float">
            <text:p>0.277650505304337</text:p>
          </table:table-cell>
          <table:table-cell office:value-type="float" office:value="-0.739735424518585" calcext:value-type="float">
            <text:p>-0.739735424518585</text:p>
          </table:table-cell>
          <table:table-cell office:value-type="float" office:value="0.999378681182861" calcext:value-type="float">
            <text:p>0.999378681182861</text:p>
          </table:table-cell>
          <table:table-cell office:value-type="float" office:value="0.27768611907959" calcext:value-type="float">
            <text:p>0.27768611907959</text:p>
          </table:table-cell>
          <table:table-cell office:value-type="float" office:value="0.317319840192795" calcext:value-type="float">
            <text:p>0.317319840192795</text:p>
          </table:table-cell>
          <table:table-cell office:value-type="float" office:value="-0.624363362789154" calcext:value-type="float">
            <text:p>-0.624363362789154</text:p>
          </table:table-cell>
          <table:table-cell office:value-type="float" office:value="0.999587714672089" calcext:value-type="float">
            <text:p>0.999587714672089</text:p>
          </table:table-cell>
          <table:table-cell office:value-type="float" office:value="0.735720694065094" calcext:value-type="float">
            <text:p>0.735720694065094</text:p>
          </table:table-cell>
          <table:table-cell office:value-type="float" office:value="1.2134690284729" calcext:value-type="float">
            <text:p>1.2134690284729</text:p>
          </table:table-cell>
          <table:table-cell office:value-type="float" office:value="0.00207202881574631" calcext:value-type="float">
            <text:p>0.00207202881574631</text:p>
          </table:table-cell>
          <table:table-cell office:value-type="float" office:value="0.0682659298181534" calcext:value-type="float">
            <text:p>0.0682659298181534</text:p>
          </table:table-cell>
          <table:table-cell office:value-type="float" office:value="0.405770540237427" calcext:value-type="float">
            <text:p>0.405770540237427</text:p>
          </table:table-cell>
          <table:table-cell office:value-type="float" office:value="1.21635317802429" calcext:value-type="float">
            <text:p>1.21635317802429</text:p>
          </table:table-cell>
          <table:table-cell office:value-type="float" office:value="0.00725193182006478" calcext:value-type="float">
            <text:p>0.00725193182006478</text:p>
          </table:table-cell>
          <table:table-cell office:value-type="float" office:value="0.0712471082806587" calcext:value-type="float">
            <text:p>0.07124710828065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QRT(([.J252]-[.F252])^2+([.K252]-[.G252])^2)" office:value-type="float" office:value="0.536774460738274" calcext:value-type="float">
            <text:p>0.536774460738274</text:p>
          </table:table-cell>
          <table:table-cell table:formula="of:=SQRT(([.R252]-[.N252])^2+([.S252]-[.O252])^2)" office:value-type="float" office:value="0.330982306461549" calcext:value-type="float">
            <text:p>0.330982306461549</text:p>
          </table:table-cell>
          <table:table-cell table:formula="of:=SQRT(([.R252]-[.F252])^2+([.S252]-[.G252])^2)" office:value-type="float" office:value="1.0239937977316" calcext:value-type="float">
            <text:p>1.0239937977316</text:p>
          </table:table-cell>
          <table:table-cell table:formula="of:=SQRT(([.N252]-[.J252])^2+([.O252]-[.K252])^2)" office:value-type="float" office:value="1.00989518032882" calcext:value-type="float">
            <text:p>1.00989518032882</text:p>
          </table:table-cell>
          <table:table-cell office:value-type="float" office:value="0.814075827598572" calcext:value-type="float">
            <text:p>0.814075827598572</text:p>
          </table:table-cell>
          <table:table-cell office:value-type="float" office:value="0.277671188116074" calcext:value-type="float">
            <text:p>0.277671188116074</text:p>
          </table:table-cell>
          <table:table-cell office:value-type="float" office:value="-0.679188966751099" calcext:value-type="float">
            <text:p>-0.679188966751099</text:p>
          </table:table-cell>
          <table:table-cell office:value-type="float" office:value="0.999355018138886" calcext:value-type="float">
            <text:p>0.999355018138886</text:p>
          </table:table-cell>
          <table:table-cell office:value-type="float" office:value="0.278641670942307" calcext:value-type="float">
            <text:p>0.278641670942307</text:p>
          </table:table-cell>
          <table:table-cell office:value-type="float" office:value="0.315580099821091" calcext:value-type="float">
            <text:p>0.315580099821091</text:p>
          </table:table-cell>
          <table:table-cell office:value-type="float" office:value="-0.61321485042572" calcext:value-type="float">
            <text:p>-0.61321485042572</text:p>
          </table:table-cell>
          <table:table-cell office:value-type="float" office:value="0.99956351518631" calcext:value-type="float">
            <text:p>0.99956351518631</text:p>
          </table:table-cell>
          <table:table-cell office:value-type="float" office:value="0.735706448554993" calcext:value-type="float">
            <text:p>0.735706448554993</text:p>
          </table:table-cell>
          <table:table-cell office:value-type="float" office:value="1.21612441539764" calcext:value-type="float">
            <text:p>1.21612441539764</text:p>
          </table:table-cell>
          <table:table-cell office:value-type="float" office:value="0.00656597688794136" calcext:value-type="float">
            <text:p>0.00656597688794136</text:p>
          </table:table-cell>
          <table:table-cell office:value-type="float" office:value="0.0690537989139557" calcext:value-type="float">
            <text:p>0.0690537989139557</text:p>
          </table:table-cell>
          <table:table-cell office:value-type="float" office:value="0.404724180698395" calcext:value-type="float">
            <text:p>0.404724180698395</text:p>
          </table:table-cell>
          <table:table-cell office:value-type="float" office:value="1.21628427505493" calcext:value-type="float">
            <text:p>1.21628427505493</text:p>
          </table:table-cell>
          <table:table-cell office:value-type="float" office:value="0.00297746271826327" calcext:value-type="float">
            <text:p>0.00297746271826327</text:p>
          </table:table-cell>
          <table:table-cell office:value-type="float" office:value="0.0721664503216744" calcext:value-type="float">
            <text:p>0.07216645032167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QRT(([.J253]-[.F253])^2+([.K253]-[.G253])^2)" office:value-type="float" office:value="0.539323704035301" calcext:value-type="float">
            <text:p>0.539323704035301</text:p>
          </table:table-cell>
          <table:table-cell table:formula="of:=SQRT(([.R253]-[.N253])^2+([.S253]-[.O253])^2)" office:value-type="float" office:value="0.33106560702821" calcext:value-type="float">
            <text:p>0.33106560702821</text:p>
          </table:table-cell>
          <table:table-cell table:formula="of:=SQRT(([.R253]-[.F253])^2+([.S253]-[.G253])^2)" office:value-type="float" office:value="1.0250198013867" calcext:value-type="float">
            <text:p>1.0250198013867</text:p>
          </table:table-cell>
          <table:table-cell table:formula="of:=SQRT(([.N253]-[.J253])^2+([.O253]-[.K253])^2)" office:value-type="float" office:value="1.00870081988137" calcext:value-type="float">
            <text:p>1.00870081988137</text:p>
          </table:table-cell>
          <table:table-cell office:value-type="float" office:value="0.816159546375275" calcext:value-type="float">
            <text:p>0.816159546375275</text:p>
          </table:table-cell>
          <table:table-cell office:value-type="float" office:value="0.277150362730026" calcext:value-type="float">
            <text:p>0.277150362730026</text:p>
          </table:table-cell>
          <table:table-cell office:value-type="float" office:value="-0.966789901256561" calcext:value-type="float">
            <text:p>-0.966789901256561</text:p>
          </table:table-cell>
          <table:table-cell office:value-type="float" office:value="0.999360501766205" calcext:value-type="float">
            <text:p>0.999360501766205</text:p>
          </table:table-cell>
          <table:table-cell office:value-type="float" office:value="0.278325647115707" calcext:value-type="float">
            <text:p>0.278325647115707</text:p>
          </table:table-cell>
          <table:table-cell office:value-type="float" office:value="0.317209750413895" calcext:value-type="float">
            <text:p>0.317209750413895</text:p>
          </table:table-cell>
          <table:table-cell office:value-type="float" office:value="-0.916349709033966" calcext:value-type="float">
            <text:p>-0.916349709033966</text:p>
          </table:table-cell>
          <table:table-cell office:value-type="float" office:value="0.999560654163361" calcext:value-type="float">
            <text:p>0.999560654163361</text:p>
          </table:table-cell>
          <table:table-cell office:value-type="float" office:value="0.736271917819977" calcext:value-type="float">
            <text:p>0.736271917819977</text:p>
          </table:table-cell>
          <table:table-cell office:value-type="float" office:value="1.21596586704254" calcext:value-type="float">
            <text:p>1.21596586704254</text:p>
          </table:table-cell>
          <table:table-cell office:value-type="float" office:value="0.00646757101640105" calcext:value-type="float">
            <text:p>0.00646757101640105</text:p>
          </table:table-cell>
          <table:table-cell office:value-type="float" office:value="0.0681506767868996" calcext:value-type="float">
            <text:p>0.0681506767868996</text:p>
          </table:table-cell>
          <table:table-cell office:value-type="float" office:value="0.405206382274628" calcext:value-type="float">
            <text:p>0.405206382274628</text:p>
          </table:table-cell>
          <table:table-cell office:value-type="float" office:value="1.21618342399597" calcext:value-type="float">
            <text:p>1.21618342399597</text:p>
          </table:table-cell>
          <table:table-cell office:value-type="float" office:value="0.00305943912826479" calcext:value-type="float">
            <text:p>0.00305943912826479</text:p>
          </table:table-cell>
          <table:table-cell office:value-type="float" office:value="0.0708426535129547" calcext:value-type="float">
            <text:p>0.07084265351295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QRT(([.J254]-[.F254])^2+([.K254]-[.G254])^2)" office:value-type="float" office:value="0.54084935196494" calcext:value-type="float">
            <text:p>0.54084935196494</text:p>
          </table:table-cell>
          <table:table-cell table:formula="of:=SQRT(([.R254]-[.N254])^2+([.S254]-[.O254])^2)" office:value-type="float" office:value="0.332872793107894" calcext:value-type="float">
            <text:p>0.332872793107894</text:p>
          </table:table-cell>
          <table:table-cell table:formula="of:=SQRT(([.R254]-[.F254])^2+([.S254]-[.G254])^2)" office:value-type="float" office:value="1.02527416877329" calcext:value-type="float">
            <text:p>1.02527416877329</text:p>
          </table:table-cell>
          <table:table-cell table:formula="of:=SQRT(([.N254]-[.J254])^2+([.O254]-[.K254])^2)" office:value-type="float" office:value="1.01174057623939" calcext:value-type="float">
            <text:p>1.01174057623939</text:p>
          </table:table-cell>
          <table:table-cell office:value-type="float" office:value="0.817664444446564" calcext:value-type="float">
            <text:p>0.817664444446564</text:p>
          </table:table-cell>
          <table:table-cell office:value-type="float" office:value="0.279045283794403" calcext:value-type="float">
            <text:p>0.279045283794403</text:p>
          </table:table-cell>
          <table:table-cell office:value-type="float" office:value="-0.97418212890625" calcext:value-type="float">
            <text:p>-0.97418212890625</text:p>
          </table:table-cell>
          <table:table-cell office:value-type="float" office:value="0.999349713325501" calcext:value-type="float">
            <text:p>0.999349713325501</text:p>
          </table:table-cell>
          <table:table-cell office:value-type="float" office:value="0.278073310852051" calcext:value-type="float">
            <text:p>0.278073310852051</text:p>
          </table:table-cell>
          <table:table-cell office:value-type="float" office:value="0.315915733575821" calcext:value-type="float">
            <text:p>0.315915733575821</text:p>
          </table:table-cell>
          <table:table-cell office:value-type="float" office:value="-0.921167254447937" calcext:value-type="float">
            <text:p>-0.921167254447937</text:p>
          </table:table-cell>
          <table:table-cell office:value-type="float" office:value="0.999545753002167" calcext:value-type="float">
            <text:p>0.999545753002167</text:p>
          </table:table-cell>
          <table:table-cell office:value-type="float" office:value="0.735572278499603" calcext:value-type="float">
            <text:p>0.735572278499603</text:p>
          </table:table-cell>
          <table:table-cell office:value-type="float" office:value="1.21830904483795" calcext:value-type="float">
            <text:p>1.21830904483795</text:p>
          </table:table-cell>
          <table:table-cell office:value-type="float" office:value="0.012620341964066" calcext:value-type="float">
            <text:p>0.012620341964066</text:p>
          </table:table-cell>
          <table:table-cell office:value-type="float" office:value="0.0693284645676613" calcext:value-type="float">
            <text:p>0.0693284645676613</text:p>
          </table:table-cell>
          <table:table-cell office:value-type="float" office:value="0.402703911066055" calcext:value-type="float">
            <text:p>0.402703911066055</text:p>
          </table:table-cell>
          <table:table-cell office:value-type="float" office:value="1.21659255027771" calcext:value-type="float">
            <text:p>1.21659255027771</text:p>
          </table:table-cell>
          <table:table-cell office:value-type="float" office:value="-0.00337417563423514" calcext:value-type="float">
            <text:p>-0.00337417563423514</text:p>
          </table:table-cell>
          <table:table-cell office:value-type="float" office:value="0.0716244876384735" calcext:value-type="float">
            <text:p>0.07162448763847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QRT(([.J255]-[.F255])^2+([.K255]-[.G255])^2)" office:value-type="float" office:value="0.537711315817581" calcext:value-type="float">
            <text:p>0.537711315817581</text:p>
          </table:table-cell>
          <table:table-cell table:formula="of:=SQRT(([.R255]-[.N255])^2+([.S255]-[.O255])^2)" office:value-type="float" office:value="0.332441012817813" calcext:value-type="float">
            <text:p>0.332441012817813</text:p>
          </table:table-cell>
          <table:table-cell table:formula="of:=SQRT(([.R255]-[.F255])^2+([.S255]-[.G255])^2)" office:value-type="float" office:value="1.02437918435643" calcext:value-type="float">
            <text:p>1.02437918435643</text:p>
          </table:table-cell>
          <table:table-cell table:formula="of:=SQRT(([.N255]-[.J255])^2+([.O255]-[.K255])^2)" office:value-type="float" office:value="1.01043672486705" calcext:value-type="float">
            <text:p>1.01043672486705</text:p>
          </table:table-cell>
          <table:table-cell office:value-type="float" office:value="0.819502055644989" calcext:value-type="float">
            <text:p>0.819502055644989</text:p>
          </table:table-cell>
          <table:table-cell office:value-type="float" office:value="0.276872575283051" calcext:value-type="float">
            <text:p>0.276872575283051</text:p>
          </table:table-cell>
          <table:table-cell office:value-type="float" office:value="-0.811528325080872" calcext:value-type="float">
            <text:p>-0.811528325080872</text:p>
          </table:table-cell>
          <table:table-cell office:value-type="float" office:value="0.999359488487244" calcext:value-type="float">
            <text:p>0.999359488487244</text:p>
          </table:table-cell>
          <table:table-cell office:value-type="float" office:value="0.283116310834885" calcext:value-type="float">
            <text:p>0.283116310834885</text:p>
          </table:table-cell>
          <table:table-cell office:value-type="float" office:value="0.314605742692947" calcext:value-type="float">
            <text:p>0.314605742692947</text:p>
          </table:table-cell>
          <table:table-cell office:value-type="float" office:value="-0.748288869857788" calcext:value-type="float">
            <text:p>-0.748288869857788</text:p>
          </table:table-cell>
          <table:table-cell office:value-type="float" office:value="0.999545395374298" calcext:value-type="float">
            <text:p>0.999545395374298</text:p>
          </table:table-cell>
          <table:table-cell office:value-type="float" office:value="0.736399173736572" calcext:value-type="float">
            <text:p>0.736399173736572</text:p>
          </table:table-cell>
          <table:table-cell office:value-type="float" office:value="1.21766555309296" calcext:value-type="float">
            <text:p>1.21766555309296</text:p>
          </table:table-cell>
          <table:table-cell office:value-type="float" office:value="0.0126725910231471" calcext:value-type="float">
            <text:p>0.0126725910231471</text:p>
          </table:table-cell>
          <table:table-cell office:value-type="float" office:value="0.0704876556992531" calcext:value-type="float">
            <text:p>0.0704876556992531</text:p>
          </table:table-cell>
          <table:table-cell office:value-type="float" office:value="0.403988212347031" calcext:value-type="float">
            <text:p>0.403988212347031</text:p>
          </table:table-cell>
          <table:table-cell office:value-type="float" office:value="1.21319568157196" calcext:value-type="float">
            <text:p>1.21319568157196</text:p>
          </table:table-cell>
          <table:table-cell office:value-type="float" office:value="-0.00338650122284889" calcext:value-type="float">
            <text:p>-0.00338650122284889</text:p>
          </table:table-cell>
          <table:table-cell office:value-type="float" office:value="0.0725600868463516" calcext:value-type="float">
            <text:p>0.07256008684635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QRT(([.J256]-[.F256])^2+([.K256]-[.G256])^2)" office:value-type="float" office:value="0.544357967758513" calcext:value-type="float">
            <text:p>0.544357967758513</text:p>
          </table:table-cell>
          <table:table-cell table:formula="of:=SQRT(([.R256]-[.N256])^2+([.S256]-[.O256])^2)" office:value-type="float" office:value="0.333164614867626" calcext:value-type="float">
            <text:p>0.333164614867626</text:p>
          </table:table-cell>
          <table:table-cell table:formula="of:=SQRT(([.R256]-[.F256])^2+([.S256]-[.G256])^2)" office:value-type="float" office:value="1.03637512229408" calcext:value-type="float">
            <text:p>1.03637512229408</text:p>
          </table:table-cell>
          <table:table-cell table:formula="of:=SQRT(([.N256]-[.J256])^2+([.O256]-[.K256])^2)" office:value-type="float" office:value="1.0201289452604" calcext:value-type="float">
            <text:p>1.0201289452604</text:p>
          </table:table-cell>
          <table:table-cell office:value-type="float" office:value="0.821585357189179" calcext:value-type="float">
            <text:p>0.821585357189179</text:p>
          </table:table-cell>
          <table:table-cell office:value-type="float" office:value="0.281275004148483" calcext:value-type="float">
            <text:p>0.281275004148483</text:p>
          </table:table-cell>
          <table:table-cell office:value-type="float" office:value="-0.927521526813507" calcext:value-type="float">
            <text:p>-0.927521526813507</text:p>
          </table:table-cell>
          <table:table-cell office:value-type="float" office:value="0.99938428401947" calcext:value-type="float">
            <text:p>0.99938428401947</text:p>
          </table:table-cell>
          <table:table-cell office:value-type="float" office:value="0.278721630573273" calcext:value-type="float">
            <text:p>0.278721630573273</text:p>
          </table:table-cell>
          <table:table-cell office:value-type="float" office:value="0.321580976247788" calcext:value-type="float">
            <text:p>0.321580976247788</text:p>
          </table:table-cell>
          <table:table-cell office:value-type="float" office:value="-0.82333505153656" calcext:value-type="float">
            <text:p>-0.82333505153656</text:p>
          </table:table-cell>
          <table:table-cell office:value-type="float" office:value="0.999555110931397" calcext:value-type="float">
            <text:p>0.999555110931397</text:p>
          </table:table-cell>
          <table:table-cell office:value-type="float" office:value="0.736015439033508" calcext:value-type="float">
            <text:p>0.736015439033508</text:p>
          </table:table-cell>
          <table:table-cell office:value-type="float" office:value="1.23347210884094" calcext:value-type="float">
            <text:p>1.23347210884094</text:p>
          </table:table-cell>
          <table:table-cell office:value-type="float" office:value="0.00309232319705188" calcext:value-type="float">
            <text:p>0.00309232319705188</text:p>
          </table:table-cell>
          <table:table-cell office:value-type="float" office:value="0.0710809454321861" calcext:value-type="float">
            <text:p>0.0710809454321861</text:p>
          </table:table-cell>
          <table:table-cell office:value-type="float" office:value="0.402876913547516" calcext:value-type="float">
            <text:p>0.402876913547516</text:p>
          </table:table-cell>
          <table:table-cell office:value-type="float" office:value="1.2293027639389" calcext:value-type="float">
            <text:p>1.2293027639389</text:p>
          </table:table-cell>
          <table:table-cell office:value-type="float" office:value="0.00600074883550406" calcext:value-type="float">
            <text:p>0.00600074883550406</text:p>
          </table:table-cell>
          <table:table-cell office:value-type="float" office:value="0.0728774070739746" calcext:value-type="float">
            <text:p>0.07287740707397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QRT(([.J257]-[.F257])^2+([.K257]-[.G257])^2)" office:value-type="float" office:value="0.542523665531195" calcext:value-type="float">
            <text:p>0.542523665531195</text:p>
          </table:table-cell>
          <table:table-cell table:formula="of:=SQRT(([.R257]-[.N257])^2+([.S257]-[.O257])^2)" office:value-type="float" office:value="0.332377524964584" calcext:value-type="float">
            <text:p>0.332377524964584</text:p>
          </table:table-cell>
          <table:table-cell table:formula="of:=SQRT(([.R257]-[.F257])^2+([.S257]-[.G257])^2)" office:value-type="float" office:value="1.03931875610621" calcext:value-type="float">
            <text:p>1.03931875610621</text:p>
          </table:table-cell>
          <table:table-cell table:formula="of:=SQRT(([.N257]-[.J257])^2+([.O257]-[.K257])^2)" office:value-type="float" office:value="1.01826211844952" calcext:value-type="float">
            <text:p>1.01826211844952</text:p>
          </table:table-cell>
          <table:table-cell office:value-type="float" office:value="0.821532249450684" calcext:value-type="float">
            <text:p>0.821532249450684</text:p>
          </table:table-cell>
          <table:table-cell office:value-type="float" office:value="0.277746856212616" calcext:value-type="float">
            <text:p>0.277746856212616</text:p>
          </table:table-cell>
          <table:table-cell office:value-type="float" office:value="-0.82267427444458" calcext:value-type="float">
            <text:p>-0.82267427444458</text:p>
          </table:table-cell>
          <table:table-cell office:value-type="float" office:value="0.999416410923004" calcext:value-type="float">
            <text:p>0.999416410923004</text:p>
          </table:table-cell>
          <table:table-cell office:value-type="float" office:value="0.280796766281128" calcext:value-type="float">
            <text:p>0.280796766281128</text:p>
          </table:table-cell>
          <table:table-cell office:value-type="float" office:value="0.321758955717087" calcext:value-type="float">
            <text:p>0.321758955717087</text:p>
          </table:table-cell>
          <table:table-cell office:value-type="float" office:value="-0.702706933021545" calcext:value-type="float">
            <text:p>-0.702706933021545</text:p>
          </table:table-cell>
          <table:table-cell office:value-type="float" office:value="0.999567806720734" calcext:value-type="float">
            <text:p>0.999567806720734</text:p>
          </table:table-cell>
          <table:table-cell office:value-type="float" office:value="0.735251307487488" calcext:value-type="float">
            <text:p>0.735251307487488</text:p>
          </table:table-cell>
          <table:table-cell office:value-type="float" office:value="1.23298275470734" calcext:value-type="float">
            <text:p>1.23298275470734</text:p>
          </table:table-cell>
          <table:table-cell office:value-type="float" office:value="0.00143639638554305" calcext:value-type="float">
            <text:p>0.00143639638554305</text:p>
          </table:table-cell>
          <table:table-cell office:value-type="float" office:value="0.0707760751247406" calcext:value-type="float">
            <text:p>0.0707760751247406</text:p>
          </table:table-cell>
          <table:table-cell office:value-type="float" office:value="0.402897357940674" calcext:value-type="float">
            <text:p>0.402897357940674</text:p>
          </table:table-cell>
          <table:table-cell office:value-type="float" office:value="1.22902405261993" calcext:value-type="float">
            <text:p>1.22902405261993</text:p>
          </table:table-cell>
          <table:table-cell office:value-type="float" office:value="0.00776981329545379" calcext:value-type="float">
            <text:p>0.00776981329545379</text:p>
          </table:table-cell>
          <table:table-cell office:value-type="float" office:value="0.0720588713884354" calcext:value-type="float">
            <text:p>0.07205887138843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QRT(([.J258]-[.F258])^2+([.K258]-[.G258])^2)" office:value-type="float" office:value="0.540167855491486" calcext:value-type="float">
            <text:p>0.540167855491486</text:p>
          </table:table-cell>
          <table:table-cell table:formula="of:=SQRT(([.R258]-[.N258])^2+([.S258]-[.O258])^2)" office:value-type="float" office:value="0.332263083273523" calcext:value-type="float">
            <text:p>0.332263083273523</text:p>
          </table:table-cell>
          <table:table-cell table:formula="of:=SQRT(([.R258]-[.F258])^2+([.S258]-[.G258])^2)" office:value-type="float" office:value="1.04451688671552" calcext:value-type="float">
            <text:p>1.04451688671552</text:p>
          </table:table-cell>
          <table:table-cell table:formula="of:=SQRT(([.N258]-[.J258])^2+([.O258]-[.K258])^2)" office:value-type="float" office:value="1.01916893418202" calcext:value-type="float">
            <text:p>1.01916893418202</text:p>
          </table:table-cell>
          <table:table-cell office:value-type="float" office:value="0.820369422435761" calcext:value-type="float">
            <text:p>0.820369422435761</text:p>
          </table:table-cell>
          <table:table-cell office:value-type="float" office:value="0.271613150835037" calcext:value-type="float">
            <text:p>0.271613150835037</text:p>
          </table:table-cell>
          <table:table-cell office:value-type="float" office:value="-0.754551470279694" calcext:value-type="float">
            <text:p>-0.754551470279694</text:p>
          </table:table-cell>
          <table:table-cell office:value-type="float" office:value="0.999444365501404" calcext:value-type="float">
            <text:p>0.999444365501404</text:p>
          </table:table-cell>
          <table:table-cell office:value-type="float" office:value="0.282396078109741" calcext:value-type="float">
            <text:p>0.282396078109741</text:p>
          </table:table-cell>
          <table:table-cell office:value-type="float" office:value="0.320254623889923" calcext:value-type="float">
            <text:p>0.320254623889923</text:p>
          </table:table-cell>
          <table:table-cell office:value-type="float" office:value="-0.610392391681671" calcext:value-type="float">
            <text:p>-0.610392391681671</text:p>
          </table:table-cell>
          <table:table-cell office:value-type="float" office:value="0.999575018882752" calcext:value-type="float">
            <text:p>0.999575018882752</text:p>
          </table:table-cell>
          <table:table-cell office:value-type="float" office:value="0.735246777534485" calcext:value-type="float">
            <text:p>0.735246777534485</text:p>
          </table:table-cell>
          <table:table-cell office:value-type="float" office:value="1.2332888841629" calcext:value-type="float">
            <text:p>1.2332888841629</text:p>
          </table:table-cell>
          <table:table-cell office:value-type="float" office:value="-0.00124745746143162" calcext:value-type="float">
            <text:p>-0.00124745746143162</text:p>
          </table:table-cell>
          <table:table-cell office:value-type="float" office:value="0.0698088705539703" calcext:value-type="float">
            <text:p>0.0698088705539703</text:p>
          </table:table-cell>
          <table:table-cell office:value-type="float" office:value="0.403009802103043" calcext:value-type="float">
            <text:p>0.403009802103043</text:p>
          </table:table-cell>
          <table:table-cell office:value-type="float" office:value="1.229123711586" calcext:value-type="float">
            <text:p>1.229123711586</text:p>
          </table:table-cell>
          <table:table-cell office:value-type="float" office:value="0.0108585553243756" calcext:value-type="float">
            <text:p>0.0108585553243756</text:p>
          </table:table-cell>
          <table:table-cell office:value-type="float" office:value="0.0707266330718994" calcext:value-type="float">
            <text:p>0.07072663307189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QRT(([.J259]-[.F259])^2+([.K259]-[.G259])^2)" office:value-type="float" office:value="0.541312202239683" calcext:value-type="float">
            <text:p>0.541312202239683</text:p>
          </table:table-cell>
          <table:table-cell table:formula="of:=SQRT(([.R259]-[.N259])^2+([.S259]-[.O259])^2)" office:value-type="float" office:value="0.332240246244658" calcext:value-type="float">
            <text:p>0.332240246244658</text:p>
          </table:table-cell>
          <table:table-cell table:formula="of:=SQRT(([.R259]-[.F259])^2+([.S259]-[.G259])^2)" office:value-type="float" office:value="1.04379106027955" calcext:value-type="float">
            <text:p>1.04379106027955</text:p>
          </table:table-cell>
          <table:table-cell table:formula="of:=SQRT(([.N259]-[.J259])^2+([.O259]-[.K259])^2)" office:value-type="float" office:value="1.01670495376758" calcext:value-type="float">
            <text:p>1.01670495376758</text:p>
          </table:table-cell>
          <table:table-cell office:value-type="float" office:value="0.820040047168732" calcext:value-type="float">
            <text:p>0.820040047168732</text:p>
          </table:table-cell>
          <table:table-cell office:value-type="float" office:value="0.268397808074951" calcext:value-type="float">
            <text:p>0.268397808074951</text:p>
          </table:table-cell>
          <table:table-cell office:value-type="float" office:value="-0.748744606971741" calcext:value-type="float">
            <text:p>-0.748744606971741</text:p>
          </table:table-cell>
          <table:table-cell office:value-type="float" office:value="0.999473094940186" calcext:value-type="float">
            <text:p>0.999473094940186</text:p>
          </table:table-cell>
          <table:table-cell office:value-type="float" office:value="0.280992805957794" calcext:value-type="float">
            <text:p>0.280992805957794</text:p>
          </table:table-cell>
          <table:table-cell office:value-type="float" office:value="0.317864686250687" calcext:value-type="float">
            <text:p>0.317864686250687</text:p>
          </table:table-cell>
          <table:table-cell office:value-type="float" office:value="-0.65692675113678" calcext:value-type="float">
            <text:p>-0.65692675113678</text:p>
          </table:table-cell>
          <table:table-cell office:value-type="float" office:value="0.999590218067169" calcext:value-type="float">
            <text:p>0.999590218067169</text:p>
          </table:table-cell>
          <table:table-cell office:value-type="float" office:value="0.733205258846283" calcext:value-type="float">
            <text:p>0.733205258846283</text:p>
          </table:table-cell>
          <table:table-cell office:value-type="float" office:value="1.22846496105194" calcext:value-type="float">
            <text:p>1.22846496105194</text:p>
          </table:table-cell>
          <table:table-cell office:value-type="float" office:value="0.00578582566231489" calcext:value-type="float">
            <text:p>0.00578582566231489</text:p>
          </table:table-cell>
          <table:table-cell office:value-type="float" office:value="0.0703959912061691" calcext:value-type="float">
            <text:p>0.0703959912061691</text:p>
          </table:table-cell>
          <table:table-cell office:value-type="float" office:value="0.400990158319473" calcext:value-type="float">
            <text:p>0.400990158319473</text:p>
          </table:table-cell>
          <table:table-cell office:value-type="float" office:value="1.22437739372253" calcext:value-type="float">
            <text:p>1.22437739372253</text:p>
          </table:table-cell>
          <table:table-cell office:value-type="float" office:value="0.00371281872503459" calcext:value-type="float">
            <text:p>0.00371281872503459</text:p>
          </table:table-cell>
          <table:table-cell office:value-type="float" office:value="0.0708086267113686" calcext:value-type="float">
            <text:p>0.07080862671136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QRT(([.J260]-[.F260])^2+([.K260]-[.G260])^2)" office:value-type="float" office:value="0.540981042632483" calcext:value-type="float">
            <text:p>0.540981042632483</text:p>
          </table:table-cell>
          <table:table-cell table:formula="of:=SQRT(([.R260]-[.N260])^2+([.S260]-[.O260])^2)" office:value-type="float" office:value="0.332438545214242" calcext:value-type="float">
            <text:p>0.332438545214242</text:p>
          </table:table-cell>
          <table:table-cell table:formula="of:=SQRT(([.R260]-[.F260])^2+([.S260]-[.G260])^2)" office:value-type="float" office:value="1.03867950876224" calcext:value-type="float">
            <text:p>1.03867950876224</text:p>
          </table:table-cell>
          <table:table-cell table:formula="of:=SQRT(([.N260]-[.J260])^2+([.O260]-[.K260])^2)" office:value-type="float" office:value="1.01398598004045" calcext:value-type="float">
            <text:p>1.01398598004045</text:p>
          </table:table-cell>
          <table:table-cell office:value-type="float" office:value="0.820028305053711" calcext:value-type="float">
            <text:p>0.820028305053711</text:p>
          </table:table-cell>
          <table:table-cell office:value-type="float" office:value="0.266850411891937" calcext:value-type="float">
            <text:p>0.266850411891937</text:p>
          </table:table-cell>
          <table:table-cell office:value-type="float" office:value="-0.851712346076965" calcext:value-type="float">
            <text:p>-0.851712346076965</text:p>
          </table:table-cell>
          <table:table-cell office:value-type="float" office:value="0.999497771263123" calcext:value-type="float">
            <text:p>0.999497771263123</text:p>
          </table:table-cell>
          <table:table-cell office:value-type="float" office:value="0.281068414449692" calcext:value-type="float">
            <text:p>0.281068414449692</text:p>
          </table:table-cell>
          <table:table-cell office:value-type="float" office:value="0.31357005238533" calcext:value-type="float">
            <text:p>0.31357005238533</text:p>
          </table:table-cell>
          <table:table-cell office:value-type="float" office:value="-0.730146646499634" calcext:value-type="float">
            <text:p>-0.730146646499634</text:p>
          </table:table-cell>
          <table:table-cell office:value-type="float" office:value="0.999597609043121" calcext:value-type="float">
            <text:p>0.999597609043121</text:p>
          </table:table-cell>
          <table:table-cell office:value-type="float" office:value="0.732375025749207" calcext:value-type="float">
            <text:p>0.732375025749207</text:p>
          </table:table-cell>
          <table:table-cell office:value-type="float" office:value="1.22158432006836" calcext:value-type="float">
            <text:p>1.22158432006836</text:p>
          </table:table-cell>
          <table:table-cell office:value-type="float" office:value="0.00339585985057056" calcext:value-type="float">
            <text:p>0.00339585985057056</text:p>
          </table:table-cell>
          <table:table-cell office:value-type="float" office:value="0.0721840038895607" calcext:value-type="float">
            <text:p>0.0721840038895607</text:p>
          </table:table-cell>
          <table:table-cell office:value-type="float" office:value="0.399970889091492" calcext:value-type="float">
            <text:p>0.399970889091492</text:p>
          </table:table-cell>
          <table:table-cell office:value-type="float" office:value="1.216801404953" calcext:value-type="float">
            <text:p>1.216801404953</text:p>
          </table:table-cell>
          <table:table-cell office:value-type="float" office:value="0.00596267404034734" calcext:value-type="float">
            <text:p>0.00596267404034734</text:p>
          </table:table-cell>
          <table:table-cell office:value-type="float" office:value="0.0715703815221787" calcext:value-type="float">
            <text:p>0.071570381522178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QRT(([.J261]-[.F261])^2+([.K261]-[.G261])^2)" office:value-type="float" office:value="0.54456888342743" calcext:value-type="float">
            <text:p>0.54456888342743</text:p>
          </table:table-cell>
          <table:table-cell table:formula="of:=SQRT(([.R261]-[.N261])^2+([.S261]-[.O261])^2)" office:value-type="float" office:value="0.333019184381592" calcext:value-type="float">
            <text:p>0.333019184381592</text:p>
          </table:table-cell>
          <table:table-cell table:formula="of:=SQRT(([.R261]-[.F261])^2+([.S261]-[.G261])^2)" office:value-type="float" office:value="1.02942290341162" calcext:value-type="float">
            <text:p>1.02942290341162</text:p>
          </table:table-cell>
          <table:table-cell table:formula="of:=SQRT(([.N261]-[.J261])^2+([.O261]-[.K261])^2)" office:value-type="float" office:value="1.01019510391809" calcext:value-type="float">
            <text:p>1.01019510391809</text:p>
          </table:table-cell>
          <table:table-cell office:value-type="float" office:value="0.823732733726502" calcext:value-type="float">
            <text:p>0.823732733726502</text:p>
          </table:table-cell>
          <table:table-cell office:value-type="float" office:value="0.272091954946518" calcext:value-type="float">
            <text:p>0.272091954946518</text:p>
          </table:table-cell>
          <table:table-cell office:value-type="float" office:value="-0.851801037788391" calcext:value-type="float">
            <text:p>-0.851801037788391</text:p>
          </table:table-cell>
          <table:table-cell office:value-type="float" office:value="0.999501824378967" calcext:value-type="float">
            <text:p>0.999501824378967</text:p>
          </table:table-cell>
          <table:table-cell office:value-type="float" office:value="0.280821621417999" calcext:value-type="float">
            <text:p>0.280821621417999</text:p>
          </table:table-cell>
          <table:table-cell office:value-type="float" office:value="0.314551264047623" calcext:value-type="float">
            <text:p>0.314551264047623</text:p>
          </table:table-cell>
          <table:table-cell office:value-type="float" office:value="-0.78161233663559" calcext:value-type="float">
            <text:p>-0.78161233663559</text:p>
          </table:table-cell>
          <table:table-cell office:value-type="float" office:value="0.99959123134613" calcext:value-type="float">
            <text:p>0.99959123134613</text:p>
          </table:table-cell>
          <table:table-cell office:value-type="float" office:value="0.732417702674866" calcext:value-type="float">
            <text:p>0.732417702674866</text:p>
          </table:table-cell>
          <table:table-cell office:value-type="float" office:value="1.21818566322327" calcext:value-type="float">
            <text:p>1.21818566322327</text:p>
          </table:table-cell>
          <table:table-cell office:value-type="float" office:value="0.00906889513134956" calcext:value-type="float">
            <text:p>0.00906889513134956</text:p>
          </table:table-cell>
          <table:table-cell office:value-type="float" office:value="0.0736659169197083" calcext:value-type="float">
            <text:p>0.0736659169197083</text:p>
          </table:table-cell>
          <table:table-cell office:value-type="float" office:value="0.399498283863068" calcext:value-type="float">
            <text:p>0.399498283863068</text:p>
          </table:table-cell>
          <table:table-cell office:value-type="float" office:value="1.21003472805023" calcext:value-type="float">
            <text:p>1.21003472805023</text:p>
          </table:table-cell>
          <table:table-cell office:value-type="float" office:value="0.000210050347959623" calcext:value-type="float">
            <text:p>0.000210050347959623</text:p>
          </table:table-cell>
          <table:table-cell office:value-type="float" office:value="0.0724049508571625" calcext:value-type="float">
            <text:p>0.07240495085716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SQRT(([.J262]-[.F262])^2+([.K262]-[.G262])^2)" office:value-type="float" office:value="0.544861528031682" calcext:value-type="float">
            <text:p>0.544861528031682</text:p>
          </table:table-cell>
          <table:table-cell table:formula="of:=SQRT(([.R262]-[.N262])^2+([.S262]-[.O262])^2)" office:value-type="float" office:value="0.33294189443397" calcext:value-type="float">
            <text:p>0.33294189443397</text:p>
          </table:table-cell>
          <table:table-cell table:formula="of:=SQRT(([.R262]-[.F262])^2+([.S262]-[.G262])^2)" office:value-type="float" office:value="1.02989035662139" calcext:value-type="float">
            <text:p>1.02989035662139</text:p>
          </table:table-cell>
          <table:table-cell table:formula="of:=SQRT(([.N262]-[.J262])^2+([.O262]-[.K262])^2)" office:value-type="float" office:value="1.01615167790706" calcext:value-type="float">
            <text:p>1.01615167790706</text:p>
          </table:table-cell>
          <table:table-cell office:value-type="float" office:value="0.824701309204102" calcext:value-type="float">
            <text:p>0.824701309204102</text:p>
          </table:table-cell>
          <table:table-cell office:value-type="float" office:value="0.272260934114456" calcext:value-type="float">
            <text:p>0.272260934114456</text:p>
          </table:table-cell>
          <table:table-cell office:value-type="float" office:value="-0.932776629924774" calcext:value-type="float">
            <text:p>-0.932776629924774</text:p>
          </table:table-cell>
          <table:table-cell office:value-type="float" office:value="0.999510049819946" calcext:value-type="float">
            <text:p>0.999510049819946</text:p>
          </table:table-cell>
          <table:table-cell office:value-type="float" office:value="0.281135141849518" calcext:value-type="float">
            <text:p>0.281135141849518</text:p>
          </table:table-cell>
          <table:table-cell office:value-type="float" office:value="0.309809654951096" calcext:value-type="float">
            <text:p>0.309809654951096</text:p>
          </table:table-cell>
          <table:table-cell office:value-type="float" office:value="-0.811333954334259" calcext:value-type="float">
            <text:p>-0.811333954334259</text:p>
          </table:table-cell>
          <table:table-cell office:value-type="float" office:value="0.999587953090668" calcext:value-type="float">
            <text:p>0.999587953090668</text:p>
          </table:table-cell>
          <table:table-cell office:value-type="float" office:value="0.732456564903259" calcext:value-type="float">
            <text:p>0.732456564903259</text:p>
          </table:table-cell>
          <table:table-cell office:value-type="float" office:value="1.22023439407349" calcext:value-type="float">
            <text:p>1.22023439407349</text:p>
          </table:table-cell>
          <table:table-cell office:value-type="float" office:value="0.00356389209628105" calcext:value-type="float">
            <text:p>0.00356389209628105</text:p>
          </table:table-cell>
          <table:table-cell office:value-type="float" office:value="0.0759578123688698" calcext:value-type="float">
            <text:p>0.0759578123688698</text:p>
          </table:table-cell>
          <table:table-cell office:value-type="float" office:value="0.399661362171173" calcext:value-type="float">
            <text:p>0.399661362171173</text:p>
          </table:table-cell>
          <table:table-cell office:value-type="float" office:value="1.21035218238831" calcext:value-type="float">
            <text:p>1.21035218238831</text:p>
          </table:table-cell>
          <table:table-cell office:value-type="float" office:value="0.00540286162868142" calcext:value-type="float">
            <text:p>0.00540286162868142</text:p>
          </table:table-cell>
          <table:table-cell office:value-type="float" office:value="0.0742514878511429" calcext:value-type="float">
            <text:p>0.07425148785114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SQRT(([.J263]-[.F263])^2+([.K263]-[.G263])^2)" office:value-type="float" office:value="0.545541236108399" calcext:value-type="float">
            <text:p>0.545541236108399</text:p>
          </table:table-cell>
          <table:table-cell table:formula="of:=SQRT(([.R263]-[.N263])^2+([.S263]-[.O263])^2)" office:value-type="float" office:value="0.332880105872801" calcext:value-type="float">
            <text:p>0.332880105872801</text:p>
          </table:table-cell>
          <table:table-cell table:formula="of:=SQRT(([.R263]-[.F263])^2+([.S263]-[.G263])^2)" office:value-type="float" office:value="1.02960546297071" calcext:value-type="float">
            <text:p>1.02960546297071</text:p>
          </table:table-cell>
          <table:table-cell table:formula="of:=SQRT(([.N263]-[.J263])^2+([.O263]-[.K263])^2)" office:value-type="float" office:value="1.00978142626777" calcext:value-type="float">
            <text:p>1.00978142626777</text:p>
          </table:table-cell>
          <table:table-cell office:value-type="float" office:value="0.824666976928711" calcext:value-type="float">
            <text:p>0.824666976928711</text:p>
          </table:table-cell>
          <table:table-cell office:value-type="float" office:value="0.269795477390289" calcext:value-type="float">
            <text:p>0.269795477390289</text:p>
          </table:table-cell>
          <table:table-cell office:value-type="float" office:value="-0.998560070991516" calcext:value-type="float">
            <text:p>-0.998560070991516</text:p>
          </table:table-cell>
          <table:table-cell office:value-type="float" office:value="0.999514639377594" calcext:value-type="float">
            <text:p>0.999514639377594</text:p>
          </table:table-cell>
          <table:table-cell office:value-type="float" office:value="0.280614405870438" calcext:value-type="float">
            <text:p>0.280614405870438</text:p>
          </table:table-cell>
          <table:table-cell office:value-type="float" office:value="0.310070037841797" calcext:value-type="float">
            <text:p>0.310070037841797</text:p>
          </table:table-cell>
          <table:table-cell office:value-type="float" office:value="-0.907120585441589" calcext:value-type="float">
            <text:p>-0.907120585441589</text:p>
          </table:table-cell>
          <table:table-cell office:value-type="float" office:value="0.999575674533844" calcext:value-type="float">
            <text:p>0.999575674533844</text:p>
          </table:table-cell>
          <table:table-cell office:value-type="float" office:value="0.732503890991211" calcext:value-type="float">
            <text:p>0.732503890991211</text:p>
          </table:table-cell>
          <table:table-cell office:value-type="float" office:value="1.21309518814087" calcext:value-type="float">
            <text:p>1.21309518814087</text:p>
          </table:table-cell>
          <table:table-cell office:value-type="float" office:value="0.00348118366673589" calcext:value-type="float">
            <text:p>0.00348118366673589</text:p>
          </table:table-cell>
          <table:table-cell office:value-type="float" office:value="0.0780996978282929" calcext:value-type="float">
            <text:p>0.0780996978282929</text:p>
          </table:table-cell>
          <table:table-cell office:value-type="float" office:value="0.399669259786606" calcext:value-type="float">
            <text:p>0.399669259786606</text:p>
          </table:table-cell>
          <table:table-cell office:value-type="float" office:value="1.20759308338165" calcext:value-type="float">
            <text:p>1.20759308338165</text:p>
          </table:table-cell>
          <table:table-cell office:value-type="float" office:value="0.00553776882588863" calcext:value-type="float">
            <text:p>0.00553776882588863</text:p>
          </table:table-cell>
          <table:table-cell office:value-type="float" office:value="0.0751681178808212" calcext:value-type="float">
            <text:p>0.07516811788082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SQRT(([.J264]-[.F264])^2+([.K264]-[.G264])^2)" office:value-type="float" office:value="0.546425621999184" calcext:value-type="float">
            <text:p>0.546425621999184</text:p>
          </table:table-cell>
          <table:table-cell table:formula="of:=SQRT(([.R264]-[.N264])^2+([.S264]-[.O264])^2)" office:value-type="float" office:value="0.329412969953578" calcext:value-type="float">
            <text:p>0.329412969953578</text:p>
          </table:table-cell>
          <table:table-cell table:formula="of:=SQRT(([.R264]-[.F264])^2+([.S264]-[.G264])^2)" office:value-type="float" office:value="1.02318591685279" calcext:value-type="float">
            <text:p>1.02318591685279</text:p>
          </table:table-cell>
          <table:table-cell table:formula="of:=SQRT(([.N264]-[.J264])^2+([.O264]-[.K264])^2)" office:value-type="float" office:value="1.00788485235213" calcext:value-type="float">
            <text:p>1.00788485235213</text:p>
          </table:table-cell>
          <table:table-cell office:value-type="float" office:value="0.825977981090546" calcext:value-type="float">
            <text:p>0.825977981090546</text:p>
          </table:table-cell>
          <table:table-cell office:value-type="float" office:value="0.270670205354691" calcext:value-type="float">
            <text:p>0.270670205354691</text:p>
          </table:table-cell>
          <table:table-cell office:value-type="float" office:value="-0.962806105613709" calcext:value-type="float">
            <text:p>-0.962806105613709</text:p>
          </table:table-cell>
          <table:table-cell office:value-type="float" office:value="0.999523997306824" calcext:value-type="float">
            <text:p>0.999523997306824</text:p>
          </table:table-cell>
          <table:table-cell office:value-type="float" office:value="0.280977159738541" calcext:value-type="float">
            <text:p>0.280977159738541</text:p>
          </table:table-cell>
          <table:table-cell office:value-type="float" office:value="0.310104519128799" calcext:value-type="float">
            <text:p>0.310104519128799</text:p>
          </table:table-cell>
          <table:table-cell office:value-type="float" office:value="-0.872353196144104" calcext:value-type="float">
            <text:p>-0.872353196144104</text:p>
          </table:table-cell>
          <table:table-cell office:value-type="float" office:value="0.999581396579742" calcext:value-type="float">
            <text:p>0.999581396579742</text:p>
          </table:table-cell>
          <table:table-cell office:value-type="float" office:value="0.73333752155304" calcext:value-type="float">
            <text:p>0.73333752155304</text:p>
          </table:table-cell>
          <table:table-cell office:value-type="float" office:value="1.2107720375061" calcext:value-type="float">
            <text:p>1.2107720375061</text:p>
          </table:table-cell>
          <table:table-cell office:value-type="float" office:value="0.00326025253161788" calcext:value-type="float">
            <text:p>0.00326025253161788</text:p>
          </table:table-cell>
          <table:table-cell office:value-type="float" office:value="0.0781383216381073" calcext:value-type="float">
            <text:p>0.0781383216381073</text:p>
          </table:table-cell>
          <table:table-cell office:value-type="float" office:value="0.404021084308624" calcext:value-type="float">
            <text:p>0.404021084308624</text:p>
          </table:table-cell>
          <table:table-cell office:value-type="float" office:value="1.20279777050018" calcext:value-type="float">
            <text:p>1.20279777050018</text:p>
          </table:table-cell>
          <table:table-cell office:value-type="float" office:value="0.00573055213317275" calcext:value-type="float">
            <text:p>0.00573055213317275</text:p>
          </table:table-cell>
          <table:table-cell office:value-type="float" office:value="0.0754225477576256" calcext:value-type="float">
            <text:p>0.07542254775762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SQRT(([.J265]-[.F265])^2+([.K265]-[.G265])^2)" office:value-type="float" office:value="0.549312402994176" calcext:value-type="float">
            <text:p>0.549312402994176</text:p>
          </table:table-cell>
          <table:table-cell table:formula="of:=SQRT(([.R265]-[.N265])^2+([.S265]-[.O265])^2)" office:value-type="float" office:value="0.331455632124007" calcext:value-type="float">
            <text:p>0.331455632124007</text:p>
          </table:table-cell>
          <table:table-cell table:formula="of:=SQRT(([.R265]-[.F265])^2+([.S265]-[.G265])^2)" office:value-type="float" office:value="1.02330247259969" calcext:value-type="float">
            <text:p>1.02330247259969</text:p>
          </table:table-cell>
          <table:table-cell table:formula="of:=SQRT(([.N265]-[.J265])^2+([.O265]-[.K265])^2)" office:value-type="float" office:value="1.00794995930257" calcext:value-type="float">
            <text:p>1.00794995930257</text:p>
          </table:table-cell>
          <table:table-cell office:value-type="float" office:value="0.826550185680389" calcext:value-type="float">
            <text:p>0.826550185680389</text:p>
          </table:table-cell>
          <table:table-cell office:value-type="float" office:value="0.273248791694641" calcext:value-type="float">
            <text:p>0.273248791694641</text:p>
          </table:table-cell>
          <table:table-cell office:value-type="float" office:value="-0.980788886547089" calcext:value-type="float">
            <text:p>-0.980788886547089</text:p>
          </table:table-cell>
          <table:table-cell office:value-type="float" office:value="0.999532759189606" calcext:value-type="float">
            <text:p>0.999532759189606</text:p>
          </table:table-cell>
          <table:table-cell office:value-type="float" office:value="0.278477013111115" calcext:value-type="float">
            <text:p>0.278477013111115</text:p>
          </table:table-cell>
          <table:table-cell office:value-type="float" office:value="0.310125797986984" calcext:value-type="float">
            <text:p>0.310125797986984</text:p>
          </table:table-cell>
          <table:table-cell office:value-type="float" office:value="-0.922520339488983" calcext:value-type="float">
            <text:p>-0.922520339488983</text:p>
          </table:table-cell>
          <table:table-cell office:value-type="float" office:value="0.999582171440125" calcext:value-type="float">
            <text:p>0.999582171440125</text:p>
          </table:table-cell>
          <table:table-cell office:value-type="float" office:value="0.730176091194153" calcext:value-type="float">
            <text:p>0.730176091194153</text:p>
          </table:table-cell>
          <table:table-cell office:value-type="float" office:value="1.21119797229767" calcext:value-type="float">
            <text:p>1.21119797229767</text:p>
          </table:table-cell>
          <table:table-cell office:value-type="float" office:value="0.00621014600619674" calcext:value-type="float">
            <text:p>0.00621014600619674</text:p>
          </table:table-cell>
          <table:table-cell office:value-type="float" office:value="0.0788994804024696" calcext:value-type="float">
            <text:p>0.0788994804024696</text:p>
          </table:table-cell>
          <table:table-cell office:value-type="float" office:value="0.39882504940033" calcext:value-type="float">
            <text:p>0.39882504940033</text:p>
          </table:table-cell>
          <table:table-cell office:value-type="float" office:value="1.20287191867828" calcext:value-type="float">
            <text:p>1.20287191867828</text:p>
          </table:table-cell>
          <table:table-cell office:value-type="float" office:value="0.00293795624747872" calcext:value-type="float">
            <text:p>0.00293795624747872</text:p>
          </table:table-cell>
          <table:table-cell office:value-type="float" office:value="0.0757314413785934" calcext:value-type="float">
            <text:p>0.07573144137859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QRT(([.J266]-[.F266])^2+([.K266]-[.G266])^2)" office:value-type="float" office:value="0.548531246280125" calcext:value-type="float">
            <text:p>0.548531246280125</text:p>
          </table:table-cell>
          <table:table-cell table:formula="of:=SQRT(([.R266]-[.N266])^2+([.S266]-[.O266])^2)" office:value-type="float" office:value="0.331996819574822" calcext:value-type="float">
            <text:p>0.331996819574822</text:p>
          </table:table-cell>
          <table:table-cell table:formula="of:=SQRT(([.R266]-[.F266])^2+([.S266]-[.G266])^2)" office:value-type="float" office:value="1.02247353431546" calcext:value-type="float">
            <text:p>1.02247353431546</text:p>
          </table:table-cell>
          <table:table-cell table:formula="of:=SQRT(([.N266]-[.J266])^2+([.O266]-[.K266])^2)" office:value-type="float" office:value="1.0038036915834" calcext:value-type="float">
            <text:p>1.0038036915834</text:p>
          </table:table-cell>
          <table:table-cell office:value-type="float" office:value="0.826802253723145" calcext:value-type="float">
            <text:p>0.826802253723145</text:p>
          </table:table-cell>
          <table:table-cell office:value-type="float" office:value="0.27204954624176" calcext:value-type="float">
            <text:p>0.27204954624176</text:p>
          </table:table-cell>
          <table:table-cell office:value-type="float" office:value="-0.968603491783142" calcext:value-type="float">
            <text:p>-0.968603491783142</text:p>
          </table:table-cell>
          <table:table-cell office:value-type="float" office:value="0.999548673629761" calcext:value-type="float">
            <text:p>0.999548673629761</text:p>
          </table:table-cell>
          <table:table-cell office:value-type="float" office:value="0.27965721487999" calcext:value-type="float">
            <text:p>0.27965721487999</text:p>
          </table:table-cell>
          <table:table-cell office:value-type="float" office:value="0.311021775007248" calcext:value-type="float">
            <text:p>0.311021775007248</text:p>
          </table:table-cell>
          <table:table-cell office:value-type="float" office:value="-0.895653426647186" calcext:value-type="float">
            <text:p>-0.895653426647186</text:p>
          </table:table-cell>
          <table:table-cell office:value-type="float" office:value="0.999577581882477" calcext:value-type="float">
            <text:p>0.999577581882477</text:p>
          </table:table-cell>
          <table:table-cell office:value-type="float" office:value="0.730754613876343" calcext:value-type="float">
            <text:p>0.730754613876343</text:p>
          </table:table-cell>
          <table:table-cell office:value-type="float" office:value="1.20775640010834" calcext:value-type="float">
            <text:p>1.20775640010834</text:p>
          </table:table-cell>
          <table:table-cell office:value-type="float" office:value="0.00386328250169754" calcext:value-type="float">
            <text:p>0.00386328250169754</text:p>
          </table:table-cell>
          <table:table-cell office:value-type="float" office:value="0.0802749916911125" calcext:value-type="float">
            <text:p>0.0802749916911125</text:p>
          </table:table-cell>
          <table:table-cell office:value-type="float" office:value="0.398833900690079" calcext:value-type="float">
            <text:p>0.398833900690079</text:p>
          </table:table-cell>
          <table:table-cell office:value-type="float" office:value="1.20064806938171" calcext:value-type="float">
            <text:p>1.20064806938171</text:p>
          </table:table-cell>
          <table:table-cell office:value-type="float" office:value="0.00542312767356634" calcext:value-type="float">
            <text:p>0.00542312767356634</text:p>
          </table:table-cell>
          <table:table-cell office:value-type="float" office:value="0.0757618770003319" calcext:value-type="float">
            <text:p>0.07576187700033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QRT(([.J267]-[.F267])^2+([.K267]-[.G267])^2)" office:value-type="float" office:value="0.54745634552288" calcext:value-type="float">
            <text:p>0.54745634552288</text:p>
          </table:table-cell>
          <table:table-cell table:formula="of:=SQRT(([.R267]-[.N267])^2+([.S267]-[.O267])^2)" office:value-type="float" office:value="0.331519796949585" calcext:value-type="float">
            <text:p>0.331519796949585</text:p>
          </table:table-cell>
          <table:table-cell table:formula="of:=SQRT(([.R267]-[.F267])^2+([.S267]-[.G267])^2)" office:value-type="float" office:value="1.02278759797133" calcext:value-type="float">
            <text:p>1.02278759797133</text:p>
          </table:table-cell>
          <table:table-cell table:formula="of:=SQRT(([.N267]-[.J267])^2+([.O267]-[.K267])^2)" office:value-type="float" office:value="1.00292570303322" calcext:value-type="float">
            <text:p>1.00292570303322</text:p>
          </table:table-cell>
          <table:table-cell office:value-type="float" office:value="0.826835334300995" calcext:value-type="float">
            <text:p>0.826835334300995</text:p>
          </table:table-cell>
          <table:table-cell office:value-type="float" office:value="0.272128432989121" calcext:value-type="float">
            <text:p>0.272128432989121</text:p>
          </table:table-cell>
          <table:table-cell office:value-type="float" office:value="-0.832805454730988" calcext:value-type="float">
            <text:p>-0.832805454730988</text:p>
          </table:table-cell>
          <table:table-cell office:value-type="float" office:value="0.999566376209259" calcext:value-type="float">
            <text:p>0.999566376209259</text:p>
          </table:table-cell>
          <table:table-cell office:value-type="float" office:value="0.280886292457581" calcext:value-type="float">
            <text:p>0.280886292457581</text:p>
          </table:table-cell>
          <table:table-cell office:value-type="float" office:value="0.312725156545639" calcext:value-type="float">
            <text:p>0.312725156545639</text:p>
          </table:table-cell>
          <table:table-cell office:value-type="float" office:value="-0.675931692123413" calcext:value-type="float">
            <text:p>-0.675931692123413</text:p>
          </table:table-cell>
          <table:table-cell office:value-type="float" office:value="0.999589920043945" calcext:value-type="float">
            <text:p>0.999589920043945</text:p>
          </table:table-cell>
          <table:table-cell office:value-type="float" office:value="0.730214059352875" calcext:value-type="float">
            <text:p>0.730214059352875</text:p>
          </table:table-cell>
          <table:table-cell office:value-type="float" office:value="1.20936584472656" calcext:value-type="float">
            <text:p>1.20936584472656</text:p>
          </table:table-cell>
          <table:table-cell office:value-type="float" office:value="-0.00409282464534044" calcext:value-type="float">
            <text:p>-0.00409282464534044</text:p>
          </table:table-cell>
          <table:table-cell office:value-type="float" office:value="0.0829878449440002" calcext:value-type="float">
            <text:p>0.0829878449440002</text:p>
          </table:table-cell>
          <table:table-cell office:value-type="float" office:value="0.398798793554306" calcext:value-type="float">
            <text:p>0.398798793554306</text:p>
          </table:table-cell>
          <table:table-cell office:value-type="float" office:value="1.20104134082794" calcext:value-type="float">
            <text:p>1.20104134082794</text:p>
          </table:table-cell>
          <table:table-cell office:value-type="float" office:value="0.0128139164298773" calcext:value-type="float">
            <text:p>0.0128139164298773</text:p>
          </table:table-cell>
          <table:table-cell office:value-type="float" office:value="0.0780527666211128" calcext:value-type="float">
            <text:p>0.07805276662111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SQRT(([.J268]-[.F268])^2+([.K268]-[.G268])^2)" office:value-type="float" office:value="0.547796159251109" calcext:value-type="float">
            <text:p>0.547796159251109</text:p>
          </table:table-cell>
          <table:table-cell table:formula="of:=SQRT(([.R268]-[.N268])^2+([.S268]-[.O268])^2)" office:value-type="float" office:value="0.331487508792583" calcext:value-type="float">
            <text:p>0.331487508792583</text:p>
          </table:table-cell>
          <table:table-cell table:formula="of:=SQRT(([.R268]-[.F268])^2+([.S268]-[.G268])^2)" office:value-type="float" office:value="1.02322048971945" calcext:value-type="float">
            <text:p>1.02322048971945</text:p>
          </table:table-cell>
          <table:table-cell table:formula="of:=SQRT(([.N268]-[.J268])^2+([.O268]-[.K268])^2)" office:value-type="float" office:value="1.00296952888808" calcext:value-type="float">
            <text:p>1.00296952888808</text:p>
          </table:table-cell>
          <table:table-cell office:value-type="float" office:value="0.827169418334961" calcext:value-type="float">
            <text:p>0.827169418334961</text:p>
          </table:table-cell>
          <table:table-cell office:value-type="float" office:value="0.27185195684433" calcext:value-type="float">
            <text:p>0.27185195684433</text:p>
          </table:table-cell>
          <table:table-cell office:value-type="float" office:value="-0.955143451690674" calcext:value-type="float">
            <text:p>-0.955143451690674</text:p>
          </table:table-cell>
          <table:table-cell office:value-type="float" office:value="0.999564051628113" calcext:value-type="float">
            <text:p>0.999564051628113</text:p>
          </table:table-cell>
          <table:table-cell office:value-type="float" office:value="0.280899077653885" calcext:value-type="float">
            <text:p>0.280899077653885</text:p>
          </table:table-cell>
          <table:table-cell office:value-type="float" office:value="0.312709599733353" calcext:value-type="float">
            <text:p>0.312709599733353</text:p>
          </table:table-cell>
          <table:table-cell office:value-type="float" office:value="-0.837727248668671" calcext:value-type="float">
            <text:p>-0.837727248668671</text:p>
          </table:table-cell>
          <table:table-cell office:value-type="float" office:value="0.999578714370728" calcext:value-type="float">
            <text:p>0.999578714370728</text:p>
          </table:table-cell>
          <table:table-cell office:value-type="float" office:value="0.730209171772003" calcext:value-type="float">
            <text:p>0.730209171772003</text:p>
          </table:table-cell>
          <table:table-cell office:value-type="float" office:value="1.20940816402435" calcext:value-type="float">
            <text:p>1.20940816402435</text:p>
          </table:table-cell>
          <table:table-cell office:value-type="float" office:value="-0.00621098326519132" calcext:value-type="float">
            <text:p>-0.00621098326519132</text:p>
          </table:table-cell>
          <table:table-cell office:value-type="float" office:value="0.0830349400639534" calcext:value-type="float">
            <text:p>0.0830349400639534</text:p>
          </table:table-cell>
          <table:table-cell office:value-type="float" office:value="0.398825794458389" calcext:value-type="float">
            <text:p>0.398825794458389</text:p>
          </table:table-cell>
          <table:table-cell office:value-type="float" office:value="1.2010999917984" calcext:value-type="float">
            <text:p>1.2010999917984</text:p>
          </table:table-cell>
          <table:table-cell office:value-type="float" office:value="0.0151528837159276" calcext:value-type="float">
            <text:p>0.0151528837159276</text:p>
          </table:table-cell>
          <table:table-cell office:value-type="float" office:value="0.0777752920985222" calcext:value-type="float">
            <text:p>0.07777529209852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SQRT(([.J269]-[.F269])^2+([.K269]-[.G269])^2)" office:value-type="float" office:value="0.549951863513712" calcext:value-type="float">
            <text:p>0.549951863513712</text:p>
          </table:table-cell>
          <table:table-cell table:formula="of:=SQRT(([.R269]-[.N269])^2+([.S269]-[.O269])^2)" office:value-type="float" office:value="0.330120175304282" calcext:value-type="float">
            <text:p>0.330120175304282</text:p>
          </table:table-cell>
          <table:table-cell table:formula="of:=SQRT(([.R269]-[.F269])^2+([.S269]-[.G269])^2)" office:value-type="float" office:value="1.02204844179937" calcext:value-type="float">
            <text:p>1.02204844179937</text:p>
          </table:table-cell>
          <table:table-cell table:formula="of:=SQRT(([.N269]-[.J269])^2+([.O269]-[.K269])^2)" office:value-type="float" office:value="1.00248293321329" calcext:value-type="float">
            <text:p>1.00248293321329</text:p>
          </table:table-cell>
          <table:table-cell office:value-type="float" office:value="0.82727986574173" calcext:value-type="float">
            <text:p>0.82727986574173</text:p>
          </table:table-cell>
          <table:table-cell office:value-type="float" office:value="0.271593362092972" calcext:value-type="float">
            <text:p>0.271593362092972</text:p>
          </table:table-cell>
          <table:table-cell office:value-type="float" office:value="-0.966939806938171" calcext:value-type="float">
            <text:p>-0.966939806938171</text:p>
          </table:table-cell>
          <table:table-cell office:value-type="float" office:value="0.999548971652985" calcext:value-type="float">
            <text:p>0.999548971652985</text:p>
          </table:table-cell>
          <table:table-cell office:value-type="float" office:value="0.27887025475502" calcext:value-type="float">
            <text:p>0.27887025475502</text:p>
          </table:table-cell>
          <table:table-cell office:value-type="float" office:value="0.312750995159149" calcext:value-type="float">
            <text:p>0.312750995159149</text:p>
          </table:table-cell>
          <table:table-cell office:value-type="float" office:value="-0.905057430267334" calcext:value-type="float">
            <text:p>-0.905057430267334</text:p>
          </table:table-cell>
          <table:table-cell office:value-type="float" office:value="0.999559104442596" calcext:value-type="float">
            <text:p>0.999559104442596</text:p>
          </table:table-cell>
          <table:table-cell office:value-type="float" office:value="0.730947554111481" calcext:value-type="float">
            <text:p>0.730947554111481</text:p>
          </table:table-cell>
          <table:table-cell office:value-type="float" office:value="1.20751249790192" calcext:value-type="float">
            <text:p>1.20751249790192</text:p>
          </table:table-cell>
          <table:table-cell office:value-type="float" office:value="-0.00607813242822886" calcext:value-type="float">
            <text:p>-0.00607813242822886</text:p>
          </table:table-cell>
          <table:table-cell office:value-type="float" office:value="0.0823167115449905" calcext:value-type="float">
            <text:p>0.0823167115449905</text:p>
          </table:table-cell>
          <table:table-cell office:value-type="float" office:value="0.400902807712555" calcext:value-type="float">
            <text:p>0.400902807712555</text:p>
          </table:table-cell>
          <table:table-cell office:value-type="float" office:value="1.20045590400696" calcext:value-type="float">
            <text:p>1.20045590400696</text:p>
          </table:table-cell>
          <table:table-cell office:value-type="float" office:value="0.0150273097679019" calcext:value-type="float">
            <text:p>0.0150273097679019</text:p>
          </table:table-cell>
          <table:table-cell office:value-type="float" office:value="0.077085591852665" calcext:value-type="float">
            <text:p>0.0770855918526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QRT(([.J270]-[.F270])^2+([.K270]-[.G270])^2)" office:value-type="float" office:value="0.547546539624519" calcext:value-type="float">
            <text:p>0.547546539624519</text:p>
          </table:table-cell>
          <table:table-cell table:formula="of:=SQRT(([.R270]-[.N270])^2+([.S270]-[.O270])^2)" office:value-type="float" office:value="0.329574984113337" calcext:value-type="float">
            <text:p>0.329574984113337</text:p>
          </table:table-cell>
          <table:table-cell table:formula="of:=SQRT(([.R270]-[.F270])^2+([.S270]-[.G270])^2)" office:value-type="float" office:value="1.02190526787685" calcext:value-type="float">
            <text:p>1.02190526787685</text:p>
          </table:table-cell>
          <table:table-cell table:formula="of:=SQRT(([.N270]-[.J270])^2+([.O270]-[.K270])^2)" office:value-type="float" office:value="1.0015024275064" calcext:value-type="float">
            <text:p>1.0015024275064</text:p>
          </table:table-cell>
          <table:table-cell office:value-type="float" office:value="0.824910819530487" calcext:value-type="float">
            <text:p>0.824910819530487</text:p>
          </table:table-cell>
          <table:table-cell office:value-type="float" office:value="0.269902408123016" calcext:value-type="float">
            <text:p>0.269902408123016</text:p>
          </table:table-cell>
          <table:table-cell office:value-type="float" office:value="-0.948604106903076" calcext:value-type="float">
            <text:p>-0.948604106903076</text:p>
          </table:table-cell>
          <table:table-cell office:value-type="float" office:value="0.999562680721283" calcext:value-type="float">
            <text:p>0.999562680721283</text:p>
          </table:table-cell>
          <table:table-cell office:value-type="float" office:value="0.278974592685699" calcext:value-type="float">
            <text:p>0.278974592685699</text:p>
          </table:table-cell>
          <table:table-cell office:value-type="float" office:value="0.311864882707596" calcext:value-type="float">
            <text:p>0.311864882707596</text:p>
          </table:table-cell>
          <table:table-cell office:value-type="float" office:value="-0.880843997001648" calcext:value-type="float">
            <text:p>-0.880843997001648</text:p>
          </table:table-cell>
          <table:table-cell office:value-type="float" office:value="0.99957138299942" calcext:value-type="float">
            <text:p>0.99957138299942</text:p>
          </table:table-cell>
          <table:table-cell office:value-type="float" office:value="0.730852544307709" calcext:value-type="float">
            <text:p>0.730852544307709</text:p>
          </table:table-cell>
          <table:table-cell office:value-type="float" office:value="1.20562851428986" calcext:value-type="float">
            <text:p>1.20562851428986</text:p>
          </table:table-cell>
          <table:table-cell office:value-type="float" office:value="-0.00392950233072043" calcext:value-type="float">
            <text:p>-0.00392950233072043</text:p>
          </table:table-cell>
          <table:table-cell office:value-type="float" office:value="0.0815747231245041" calcext:value-type="float">
            <text:p>0.0815747231245041</text:p>
          </table:table-cell>
          <table:table-cell office:value-type="float" office:value="0.401327610015869" calcext:value-type="float">
            <text:p>0.401327610015869</text:p>
          </table:table-cell>
          <table:table-cell office:value-type="float" office:value="1.1998850107193" calcext:value-type="float">
            <text:p>1.1998850107193</text:p>
          </table:table-cell>
          <table:table-cell office:value-type="float" office:value="0.012856843881309" calcext:value-type="float">
            <text:p>0.012856843881309</text:p>
          </table:table-cell>
          <table:table-cell office:value-type="float" office:value="0.0760935172438622" calcext:value-type="float">
            <text:p>0.07609351724386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QRT(([.J271]-[.F271])^2+([.K271]-[.G271])^2)" office:value-type="float" office:value="0.549578333684228" calcext:value-type="float">
            <text:p>0.549578333684228</text:p>
          </table:table-cell>
          <table:table-cell table:formula="of:=SQRT(([.R271]-[.N271])^2+([.S271]-[.O271])^2)" office:value-type="float" office:value="0.329457031590472" calcext:value-type="float">
            <text:p>0.329457031590472</text:p>
          </table:table-cell>
          <table:table-cell table:formula="of:=SQRT(([.R271]-[.F271])^2+([.S271]-[.G271])^2)" office:value-type="float" office:value="1.01695323054105" calcext:value-type="float">
            <text:p>1.01695323054105</text:p>
          </table:table-cell>
          <table:table-cell table:formula="of:=SQRT(([.N271]-[.J271])^2+([.O271]-[.K271])^2)" office:value-type="float" office:value="0.991540467832617" calcext:value-type="float">
            <text:p>0.991540467832617</text:p>
          </table:table-cell>
          <table:table-cell office:value-type="float" office:value="0.826697170734406" calcext:value-type="float">
            <text:p>0.826697170734406</text:p>
          </table:table-cell>
          <table:table-cell office:value-type="float" office:value="0.273182690143585" calcext:value-type="float">
            <text:p>0.273182690143585</text:p>
          </table:table-cell>
          <table:table-cell office:value-type="float" office:value="-1.01050496101379" calcext:value-type="float">
            <text:p>-1.01050496101379</text:p>
          </table:table-cell>
          <table:table-cell office:value-type="float" office:value="0.999561309814453" calcext:value-type="float">
            <text:p>0.999561309814453</text:p>
          </table:table-cell>
          <table:table-cell office:value-type="float" office:value="0.278968006372452" calcext:value-type="float">
            <text:p>0.278968006372452</text:p>
          </table:table-cell>
          <table:table-cell office:value-type="float" office:value="0.318228304386139" calcext:value-type="float">
            <text:p>0.318228304386139</text:p>
          </table:table-cell>
          <table:table-cell office:value-type="float" office:value="-0.937123477458954" calcext:value-type="float">
            <text:p>-0.937123477458954</text:p>
          </table:table-cell>
          <table:table-cell office:value-type="float" office:value="0.999558627605438" calcext:value-type="float">
            <text:p>0.999558627605438</text:p>
          </table:table-cell>
          <table:table-cell office:value-type="float" office:value="0.730756103992462" calcext:value-type="float">
            <text:p>0.730756103992462</text:p>
          </table:table-cell>
          <table:table-cell office:value-type="float" office:value="1.20086073875427" calcext:value-type="float">
            <text:p>1.20086073875427</text:p>
          </table:table-cell>
          <table:table-cell office:value-type="float" office:value="-0.0038524828851223" calcext:value-type="float">
            <text:p>-0.0038524828851223</text:p>
          </table:table-cell>
          <table:table-cell office:value-type="float" office:value="0.0837824270129204" calcext:value-type="float">
            <text:p>0.0837824270129204</text:p>
          </table:table-cell>
          <table:table-cell office:value-type="float" office:value="0.401322901248932" calcext:value-type="float">
            <text:p>0.401322901248932</text:p>
          </table:table-cell>
          <table:table-cell office:value-type="float" office:value="1.19689834117889" calcext:value-type="float">
            <text:p>1.19689834117889</text:p>
          </table:table-cell>
          <table:table-cell office:value-type="float" office:value="0.0128001449629664" calcext:value-type="float">
            <text:p>0.0128001449629664</text:p>
          </table:table-cell>
          <table:table-cell office:value-type="float" office:value="0.0775842368602753" calcext:value-type="float">
            <text:p>0.077584236860275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SQRT(([.J272]-[.F272])^2+([.K272]-[.G272])^2)" office:value-type="float" office:value="0.550305240671636" calcext:value-type="float">
            <text:p>0.550305240671636</text:p>
          </table:table-cell>
          <table:table-cell table:formula="of:=SQRT(([.R272]-[.N272])^2+([.S272]-[.O272])^2)" office:value-type="float" office:value="0.330475361555913" calcext:value-type="float">
            <text:p>0.330475361555913</text:p>
          </table:table-cell>
          <table:table-cell table:formula="of:=SQRT(([.R272]-[.F272])^2+([.S272]-[.G272])^2)" office:value-type="float" office:value="1.01400974726988" calcext:value-type="float">
            <text:p>1.01400974726988</text:p>
          </table:table-cell>
          <table:table-cell table:formula="of:=SQRT(([.N272]-[.J272])^2+([.O272]-[.K272])^2)" office:value-type="float" office:value="0.991805418092536" calcext:value-type="float">
            <text:p>0.991805418092536</text:p>
          </table:table-cell>
          <table:table-cell office:value-type="float" office:value="0.827449977397919" calcext:value-type="float">
            <text:p>0.827449977397919</text:p>
          </table:table-cell>
          <table:table-cell office:value-type="float" office:value="0.277708381414413" calcext:value-type="float">
            <text:p>0.277708381414413</text:p>
          </table:table-cell>
          <table:table-cell office:value-type="float" office:value="-1.0645477771759" calcext:value-type="float">
            <text:p>-1.0645477771759</text:p>
          </table:table-cell>
          <table:table-cell office:value-type="float" office:value="0.999554336071014" calcext:value-type="float">
            <text:p>0.999554336071014</text:p>
          </table:table-cell>
          <table:table-cell office:value-type="float" office:value="0.278716951608658" calcext:value-type="float">
            <text:p>0.278716951608658</text:p>
          </table:table-cell>
          <table:table-cell office:value-type="float" office:value="0.319276690483093" calcext:value-type="float">
            <text:p>0.319276690483093</text:p>
          </table:table-cell>
          <table:table-cell office:value-type="float" office:value="-0.949555516242981" calcext:value-type="float">
            <text:p>-0.949555516242981</text:p>
          </table:table-cell>
          <table:table-cell office:value-type="float" office:value="0.999549865722656" calcext:value-type="float">
            <text:p>0.999549865722656</text:p>
          </table:table-cell>
          <table:table-cell office:value-type="float" office:value="0.73079526424408" calcext:value-type="float">
            <text:p>0.73079526424408</text:p>
          </table:table-cell>
          <table:table-cell office:value-type="float" office:value="1.20205819606781" calcext:value-type="float">
            <text:p>1.20205819606781</text:p>
          </table:table-cell>
          <table:table-cell office:value-type="float" office:value="-0.00637796986848116" calcext:value-type="float">
            <text:p>-0.00637796986848116</text:p>
          </table:table-cell>
          <table:table-cell office:value-type="float" office:value="0.0831868872046471" calcext:value-type="float">
            <text:p>0.0831868872046471</text:p>
          </table:table-cell>
          <table:table-cell office:value-type="float" office:value="0.400352954864502" calcext:value-type="float">
            <text:p>0.400352954864502</text:p>
          </table:table-cell>
          <table:table-cell office:value-type="float" office:value="1.19738435745239" calcext:value-type="float">
            <text:p>1.19738435745239</text:p>
          </table:table-cell>
          <table:table-cell office:value-type="float" office:value="0.0154179660603404" calcext:value-type="float">
            <text:p>0.0154179660603404</text:p>
          </table:table-cell>
          <table:table-cell office:value-type="float" office:value="0.0768864825367928" calcext:value-type="float">
            <text:p>0.07688648253679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SQRT(([.J273]-[.F273])^2+([.K273]-[.G273])^2)" office:value-type="float" office:value="0.550776071400336" calcext:value-type="float">
            <text:p>0.550776071400336</text:p>
          </table:table-cell>
          <table:table-cell table:formula="of:=SQRT(([.R273]-[.N273])^2+([.S273]-[.O273])^2)" office:value-type="float" office:value="0.330811545395336" calcext:value-type="float">
            <text:p>0.330811545395336</text:p>
          </table:table-cell>
          <table:table-cell table:formula="of:=SQRT(([.R273]-[.F273])^2+([.S273]-[.G273])^2)" office:value-type="float" office:value="1.01339741275201" calcext:value-type="float">
            <text:p>1.01339741275201</text:p>
          </table:table-cell>
          <table:table-cell table:formula="of:=SQRT(([.N273]-[.J273])^2+([.O273]-[.K273])^2)" office:value-type="float" office:value="0.990991533095387" calcext:value-type="float">
            <text:p>0.990991533095387</text:p>
          </table:table-cell>
          <table:table-cell office:value-type="float" office:value="0.827964305877686" calcext:value-type="float">
            <text:p>0.827964305877686</text:p>
          </table:table-cell>
          <table:table-cell office:value-type="float" office:value="0.277799487113953" calcext:value-type="float">
            <text:p>0.277799487113953</text:p>
          </table:table-cell>
          <table:table-cell office:value-type="float" office:value="-1.03835988044739" calcext:value-type="float">
            <text:p>-1.03835988044739</text:p>
          </table:table-cell>
          <table:table-cell office:value-type="float" office:value="0.999551177024841" calcext:value-type="float">
            <text:p>0.999551177024841</text:p>
          </table:table-cell>
          <table:table-cell office:value-type="float" office:value="0.278750091791153" calcext:value-type="float">
            <text:p>0.278750091791153</text:p>
          </table:table-cell>
          <table:table-cell office:value-type="float" office:value="0.319248586893082" calcext:value-type="float">
            <text:p>0.319248586893082</text:p>
          </table:table-cell>
          <table:table-cell office:value-type="float" office:value="-0.928063213825226" calcext:value-type="float">
            <text:p>-0.928063213825226</text:p>
          </table:table-cell>
          <table:table-cell office:value-type="float" office:value="0.999540090560913" calcext:value-type="float">
            <text:p>0.999540090560913</text:p>
          </table:table-cell>
          <table:table-cell office:value-type="float" office:value="0.73080837726593" calcext:value-type="float">
            <text:p>0.73080837726593</text:p>
          </table:table-cell>
          <table:table-cell office:value-type="float" office:value="1.20112586021423" calcext:value-type="float">
            <text:p>1.20112586021423</text:p>
          </table:table-cell>
          <table:table-cell office:value-type="float" office:value="-0.00532341841608286" calcext:value-type="float">
            <text:p>-0.00532341841608286</text:p>
          </table:table-cell>
          <table:table-cell office:value-type="float" office:value="0.0839511081576347" calcext:value-type="float">
            <text:p>0.0839511081576347</text:p>
          </table:table-cell>
          <table:table-cell office:value-type="float" office:value="0.400030434131622" calcext:value-type="float">
            <text:p>0.400030434131622</text:p>
          </table:table-cell>
          <table:table-cell office:value-type="float" office:value="1.19641089439392" calcext:value-type="float">
            <text:p>1.19641089439392</text:p>
          </table:table-cell>
          <table:table-cell office:value-type="float" office:value="0.0143489269539714" calcext:value-type="float">
            <text:p>0.0143489269539714</text:p>
          </table:table-cell>
          <table:table-cell office:value-type="float" office:value="0.076920673251152" calcext:value-type="float">
            <text:p>0.07692067325115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SQRT(([.J274]-[.F274])^2+([.K274]-[.G274])^2)" office:value-type="float" office:value="0.550992541743617" calcext:value-type="float">
            <text:p>0.550992541743617</text:p>
          </table:table-cell>
          <table:table-cell table:formula="of:=SQRT(([.R274]-[.N274])^2+([.S274]-[.O274])^2)" office:value-type="float" office:value="0.330118311686906" calcext:value-type="float">
            <text:p>0.330118311686906</text:p>
          </table:table-cell>
          <table:table-cell table:formula="of:=SQRT(([.R274]-[.F274])^2+([.S274]-[.G274])^2)" office:value-type="float" office:value="1.01436232403428" calcext:value-type="float">
            <text:p>1.01436232403428</text:p>
          </table:table-cell>
          <table:table-cell table:formula="of:=SQRT(([.N274]-[.J274])^2+([.O274]-[.K274])^2)" office:value-type="float" office:value="0.992181190637697" calcext:value-type="float">
            <text:p>0.992181190637697</text:p>
          </table:table-cell>
          <table:table-cell office:value-type="float" office:value="0.828012108802795" calcext:value-type="float">
            <text:p>0.828012108802795</text:p>
          </table:table-cell>
          <table:table-cell office:value-type="float" office:value="0.27942830324173" calcext:value-type="float">
            <text:p>0.27942830324173</text:p>
          </table:table-cell>
          <table:table-cell office:value-type="float" office:value="-1.020836353302" calcext:value-type="float">
            <text:p>-1.020836353302</text:p>
          </table:table-cell>
          <table:table-cell office:value-type="float" office:value="0.999549806118012" calcext:value-type="float">
            <text:p>0.999549806118012</text:p>
          </table:table-cell>
          <table:table-cell office:value-type="float" office:value="0.278618425130844" calcext:value-type="float">
            <text:p>0.278618425130844</text:p>
          </table:table-cell>
          <table:table-cell office:value-type="float" office:value="0.321373045444489" calcext:value-type="float">
            <text:p>0.321373045444489</text:p>
          </table:table-cell>
          <table:table-cell office:value-type="float" office:value="-0.918389141559601" calcext:value-type="float">
            <text:p>-0.918389141559601</text:p>
          </table:table-cell>
          <table:table-cell office:value-type="float" office:value="0.999537169933319" calcext:value-type="float">
            <text:p>0.999537169933319</text:p>
          </table:table-cell>
          <table:table-cell office:value-type="float" office:value="0.729011714458466" calcext:value-type="float">
            <text:p>0.729011714458466</text:p>
          </table:table-cell>
          <table:table-cell office:value-type="float" office:value="1.20543718338013" calcext:value-type="float">
            <text:p>1.20543718338013</text:p>
          </table:table-cell>
          <table:table-cell office:value-type="float" office:value="-0.00529037462547421" calcext:value-type="float">
            <text:p>-0.00529037462547421</text:p>
          </table:table-cell>
          <table:table-cell office:value-type="float" office:value="0.0844953954219818" calcext:value-type="float">
            <text:p>0.0844953954219818</text:p>
          </table:table-cell>
          <table:table-cell office:value-type="float" office:value="0.398964524269104" calcext:value-type="float">
            <text:p>0.398964524269104</text:p>
          </table:table-cell>
          <table:table-cell office:value-type="float" office:value="1.19858503341675" calcext:value-type="float">
            <text:p>1.19858503341675</text:p>
          </table:table-cell>
          <table:table-cell office:value-type="float" office:value="0.0142777664586902" calcext:value-type="float">
            <text:p>0.0142777664586902</text:p>
          </table:table-cell>
          <table:table-cell office:value-type="float" office:value="0.0776645690202713" calcext:value-type="float">
            <text:p>0.07766456902027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SQRT(([.J275]-[.F275])^2+([.K275]-[.G275])^2)" office:value-type="float" office:value="0.551990997934944" calcext:value-type="float">
            <text:p>0.551990997934944</text:p>
          </table:table-cell>
          <table:table-cell table:formula="of:=SQRT(([.R275]-[.N275])^2+([.S275]-[.O275])^2)" office:value-type="float" office:value="0.330239291984629" calcext:value-type="float">
            <text:p>0.330239291984629</text:p>
          </table:table-cell>
          <table:table-cell table:formula="of:=SQRT(([.R275]-[.F275])^2+([.S275]-[.G275])^2)" office:value-type="float" office:value="1.01253468983879" calcext:value-type="float">
            <text:p>1.01253468983879</text:p>
          </table:table-cell>
          <table:table-cell table:formula="of:=SQRT(([.N275]-[.J275])^2+([.O275]-[.K275])^2)" office:value-type="float" office:value="0.985872740007899" calcext:value-type="float">
            <text:p>0.985872740007899</text:p>
          </table:table-cell>
          <table:table-cell office:value-type="float" office:value="0.827703773975372" calcext:value-type="float">
            <text:p>0.827703773975372</text:p>
          </table:table-cell>
          <table:table-cell office:value-type="float" office:value="0.279416829347611" calcext:value-type="float">
            <text:p>0.279416829347611</text:p>
          </table:table-cell>
          <table:table-cell office:value-type="float" office:value="-1.03349614143372" calcext:value-type="float">
            <text:p>-1.03349614143372</text:p>
          </table:table-cell>
          <table:table-cell office:value-type="float" office:value="0.999535977840424" calcext:value-type="float">
            <text:p>0.999535977840424</text:p>
          </table:table-cell>
          <table:table-cell office:value-type="float" office:value="0.277540743350983" calcext:value-type="float">
            <text:p>0.277540743350983</text:p>
          </table:table-cell>
          <table:table-cell office:value-type="float" office:value="0.32430225610733" calcext:value-type="float">
            <text:p>0.32430225610733</text:p>
          </table:table-cell>
          <table:table-cell office:value-type="float" office:value="-1.0008716583252" calcext:value-type="float">
            <text:p>-1.0008716583252</text:p>
          </table:table-cell>
          <table:table-cell office:value-type="float" office:value="0.999522030353546" calcext:value-type="float">
            <text:p>0.999522030353546</text:p>
          </table:table-cell>
          <table:table-cell office:value-type="float" office:value="0.729201853275299" calcext:value-type="float">
            <text:p>0.729201853275299</text:p>
          </table:table-cell>
          <table:table-cell office:value-type="float" office:value="1.20062828063965" calcext:value-type="float">
            <text:p>1.20062828063965</text:p>
          </table:table-cell>
          <table:table-cell office:value-type="float" office:value="0.0044340337626636" calcext:value-type="float">
            <text:p>0.0044340337626636</text:p>
          </table:table-cell>
          <table:table-cell office:value-type="float" office:value="0.0851273462176323" calcext:value-type="float">
            <text:p>0.0851273462176323</text:p>
          </table:table-cell>
          <table:table-cell office:value-type="float" office:value="0.398985803127289" calcext:value-type="float">
            <text:p>0.398985803127289</text:p>
          </table:table-cell>
          <table:table-cell office:value-type="float" office:value="1.19671034812927" calcext:value-type="float">
            <text:p>1.19671034812927</text:p>
          </table:table-cell>
          <table:table-cell office:value-type="float" office:value="0.00467475317418575" calcext:value-type="float">
            <text:p>0.00467475317418575</text:p>
          </table:table-cell>
          <table:table-cell office:value-type="float" office:value="0.0779018849134445" calcext:value-type="float">
            <text:p>0.07790188491344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SQRT(([.J276]-[.F276])^2+([.K276]-[.G276])^2)" office:value-type="float" office:value="0.553973456186444" calcext:value-type="float">
            <text:p>0.553973456186444</text:p>
          </table:table-cell>
          <table:table-cell table:formula="of:=SQRT(([.R276]-[.N276])^2+([.S276]-[.O276])^2)" office:value-type="float" office:value="0.331003019447479" calcext:value-type="float">
            <text:p>0.331003019447479</text:p>
          </table:table-cell>
          <table:table-cell table:formula="of:=SQRT(([.R276]-[.F276])^2+([.S276]-[.G276])^2)" office:value-type="float" office:value="1.0245601603298" calcext:value-type="float">
            <text:p>1.0245601603298</text:p>
          </table:table-cell>
          <table:table-cell table:formula="of:=SQRT(([.N276]-[.J276])^2+([.O276]-[.K276])^2)" office:value-type="float" office:value="0.996622541839446" calcext:value-type="float">
            <text:p>0.996622541839446</text:p>
          </table:table-cell>
          <table:table-cell office:value-type="float" office:value="0.828307032585144" calcext:value-type="float">
            <text:p>0.828307032585144</text:p>
          </table:table-cell>
          <table:table-cell office:value-type="float" office:value="0.279758155345917" calcext:value-type="float">
            <text:p>0.279758155345917</text:p>
          </table:table-cell>
          <table:table-cell office:value-type="float" office:value="-1.09305882453918" calcext:value-type="float">
            <text:p>-1.09305882453918</text:p>
          </table:table-cell>
          <table:table-cell office:value-type="float" office:value="0.999541103839874" calcext:value-type="float">
            <text:p>0.999541103839874</text:p>
          </table:table-cell>
          <table:table-cell office:value-type="float" office:value="0.276246458292007" calcext:value-type="float">
            <text:p>0.276246458292007</text:p>
          </table:table-cell>
          <table:table-cell office:value-type="float" office:value="0.325755029916763" calcext:value-type="float">
            <text:p>0.325755029916763</text:p>
          </table:table-cell>
          <table:table-cell office:value-type="float" office:value="-1.02264642715454" calcext:value-type="float">
            <text:p>-1.02264642715454</text:p>
          </table:table-cell>
          <table:table-cell office:value-type="float" office:value="0.999532759189606" calcext:value-type="float">
            <text:p>0.999532759189606</text:p>
          </table:table-cell>
          <table:table-cell office:value-type="float" office:value="0.729832947254181" calcext:value-type="float">
            <text:p>0.729832947254181</text:p>
          </table:table-cell>
          <table:table-cell office:value-type="float" office:value="1.2131758928299" calcext:value-type="float">
            <text:p>1.2131758928299</text:p>
          </table:table-cell>
          <table:table-cell office:value-type="float" office:value="0.00439033657312393" calcext:value-type="float">
            <text:p>0.00439033657312393</text:p>
          </table:table-cell>
          <table:table-cell office:value-type="float" office:value="0.084597572684288" calcext:value-type="float">
            <text:p>0.084597572684288</text:p>
          </table:table-cell>
          <table:table-cell office:value-type="float" office:value="0.398845493793488" calcext:value-type="float">
            <text:p>0.398845493793488</text:p>
          </table:table-cell>
          <table:table-cell office:value-type="float" office:value="1.20996582508087" calcext:value-type="float">
            <text:p>1.20996582508087</text:p>
          </table:table-cell>
          <table:table-cell office:value-type="float" office:value="0.00470649776980281" calcext:value-type="float">
            <text:p>0.00470649776980281</text:p>
          </table:table-cell>
          <table:table-cell office:value-type="float" office:value="0.0779947191476822" calcext:value-type="float">
            <text:p>0.07799471914768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SQRT(([.J277]-[.F277])^2+([.K277]-[.G277])^2)" office:value-type="float" office:value="0.547739067368747" calcext:value-type="float">
            <text:p>0.547739067368747</text:p>
          </table:table-cell>
          <table:table-cell table:formula="of:=SQRT(([.R277]-[.N277])^2+([.S277]-[.O277])^2)" office:value-type="float" office:value="0.330825919760686" calcext:value-type="float">
            <text:p>0.330825919760686</text:p>
          </table:table-cell>
          <table:table-cell table:formula="of:=SQRT(([.R277]-[.F277])^2+([.S277]-[.G277])^2)" office:value-type="float" office:value="1.02542456445297" calcext:value-type="float">
            <text:p>1.02542456445297</text:p>
          </table:table-cell>
          <table:table-cell table:formula="of:=SQRT(([.N277]-[.J277])^2+([.O277]-[.K277])^2)" office:value-type="float" office:value="0.996037997191509" calcext:value-type="float">
            <text:p>0.996037997191509</text:p>
          </table:table-cell>
          <table:table-cell office:value-type="float" office:value="0.824637115001679" calcext:value-type="float">
            <text:p>0.824637115001679</text:p>
          </table:table-cell>
          <table:table-cell office:value-type="float" office:value="0.278061896562576" calcext:value-type="float">
            <text:p>0.278061896562576</text:p>
          </table:table-cell>
          <table:table-cell office:value-type="float" office:value="-0.90368640422821" calcext:value-type="float">
            <text:p>-0.90368640422821</text:p>
          </table:table-cell>
          <table:table-cell office:value-type="float" office:value="0.999555349349976" calcext:value-type="float">
            <text:p>0.999555349349976</text:p>
          </table:table-cell>
          <table:table-cell office:value-type="float" office:value="0.278909385204315" calcext:value-type="float">
            <text:p>0.278909385204315</text:p>
          </table:table-cell>
          <table:table-cell office:value-type="float" office:value="0.324958920478821" calcext:value-type="float">
            <text:p>0.324958920478821</text:p>
          </table:table-cell>
          <table:table-cell office:value-type="float" office:value="-0.795095205307007" calcext:value-type="float">
            <text:p>-0.795095205307007</text:p>
          </table:table-cell>
          <table:table-cell office:value-type="float" office:value="0.999547421932221" calcext:value-type="float">
            <text:p>0.999547421932221</text:p>
          </table:table-cell>
          <table:table-cell office:value-type="float" office:value="0.729725241661072" calcext:value-type="float">
            <text:p>0.729725241661072</text:p>
          </table:table-cell>
          <table:table-cell office:value-type="float" office:value="1.21313500404358" calcext:value-type="float">
            <text:p>1.21313500404358</text:p>
          </table:table-cell>
          <table:table-cell office:value-type="float" office:value="0.00306107033975422" calcext:value-type="float">
            <text:p>0.00306107033975422</text:p>
          </table:table-cell>
          <table:table-cell office:value-type="float" office:value="0.0814213454723358" calcext:value-type="float">
            <text:p>0.0814213454723358</text:p>
          </table:table-cell>
          <table:table-cell office:value-type="float" office:value="0.398906648159027" calcext:value-type="float">
            <text:p>0.398906648159027</text:p>
          </table:table-cell>
          <table:table-cell office:value-type="float" office:value="1.21093332767487" calcext:value-type="float">
            <text:p>1.21093332767487</text:p>
          </table:table-cell>
          <table:table-cell office:value-type="float" office:value="0.00619073491543531" calcext:value-type="float">
            <text:p>0.00619073491543531</text:p>
          </table:table-cell>
          <table:table-cell office:value-type="float" office:value="0.0751414597034454" calcext:value-type="float">
            <text:p>0.07514145970344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SQRT(([.J278]-[.F278])^2+([.K278]-[.G278])^2)" office:value-type="float" office:value="0.54725814463992" calcext:value-type="float">
            <text:p>0.54725814463992</text:p>
          </table:table-cell>
          <table:table-cell table:formula="of:=SQRT(([.R278]-[.N278])^2+([.S278]-[.O278])^2)" office:value-type="float" office:value="0.331002953328102" calcext:value-type="float">
            <text:p>0.331002953328102</text:p>
          </table:table-cell>
          <table:table-cell table:formula="of:=SQRT(([.R278]-[.F278])^2+([.S278]-[.G278])^2)" office:value-type="float" office:value="1.02551887170248" calcext:value-type="float">
            <text:p>1.02551887170248</text:p>
          </table:table-cell>
          <table:table-cell table:formula="of:=SQRT(([.N278]-[.J278])^2+([.O278]-[.K278])^2)" office:value-type="float" office:value="0.994122204267795" calcext:value-type="float">
            <text:p>0.994122204267795</text:p>
          </table:table-cell>
          <table:table-cell office:value-type="float" office:value="0.824218153953552" calcext:value-type="float">
            <text:p>0.824218153953552</text:p>
          </table:table-cell>
          <table:table-cell office:value-type="float" office:value="0.276561886072159" calcext:value-type="float">
            <text:p>0.276561886072159</text:p>
          </table:table-cell>
          <table:table-cell office:value-type="float" office:value="-0.888384222984314" calcext:value-type="float">
            <text:p>-0.888384222984314</text:p>
          </table:table-cell>
          <table:table-cell office:value-type="float" office:value="0.999565601348877" calcext:value-type="float">
            <text:p>0.999565601348877</text:p>
          </table:table-cell>
          <table:table-cell office:value-type="float" office:value="0.279086291790009" calcext:value-type="float">
            <text:p>0.279086291790009</text:p>
          </table:table-cell>
          <table:table-cell office:value-type="float" office:value="0.324756592512131" calcext:value-type="float">
            <text:p>0.324756592512131</text:p>
          </table:table-cell>
          <table:table-cell office:value-type="float" office:value="-0.808114230632782" calcext:value-type="float">
            <text:p>-0.808114230632782</text:p>
          </table:table-cell>
          <table:table-cell office:value-type="float" office:value="0.999557793140411" calcext:value-type="float">
            <text:p>0.999557793140411</text:p>
          </table:table-cell>
          <table:table-cell office:value-type="float" office:value="0.730956494808197" calcext:value-type="float">
            <text:p>0.730956494808197</text:p>
          </table:table-cell>
          <table:table-cell office:value-type="float" office:value="1.21024644374847" calcext:value-type="float">
            <text:p>1.21024644374847</text:p>
          </table:table-cell>
          <table:table-cell office:value-type="float" office:value="0.00391342584043741" calcext:value-type="float">
            <text:p>0.00391342584043741</text:p>
          </table:table-cell>
          <table:table-cell office:value-type="float" office:value="0.0782427415251732" calcext:value-type="float">
            <text:p>0.0782427415251732</text:p>
          </table:table-cell>
          <table:table-cell office:value-type="float" office:value="0.399953544139862" calcext:value-type="float">
            <text:p>0.399953544139862</text:p>
          </table:table-cell>
          <table:table-cell office:value-type="float" office:value="1.21020448207855" calcext:value-type="float">
            <text:p>1.21020448207855</text:p>
          </table:table-cell>
          <table:table-cell office:value-type="float" office:value="0.00550065468996763" calcext:value-type="float">
            <text:p>0.00550065468996763</text:p>
          </table:table-cell>
          <table:table-cell office:value-type="float" office:value="0.0720559358596802" calcext:value-type="float">
            <text:p>0.07205593585968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SQRT(([.J279]-[.F279])^2+([.K279]-[.G279])^2)" office:value-type="float" office:value="0.549613634292598" calcext:value-type="float">
            <text:p>0.549613634292598</text:p>
          </table:table-cell>
          <table:table-cell table:formula="of:=SQRT(([.R279]-[.N279])^2+([.S279]-[.O279])^2)" office:value-type="float" office:value="0.331275719030662" calcext:value-type="float">
            <text:p>0.331275719030662</text:p>
          </table:table-cell>
          <table:table-cell table:formula="of:=SQRT(([.R279]-[.F279])^2+([.S279]-[.G279])^2)" office:value-type="float" office:value="1.02224876466851" calcext:value-type="float">
            <text:p>1.02224876466851</text:p>
          </table:table-cell>
          <table:table-cell table:formula="of:=SQRT(([.N279]-[.J279])^2+([.O279]-[.K279])^2)" office:value-type="float" office:value="0.992845388752518" calcext:value-type="float">
            <text:p>0.992845388752518</text:p>
          </table:table-cell>
          <table:table-cell office:value-type="float" office:value="0.824103832244873" calcext:value-type="float">
            <text:p>0.824103832244873</text:p>
          </table:table-cell>
          <table:table-cell office:value-type="float" office:value="0.278587877750397" calcext:value-type="float">
            <text:p>0.278587877750397</text:p>
          </table:table-cell>
          <table:table-cell office:value-type="float" office:value="-1.0955548286438" calcext:value-type="float">
            <text:p>-1.0955548286438</text:p>
          </table:table-cell>
          <table:table-cell office:value-type="float" office:value="0.999551355838776" calcext:value-type="float">
            <text:p>0.999551355838776</text:p>
          </table:table-cell>
          <table:table-cell office:value-type="float" office:value="0.276483446359634" calcext:value-type="float">
            <text:p>0.276483446359634</text:p>
          </table:table-cell>
          <table:table-cell office:value-type="float" office:value="0.325353890657425" calcext:value-type="float">
            <text:p>0.325353890657425</text:p>
          </table:table-cell>
          <table:table-cell office:value-type="float" office:value="-1.06596684455872" calcext:value-type="float">
            <text:p>-1.06596684455872</text:p>
          </table:table-cell>
          <table:table-cell office:value-type="float" office:value="0.999544262886047" calcext:value-type="float">
            <text:p>0.999544262886047</text:p>
          </table:table-cell>
          <table:table-cell office:value-type="float" office:value="0.729827582836151" calcext:value-type="float">
            <text:p>0.729827582836151</text:p>
          </table:table-cell>
          <table:table-cell office:value-type="float" office:value="1.20865511894226" calcext:value-type="float">
            <text:p>1.20865511894226</text:p>
          </table:table-cell>
          <table:table-cell office:value-type="float" office:value="0.00621737958863378" calcext:value-type="float">
            <text:p>0.00621737958863378</text:p>
          </table:table-cell>
          <table:table-cell office:value-type="float" office:value="0.0796229094266892" calcext:value-type="float">
            <text:p>0.0796229094266892</text:p>
          </table:table-cell>
          <table:table-cell office:value-type="float" office:value="0.398552417755127" calcext:value-type="float">
            <text:p>0.398552417755127</text:p>
          </table:table-cell>
          <table:table-cell office:value-type="float" office:value="1.20804929733276" calcext:value-type="float">
            <text:p>1.20804929733276</text:p>
          </table:table-cell>
          <table:table-cell office:value-type="float" office:value="0.00314461067318916" calcext:value-type="float">
            <text:p>0.00314461067318916</text:p>
          </table:table-cell>
          <table:table-cell office:value-type="float" office:value="0.0734005644917488" calcext:value-type="float">
            <text:p>0.07340056449174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SQRT(([.J280]-[.F280])^2+([.K280]-[.G280])^2)" office:value-type="float" office:value="0.549255308340561" calcext:value-type="float">
            <text:p>0.549255308340561</text:p>
          </table:table-cell>
          <table:table-cell table:formula="of:=SQRT(([.R280]-[.N280])^2+([.S280]-[.O280])^2)" office:value-type="float" office:value="0.331281052650868" calcext:value-type="float">
            <text:p>0.331281052650868</text:p>
          </table:table-cell>
          <table:table-cell table:formula="of:=SQRT(([.R280]-[.F280])^2+([.S280]-[.G280])^2)" office:value-type="float" office:value="1.02186156394106" calcext:value-type="float">
            <text:p>1.02186156394106</text:p>
          </table:table-cell>
          <table:table-cell table:formula="of:=SQRT(([.N280]-[.J280])^2+([.O280]-[.K280])^2)" office:value-type="float" office:value="0.996334511695925" calcext:value-type="float">
            <text:p>0.996334511695925</text:p>
          </table:table-cell>
          <table:table-cell office:value-type="float" office:value="0.824111938476563" calcext:value-type="float">
            <text:p>0.824111938476563</text:p>
          </table:table-cell>
          <table:table-cell office:value-type="float" office:value="0.278581708669663" calcext:value-type="float">
            <text:p>0.278581708669663</text:p>
          </table:table-cell>
          <table:table-cell office:value-type="float" office:value="-1.07194757461548" calcext:value-type="float">
            <text:p>-1.07194757461548</text:p>
          </table:table-cell>
          <table:table-cell office:value-type="float" office:value="0.999550998210907" calcext:value-type="float">
            <text:p>0.999550998210907</text:p>
          </table:table-cell>
          <table:table-cell office:value-type="float" office:value="0.276576340198517" calcext:value-type="float">
            <text:p>0.276576340198517</text:p>
          </table:table-cell>
          <table:table-cell office:value-type="float" office:value="0.322011679410934" calcext:value-type="float">
            <text:p>0.322011679410934</text:p>
          </table:table-cell>
          <table:table-cell office:value-type="float" office:value="-1.01953053474426" calcext:value-type="float">
            <text:p>-1.01953053474426</text:p>
          </table:table-cell>
          <table:table-cell office:value-type="float" office:value="0.999547779560089" calcext:value-type="float">
            <text:p>0.999547779560089</text:p>
          </table:table-cell>
          <table:table-cell office:value-type="float" office:value="0.729693651199341" calcext:value-type="float">
            <text:p>0.729693651199341</text:p>
          </table:table-cell>
          <table:table-cell office:value-type="float" office:value="1.20934879779816" calcext:value-type="float">
            <text:p>1.20934879779816</text:p>
          </table:table-cell>
          <table:table-cell office:value-type="float" office:value="0.00895079597830772" calcext:value-type="float">
            <text:p>0.00895079597830772</text:p>
          </table:table-cell>
          <table:table-cell office:value-type="float" office:value="0.0788087919354439" calcext:value-type="float">
            <text:p>0.0788087919354439</text:p>
          </table:table-cell>
          <table:table-cell office:value-type="float" office:value="0.398417472839355" calcext:value-type="float">
            <text:p>0.398417472839355</text:p>
          </table:table-cell>
          <table:table-cell office:value-type="float" office:value="1.20755171775818" calcext:value-type="float">
            <text:p>1.20755171775818</text:p>
          </table:table-cell>
          <table:table-cell office:value-type="float" office:value="0.000500734779052436" calcext:value-type="float">
            <text:p>0.000500734779052436</text:p>
          </table:table-cell>
          <table:table-cell office:value-type="float" office:value="0.0732992962002754" calcext:value-type="float">
            <text:p>0.07329929620027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SQRT(([.J281]-[.F281])^2+([.K281]-[.G281])^2)" office:value-type="float" office:value="0.54905815548814" calcext:value-type="float">
            <text:p>0.54905815548814</text:p>
          </table:table-cell>
          <table:table-cell table:formula="of:=SQRT(([.R281]-[.N281])^2+([.S281]-[.O281])^2)" office:value-type="float" office:value="0.333345520769569" calcext:value-type="float">
            <text:p>0.333345520769569</text:p>
          </table:table-cell>
          <table:table-cell table:formula="of:=SQRT(([.R281]-[.F281])^2+([.S281]-[.G281])^2)" office:value-type="float" office:value="1.01178312640924" calcext:value-type="float">
            <text:p>1.01178312640924</text:p>
          </table:table-cell>
          <table:table-cell table:formula="of:=SQRT(([.N281]-[.J281])^2+([.O281]-[.K281])^2)" office:value-type="float" office:value="0.993101645944917" calcext:value-type="float">
            <text:p>0.993101645944917</text:p>
          </table:table-cell>
          <table:table-cell office:value-type="float" office:value="0.824118733406067" calcext:value-type="float">
            <text:p>0.824118733406067</text:p>
          </table:table-cell>
          <table:table-cell office:value-type="float" office:value="0.278674572706223" calcext:value-type="float">
            <text:p>0.278674572706223</text:p>
          </table:table-cell>
          <table:table-cell office:value-type="float" office:value="-1.06981480121613" calcext:value-type="float">
            <text:p>-1.06981480121613</text:p>
          </table:table-cell>
          <table:table-cell office:value-type="float" office:value="0.999538242816925" calcext:value-type="float">
            <text:p>0.999538242816925</text:p>
          </table:table-cell>
          <table:table-cell office:value-type="float" office:value="0.276582181453705" calcext:value-type="float">
            <text:p>0.276582181453705</text:p>
          </table:table-cell>
          <table:table-cell office:value-type="float" office:value="0.319522857666016" calcext:value-type="float">
            <text:p>0.319522857666016</text:p>
          </table:table-cell>
          <table:table-cell office:value-type="float" office:value="-1.00881028175354" calcext:value-type="float">
            <text:p>-1.00881028175354</text:p>
          </table:table-cell>
          <table:table-cell office:value-type="float" office:value="0.999542117118835" calcext:value-type="float">
            <text:p>0.999542117118835</text:p>
          </table:table-cell>
          <table:table-cell office:value-type="float" office:value="0.732717037200928" calcext:value-type="float">
            <text:p>0.732717037200928</text:p>
          </table:table-cell>
          <table:table-cell office:value-type="float" office:value="1.20167469978333" calcext:value-type="float">
            <text:p>1.20167469978333</text:p>
          </table:table-cell>
          <table:table-cell office:value-type="float" office:value="0.00877989735454321" calcext:value-type="float">
            <text:p>0.00877989735454321</text:p>
          </table:table-cell>
          <table:table-cell office:value-type="float" office:value="0.078806534409523" calcext:value-type="float">
            <text:p>0.078806534409523</text:p>
          </table:table-cell>
          <table:table-cell office:value-type="float" office:value="0.399404287338257" calcext:value-type="float">
            <text:p>0.399404287338257</text:p>
          </table:table-cell>
          <table:table-cell office:value-type="float" office:value="1.19700062274933" calcext:value-type="float">
            <text:p>1.19700062274933</text:p>
          </table:table-cell>
          <table:table-cell office:value-type="float" office:value="0.000735349138267338" calcext:value-type="float">
            <text:p>0.000735349138267338</text:p>
          </table:table-cell>
          <table:table-cell office:value-type="float" office:value="0.0734012722969055" calcext:value-type="float">
            <text:p>0.07340127229690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SQRT(([.J282]-[.F282])^2+([.K282]-[.G282])^2)" office:value-type="float" office:value="0.551222587009993" calcext:value-type="float">
            <text:p>0.551222587009993</text:p>
          </table:table-cell>
          <table:table-cell table:formula="of:=SQRT(([.R282]-[.N282])^2+([.S282]-[.O282])^2)" office:value-type="float" office:value="0.329082254351478" calcext:value-type="float">
            <text:p>0.329082254351478</text:p>
          </table:table-cell>
          <table:table-cell table:formula="of:=SQRT(([.R282]-[.F282])^2+([.S282]-[.G282])^2)" office:value-type="float" office:value="1.01030526483893" calcext:value-type="float">
            <text:p>1.01030526483893</text:p>
          </table:table-cell>
          <table:table-cell table:formula="of:=SQRT(([.N282]-[.J282])^2+([.O282]-[.K282])^2)" office:value-type="float" office:value="0.993447617515105" calcext:value-type="float">
            <text:p>0.993447617515105</text:p>
          </table:table-cell>
          <table:table-cell office:value-type="float" office:value="0.824314951896668" calcext:value-type="float">
            <text:p>0.824314951896668</text:p>
          </table:table-cell>
          <table:table-cell office:value-type="float" office:value="0.278965473175049" calcext:value-type="float">
            <text:p>0.278965473175049</text:p>
          </table:table-cell>
          <table:table-cell office:value-type="float" office:value="-1.01722979545593" calcext:value-type="float">
            <text:p>-1.01722979545593</text:p>
          </table:table-cell>
          <table:table-cell office:value-type="float" office:value="0.999536156654358" calcext:value-type="float">
            <text:p>0.999536156654358</text:p>
          </table:table-cell>
          <table:table-cell office:value-type="float" office:value="0.274737656116486" calcext:value-type="float">
            <text:p>0.274737656116486</text:p>
          </table:table-cell>
          <table:table-cell office:value-type="float" office:value="0.321522921323776" calcext:value-type="float">
            <text:p>0.321522921323776</text:p>
          </table:table-cell>
          <table:table-cell office:value-type="float" office:value="-1.00397276878357" calcext:value-type="float">
            <text:p>-1.00397276878357</text:p>
          </table:table-cell>
          <table:table-cell office:value-type="float" office:value="0.999557137489319" calcext:value-type="float">
            <text:p>0.999557137489319</text:p>
          </table:table-cell>
          <table:table-cell office:value-type="float" office:value="0.735785126686096" calcext:value-type="float">
            <text:p>0.735785126686096</text:p>
          </table:table-cell>
          <table:table-cell office:value-type="float" office:value="1.20150780677795" calcext:value-type="float">
            <text:p>1.20150780677795</text:p>
          </table:table-cell>
          <table:table-cell office:value-type="float" office:value="0.0087163932621479" calcext:value-type="float">
            <text:p>0.0087163932621479</text:p>
          </table:table-cell>
          <table:table-cell office:value-type="float" office:value="0.0774230435490608" calcext:value-type="float">
            <text:p>0.0774230435490608</text:p>
          </table:table-cell>
          <table:table-cell office:value-type="float" office:value="0.406713008880615" calcext:value-type="float">
            <text:p>0.406713008880615</text:p>
          </table:table-cell>
          <table:table-cell office:value-type="float" office:value="1.19892489910126" calcext:value-type="float">
            <text:p>1.19892489910126</text:p>
          </table:table-cell>
          <table:table-cell office:value-type="float" office:value="0.000780633359681815" calcext:value-type="float">
            <text:p>0.000780633359681815</text:p>
          </table:table-cell>
          <table:table-cell office:value-type="float" office:value="0.0729770958423615" calcext:value-type="float">
            <text:p>0.07297709584236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SQRT(([.J283]-[.F283])^2+([.K283]-[.G283])^2)" office:value-type="float" office:value="0.546664906804225" calcext:value-type="float">
            <text:p>0.546664906804225</text:p>
          </table:table-cell>
          <table:table-cell table:formula="of:=SQRT(([.R283]-[.N283])^2+([.S283]-[.O283])^2)" office:value-type="float" office:value="0.327506052803935" calcext:value-type="float">
            <text:p>0.327506052803935</text:p>
          </table:table-cell>
          <table:table-cell table:formula="of:=SQRT(([.R283]-[.F283])^2+([.S283]-[.G283])^2)" office:value-type="float" office:value="1.01258343105914" calcext:value-type="float">
            <text:p>1.01258343105914</text:p>
          </table:table-cell>
          <table:table-cell table:formula="of:=SQRT(([.N283]-[.J283])^2+([.O283]-[.K283])^2)" office:value-type="float" office:value="0.993449717862414" calcext:value-type="float">
            <text:p>0.993449717862414</text:p>
          </table:table-cell>
          <table:table-cell office:value-type="float" office:value="0.822169005870819" calcext:value-type="float">
            <text:p>0.822169005870819</text:p>
          </table:table-cell>
          <table:table-cell office:value-type="float" office:value="0.273775100708008" calcext:value-type="float">
            <text:p>0.273775100708008</text:p>
          </table:table-cell>
          <table:table-cell office:value-type="float" office:value="-0.988888144493103" calcext:value-type="float">
            <text:p>-0.988888144493103</text:p>
          </table:table-cell>
          <table:table-cell office:value-type="float" office:value="0.999500215053558" calcext:value-type="float">
            <text:p>0.999500215053558</text:p>
          </table:table-cell>
          <table:table-cell office:value-type="float" office:value="0.277403801679611" calcext:value-type="float">
            <text:p>0.277403801679611</text:p>
          </table:table-cell>
          <table:table-cell office:value-type="float" office:value="0.319309622049332" calcext:value-type="float">
            <text:p>0.319309622049332</text:p>
          </table:table-cell>
          <table:table-cell office:value-type="float" office:value="-0.957010447978973" calcext:value-type="float">
            <text:p>-0.957010447978973</text:p>
          </table:table-cell>
          <table:table-cell office:value-type="float" office:value="0.99954229593277" calcext:value-type="float">
            <text:p>0.99954229593277</text:p>
          </table:table-cell>
          <table:table-cell office:value-type="float" office:value="0.736302554607391" calcext:value-type="float">
            <text:p>0.736302554607391</text:p>
          </table:table-cell>
          <table:table-cell office:value-type="float" office:value="1.20041930675507" calcext:value-type="float">
            <text:p>1.20041930675507</text:p>
          </table:table-cell>
          <table:table-cell office:value-type="float" office:value="0.0106100644916296" calcext:value-type="float">
            <text:p>0.0106100644916296</text:p>
          </table:table-cell>
          <table:table-cell office:value-type="float" office:value="0.0813635513186455" calcext:value-type="float">
            <text:p>0.0813635513186455</text:p>
          </table:table-cell>
          <table:table-cell office:value-type="float" office:value="0.408804416656494" calcext:value-type="float">
            <text:p>0.408804416656494</text:p>
          </table:table-cell>
          <table:table-cell office:value-type="float" office:value="1.19814240932465" calcext:value-type="float">
            <text:p>1.19814240932465</text:p>
          </table:table-cell>
          <table:table-cell office:value-type="float" office:value="-0.00129914714489132" calcext:value-type="float">
            <text:p>-0.00129914714489132</text:p>
          </table:table-cell>
          <table:table-cell office:value-type="float" office:value="0.0772383436560631" calcext:value-type="float">
            <text:p>0.07723834365606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SQRT(([.J284]-[.F284])^2+([.K284]-[.G284])^2)" office:value-type="float" office:value="0.545126537607992" calcext:value-type="float">
            <text:p>0.545126537607992</text:p>
          </table:table-cell>
          <table:table-cell table:formula="of:=SQRT(([.R284]-[.N284])^2+([.S284]-[.O284])^2)" office:value-type="float" office:value="0.327607759217591" calcext:value-type="float">
            <text:p>0.327607759217591</text:p>
          </table:table-cell>
          <table:table-cell table:formula="of:=SQRT(([.R284]-[.F284])^2+([.S284]-[.G284])^2)" office:value-type="float" office:value="1.01595318932124" calcext:value-type="float">
            <text:p>1.01595318932124</text:p>
          </table:table-cell>
          <table:table-cell table:formula="of:=SQRT(([.N284]-[.J284])^2+([.O284]-[.K284])^2)" office:value-type="float" office:value="0.998889218582453" calcext:value-type="float">
            <text:p>0.998889218582453</text:p>
          </table:table-cell>
          <table:table-cell office:value-type="float" office:value="0.821316540241242" calcext:value-type="float">
            <text:p>0.821316540241242</text:p>
          </table:table-cell>
          <table:table-cell office:value-type="float" office:value="0.273745983839035" calcext:value-type="float">
            <text:p>0.273745983839035</text:p>
          </table:table-cell>
          <table:table-cell office:value-type="float" office:value="-0.813437581062317" calcext:value-type="float">
            <text:p>-0.813437581062317</text:p>
          </table:table-cell>
          <table:table-cell office:value-type="float" office:value="0.99950236082077" calcext:value-type="float">
            <text:p>0.99950236082077</text:p>
          </table:table-cell>
          <table:table-cell office:value-type="float" office:value="0.277980387210846" calcext:value-type="float">
            <text:p>0.277980387210846</text:p>
          </table:table-cell>
          <table:table-cell office:value-type="float" office:value="0.317890822887421" calcext:value-type="float">
            <text:p>0.317890822887421</text:p>
          </table:table-cell>
          <table:table-cell office:value-type="float" office:value="-0.710645318031311" calcext:value-type="float">
            <text:p>-0.710645318031311</text:p>
          </table:table-cell>
          <table:table-cell office:value-type="float" office:value="0.999557435512543" calcext:value-type="float">
            <text:p>0.999557435512543</text:p>
          </table:table-cell>
          <table:table-cell office:value-type="float" office:value="0.736292064189911" calcext:value-type="float">
            <text:p>0.736292064189911</text:p>
          </table:table-cell>
          <table:table-cell office:value-type="float" office:value="1.20543241500855" calcext:value-type="float">
            <text:p>1.20543241500855</text:p>
          </table:table-cell>
          <table:table-cell office:value-type="float" office:value="0.0105541162192822" calcext:value-type="float">
            <text:p>0.0105541162192822</text:p>
          </table:table-cell>
          <table:table-cell office:value-type="float" office:value="0.0800648182630539" calcext:value-type="float">
            <text:p>0.0800648182630539</text:p>
          </table:table-cell>
          <table:table-cell office:value-type="float" office:value="0.408700883388519" calcext:value-type="float">
            <text:p>0.408700883388519</text:p>
          </table:table-cell>
          <table:table-cell office:value-type="float" office:value="1.20213663578033" calcext:value-type="float">
            <text:p>1.20213663578033</text:p>
          </table:table-cell>
          <table:table-cell office:value-type="float" office:value="-0.00125351431779563" calcext:value-type="float">
            <text:p>-0.00125351431779563</text:p>
          </table:table-cell>
          <table:table-cell office:value-type="float" office:value="0.0765740424394608" calcext:value-type="float">
            <text:p>0.07657404243946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SQRT(([.J285]-[.F285])^2+([.K285]-[.G285])^2)" office:value-type="float" office:value="0.542945544960224" calcext:value-type="float">
            <text:p>0.542945544960224</text:p>
          </table:table-cell>
          <table:table-cell table:formula="of:=SQRT(([.R285]-[.N285])^2+([.S285]-[.O285])^2)" office:value-type="float" office:value="0.32874229927655" calcext:value-type="float">
            <text:p>0.32874229927655</text:p>
          </table:table-cell>
          <table:table-cell table:formula="of:=SQRT(([.R285]-[.F285])^2+([.S285]-[.G285])^2)" office:value-type="float" office:value="1.01965798883488" calcext:value-type="float">
            <text:p>1.01965798883488</text:p>
          </table:table-cell>
          <table:table-cell table:formula="of:=SQRT(([.N285]-[.J285])^2+([.O285]-[.K285])^2)" office:value-type="float" office:value="1.00139772739952" calcext:value-type="float">
            <text:p>1.00139772739952</text:p>
          </table:table-cell>
          <table:table-cell office:value-type="float" office:value="0.819483578205109" calcext:value-type="float">
            <text:p>0.819483578205109</text:p>
          </table:table-cell>
          <table:table-cell office:value-type="float" office:value="0.27372419834137" calcext:value-type="float">
            <text:p>0.27372419834137</text:p>
          </table:table-cell>
          <table:table-cell office:value-type="float" office:value="-0.759328126907349" calcext:value-type="float">
            <text:p>-0.759328126907349</text:p>
          </table:table-cell>
          <table:table-cell office:value-type="float" office:value="0.999504446983337" calcext:value-type="float">
            <text:p>0.999504446983337</text:p>
          </table:table-cell>
          <table:table-cell office:value-type="float" office:value="0.278320074081421" calcext:value-type="float">
            <text:p>0.278320074081421</text:p>
          </table:table-cell>
          <table:table-cell office:value-type="float" office:value="0.317677885293961" calcext:value-type="float">
            <text:p>0.317677885293961</text:p>
          </table:table-cell>
          <table:table-cell office:value-type="float" office:value="-0.623318552970886" calcext:value-type="float">
            <text:p>-0.623318552970886</text:p>
          </table:table-cell>
          <table:table-cell office:value-type="float" office:value="0.99955278635025" calcext:value-type="float">
            <text:p>0.99955278635025</text:p>
          </table:table-cell>
          <table:table-cell office:value-type="float" office:value="0.73560893535614" calcext:value-type="float">
            <text:p>0.73560893535614</text:p>
          </table:table-cell>
          <table:table-cell office:value-type="float" office:value="1.20856750011444" calcext:value-type="float">
            <text:p>1.20856750011444</text:p>
          </table:table-cell>
          <table:table-cell office:value-type="float" office:value="0.0033658891916275" calcext:value-type="float">
            <text:p>0.0033658891916275</text:p>
          </table:table-cell>
          <table:table-cell office:value-type="float" office:value="0.0758117735385895" calcext:value-type="float">
            <text:p>0.0758117735385895</text:p>
          </table:table-cell>
          <table:table-cell office:value-type="float" office:value="0.406875371932983" calcext:value-type="float">
            <text:p>0.406875371932983</text:p>
          </table:table-cell>
          <table:table-cell office:value-type="float" office:value="1.20617091655731" calcext:value-type="float">
            <text:p>1.20617091655731</text:p>
          </table:table-cell>
          <table:table-cell office:value-type="float" office:value="0.00638055568560958" calcext:value-type="float">
            <text:p>0.00638055568560958</text:p>
          </table:table-cell>
          <table:table-cell office:value-type="float" office:value="0.0727462098002434" calcext:value-type="float">
            <text:p>0.07274620980024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SQRT(([.J286]-[.F286])^2+([.K286]-[.G286])^2)" office:value-type="float" office:value="0.542775983837579" calcext:value-type="float">
            <text:p>0.542775983837579</text:p>
          </table:table-cell>
          <table:table-cell table:formula="of:=SQRT(([.R286]-[.N286])^2+([.S286]-[.O286])^2)" office:value-type="float" office:value="0.329233733794836" calcext:value-type="float">
            <text:p>0.329233733794836</text:p>
          </table:table-cell>
          <table:table-cell table:formula="of:=SQRT(([.R286]-[.F286])^2+([.S286]-[.G286])^2)" office:value-type="float" office:value="1.02378339458951" calcext:value-type="float">
            <text:p>1.02378339458951</text:p>
          </table:table-cell>
          <table:table-cell table:formula="of:=SQRT(([.N286]-[.J286])^2+([.O286]-[.K286])^2)" office:value-type="float" office:value="1.00862361322134" calcext:value-type="float">
            <text:p>1.00862361322134</text:p>
          </table:table-cell>
          <table:table-cell office:value-type="float" office:value="0.819772839546204" calcext:value-type="float">
            <text:p>0.819772839546204</text:p>
          </table:table-cell>
          <table:table-cell office:value-type="float" office:value="0.28348907828331" calcext:value-type="float">
            <text:p>0.28348907828331</text:p>
          </table:table-cell>
          <table:table-cell office:value-type="float" office:value="-0.78208065032959" calcext:value-type="float">
            <text:p>-0.78208065032959</text:p>
          </table:table-cell>
          <table:table-cell office:value-type="float" office:value="0.999487400054932" calcext:value-type="float">
            <text:p>0.999487400054932</text:p>
          </table:table-cell>
          <table:table-cell office:value-type="float" office:value="0.278338372707367" calcext:value-type="float">
            <text:p>0.278338372707367</text:p>
          </table:table-cell>
          <table:table-cell office:value-type="float" office:value="0.32162681221962" calcext:value-type="float">
            <text:p>0.32162681221962</text:p>
          </table:table-cell>
          <table:table-cell office:value-type="float" office:value="-0.669993281364441" calcext:value-type="float">
            <text:p>-0.669993281364441</text:p>
          </table:table-cell>
          <table:table-cell office:value-type="float" office:value="0.999552130699158" calcext:value-type="float">
            <text:p>0.999552130699158</text:p>
          </table:table-cell>
          <table:table-cell office:value-type="float" office:value="0.735610544681549" calcext:value-type="float">
            <text:p>0.735610544681549</text:p>
          </table:table-cell>
          <table:table-cell office:value-type="float" office:value="1.22063946723938" calcext:value-type="float">
            <text:p>1.22063946723938</text:p>
          </table:table-cell>
          <table:table-cell office:value-type="float" office:value="0.00115665735211223" calcext:value-type="float">
            <text:p>0.00115665735211223</text:p>
          </table:table-cell>
          <table:table-cell office:value-type="float" office:value="0.074820801615715" calcext:value-type="float">
            <text:p>0.074820801615715</text:p>
          </table:table-cell>
          <table:table-cell office:value-type="float" office:value="0.406377255916595" calcext:value-type="float">
            <text:p>0.406377255916595</text:p>
          </table:table-cell>
          <table:table-cell office:value-type="float" office:value="1.22009813785553" calcext:value-type="float">
            <text:p>1.22009813785553</text:p>
          </table:table-cell>
          <table:table-cell office:value-type="float" office:value="0.00870198849588633" calcext:value-type="float">
            <text:p>0.00870198849588633</text:p>
          </table:table-cell>
          <table:table-cell office:value-type="float" office:value="0.0724112540483475" calcext:value-type="float">
            <text:p>0.07241125404834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SQRT(([.J287]-[.F287])^2+([.K287]-[.G287])^2)" office:value-type="float" office:value="0.542788678155086" calcext:value-type="float">
            <text:p>0.542788678155086</text:p>
          </table:table-cell>
          <table:table-cell table:formula="of:=SQRT(([.R287]-[.N287])^2+([.S287]-[.O287])^2)" office:value-type="float" office:value="0.329366607392847" calcext:value-type="float">
            <text:p>0.329366607392847</text:p>
          </table:table-cell>
          <table:table-cell table:formula="of:=SQRT(([.R287]-[.F287])^2+([.S287]-[.G287])^2)" office:value-type="float" office:value="1.02980684390384" calcext:value-type="float">
            <text:p>1.02980684390384</text:p>
          </table:table-cell>
          <table:table-cell table:formula="of:=SQRT(([.N287]-[.J287])^2+([.O287]-[.K287])^2)" office:value-type="float" office:value="1.01357834922115" calcext:value-type="float">
            <text:p>1.01357834922115</text:p>
          </table:table-cell>
          <table:table-cell office:value-type="float" office:value="0.818737387657166" calcext:value-type="float">
            <text:p>0.818737387657166</text:p>
          </table:table-cell>
          <table:table-cell office:value-type="float" office:value="0.282525569200516" calcext:value-type="float">
            <text:p>0.282525569200516</text:p>
          </table:table-cell>
          <table:table-cell office:value-type="float" office:value="-0.719811320304871" calcext:value-type="float">
            <text:p>-0.719811320304871</text:p>
          </table:table-cell>
          <table:table-cell office:value-type="float" office:value="0.999500215053558" calcext:value-type="float">
            <text:p>0.999500215053558</text:p>
          </table:table-cell>
          <table:table-cell office:value-type="float" office:value="0.277357190847397" calcext:value-type="float">
            <text:p>0.277357190847397</text:p>
          </table:table-cell>
          <table:table-cell office:value-type="float" office:value="0.321602821350098" calcext:value-type="float">
            <text:p>0.321602821350098</text:p>
          </table:table-cell>
          <table:table-cell office:value-type="float" office:value="-0.638056874275208" calcext:value-type="float">
            <text:p>-0.638056874275208</text:p>
          </table:table-cell>
          <table:table-cell office:value-type="float" office:value="0.999560058116913" calcext:value-type="float">
            <text:p>0.999560058116913</text:p>
          </table:table-cell>
          <table:table-cell office:value-type="float" office:value="0.735672116279602" calcext:value-type="float">
            <text:p>0.735672116279602</text:p>
          </table:table-cell>
          <table:table-cell office:value-type="float" office:value="1.22564291954041" calcext:value-type="float">
            <text:p>1.22564291954041</text:p>
          </table:table-cell>
          <table:table-cell office:value-type="float" office:value="0.000609018781688064" calcext:value-type="float">
            <text:p>0.000609018781688064</text:p>
          </table:table-cell>
          <table:table-cell office:value-type="float" office:value="0.0724668428301811" calcext:value-type="float">
            <text:p>0.0724668428301811</text:p>
          </table:table-cell>
          <table:table-cell office:value-type="float" office:value="0.406305879354477" calcext:value-type="float">
            <text:p>0.406305879354477</text:p>
          </table:table-cell>
          <table:table-cell office:value-type="float" office:value="1.2261369228363" calcext:value-type="float">
            <text:p>1.2261369228363</text:p>
          </table:table-cell>
          <table:table-cell office:value-type="float" office:value="0.0092579796910286" calcext:value-type="float">
            <text:p>0.0092579796910286</text:p>
          </table:table-cell>
          <table:table-cell office:value-type="float" office:value="0.0704200565814972" calcext:value-type="float">
            <text:p>0.07042005658149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SQRT(([.J288]-[.F288])^2+([.K288]-[.G288])^2)" office:value-type="float" office:value="0.53892911762133" calcext:value-type="float">
            <text:p>0.53892911762133</text:p>
          </table:table-cell>
          <table:table-cell table:formula="of:=SQRT(([.R288]-[.N288])^2+([.S288]-[.O288])^2)" office:value-type="float" office:value="0.329386882568567" calcext:value-type="float">
            <text:p>0.329386882568567</text:p>
          </table:table-cell>
          <table:table-cell table:formula="of:=SQRT(([.R288]-[.F288])^2+([.S288]-[.G288])^2)" office:value-type="float" office:value="1.02998465117911" calcext:value-type="float">
            <text:p>1.02998465117911</text:p>
          </table:table-cell>
          <table:table-cell table:formula="of:=SQRT(([.N288]-[.J288])^2+([.O288]-[.K288])^2)" office:value-type="float" office:value="1.01442107298947" calcext:value-type="float">
            <text:p>1.01442107298947</text:p>
          </table:table-cell>
          <table:table-cell office:value-type="float" office:value="0.814754366874695" calcext:value-type="float">
            <text:p>0.814754366874695</text:p>
          </table:table-cell>
          <table:table-cell office:value-type="float" office:value="0.280514091253281" calcext:value-type="float">
            <text:p>0.280514091253281</text:p>
          </table:table-cell>
          <table:table-cell office:value-type="float" office:value="-0.690817415714264" calcext:value-type="float">
            <text:p>-0.690817415714264</text:p>
          </table:table-cell>
          <table:table-cell office:value-type="float" office:value="0.99950647354126" calcext:value-type="float">
            <text:p>0.99950647354126</text:p>
          </table:table-cell>
          <table:table-cell office:value-type="float" office:value="0.277330577373505" calcext:value-type="float">
            <text:p>0.277330577373505</text:p>
          </table:table-cell>
          <table:table-cell office:value-type="float" office:value="0.320766597986221" calcext:value-type="float">
            <text:p>0.320766597986221</text:p>
          </table:table-cell>
          <table:table-cell office:value-type="float" office:value="-0.58523017168045" calcext:value-type="float">
            <text:p>-0.58523017168045</text:p>
          </table:table-cell>
          <table:table-cell office:value-type="float" office:value="0.999560594558716" calcext:value-type="float">
            <text:p>0.999560594558716</text:p>
          </table:table-cell>
          <table:table-cell office:value-type="float" office:value="0.73563826084137" calcext:value-type="float">
            <text:p>0.73563826084137</text:p>
          </table:table-cell>
          <table:table-cell office:value-type="float" office:value="1.22575509548187" calcext:value-type="float">
            <text:p>1.22575509548187</text:p>
          </table:table-cell>
          <table:table-cell office:value-type="float" office:value="0.000468007696326822" calcext:value-type="float">
            <text:p>0.000468007696326822</text:p>
          </table:table-cell>
          <table:table-cell office:value-type="float" office:value="0.0700628086924553" calcext:value-type="float">
            <text:p>0.0700628086924553</text:p>
          </table:table-cell>
          <table:table-cell office:value-type="float" office:value="0.406251490116119" calcext:value-type="float">
            <text:p>0.406251490116119</text:p>
          </table:table-cell>
          <table:table-cell office:value-type="float" office:value="1.22602653503418" calcext:value-type="float">
            <text:p>1.22602653503418</text:p>
          </table:table-cell>
          <table:table-cell office:value-type="float" office:value="0.00937024783343077" calcext:value-type="float">
            <text:p>0.00937024783343077</text:p>
          </table:table-cell>
          <table:table-cell office:value-type="float" office:value="0.0683847889304161" calcext:value-type="float">
            <text:p>0.06838478893041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SQRT(([.J289]-[.F289])^2+([.K289]-[.G289])^2)" office:value-type="float" office:value="0.538222144993832" calcext:value-type="float">
            <text:p>0.538222144993832</text:p>
          </table:table-cell>
          <table:table-cell table:formula="of:=SQRT(([.R289]-[.N289])^2+([.S289]-[.O289])^2)" office:value-type="float" office:value="0.329945950005104" calcext:value-type="float">
            <text:p>0.329945950005104</text:p>
          </table:table-cell>
          <table:table-cell table:formula="of:=SQRT(([.R289]-[.F289])^2+([.S289]-[.G289])^2)" office:value-type="float" office:value="1.03618544336361" calcext:value-type="float">
            <text:p>1.03618544336361</text:p>
          </table:table-cell>
          <table:table-cell table:formula="of:=SQRT(([.N289]-[.J289])^2+([.O289]-[.K289])^2)" office:value-type="float" office:value="1.01537125387846" calcext:value-type="float">
            <text:p>1.01537125387846</text:p>
          </table:table-cell>
          <table:table-cell office:value-type="float" office:value="0.814630329608917" calcext:value-type="float">
            <text:p>0.814630329608917</text:p>
          </table:table-cell>
          <table:table-cell office:value-type="float" office:value="0.272792339324951" calcext:value-type="float">
            <text:p>0.272792339324951</text:p>
          </table:table-cell>
          <table:table-cell office:value-type="float" office:value="-0.686396300792694" calcext:value-type="float">
            <text:p>-0.686396300792694</text:p>
          </table:table-cell>
          <table:table-cell office:value-type="float" office:value="0.999509751796722" calcext:value-type="float">
            <text:p>0.999509751796722</text:p>
          </table:table-cell>
          <table:table-cell office:value-type="float" office:value="0.27848607301712" calcext:value-type="float">
            <text:p>0.27848607301712</text:p>
          </table:table-cell>
          <table:table-cell office:value-type="float" office:value="0.320040762424469" calcext:value-type="float">
            <text:p>0.320040762424469</text:p>
          </table:table-cell>
          <table:table-cell office:value-type="float" office:value="-0.651164889335632" calcext:value-type="float">
            <text:p>-0.651164889335632</text:p>
          </table:table-cell>
          <table:table-cell office:value-type="float" office:value="0.999570786952972" calcext:value-type="float">
            <text:p>0.999570786952972</text:p>
          </table:table-cell>
          <table:table-cell office:value-type="float" office:value="0.738023936748505" calcext:value-type="float">
            <text:p>0.738023936748505</text:p>
          </table:table-cell>
          <table:table-cell office:value-type="float" office:value="1.22547090053558" calcext:value-type="float">
            <text:p>1.22547090053558</text:p>
          </table:table-cell>
          <table:table-cell office:value-type="float" office:value="0.00905144773423672" calcext:value-type="float">
            <text:p>0.00905144773423672</text:p>
          </table:table-cell>
          <table:table-cell office:value-type="float" office:value="0.0683067739009857" calcext:value-type="float">
            <text:p>0.0683067739009857</text:p>
          </table:table-cell>
          <table:table-cell office:value-type="float" office:value="0.408078253269196" calcext:value-type="float">
            <text:p>0.408078253269196</text:p>
          </table:table-cell>
          <table:table-cell office:value-type="float" office:value="1.22589027881622" calcext:value-type="float">
            <text:p>1.22589027881622</text:p>
          </table:table-cell>
          <table:table-cell office:value-type="float" office:value="0.000520638364832848" calcext:value-type="float">
            <text:p>0.000520638364832848</text:p>
          </table:table-cell>
          <table:table-cell office:value-type="float" office:value="0.0673977583646774" calcext:value-type="float">
            <text:p>0.06739775836467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SQRT(([.J290]-[.F290])^2+([.K290]-[.G290])^2)" office:value-type="float" office:value="0.535988302521959" calcext:value-type="float">
            <text:p>0.535988302521959</text:p>
          </table:table-cell>
          <table:table-cell table:formula="of:=SQRT(([.R290]-[.N290])^2+([.S290]-[.O290])^2)" office:value-type="float" office:value="0.327194022284511" calcext:value-type="float">
            <text:p>0.327194022284511</text:p>
          </table:table-cell>
          <table:table-cell table:formula="of:=SQRT(([.R290]-[.F290])^2+([.S290]-[.G290])^2)" office:value-type="float" office:value="1.03529174613433" calcext:value-type="float">
            <text:p>1.03529174613433</text:p>
          </table:table-cell>
          <table:table-cell table:formula="of:=SQRT(([.N290]-[.J290])^2+([.O290]-[.K290])^2)" office:value-type="float" office:value="1.01372635651568" calcext:value-type="float">
            <text:p>1.01372635651568</text:p>
          </table:table-cell>
          <table:table-cell office:value-type="float" office:value="0.812389731407166" calcext:value-type="float">
            <text:p>0.812389731407166</text:p>
          </table:table-cell>
          <table:table-cell office:value-type="float" office:value="0.272675096988678" calcext:value-type="float">
            <text:p>0.272675096988678</text:p>
          </table:table-cell>
          <table:table-cell office:value-type="float" office:value="-0.677440524101257" calcext:value-type="float">
            <text:p>-0.677440524101257</text:p>
          </table:table-cell>
          <table:table-cell office:value-type="float" office:value="0.999532341957092" calcext:value-type="float">
            <text:p>0.999532341957092</text:p>
          </table:table-cell>
          <table:table-cell office:value-type="float" office:value="0.278500139713287" calcext:value-type="float">
            <text:p>0.278500139713287</text:p>
          </table:table-cell>
          <table:table-cell office:value-type="float" office:value="0.3200603723526" calcext:value-type="float">
            <text:p>0.3200603723526</text:p>
          </table:table-cell>
          <table:table-cell office:value-type="float" office:value="-0.625978827476502" calcext:value-type="float">
            <text:p>-0.625978827476502</text:p>
          </table:table-cell>
          <table:table-cell office:value-type="float" office:value="0.999585688114166" calcext:value-type="float">
            <text:p>0.999585688114166</text:p>
          </table:table-cell>
          <table:table-cell office:value-type="float" office:value="0.735021114349365" calcext:value-type="float">
            <text:p>0.735021114349365</text:p>
          </table:table-cell>
          <table:table-cell office:value-type="float" office:value="1.22517347335815" calcext:value-type="float">
            <text:p>1.22517347335815</text:p>
          </table:table-cell>
          <table:table-cell office:value-type="float" office:value="0.00904362462460995" calcext:value-type="float">
            <text:p>0.00904362462460995</text:p>
          </table:table-cell>
          <table:table-cell office:value-type="float" office:value="0.0670630261301994" calcext:value-type="float">
            <text:p>0.0670630261301994</text:p>
          </table:table-cell>
          <table:table-cell office:value-type="float" office:value="0.407827436923981" calcext:value-type="float">
            <text:p>0.407827436923981</text:p>
          </table:table-cell>
          <table:table-cell office:value-type="float" office:value="1.22564852237701" calcext:value-type="float">
            <text:p>1.22564852237701</text:p>
          </table:table-cell>
          <table:table-cell office:value-type="float" office:value="0.000531144323758781" calcext:value-type="float">
            <text:p>0.000531144323758781</text:p>
          </table:table-cell>
          <table:table-cell office:value-type="float" office:value="0.0660233795642853" calcext:value-type="float">
            <text:p>0.06602337956428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SQRT(([.J291]-[.F291])^2+([.K291]-[.G291])^2)" office:value-type="float" office:value="0.534313774156509" calcext:value-type="float">
            <text:p>0.534313774156509</text:p>
          </table:table-cell>
          <table:table-cell table:formula="of:=SQRT(([.R291]-[.N291])^2+([.S291]-[.O291])^2)" office:value-type="float" office:value="0.330111856698897" calcext:value-type="float">
            <text:p>0.330111856698897</text:p>
          </table:table-cell>
          <table:table-cell table:formula="of:=SQRT(([.R291]-[.F291])^2+([.S291]-[.G291])^2)" office:value-type="float" office:value="1.03542249789957" calcext:value-type="float">
            <text:p>1.03542249789957</text:p>
          </table:table-cell>
          <table:table-cell table:formula="of:=SQRT(([.N291]-[.J291])^2+([.O291]-[.K291])^2)" office:value-type="float" office:value="1.01787647722522" calcext:value-type="float">
            <text:p>1.01787647722522</text:p>
          </table:table-cell>
          <table:table-cell office:value-type="float" office:value="0.812384605407715" calcext:value-type="float">
            <text:p>0.812384605407715</text:p>
          </table:table-cell>
          <table:table-cell office:value-type="float" office:value="0.270739078521729" calcext:value-type="float">
            <text:p>0.270739078521729</text:p>
          </table:table-cell>
          <table:table-cell office:value-type="float" office:value="-0.625861585140228" calcext:value-type="float">
            <text:p>-0.625861585140228</text:p>
          </table:table-cell>
          <table:table-cell office:value-type="float" office:value="0.999518573284149" calcext:value-type="float">
            <text:p>0.999518573284149</text:p>
          </table:table-cell>
          <table:table-cell office:value-type="float" office:value="0.280038058757782" calcext:value-type="float">
            <text:p>0.280038058757782</text:p>
          </table:table-cell>
          <table:table-cell office:value-type="float" office:value="0.316546976566315" calcext:value-type="float">
            <text:p>0.316546976566315</text:p>
          </table:table-cell>
          <table:table-cell office:value-type="float" office:value="-0.560216009616852" calcext:value-type="float">
            <text:p>-0.560216009616852</text:p>
          </table:table-cell>
          <table:table-cell office:value-type="float" office:value="0.999585270881653" calcext:value-type="float">
            <text:p>0.999585270881653</text:p>
          </table:table-cell>
          <table:table-cell office:value-type="float" office:value="0.73904675245285" calcext:value-type="float">
            <text:p>0.73904675245285</text:p>
          </table:table-cell>
          <table:table-cell office:value-type="float" office:value="1.225053191185" calcext:value-type="float">
            <text:p>1.225053191185</text:p>
          </table:table-cell>
          <table:table-cell office:value-type="float" office:value="0.00883715879172087" calcext:value-type="float">
            <text:p>0.00883715879172087</text:p>
          </table:table-cell>
          <table:table-cell office:value-type="float" office:value="0.0659049525856972" calcext:value-type="float">
            <text:p>0.0659049525856972</text:p>
          </table:table-cell>
          <table:table-cell office:value-type="float" office:value="0.408935695886612" calcext:value-type="float">
            <text:p>0.408935695886612</text:p>
          </table:table-cell>
          <table:table-cell office:value-type="float" office:value="1.22432637214661" calcext:value-type="float">
            <text:p>1.22432637214661</text:p>
          </table:table-cell>
          <table:table-cell office:value-type="float" office:value="0.000729153689462692" calcext:value-type="float">
            <text:p>0.000729153689462692</text:p>
          </table:table-cell>
          <table:table-cell office:value-type="float" office:value="0.0660148784518242" calcext:value-type="float">
            <text:p>0.06601487845182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SQRT(([.J292]-[.F292])^2+([.K292]-[.G292])^2)" office:value-type="float" office:value="0.532481769975891" calcext:value-type="float">
            <text:p>0.532481769975891</text:p>
          </table:table-cell>
          <table:table-cell table:formula="of:=SQRT(([.R292]-[.N292])^2+([.S292]-[.O292])^2)" office:value-type="float" office:value="0.325541480376053" calcext:value-type="float">
            <text:p>0.325541480376053</text:p>
          </table:table-cell>
          <table:table-cell table:formula="of:=SQRT(([.R292]-[.F292])^2+([.S292]-[.G292])^2)" office:value-type="float" office:value="1.03495757366673" calcext:value-type="float">
            <text:p>1.03495757366673</text:p>
          </table:table-cell>
          <table:table-cell table:formula="of:=SQRT(([.N292]-[.J292])^2+([.O292]-[.K292])^2)" office:value-type="float" office:value="1.01742049562705" calcext:value-type="float">
            <text:p>1.01742049562705</text:p>
          </table:table-cell>
          <table:table-cell office:value-type="float" office:value="0.810425400733948" calcext:value-type="float">
            <text:p>0.810425400733948</text:p>
          </table:table-cell>
          <table:table-cell office:value-type="float" office:value="0.269945532083511" calcext:value-type="float">
            <text:p>0.269945532083511</text:p>
          </table:table-cell>
          <table:table-cell office:value-type="float" office:value="-0.650460124015808" calcext:value-type="float">
            <text:p>-0.650460124015808</text:p>
          </table:table-cell>
          <table:table-cell office:value-type="float" office:value="0.99952232837677" calcext:value-type="float">
            <text:p>0.99952232837677</text:p>
          </table:table-cell>
          <table:table-cell office:value-type="float" office:value="0.280015826225281" calcext:value-type="float">
            <text:p>0.280015826225281</text:p>
          </table:table-cell>
          <table:table-cell office:value-type="float" office:value="0.316876530647278" calcext:value-type="float">
            <text:p>0.316876530647278</text:p>
          </table:table-cell>
          <table:table-cell office:value-type="float" office:value="-0.596877932548523" calcext:value-type="float">
            <text:p>-0.596877932548523</text:p>
          </table:table-cell>
          <table:table-cell office:value-type="float" office:value="0.999594032764435" calcext:value-type="float">
            <text:p>0.999594032764435</text:p>
          </table:table-cell>
          <table:table-cell office:value-type="float" office:value="0.739072322845459" calcext:value-type="float">
            <text:p>0.739072322845459</text:p>
          </table:table-cell>
          <table:table-cell office:value-type="float" office:value="1.22484767436981" calcext:value-type="float">
            <text:p>1.22484767436981</text:p>
          </table:table-cell>
          <table:table-cell office:value-type="float" office:value="0.018275199458003" calcext:value-type="float">
            <text:p>0.018275199458003</text:p>
          </table:table-cell>
          <table:table-cell office:value-type="float" office:value="0.0653931125998497" calcext:value-type="float">
            <text:p>0.0653931125998497</text:p>
          </table:table-cell>
          <table:table-cell office:value-type="float" office:value="0.413532167673111" calcext:value-type="float">
            <text:p>0.413532167673111</text:p>
          </table:table-cell>
          <table:table-cell office:value-type="float" office:value="1.22577655315399" calcext:value-type="float">
            <text:p>1.22577655315399</text:p>
          </table:table-cell>
          <table:table-cell office:value-type="float" office:value="-0.00906197540462017" calcext:value-type="float">
            <text:p>-0.00906197540462017</text:p>
          </table:table-cell>
          <table:table-cell office:value-type="float" office:value="0.0661066547036171" calcext:value-type="float">
            <text:p>0.066106654703617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SQRT(([.J293]-[.F293])^2+([.K293]-[.G293])^2)" office:value-type="float" office:value="0.533049707223339" calcext:value-type="float">
            <text:p>0.533049707223339</text:p>
          </table:table-cell>
          <table:table-cell table:formula="of:=SQRT(([.R293]-[.N293])^2+([.S293]-[.O293])^2)" office:value-type="float" office:value="0.326181198518297" calcext:value-type="float">
            <text:p>0.326181198518297</text:p>
          </table:table-cell>
          <table:table-cell table:formula="of:=SQRT(([.R293]-[.F293])^2+([.S293]-[.G293])^2)" office:value-type="float" office:value="1.03621630074771" calcext:value-type="float">
            <text:p>1.03621630074771</text:p>
          </table:table-cell>
          <table:table-cell table:formula="of:=SQRT(([.N293]-[.J293])^2+([.O293]-[.K293])^2)" office:value-type="float" office:value="1.02224507323004" calcext:value-type="float">
            <text:p>1.02224507323004</text:p>
          </table:table-cell>
          <table:table-cell office:value-type="float" office:value="0.810455620288849" calcext:value-type="float">
            <text:p>0.810455620288849</text:p>
          </table:table-cell>
          <table:table-cell office:value-type="float" office:value="0.269979417324066" calcext:value-type="float">
            <text:p>0.269979417324066</text:p>
          </table:table-cell>
          <table:table-cell office:value-type="float" office:value="-0.612976789474487" calcext:value-type="float">
            <text:p>-0.612976789474487</text:p>
          </table:table-cell>
          <table:table-cell office:value-type="float" office:value="0.999530375003815" calcext:value-type="float">
            <text:p>0.999530375003815</text:p>
          </table:table-cell>
          <table:table-cell office:value-type="float" office:value="0.279439866542816" calcext:value-type="float">
            <text:p>0.279439866542816</text:p>
          </table:table-cell>
          <table:table-cell office:value-type="float" office:value="0.316501021385193" calcext:value-type="float">
            <text:p>0.316501021385193</text:p>
          </table:table-cell>
          <table:table-cell office:value-type="float" office:value="-0.616519808769226" calcext:value-type="float">
            <text:p>-0.616519808769226</text:p>
          </table:table-cell>
          <table:table-cell office:value-type="float" office:value="0.999598264694214" calcext:value-type="float">
            <text:p>0.999598264694214</text:p>
          </table:table-cell>
          <table:table-cell office:value-type="float" office:value="0.738338768482208" calcext:value-type="float">
            <text:p>0.738338768482208</text:p>
          </table:table-cell>
          <table:table-cell office:value-type="float" office:value="1.2299542427063" calcext:value-type="float">
            <text:p>1.2299542427063</text:p>
          </table:table-cell>
          <table:table-cell office:value-type="float" office:value="0.0354226268827915" calcext:value-type="float">
            <text:p>0.0354226268827915</text:p>
          </table:table-cell>
          <table:table-cell office:value-type="float" office:value="0.0676853582262993" calcext:value-type="float">
            <text:p>0.0676853582262993</text:p>
          </table:table-cell>
          <table:table-cell office:value-type="float" office:value="0.412174850702286" calcext:value-type="float">
            <text:p>0.412174850702286</text:p>
          </table:table-cell>
          <table:table-cell office:value-type="float" office:value="1.2265967130661" calcext:value-type="float">
            <text:p>1.2265967130661</text:p>
          </table:table-cell>
          <table:table-cell office:value-type="float" office:value="-0.0265585370361805" calcext:value-type="float">
            <text:p>-0.0265585370361805</text:p>
          </table:table-cell>
          <table:table-cell office:value-type="float" office:value="0.0683954283595085" calcext:value-type="float">
            <text:p>0.06839542835950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SQRT(([.J294]-[.F294])^2+([.K294]-[.G294])^2)" office:value-type="float" office:value="0.532676628682758" calcext:value-type="float">
            <text:p>0.532676628682758</text:p>
          </table:table-cell>
          <table:table-cell table:formula="of:=SQRT(([.R294]-[.N294])^2+([.S294]-[.O294])^2)" office:value-type="float" office:value="0.32857140438995" calcext:value-type="float">
            <text:p>0.32857140438995</text:p>
          </table:table-cell>
          <table:table-cell table:formula="of:=SQRT(([.R294]-[.F294])^2+([.S294]-[.G294])^2)" office:value-type="float" office:value="1.03527769026925" calcext:value-type="float">
            <text:p>1.03527769026925</text:p>
          </table:table-cell>
          <table:table-cell table:formula="of:=SQRT(([.N294]-[.J294])^2+([.O294]-[.K294])^2)" office:value-type="float" office:value="1.0220572403869" calcext:value-type="float">
            <text:p>1.0220572403869</text:p>
          </table:table-cell>
          <table:table-cell office:value-type="float" office:value="0.811249077320099" calcext:value-type="float">
            <text:p>0.811249077320099</text:p>
          </table:table-cell>
          <table:table-cell office:value-type="float" office:value="0.272214144468308" calcext:value-type="float">
            <text:p>0.272214144468308</text:p>
          </table:table-cell>
          <table:table-cell office:value-type="float" office:value="-0.603906333446503" calcext:value-type="float">
            <text:p>-0.603906333446503</text:p>
          </table:table-cell>
          <table:table-cell office:value-type="float" office:value="0.99953705072403" calcext:value-type="float">
            <text:p>0.99953705072403</text:p>
          </table:table-cell>
          <table:table-cell office:value-type="float" office:value="0.280380666255951" calcext:value-type="float">
            <text:p>0.280380666255951</text:p>
          </table:table-cell>
          <table:table-cell office:value-type="float" office:value="0.316067546606064" calcext:value-type="float">
            <text:p>0.316067546606064</text:p>
          </table:table-cell>
          <table:table-cell office:value-type="float" office:value="-0.525456964969635" calcext:value-type="float">
            <text:p>-0.525456964969635</text:p>
          </table:table-cell>
          <table:table-cell office:value-type="float" office:value="0.99959671497345" calcext:value-type="float">
            <text:p>0.99959671497345</text:p>
          </table:table-cell>
          <table:table-cell office:value-type="float" office:value="0.738312125205994" calcext:value-type="float">
            <text:p>0.738312125205994</text:p>
          </table:table-cell>
          <table:table-cell office:value-type="float" office:value="1.22979605197907" calcext:value-type="float">
            <text:p>1.22979605197907</text:p>
          </table:table-cell>
          <table:table-cell office:value-type="float" office:value="0.0260494891554117" calcext:value-type="float">
            <text:p>0.0260494891554117</text:p>
          </table:table-cell>
          <table:table-cell office:value-type="float" office:value="0.0664648935198784" calcext:value-type="float">
            <text:p>0.0664648935198784</text:p>
          </table:table-cell>
          <table:table-cell office:value-type="float" office:value="0.409757554531097" calcext:value-type="float">
            <text:p>0.409757554531097</text:p>
          </table:table-cell>
          <table:table-cell office:value-type="float" office:value="1.2264701128006" calcext:value-type="float">
            <text:p>1.2264701128006</text:p>
          </table:table-cell>
          <table:table-cell office:value-type="float" office:value="-0.016073290258646" calcext:value-type="float">
            <text:p>-0.016073290258646</text:p>
          </table:table-cell>
          <table:table-cell office:value-type="float" office:value="0.0673733130097389" calcext:value-type="float">
            <text:p>0.06737331300973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SQRT(([.J295]-[.F295])^2+([.K295]-[.G295])^2)" office:value-type="float" office:value="0.531859756041402" calcext:value-type="float">
            <text:p>0.531859756041402</text:p>
          </table:table-cell>
          <table:table-cell table:formula="of:=SQRT(([.R295]-[.N295])^2+([.S295]-[.O295])^2)" office:value-type="float" office:value="0.326741198555876" calcext:value-type="float">
            <text:p>0.326741198555876</text:p>
          </table:table-cell>
          <table:table-cell table:formula="of:=SQRT(([.R295]-[.F295])^2+([.S295]-[.G295])^2)" office:value-type="float" office:value="1.03080078774672" calcext:value-type="float">
            <text:p>1.03080078774672</text:p>
          </table:table-cell>
          <table:table-cell table:formula="of:=SQRT(([.N295]-[.J295])^2+([.O295]-[.K295])^2)" office:value-type="float" office:value="1.01613640310924" calcext:value-type="float">
            <text:p>1.01613640310924</text:p>
          </table:table-cell>
          <table:table-cell office:value-type="float" office:value="0.811534881591797" calcext:value-type="float">
            <text:p>0.811534881591797</text:p>
          </table:table-cell>
          <table:table-cell office:value-type="float" office:value="0.270009160041809" calcext:value-type="float">
            <text:p>0.270009160041809</text:p>
          </table:table-cell>
          <table:table-cell office:value-type="float" office:value="-0.650674700737" calcext:value-type="float">
            <text:p>-0.650674700737</text:p>
          </table:table-cell>
          <table:table-cell office:value-type="float" office:value="0.999557971954346" calcext:value-type="float">
            <text:p>0.999557971954346</text:p>
          </table:table-cell>
          <table:table-cell office:value-type="float" office:value="0.281535923480988" calcext:value-type="float">
            <text:p>0.281535923480988</text:p>
          </table:table-cell>
          <table:table-cell office:value-type="float" office:value="0.314460307359695" calcext:value-type="float">
            <text:p>0.314460307359695</text:p>
          </table:table-cell>
          <table:table-cell office:value-type="float" office:value="-0.570543825626373" calcext:value-type="float">
            <text:p>-0.570543825626373</text:p>
          </table:table-cell>
          <table:table-cell office:value-type="float" office:value="0.99960869550705" calcext:value-type="float">
            <text:p>0.99960869550705</text:p>
          </table:table-cell>
          <table:table-cell office:value-type="float" office:value="0.739205121994019" calcext:value-type="float">
            <text:p>0.739205121994019</text:p>
          </table:table-cell>
          <table:table-cell office:value-type="float" office:value="1.22169351577759" calcext:value-type="float">
            <text:p>1.22169351577759</text:p>
          </table:table-cell>
          <table:table-cell office:value-type="float" office:value="0.0234719552099705" calcext:value-type="float">
            <text:p>0.0234719552099705</text:p>
          </table:table-cell>
          <table:table-cell office:value-type="float" office:value="0.0650691539049149" calcext:value-type="float">
            <text:p>0.0650691539049149</text:p>
          </table:table-cell>
          <table:table-cell office:value-type="float" office:value="0.412466377019882" calcext:value-type="float">
            <text:p>0.412466377019882</text:p>
          </table:table-cell>
          <table:table-cell office:value-type="float" office:value="1.22042727470398" calcext:value-type="float">
            <text:p>1.22042727470398</text:p>
          </table:table-cell>
          <table:table-cell office:value-type="float" office:value="-0.0131635945290327" calcext:value-type="float">
            <text:p>-0.0131635945290327</text:p>
          </table:table-cell>
          <table:table-cell office:value-type="float" office:value="0.0656770020723343" calcext:value-type="float">
            <text:p>0.06567700207233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SQRT(([.J296]-[.F296])^2+([.K296]-[.G296])^2)" office:value-type="float" office:value="0.533762790874155" calcext:value-type="float">
            <text:p>0.533762790874155</text:p>
          </table:table-cell>
          <table:table-cell table:formula="of:=SQRT(([.R296]-[.N296])^2+([.S296]-[.O296])^2)" office:value-type="float" office:value="0.327077680880924" calcext:value-type="float">
            <text:p>0.327077680880924</text:p>
          </table:table-cell>
          <table:table-cell table:formula="of:=SQRT(([.R296]-[.F296])^2+([.S296]-[.G296])^2)" office:value-type="float" office:value="1.02322829457641" calcext:value-type="float">
            <text:p>1.02322829457641</text:p>
          </table:table-cell>
          <table:table-cell table:formula="of:=SQRT(([.N296]-[.J296])^2+([.O296]-[.K296])^2)" office:value-type="float" office:value="1.01453018804693" calcext:value-type="float">
            <text:p>1.01453018804693</text:p>
          </table:table-cell>
          <table:table-cell office:value-type="float" office:value="0.81387186050415" calcext:value-type="float">
            <text:p>0.81387186050415</text:p>
          </table:table-cell>
          <table:table-cell office:value-type="float" office:value="0.270919680595398" calcext:value-type="float">
            <text:p>0.270919680595398</text:p>
          </table:table-cell>
          <table:table-cell office:value-type="float" office:value="-0.929173350334168" calcext:value-type="float">
            <text:p>-0.929173350334168</text:p>
          </table:table-cell>
          <table:table-cell office:value-type="float" office:value="0.99955940246582" calcext:value-type="float">
            <text:p>0.99955940246582</text:p>
          </table:table-cell>
          <table:table-cell office:value-type="float" office:value="0.281722128391266" calcext:value-type="float">
            <text:p>0.281722128391266</text:p>
          </table:table-cell>
          <table:table-cell office:value-type="float" office:value="0.312385082244873" calcext:value-type="float">
            <text:p>0.312385082244873</text:p>
          </table:table-cell>
          <table:table-cell office:value-type="float" office:value="-0.85473096370697" calcext:value-type="float">
            <text:p>-0.85473096370697</text:p>
          </table:table-cell>
          <table:table-cell office:value-type="float" office:value="0.999615073204041" calcext:value-type="float">
            <text:p>0.999615073204041</text:p>
          </table:table-cell>
          <table:table-cell office:value-type="float" office:value="0.73918217420578" calcext:value-type="float">
            <text:p>0.73918217420578</text:p>
          </table:table-cell>
          <table:table-cell office:value-type="float" office:value="1.21792459487915" calcext:value-type="float">
            <text:p>1.21792459487915</text:p>
          </table:table-cell>
          <table:table-cell office:value-type="float" office:value="0.022827310487628" calcext:value-type="float">
            <text:p>0.022827310487628</text:p>
          </table:table-cell>
          <table:table-cell office:value-type="float" office:value="0.0668792948126793" calcext:value-type="float">
            <text:p>0.0668792948126793</text:p>
          </table:table-cell>
          <table:table-cell office:value-type="float" office:value="0.412158250808716" calcext:value-type="float">
            <text:p>0.412158250808716</text:p>
          </table:table-cell>
          <table:table-cell office:value-type="float" office:value="1.21199476718903" calcext:value-type="float">
            <text:p>1.21199476718903</text:p>
          </table:table-cell>
          <table:table-cell office:value-type="float" office:value="-0.0125783979892731" calcext:value-type="float">
            <text:p>-0.0125783979892731</text:p>
          </table:table-cell>
          <table:table-cell office:value-type="float" office:value="0.0674694776535034" calcext:value-type="float">
            <text:p>0.06746947765350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SQRT(([.J297]-[.F297])^2+([.K297]-[.G297])^2)" office:value-type="float" office:value="0.536026022193772" calcext:value-type="float">
            <text:p>0.536026022193772</text:p>
          </table:table-cell>
          <table:table-cell table:formula="of:=SQRT(([.R297]-[.N297])^2+([.S297]-[.O297])^2)" office:value-type="float" office:value="0.331220226776661" calcext:value-type="float">
            <text:p>0.331220226776661</text:p>
          </table:table-cell>
          <table:table-cell table:formula="of:=SQRT(([.R297]-[.F297])^2+([.S297]-[.G297])^2)" office:value-type="float" office:value="1.01772283393033" calcext:value-type="float">
            <text:p>1.01772283393033</text:p>
          </table:table-cell>
          <table:table-cell table:formula="of:=SQRT(([.N297]-[.J297])^2+([.O297]-[.K297])^2)" office:value-type="float" office:value="1.00998312719968" calcext:value-type="float">
            <text:p>1.00998312719968</text:p>
          </table:table-cell>
          <table:table-cell office:value-type="float" office:value="0.816210627555847" calcext:value-type="float">
            <text:p>0.816210627555847</text:p>
          </table:table-cell>
          <table:table-cell office:value-type="float" office:value="0.270936757326126" calcext:value-type="float">
            <text:p>0.270936757326126</text:p>
          </table:table-cell>
          <table:table-cell office:value-type="float" office:value="-1.0838897228241" calcext:value-type="float">
            <text:p>-1.0838897228241</text:p>
          </table:table-cell>
          <table:table-cell office:value-type="float" office:value="0.999554514884949" calcext:value-type="float">
            <text:p>0.999554514884949</text:p>
          </table:table-cell>
          <table:table-cell office:value-type="float" office:value="0.281716257333756" calcext:value-type="float">
            <text:p>0.281716257333756</text:p>
          </table:table-cell>
          <table:table-cell office:value-type="float" office:value="0.311429530382156" calcext:value-type="float">
            <text:p>0.311429530382156</text:p>
          </table:table-cell>
          <table:table-cell office:value-type="float" office:value="-1.00259232521057" calcext:value-type="float">
            <text:p>-1.00259232521057</text:p>
          </table:table-cell>
          <table:table-cell office:value-type="float" office:value="0.999617755413055" calcext:value-type="float">
            <text:p>0.999617755413055</text:p>
          </table:table-cell>
          <table:table-cell office:value-type="float" office:value="0.743261992931366" calcext:value-type="float">
            <text:p>0.743261992931366</text:p>
          </table:table-cell>
          <table:table-cell office:value-type="float" office:value="1.20978438854218" calcext:value-type="float">
            <text:p>1.20978438854218</text:p>
          </table:table-cell>
          <table:table-cell office:value-type="float" office:value="0.0176989622414112" calcext:value-type="float">
            <text:p>0.0176989622414112</text:p>
          </table:table-cell>
          <table:table-cell office:value-type="float" office:value="0.0655674338340759" calcext:value-type="float">
            <text:p>0.0655674338340759</text:p>
          </table:table-cell>
          <table:table-cell office:value-type="float" office:value="0.412076622247696" calcext:value-type="float">
            <text:p>0.412076622247696</text:p>
          </table:table-cell>
          <table:table-cell office:value-type="float" office:value="1.20497930049896" calcext:value-type="float">
            <text:p>1.20497930049896</text:p>
          </table:table-cell>
          <table:table-cell office:value-type="float" office:value="-0.00728564616292715" calcext:value-type="float">
            <text:p>-0.00728564616292715</text:p>
          </table:table-cell>
          <table:table-cell office:value-type="float" office:value="0.0661132335662842" calcext:value-type="float">
            <text:p>0.06611323356628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SQRT(([.J298]-[.F298])^2+([.K298]-[.G298])^2)" office:value-type="float" office:value="0.536022922542026" calcext:value-type="float">
            <text:p>0.536022922542026</text:p>
          </table:table-cell>
          <table:table-cell table:formula="of:=SQRT(([.R298]-[.N298])^2+([.S298]-[.O298])^2)" office:value-type="float" office:value="0.311219076340599" calcext:value-type="float">
            <text:p>0.311219076340599</text:p>
          </table:table-cell>
          <table:table-cell table:formula="of:=SQRT(([.R298]-[.F298])^2+([.S298]-[.G298])^2)" office:value-type="float" office:value="1.00855099799663" calcext:value-type="float">
            <text:p>1.00855099799663</text:p>
          </table:table-cell>
          <table:table-cell table:formula="of:=SQRT(([.N298]-[.J298])^2+([.O298]-[.K298])^2)" office:value-type="float" office:value="0.989839206360602" calcext:value-type="float">
            <text:p>0.989839206360602</text:p>
          </table:table-cell>
          <table:table-cell office:value-type="float" office:value="0.816003203392029" calcext:value-type="float">
            <text:p>0.816003203392029</text:p>
          </table:table-cell>
          <table:table-cell office:value-type="float" office:value="0.263743072748184" calcext:value-type="float">
            <text:p>0.263743072748184</text:p>
          </table:table-cell>
          <table:table-cell office:value-type="float" office:value="-0.687452733516693" calcext:value-type="float">
            <text:p>-0.687452733516693</text:p>
          </table:table-cell>
          <table:table-cell office:value-type="float" office:value="0.999549984931946" calcext:value-type="float">
            <text:p>0.999549984931946</text:p>
          </table:table-cell>
          <table:table-cell office:value-type="float" office:value="0.281719505786896" calcext:value-type="float">
            <text:p>0.281719505786896</text:p>
          </table:table-cell>
          <table:table-cell office:value-type="float" office:value="0.306888222694397" calcext:value-type="float">
            <text:p>0.306888222694397</text:p>
          </table:table-cell>
          <table:table-cell office:value-type="float" office:value="-0.658781468868256" calcext:value-type="float">
            <text:p>-0.658781468868256</text:p>
          </table:table-cell>
          <table:table-cell office:value-type="float" office:value="0.999629974365234" calcext:value-type="float">
            <text:p>0.999629974365234</text:p>
          </table:table-cell>
          <table:table-cell office:value-type="float" office:value="0.735642850399017" calcext:value-type="float">
            <text:p>0.735642850399017</text:p>
          </table:table-cell>
          <table:table-cell office:value-type="float" office:value="1.18651044368744" calcext:value-type="float">
            <text:p>1.18651044368744</text:p>
          </table:table-cell>
          <table:table-cell office:value-type="float" office:value="0.0140911536291242" calcext:value-type="float">
            <text:p>0.0140911536291242</text:p>
          </table:table-cell>
          <table:table-cell office:value-type="float" office:value="0.0644865408539772" calcext:value-type="float">
            <text:p>0.0644865408539772</text:p>
          </table:table-cell>
          <table:table-cell office:value-type="float" office:value="0.424495756626129" calcext:value-type="float">
            <text:p>0.424495756626129</text:p>
          </table:table-cell>
          <table:table-cell office:value-type="float" office:value="1.19320368766785" calcext:value-type="float">
            <text:p>1.19320368766785</text:p>
          </table:table-cell>
          <table:table-cell office:value-type="float" office:value="-0.00418389262631536" calcext:value-type="float">
            <text:p>-0.00418389262631536</text:p>
          </table:table-cell>
          <table:table-cell office:value-type="float" office:value="0.0667829588055611" calcext:value-type="float">
            <text:p>0.06678295880556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SQRT(([.J299]-[.F299])^2+([.K299]-[.G299])^2)" office:value-type="float" office:value="0.534579274167255" calcext:value-type="float">
            <text:p>0.534579274167255</text:p>
          </table:table-cell>
          <table:table-cell table:formula="of:=SQRT(([.R299]-[.N299])^2+([.S299]-[.O299])^2)" office:value-type="float" office:value="0.304283337777531" calcext:value-type="float">
            <text:p>0.304283337777531</text:p>
          </table:table-cell>
          <table:table-cell table:formula="of:=SQRT(([.R299]-[.F299])^2+([.S299]-[.G299])^2)" office:value-type="float" office:value="1.01395612834764" calcext:value-type="float">
            <text:p>1.01395612834764</text:p>
          </table:table-cell>
          <table:table-cell table:formula="of:=SQRT(([.N299]-[.J299])^2+([.O299]-[.K299])^2)" office:value-type="float" office:value="0.979058853269609" calcext:value-type="float">
            <text:p>0.979058853269609</text:p>
          </table:table-cell>
          <table:table-cell office:value-type="float" office:value="0.814653992652893" calcext:value-type="float">
            <text:p>0.814653992652893</text:p>
          </table:table-cell>
          <table:table-cell office:value-type="float" office:value="0.258443087339401" calcext:value-type="float">
            <text:p>0.258443087339401</text:p>
          </table:table-cell>
          <table:table-cell office:value-type="float" office:value="-0.53327476978302" calcext:value-type="float">
            <text:p>-0.53327476978302</text:p>
          </table:table-cell>
          <table:table-cell office:value-type="float" office:value="0.999460816383362" calcext:value-type="float">
            <text:p>0.999460816383362</text:p>
          </table:table-cell>
          <table:table-cell office:value-type="float" office:value="0.281624227762222" calcext:value-type="float">
            <text:p>0.281624227762222</text:p>
          </table:table-cell>
          <table:table-cell office:value-type="float" office:value="0.299115806818008" calcext:value-type="float">
            <text:p>0.299115806818008</text:p>
          </table:table-cell>
          <table:table-cell office:value-type="float" office:value="-0.540809273719788" calcext:value-type="float">
            <text:p>-0.540809273719788</text:p>
          </table:table-cell>
          <table:table-cell office:value-type="float" office:value="0.999589502811432" calcext:value-type="float">
            <text:p>0.999589502811432</text:p>
          </table:table-cell>
          <table:table-cell office:value-type="float" office:value="0.720795273780823" calcext:value-type="float">
            <text:p>0.720795273780823</text:p>
          </table:table-cell>
          <table:table-cell office:value-type="float" office:value="1.17415010929108" calcext:value-type="float">
            <text:p>1.17415010929108</text:p>
          </table:table-cell>
          <table:table-cell office:value-type="float" office:value="0.0219389572739601" calcext:value-type="float">
            <text:p>0.0219389572739601</text:p>
          </table:table-cell>
          <table:table-cell office:value-type="float" office:value="0.07993483543396" calcext:value-type="float">
            <text:p>0.07993483543396</text:p>
          </table:table-cell>
          <table:table-cell office:value-type="float" office:value="0.416987985372543" calcext:value-type="float">
            <text:p>0.416987985372543</text:p>
          </table:table-cell>
          <table:table-cell office:value-type="float" office:value="1.19116425514221" calcext:value-type="float">
            <text:p>1.19116425514221</text:p>
          </table:table-cell>
          <table:table-cell office:value-type="float" office:value="-0.0134664131328464" calcext:value-type="float">
            <text:p>-0.0134664131328464</text:p>
          </table:table-cell>
          <table:table-cell office:value-type="float" office:value="0.0856770351529121" calcext:value-type="float">
            <text:p>0.08567703515291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SQRT(([.J300]-[.F300])^2+([.K300]-[.G300])^2)" office:value-type="float" office:value="0.533963653963226" calcext:value-type="float">
            <text:p>0.533963653963226</text:p>
          </table:table-cell>
          <table:table-cell table:formula="of:=SQRT(([.R300]-[.N300])^2+([.S300]-[.O300])^2)" office:value-type="float" office:value="0.320029097389143" calcext:value-type="float">
            <text:p>0.320029097389143</text:p>
          </table:table-cell>
          <table:table-cell table:formula="of:=SQRT(([.R300]-[.F300])^2+([.S300]-[.G300])^2)" office:value-type="float" office:value="1.01796096498608" calcext:value-type="float">
            <text:p>1.01796096498608</text:p>
          </table:table-cell>
          <table:table-cell table:formula="of:=SQRT(([.N300]-[.J300])^2+([.O300]-[.K300])^2)" office:value-type="float" office:value="0.986562750164562" calcext:value-type="float">
            <text:p>0.986562750164562</text:p>
          </table:table-cell>
          <table:table-cell office:value-type="float" office:value="0.814965844154358" calcext:value-type="float">
            <text:p>0.814965844154358</text:p>
          </table:table-cell>
          <table:table-cell office:value-type="float" office:value="0.257559329271317" calcext:value-type="float">
            <text:p>0.257559329271317</text:p>
          </table:table-cell>
          <table:table-cell office:value-type="float" office:value="-0.6014124751091" calcext:value-type="float">
            <text:p>-0.6014124751091</text:p>
          </table:table-cell>
          <table:table-cell office:value-type="float" office:value="0.99942409992218" calcext:value-type="float">
            <text:p>0.99942409992218</text:p>
          </table:table-cell>
          <table:table-cell office:value-type="float" office:value="0.282482296228409" calcext:value-type="float">
            <text:p>0.282482296228409</text:p>
          </table:table-cell>
          <table:table-cell office:value-type="float" office:value="0.297289103269577" calcext:value-type="float">
            <text:p>0.297289103269577</text:p>
          </table:table-cell>
          <table:table-cell office:value-type="float" office:value="-0.66105842590332" calcext:value-type="float">
            <text:p>-0.66105842590332</text:p>
          </table:table-cell>
          <table:table-cell office:value-type="float" office:value="0.999593079090118" calcext:value-type="float">
            <text:p>0.999593079090118</text:p>
          </table:table-cell>
          <table:table-cell office:value-type="float" office:value="0.730256140232086" calcext:value-type="float">
            <text:p>0.730256140232086</text:p>
          </table:table-cell>
          <table:table-cell office:value-type="float" office:value="1.17638218402863" calcext:value-type="float">
            <text:p>1.17638218402863</text:p>
          </table:table-cell>
          <table:table-cell office:value-type="float" office:value="0.0264702402055264" calcext:value-type="float">
            <text:p>0.0264702402055264</text:p>
          </table:table-cell>
          <table:table-cell office:value-type="float" office:value="0.0850832760334015" calcext:value-type="float">
            <text:p>0.0850832760334015</text:p>
          </table:table-cell>
          <table:table-cell office:value-type="float" office:value="0.410596698522568" calcext:value-type="float">
            <text:p>0.410596698522568</text:p>
          </table:table-cell>
          <table:table-cell office:value-type="float" office:value="1.19175958633423" calcext:value-type="float">
            <text:p>1.19175958633423</text:p>
          </table:table-cell>
          <table:table-cell office:value-type="float" office:value="-0.0174713153392077" calcext:value-type="float">
            <text:p>-0.0174713153392077</text:p>
          </table:table-cell>
          <table:table-cell office:value-type="float" office:value="0.0941827744245529" calcext:value-type="float">
            <text:p>0.0941827744245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SQRT(([.J301]-[.F301])^2+([.K301]-[.G301])^2)" office:value-type="float" office:value="0.535459004134044" calcext:value-type="float">
            <text:p>0.535459004134044</text:p>
          </table:table-cell>
          <table:table-cell table:formula="of:=SQRT(([.R301]-[.N301])^2+([.S301]-[.O301])^2)" office:value-type="float" office:value="0.338695102340895" calcext:value-type="float">
            <text:p>0.338695102340895</text:p>
          </table:table-cell>
          <table:table-cell table:formula="of:=SQRT(([.R301]-[.F301])^2+([.S301]-[.G301])^2)" office:value-type="float" office:value="1.046370358255" calcext:value-type="float">
            <text:p>1.046370358255</text:p>
          </table:table-cell>
          <table:table-cell table:formula="of:=SQRT(([.N301]-[.J301])^2+([.O301]-[.K301])^2)" office:value-type="float" office:value="1.02888348326286" calcext:value-type="float">
            <text:p>1.02888348326286</text:p>
          </table:table-cell>
          <table:table-cell office:value-type="float" office:value="0.81617671251297" calcext:value-type="float">
            <text:p>0.81617671251297</text:p>
          </table:table-cell>
          <table:table-cell office:value-type="float" office:value="0.257497727870941" calcext:value-type="float">
            <text:p>0.257497727870941</text:p>
          </table:table-cell>
          <table:table-cell office:value-type="float" office:value="-0.87485533952713" calcext:value-type="float">
            <text:p>-0.87485533952713</text:p>
          </table:table-cell>
          <table:table-cell office:value-type="float" office:value="0.999446094036102" calcext:value-type="float">
            <text:p>0.999446094036102</text:p>
          </table:table-cell>
          <table:table-cell office:value-type="float" office:value="0.281275779008865" calcext:value-type="float">
            <text:p>0.281275779008865</text:p>
          </table:table-cell>
          <table:table-cell office:value-type="float" office:value="0.281938195228577" calcext:value-type="float">
            <text:p>0.281938195228577</text:p>
          </table:table-cell>
          <table:table-cell office:value-type="float" office:value="-0.853293299674988" calcext:value-type="float">
            <text:p>-0.853293299674988</text:p>
          </table:table-cell>
          <table:table-cell office:value-type="float" office:value="0.999619603157044" calcext:value-type="float">
            <text:p>0.999619603157044</text:p>
          </table:table-cell>
          <table:table-cell office:value-type="float" office:value="0.730361223220825" calcext:value-type="float">
            <text:p>0.730361223220825</text:p>
          </table:table-cell>
          <table:table-cell office:value-type="float" office:value="1.20763981342316" calcext:value-type="float">
            <text:p>1.20763981342316</text:p>
          </table:table-cell>
          <table:table-cell office:value-type="float" office:value="0.0275706108659506" calcext:value-type="float">
            <text:p>0.0275706108659506</text:p>
          </table:table-cell>
          <table:table-cell office:value-type="float" office:value="0.0802739709615707" calcext:value-type="float">
            <text:p>0.0802739709615707</text:p>
          </table:table-cell>
          <table:table-cell office:value-type="float" office:value="0.391724228858948" calcext:value-type="float">
            <text:p>0.391724228858948</text:p>
          </table:table-cell>
          <table:table-cell office:value-type="float" office:value="1.21391344070435" calcext:value-type="float">
            <text:p>1.21391344070435</text:p>
          </table:table-cell>
          <table:table-cell office:value-type="float" office:value="-0.0179572943598032" calcext:value-type="float">
            <text:p>-0.0179572943598032</text:p>
          </table:table-cell>
          <table:table-cell office:value-type="float" office:value="0.0902321115136147" calcext:value-type="float">
            <text:p>0.09023211151361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SQRT(([.J302]-[.F302])^2+([.K302]-[.G302])^2)" office:value-type="float" office:value="0.540703156153639" calcext:value-type="float">
            <text:p>0.540703156153639</text:p>
          </table:table-cell>
          <table:table-cell table:formula="of:=SQRT(([.R302]-[.N302])^2+([.S302]-[.O302])^2)" office:value-type="float" office:value="0.349386201044325" calcext:value-type="float">
            <text:p>0.349386201044325</text:p>
          </table:table-cell>
          <table:table-cell table:formula="of:=SQRT(([.R302]-[.F302])^2+([.S302]-[.G302])^2)" office:value-type="float" office:value="1.06393761070655" calcext:value-type="float">
            <text:p>1.06393761070655</text:p>
          </table:table-cell>
          <table:table-cell table:formula="of:=SQRT(([.N302]-[.J302])^2+([.O302]-[.K302])^2)" office:value-type="float" office:value="1.04373409566577" calcext:value-type="float">
            <text:p>1.04373409566577</text:p>
          </table:table-cell>
          <table:table-cell office:value-type="float" office:value="0.816223740577698" calcext:value-type="float">
            <text:p>0.816223740577698</text:p>
          </table:table-cell>
          <table:table-cell office:value-type="float" office:value="0.255028039216995" calcext:value-type="float">
            <text:p>0.255028039216995</text:p>
          </table:table-cell>
          <table:table-cell office:value-type="float" office:value="-0.870149254798889" calcext:value-type="float">
            <text:p>-0.870149254798889</text:p>
          </table:table-cell>
          <table:table-cell office:value-type="float" office:value="0.999442636966705" calcext:value-type="float">
            <text:p>0.999442636966705</text:p>
          </table:table-cell>
          <table:table-cell office:value-type="float" office:value="0.275812417268753" calcext:value-type="float">
            <text:p>0.275812417268753</text:p>
          </table:table-cell>
          <table:table-cell office:value-type="float" office:value="0.272790491580963" calcext:value-type="float">
            <text:p>0.272790491580963</text:p>
          </table:table-cell>
          <table:table-cell office:value-type="float" office:value="-0.976713538169861" calcext:value-type="float">
            <text:p>-0.976713538169861</text:p>
          </table:table-cell>
          <table:table-cell office:value-type="float" office:value="0.999636828899384" calcext:value-type="float">
            <text:p>0.999636828899384</text:p>
          </table:table-cell>
          <table:table-cell office:value-type="float" office:value="0.728235483169556" calcext:value-type="float">
            <text:p>0.728235483169556</text:p>
          </table:table-cell>
          <table:table-cell office:value-type="float" office:value="1.21337234973907" calcext:value-type="float">
            <text:p>1.21337234973907</text:p>
          </table:table-cell>
          <table:table-cell office:value-type="float" office:value="0.0526143424212933" calcext:value-type="float">
            <text:p>0.0526143424212933</text:p>
          </table:table-cell>
          <table:table-cell office:value-type="float" office:value="0.0750867426395416" calcext:value-type="float">
            <text:p>0.0750867426395416</text:p>
          </table:table-cell>
          <table:table-cell office:value-type="float" office:value="0.379042655229569" calcext:value-type="float">
            <text:p>0.379042655229569</text:p>
          </table:table-cell>
          <table:table-cell office:value-type="float" office:value="1.2249950170517" calcext:value-type="float">
            <text:p>1.2249950170517</text:p>
          </table:table-cell>
          <table:table-cell office:value-type="float" office:value="-0.0410424023866653" calcext:value-type="float">
            <text:p>-0.0410424023866653</text:p>
          </table:table-cell>
          <table:table-cell office:value-type="float" office:value="0.0850955918431282" calcext:value-type="float">
            <text:p>0.085095591843128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SQRT(([.J303]-[.F303])^2+([.K303]-[.G303])^2)" office:value-type="float" office:value="0.551428886625126" calcext:value-type="float">
            <text:p>0.551428886625126</text:p>
          </table:table-cell>
          <table:table-cell table:formula="of:=SQRT(([.R303]-[.N303])^2+([.S303]-[.O303])^2)" office:value-type="float" office:value="0.358446636377245" calcext:value-type="float">
            <text:p>0.358446636377245</text:p>
          </table:table-cell>
          <table:table-cell table:formula="of:=SQRT(([.R303]-[.F303])^2+([.S303]-[.G303])^2)" office:value-type="float" office:value="1.08173011889895" calcext:value-type="float">
            <text:p>1.08173011889895</text:p>
          </table:table-cell>
          <table:table-cell table:formula="of:=SQRT(([.N303]-[.J303])^2+([.O303]-[.K303])^2)" office:value-type="float" office:value="1.06647585907548" calcext:value-type="float">
            <text:p>1.06647585907548</text:p>
          </table:table-cell>
          <table:table-cell office:value-type="float" office:value="0.813531696796417" calcext:value-type="float">
            <text:p>0.813531696796417</text:p>
          </table:table-cell>
          <table:table-cell office:value-type="float" office:value="0.250223398208618" calcext:value-type="float">
            <text:p>0.250223398208618</text:p>
          </table:table-cell>
          <table:table-cell office:value-type="float" office:value="-0.853817343711853" calcext:value-type="float">
            <text:p>-0.853817343711853</text:p>
          </table:table-cell>
          <table:table-cell office:value-type="float" office:value="0.999438643455505" calcext:value-type="float">
            <text:p>0.999438643455505</text:p>
          </table:table-cell>
          <table:table-cell office:value-type="float" office:value="0.262249827384949" calcext:value-type="float">
            <text:p>0.262249827384949</text:p>
          </table:table-cell>
          <table:table-cell office:value-type="float" office:value="0.26295593380928" calcext:value-type="float">
            <text:p>0.26295593380928</text:p>
          </table:table-cell>
          <table:table-cell office:value-type="float" office:value="-0.932529151439667" calcext:value-type="float">
            <text:p>-0.932529151439667</text:p>
          </table:table-cell>
          <table:table-cell office:value-type="float" office:value="0.999651789665222" calcext:value-type="float">
            <text:p>0.999651789665222</text:p>
          </table:table-cell>
          <table:table-cell office:value-type="float" office:value="0.726808667182922" calcext:value-type="float">
            <text:p>0.726808667182922</text:p>
          </table:table-cell>
          <table:table-cell office:value-type="float" office:value="1.22293293476105" calcext:value-type="float">
            <text:p>1.22293293476105</text:p>
          </table:table-cell>
          <table:table-cell office:value-type="float" office:value="0.0666598901152611" calcext:value-type="float">
            <text:p>0.0666598901152611</text:p>
          </table:table-cell>
          <table:table-cell office:value-type="float" office:value="0.0698183476924896" calcext:value-type="float">
            <text:p>0.0698183476924896</text:p>
          </table:table-cell>
          <table:table-cell office:value-type="float" office:value="0.368608266115189" calcext:value-type="float">
            <text:p>0.368608266115189</text:p>
          </table:table-cell>
          <table:table-cell office:value-type="float" office:value="1.23621690273285" calcext:value-type="float">
            <text:p>1.23621690273285</text:p>
          </table:table-cell>
          <table:table-cell office:value-type="float" office:value="-0.0543618127703667" calcext:value-type="float">
            <text:p>-0.0543618127703667</text:p>
          </table:table-cell>
          <table:table-cell office:value-type="float" office:value="0.0797450169920921" calcext:value-type="float">
            <text:p>0.07974501699209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SQRT(([.J304]-[.F304])^2+([.K304]-[.G304])^2)" office:value-type="float" office:value="0.552780926268855" calcext:value-type="float">
            <text:p>0.552780926268855</text:p>
          </table:table-cell>
          <table:table-cell table:formula="of:=SQRT(([.R304]-[.N304])^2+([.S304]-[.O304])^2)" office:value-type="float" office:value="0.360918358533668" calcext:value-type="float">
            <text:p>0.360918358533668</text:p>
          </table:table-cell>
          <table:table-cell table:formula="of:=SQRT(([.R304]-[.F304])^2+([.S304]-[.G304])^2)" office:value-type="float" office:value="1.09746271539807" calcext:value-type="float">
            <text:p>1.09746271539807</text:p>
          </table:table-cell>
          <table:table-cell table:formula="of:=SQRT(([.N304]-[.J304])^2+([.O304]-[.K304])^2)" office:value-type="float" office:value="1.10866017008936" calcext:value-type="float">
            <text:p>1.10866017008936</text:p>
          </table:table-cell>
          <table:table-cell office:value-type="float" office:value="0.813379645347595" calcext:value-type="float">
            <text:p>0.813379645347595</text:p>
          </table:table-cell>
          <table:table-cell office:value-type="float" office:value="0.250809758901596" calcext:value-type="float">
            <text:p>0.250809758901596</text:p>
          </table:table-cell>
          <table:table-cell office:value-type="float" office:value="-0.750887513160706" calcext:value-type="float">
            <text:p>-0.750887513160706</text:p>
          </table:table-cell>
          <table:table-cell office:value-type="float" office:value="0.999413549900055" calcext:value-type="float">
            <text:p>0.999413549900055</text:p>
          </table:table-cell>
          <table:table-cell office:value-type="float" office:value="0.260599881410599" calcext:value-type="float">
            <text:p>0.260599881410599</text:p>
          </table:table-cell>
          <table:table-cell office:value-type="float" office:value="0.249676167964935" calcext:value-type="float">
            <text:p>0.249676167964935</text:p>
          </table:table-cell>
          <table:table-cell office:value-type="float" office:value="-0.829021155834198" calcext:value-type="float">
            <text:p>-0.829021155834198</text:p>
          </table:table-cell>
          <table:table-cell office:value-type="float" office:value="0.999666512012482" calcext:value-type="float">
            <text:p>0.999666512012482</text:p>
          </table:table-cell>
          <table:table-cell office:value-type="float" office:value="0.726817965507507" calcext:value-type="float">
            <text:p>0.726817965507507</text:p>
          </table:table-cell>
          <table:table-cell office:value-type="float" office:value="1.25554299354553" calcext:value-type="float">
            <text:p>1.25554299354553</text:p>
          </table:table-cell>
          <table:table-cell office:value-type="float" office:value="0.0624861493706703" calcext:value-type="float">
            <text:p>0.0624861493706703</text:p>
          </table:table-cell>
          <table:table-cell office:value-type="float" office:value="0.0650006234645844" calcext:value-type="float">
            <text:p>0.0650006234645844</text:p>
          </table:table-cell>
          <table:table-cell office:value-type="float" office:value="0.365909248590469" calcext:value-type="float">
            <text:p>0.365909248590469</text:p>
          </table:table-cell>
          <table:table-cell office:value-type="float" office:value="1.25290489196777" calcext:value-type="float">
            <text:p>1.25290489196777</text:p>
          </table:table-cell>
          <table:table-cell office:value-type="float" office:value="-0.0504506826400757" calcext:value-type="float">
            <text:p>-0.0504506826400757</text:p>
          </table:table-cell>
          <table:table-cell office:value-type="float" office:value="0.074925608932972" calcext:value-type="float">
            <text:p>0.07492560893297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SQRT(([.J305]-[.F305])^2+([.K305]-[.G305])^2)" office:value-type="float" office:value="0.554427660260962" calcext:value-type="float">
            <text:p>0.554427660260962</text:p>
          </table:table-cell>
          <table:table-cell table:formula="of:=SQRT(([.R305]-[.N305])^2+([.S305]-[.O305])^2)" office:value-type="float" office:value="0.361783569981054" calcext:value-type="float">
            <text:p>0.361783569981054</text:p>
          </table:table-cell>
          <table:table-cell table:formula="of:=SQRT(([.R305]-[.F305])^2+([.S305]-[.G305])^2)" office:value-type="float" office:value="1.13076147020702" calcext:value-type="float">
            <text:p>1.13076147020702</text:p>
          </table:table-cell>
          <table:table-cell table:formula="of:=SQRT(([.N305]-[.J305])^2+([.O305]-[.K305])^2)" office:value-type="float" office:value="1.16200588622584" calcext:value-type="float">
            <text:p>1.16200588622584</text:p>
          </table:table-cell>
          <table:table-cell office:value-type="float" office:value="0.812843799591065" calcext:value-type="float">
            <text:p>0.812843799591065</text:p>
          </table:table-cell>
          <table:table-cell office:value-type="float" office:value="0.251167118549347" calcext:value-type="float">
            <text:p>0.251167118549347</text:p>
          </table:table-cell>
          <table:table-cell office:value-type="float" office:value="-0.526221632957459" calcext:value-type="float">
            <text:p>-0.526221632957459</text:p>
          </table:table-cell>
          <table:table-cell office:value-type="float" office:value="0.999321103096008" calcext:value-type="float">
            <text:p>0.999321103096008</text:p>
          </table:table-cell>
          <table:table-cell office:value-type="float" office:value="0.258482664823532" calcext:value-type="float">
            <text:p>0.258482664823532</text:p>
          </table:table-cell>
          <table:table-cell office:value-type="float" office:value="0.242578595876694" calcext:value-type="float">
            <text:p>0.242578595876694</text:p>
          </table:table-cell>
          <table:table-cell office:value-type="float" office:value="-0.52907931804657" calcext:value-type="float">
            <text:p>-0.52907931804657</text:p>
          </table:table-cell>
          <table:table-cell office:value-type="float" office:value="0.999657452106476" calcext:value-type="float">
            <text:p>0.999657452106476</text:p>
          </table:table-cell>
          <table:table-cell office:value-type="float" office:value="0.726794838905335" calcext:value-type="float">
            <text:p>0.726794838905335</text:p>
          </table:table-cell>
          <table:table-cell office:value-type="float" office:value="1.30603587627411" calcext:value-type="float">
            <text:p>1.30603587627411</text:p>
          </table:table-cell>
          <table:table-cell office:value-type="float" office:value="0.0549911335110664" calcext:value-type="float">
            <text:p>0.0549911335110664</text:p>
          </table:table-cell>
          <table:table-cell office:value-type="float" office:value="0.0618772804737091" calcext:value-type="float">
            <text:p>0.0618772804737091</text:p>
          </table:table-cell>
          <table:table-cell office:value-type="float" office:value="0.36538353562355" calcext:value-type="float">
            <text:p>0.36538353562355</text:p>
          </table:table-cell>
          <table:table-cell office:value-type="float" office:value="1.28962790966034" calcext:value-type="float">
            <text:p>1.28962790966034</text:p>
          </table:table-cell>
          <table:table-cell office:value-type="float" office:value="-0.0418148934841156" calcext:value-type="float">
            <text:p>-0.0418148934841156</text:p>
          </table:table-cell>
          <table:table-cell office:value-type="float" office:value="0.0722782164812088" calcext:value-type="float">
            <text:p>0.07227821648120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SQRT(([.J306]-[.F306])^2+([.K306]-[.G306])^2)" office:value-type="float" office:value="0.561671153827781" calcext:value-type="float">
            <text:p>0.561671153827781</text:p>
          </table:table-cell>
          <table:table-cell table:formula="of:=SQRT(([.R306]-[.N306])^2+([.S306]-[.O306])^2)" office:value-type="float" office:value="0.366751932437208" calcext:value-type="float">
            <text:p>0.366751932437208</text:p>
          </table:table-cell>
          <table:table-cell table:formula="of:=SQRT(([.R306]-[.F306])^2+([.S306]-[.G306])^2)" office:value-type="float" office:value="1.14625695469934" calcext:value-type="float">
            <text:p>1.14625695469934</text:p>
          </table:table-cell>
          <table:table-cell table:formula="of:=SQRT(([.N306]-[.J306])^2+([.O306]-[.K306])^2)" office:value-type="float" office:value="1.1821136379347" calcext:value-type="float">
            <text:p>1.1821136379347</text:p>
          </table:table-cell>
          <table:table-cell office:value-type="float" office:value="0.81160181760788" calcext:value-type="float">
            <text:p>0.81160181760788</text:p>
          </table:table-cell>
          <table:table-cell office:value-type="float" office:value="0.251283288002014" calcext:value-type="float">
            <text:p>0.251283288002014</text:p>
          </table:table-cell>
          <table:table-cell office:value-type="float" office:value="-0.491022408008575" calcext:value-type="float">
            <text:p>-0.491022408008575</text:p>
          </table:table-cell>
          <table:table-cell office:value-type="float" office:value="0.999301671981812" calcext:value-type="float">
            <text:p>0.999301671981812</text:p>
          </table:table-cell>
          <table:table-cell office:value-type="float" office:value="0.250136315822601" calcext:value-type="float">
            <text:p>0.250136315822601</text:p>
          </table:table-cell>
          <table:table-cell office:value-type="float" office:value="0.236085414886475" calcext:value-type="float">
            <text:p>0.236085414886475</text:p>
          </table:table-cell>
          <table:table-cell office:value-type="float" office:value="-0.508090555667877" calcext:value-type="float">
            <text:p>-0.508090555667877</text:p>
          </table:table-cell>
          <table:table-cell office:value-type="float" office:value="0.999662220478058" calcext:value-type="float">
            <text:p>0.999662220478058</text:p>
          </table:table-cell>
          <table:table-cell office:value-type="float" office:value="0.725027799606323" calcext:value-type="float">
            <text:p>0.725027799606323</text:p>
          </table:table-cell>
          <table:table-cell office:value-type="float" office:value="1.31861519813538" calcext:value-type="float">
            <text:p>1.31861519813538</text:p>
          </table:table-cell>
          <table:table-cell office:value-type="float" office:value="0.0540604218840599" calcext:value-type="float">
            <text:p>0.0540604218840599</text:p>
          </table:table-cell>
          <table:table-cell office:value-type="float" office:value="0.0595651715993881" calcext:value-type="float">
            <text:p>0.0595651715993881</text:p>
          </table:table-cell>
          <table:table-cell office:value-type="float" office:value="0.358558833599091" calcext:value-type="float">
            <text:p>0.358558833599091</text:p>
          </table:table-cell>
          <table:table-cell office:value-type="float" office:value="1.30421113967896" calcext:value-type="float">
            <text:p>1.30421113967896</text:p>
          </table:table-cell>
          <table:table-cell office:value-type="float" office:value="-0.0415106825530529" calcext:value-type="float">
            <text:p>-0.0415106825530529</text:p>
          </table:table-cell>
          <table:table-cell office:value-type="float" office:value="0.0700187608599663" calcext:value-type="float">
            <text:p>0.070018760859966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SQRT(([.J307]-[.F307])^2+([.K307]-[.G307])^2)" office:value-type="float" office:value="0.567718027692881" calcext:value-type="float">
            <text:p>0.567718027692881</text:p>
          </table:table-cell>
          <table:table-cell table:formula="of:=SQRT(([.R307]-[.N307])^2+([.S307]-[.O307])^2)" office:value-type="float" office:value="0.367926793479898" calcext:value-type="float">
            <text:p>0.367926793479898</text:p>
          </table:table-cell>
          <table:table-cell table:formula="of:=SQRT(([.R307]-[.F307])^2+([.S307]-[.G307])^2)" office:value-type="float" office:value="1.17612394132069" calcext:value-type="float">
            <text:p>1.17612394132069</text:p>
          </table:table-cell>
          <table:table-cell table:formula="of:=SQRT(([.N307]-[.J307])^2+([.O307]-[.K307])^2)" office:value-type="float" office:value="1.19899031203339" calcext:value-type="float">
            <text:p>1.19899031203339</text:p>
          </table:table-cell>
          <table:table-cell office:value-type="float" office:value="0.811434626579285" calcext:value-type="float">
            <text:p>0.811434626579285</text:p>
          </table:table-cell>
          <table:table-cell office:value-type="float" office:value="0.249031856656075" calcext:value-type="float">
            <text:p>0.249031856656075</text:p>
          </table:table-cell>
          <table:table-cell office:value-type="float" office:value="-0.433786481618881" calcext:value-type="float">
            <text:p>-0.433786481618881</text:p>
          </table:table-cell>
          <table:table-cell office:value-type="float" office:value="0.999264001846314" calcext:value-type="float">
            <text:p>0.999264001846314</text:p>
          </table:table-cell>
          <table:table-cell office:value-type="float" office:value="0.243809133768082" calcext:value-type="float">
            <text:p>0.243809133768082</text:p>
          </table:table-cell>
          <table:table-cell office:value-type="float" office:value="0.238782033324242" calcext:value-type="float">
            <text:p>0.238782033324242</text:p>
          </table:table-cell>
          <table:table-cell office:value-type="float" office:value="-0.493761867284775" calcext:value-type="float">
            <text:p>-0.493761867284775</text:p>
          </table:table-cell>
          <table:table-cell office:value-type="float" office:value="0.999662518501282" calcext:value-type="float">
            <text:p>0.999662518501282</text:p>
          </table:table-cell>
          <table:table-cell office:value-type="float" office:value="0.725312352180481" calcext:value-type="float">
            <text:p>0.725312352180481</text:p>
          </table:table-cell>
          <table:table-cell office:value-type="float" office:value="1.33684051036835" calcext:value-type="float">
            <text:p>1.33684051036835</text:p>
          </table:table-cell>
          <table:table-cell office:value-type="float" office:value="0.0525704808533192" calcext:value-type="float">
            <text:p>0.0525704808533192</text:p>
          </table:table-cell>
          <table:table-cell office:value-type="float" office:value="0.05778593942523" calcext:value-type="float">
            <text:p>0.05778593942523</text:p>
          </table:table-cell>
          <table:table-cell office:value-type="float" office:value="0.35739666223526" calcext:value-type="float">
            <text:p>0.35739666223526</text:p>
          </table:table-cell>
          <table:table-cell office:value-type="float" office:value="1.3339821100235" calcext:value-type="float">
            <text:p>1.3339821100235</text:p>
          </table:table-cell>
          <table:table-cell office:value-type="float" office:value="-0.0403001978993416" calcext:value-type="float">
            <text:p>-0.0403001978993416</text:p>
          </table:table-cell>
          <table:table-cell office:value-type="float" office:value="0.068633995950222" calcext:value-type="float">
            <text:p>0.0686339959502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SQRT(([.J308]-[.F308])^2+([.K308]-[.G308])^2)" office:value-type="float" office:value="0.568362069157015" calcext:value-type="float">
            <text:p>0.568362069157015</text:p>
          </table:table-cell>
          <table:table-cell table:formula="of:=SQRT(([.R308]-[.N308])^2+([.S308]-[.O308])^2)" office:value-type="float" office:value="0.37032744922308" calcext:value-type="float">
            <text:p>0.37032744922308</text:p>
          </table:table-cell>
          <table:table-cell table:formula="of:=SQRT(([.R308]-[.F308])^2+([.S308]-[.G308])^2)" office:value-type="float" office:value="1.17131108447858" calcext:value-type="float">
            <text:p>1.17131108447858</text:p>
          </table:table-cell>
          <table:table-cell table:formula="of:=SQRT(([.N308]-[.J308])^2+([.O308]-[.K308])^2)" office:value-type="float" office:value="1.19542153666986" calcext:value-type="float">
            <text:p>1.19542153666986</text:p>
          </table:table-cell>
          <table:table-cell office:value-type="float" office:value="0.813175797462463" calcext:value-type="float">
            <text:p>0.813175797462463</text:p>
          </table:table-cell>
          <table:table-cell office:value-type="float" office:value="0.251296550035477" calcext:value-type="float">
            <text:p>0.251296550035477</text:p>
          </table:table-cell>
          <table:table-cell office:value-type="float" office:value="-0.478075176477432" calcext:value-type="float">
            <text:p>-0.478075176477432</text:p>
          </table:table-cell>
          <table:table-cell office:value-type="float" office:value="0.999201416969299" calcext:value-type="float">
            <text:p>0.999201416969299</text:p>
          </table:table-cell>
          <table:table-cell office:value-type="float" office:value="0.244912341237068" calcext:value-type="float">
            <text:p>0.244912341237068</text:p>
          </table:table-cell>
          <table:table-cell office:value-type="float" office:value="0.240709483623505" calcext:value-type="float">
            <text:p>0.240709483623505</text:p>
          </table:table-cell>
          <table:table-cell office:value-type="float" office:value="-0.544213235378265" calcext:value-type="float">
            <text:p>-0.544213235378265</text:p>
          </table:table-cell>
          <table:table-cell office:value-type="float" office:value="0.999664187431335" calcext:value-type="float">
            <text:p>0.999664187431335</text:p>
          </table:table-cell>
          <table:table-cell office:value-type="float" office:value="0.728401005268097" calcext:value-type="float">
            <text:p>0.728401005268097</text:p>
          </table:table-cell>
          <table:table-cell office:value-type="float" office:value="1.33399415016174" calcext:value-type="float">
            <text:p>1.33399415016174</text:p>
          </table:table-cell>
          <table:table-cell office:value-type="float" office:value="0.0557447373867035" calcext:value-type="float">
            <text:p>0.0557447373867035</text:p>
          </table:table-cell>
          <table:table-cell office:value-type="float" office:value="0.0551826059818268" calcext:value-type="float">
            <text:p>0.0551826059818268</text:p>
          </table:table-cell>
          <table:table-cell office:value-type="float" office:value="0.358089238405228" calcext:value-type="float">
            <text:p>0.358089238405228</text:p>
          </table:table-cell>
          <table:table-cell office:value-type="float" office:value="1.33058607578278" calcext:value-type="float">
            <text:p>1.33058607578278</text:p>
          </table:table-cell>
          <table:table-cell office:value-type="float" office:value="-0.0430681332945824" calcext:value-type="float">
            <text:p>-0.0430681332945824</text:p>
          </table:table-cell>
          <table:table-cell office:value-type="float" office:value="0.0665148422122002" calcext:value-type="float">
            <text:p>0.06651484221220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SQRT(([.J309]-[.F309])^2+([.K309]-[.G309])^2)" office:value-type="float" office:value="0.57379615597884" calcext:value-type="float">
            <text:p>0.57379615597884</text:p>
          </table:table-cell>
          <table:table-cell table:formula="of:=SQRT(([.R309]-[.N309])^2+([.S309]-[.O309])^2)" office:value-type="float" office:value="0.378214125951034" calcext:value-type="float">
            <text:p>0.378214125951034</text:p>
          </table:table-cell>
          <table:table-cell table:formula="of:=SQRT(([.R309]-[.F309])^2+([.S309]-[.G309])^2)" office:value-type="float" office:value="1.18922841943036" calcext:value-type="float">
            <text:p>1.18922841943036</text:p>
          </table:table-cell>
          <table:table-cell table:formula="of:=SQRT(([.N309]-[.J309])^2+([.O309]-[.K309])^2)" office:value-type="float" office:value="1.24085205894841" calcext:value-type="float">
            <text:p>1.24085205894841</text:p>
          </table:table-cell>
          <table:table-cell office:value-type="float" office:value="0.809193968772888" calcext:value-type="float">
            <text:p>0.809193968772888</text:p>
          </table:table-cell>
          <table:table-cell office:value-type="float" office:value="0.262642830610275" calcext:value-type="float">
            <text:p>0.262642830610275</text:p>
          </table:table-cell>
          <table:table-cell office:value-type="float" office:value="-0.449001312255859" calcext:value-type="float">
            <text:p>-0.449001312255859</text:p>
          </table:table-cell>
          <table:table-cell office:value-type="float" office:value="0.999173164367676" calcext:value-type="float">
            <text:p>0.999173164367676</text:p>
          </table:table-cell>
          <table:table-cell office:value-type="float" office:value="0.235776260495186" calcext:value-type="float">
            <text:p>0.235776260495186</text:p>
          </table:table-cell>
          <table:table-cell office:value-type="float" office:value="0.2418063133955" calcext:value-type="float">
            <text:p>0.2418063133955</text:p>
          </table:table-cell>
          <table:table-cell office:value-type="float" office:value="-0.504124045372009" calcext:value-type="float">
            <text:p>-0.504124045372009</text:p>
          </table:table-cell>
          <table:table-cell office:value-type="float" office:value="0.999666631221771" calcext:value-type="float">
            <text:p>0.999666631221771</text:p>
          </table:table-cell>
          <table:table-cell office:value-type="float" office:value="0.727803230285645" calcext:value-type="float">
            <text:p>0.727803230285645</text:p>
          </table:table-cell>
          <table:table-cell office:value-type="float" office:value="1.38093900680542" calcext:value-type="float">
            <text:p>1.38093900680542</text:p>
          </table:table-cell>
          <table:table-cell office:value-type="float" office:value="0.0551408901810646" calcext:value-type="float">
            <text:p>0.0551408901810646</text:p>
          </table:table-cell>
          <table:table-cell office:value-type="float" office:value="0.0526895597577095" calcext:value-type="float">
            <text:p>0.0526895597577095</text:p>
          </table:table-cell>
          <table:table-cell office:value-type="float" office:value="0.350184887647629" calcext:value-type="float">
            <text:p>0.350184887647629</text:p>
          </table:table-cell>
          <table:table-cell office:value-type="float" office:value="1.3597184419632" calcext:value-type="float">
            <text:p>1.3597184419632</text:p>
          </table:table-cell>
          <table:table-cell office:value-type="float" office:value="-0.0423544645309448" calcext:value-type="float">
            <text:p>-0.0423544645309448</text:p>
          </table:table-cell>
          <table:table-cell office:value-type="float" office:value="0.0642158314585686" calcext:value-type="float">
            <text:p>0.06421583145856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QRT(([.J310]-[.F310])^2+([.K310]-[.G310])^2)" office:value-type="float" office:value="0.581412401318866" calcext:value-type="float">
            <text:p>0.581412401318866</text:p>
          </table:table-cell>
          <table:table-cell table:formula="of:=SQRT(([.R310]-[.N310])^2+([.S310]-[.O310])^2)" office:value-type="float" office:value="0.375423297437421" calcext:value-type="float">
            <text:p>0.375423297437421</text:p>
          </table:table-cell>
          <table:table-cell table:formula="of:=SQRT(([.R310]-[.F310])^2+([.S310]-[.G310])^2)" office:value-type="float" office:value="1.18568731678005" calcext:value-type="float">
            <text:p>1.18568731678005</text:p>
          </table:table-cell>
          <table:table-cell table:formula="of:=SQRT(([.N310]-[.J310])^2+([.O310]-[.K310])^2)" office:value-type="float" office:value="1.23157889649045" calcext:value-type="float">
            <text:p>1.23157889649045</text:p>
          </table:table-cell>
          <table:table-cell office:value-type="float" office:value="0.80162239074707" calcext:value-type="float">
            <text:p>0.80162239074707</text:p>
          </table:table-cell>
          <table:table-cell office:value-type="float" office:value="0.25201079249382" calcext:value-type="float">
            <text:p>0.25201079249382</text:p>
          </table:table-cell>
          <table:table-cell office:value-type="float" office:value="-0.458727180957794" calcext:value-type="float">
            <text:p>-0.458727180957794</text:p>
          </table:table-cell>
          <table:table-cell office:value-type="float" office:value="0.999168694019318" calcext:value-type="float">
            <text:p>0.999168694019318</text:p>
          </table:table-cell>
          <table:table-cell office:value-type="float" office:value="0.220322102308273" calcext:value-type="float">
            <text:p>0.220322102308273</text:p>
          </table:table-cell>
          <table:table-cell office:value-type="float" office:value="0.240593478083611" calcext:value-type="float">
            <text:p>0.240593478083611</text:p>
          </table:table-cell>
          <table:table-cell office:value-type="float" office:value="-0.505598187446594" calcext:value-type="float">
            <text:p>-0.505598187446594</text:p>
          </table:table-cell>
          <table:table-cell office:value-type="float" office:value="0.999664664268494" calcext:value-type="float">
            <text:p>0.999664664268494</text:p>
          </table:table-cell>
          <table:table-cell office:value-type="float" office:value="0.724483489990234" calcext:value-type="float">
            <text:p>0.724483489990234</text:p>
          </table:table-cell>
          <table:table-cell office:value-type="float" office:value="1.36425173282623" calcext:value-type="float">
            <text:p>1.36425173282623</text:p>
          </table:table-cell>
          <table:table-cell office:value-type="float" office:value="0.0515353605151176" calcext:value-type="float">
            <text:p>0.0515353605151176</text:p>
          </table:table-cell>
          <table:table-cell office:value-type="float" office:value="0.0524201281368732" calcext:value-type="float">
            <text:p>0.0524201281368732</text:p>
          </table:table-cell>
          <table:table-cell office:value-type="float" office:value="0.349408864974976" calcext:value-type="float">
            <text:p>0.349408864974976</text:p>
          </table:table-cell>
          <table:table-cell office:value-type="float" office:value="1.34807527065277" calcext:value-type="float">
            <text:p>1.34807527065277</text:p>
          </table:table-cell>
          <table:table-cell office:value-type="float" office:value="-0.0384721718728542" calcext:value-type="float">
            <text:p>-0.0384721718728542</text:p>
          </table:table-cell>
          <table:table-cell office:value-type="float" office:value="0.0646045729517937" calcext:value-type="float">
            <text:p>0.06460457295179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QRT(([.J311]-[.F311])^2+([.K311]-[.G311])^2)" office:value-type="float" office:value="0.579830636541793" calcext:value-type="float">
            <text:p>0.579830636541793</text:p>
          </table:table-cell>
          <table:table-cell table:formula="of:=SQRT(([.R311]-[.N311])^2+([.S311]-[.O311])^2)" office:value-type="float" office:value="0.37869798587247" calcext:value-type="float">
            <text:p>0.37869798587247</text:p>
          </table:table-cell>
          <table:table-cell table:formula="of:=SQRT(([.R311]-[.F311])^2+([.S311]-[.G311])^2)" office:value-type="float" office:value="1.1498931540783" calcext:value-type="float">
            <text:p>1.1498931540783</text:p>
          </table:table-cell>
          <table:table-cell table:formula="of:=SQRT(([.N311]-[.J311])^2+([.O311]-[.K311])^2)" office:value-type="float" office:value="1.19852124053049" calcext:value-type="float">
            <text:p>1.19852124053049</text:p>
          </table:table-cell>
          <table:table-cell office:value-type="float" office:value="0.801781833171845" calcext:value-type="float">
            <text:p>0.801781833171845</text:p>
          </table:table-cell>
          <table:table-cell office:value-type="float" office:value="0.245006129145622" calcext:value-type="float">
            <text:p>0.245006129145622</text:p>
          </table:table-cell>
          <table:table-cell office:value-type="float" office:value="-0.422640144824982" calcext:value-type="float">
            <text:p>-0.422640144824982</text:p>
          </table:table-cell>
          <table:table-cell office:value-type="float" office:value="0.999213457107544" calcext:value-type="float">
            <text:p>0.999213457107544</text:p>
          </table:table-cell>
          <table:table-cell office:value-type="float" office:value="0.222065299749374" calcext:value-type="float">
            <text:p>0.222065299749374</text:p>
          </table:table-cell>
          <table:table-cell office:value-type="float" office:value="0.233503609895706" calcext:value-type="float">
            <text:p>0.233503609895706</text:p>
          </table:table-cell>
          <table:table-cell office:value-type="float" office:value="-0.497438192367554" calcext:value-type="float">
            <text:p>-0.497438192367554</text:p>
          </table:table-cell>
          <table:table-cell office:value-type="float" office:value="0.999689817428589" calcext:value-type="float">
            <text:p>0.999689817428589</text:p>
          </table:table-cell>
          <table:table-cell office:value-type="float" office:value="0.728588819503784" calcext:value-type="float">
            <text:p>0.728588819503784</text:p>
          </table:table-cell>
          <table:table-cell office:value-type="float" office:value="1.31972968578339" calcext:value-type="float">
            <text:p>1.31972968578339</text:p>
          </table:table-cell>
          <table:table-cell office:value-type="float" office:value="0.0617345869541168" calcext:value-type="float">
            <text:p>0.0617345869541168</text:p>
          </table:table-cell>
          <table:table-cell office:value-type="float" office:value="0.0514237619936466" calcext:value-type="float">
            <text:p>0.0514237619936466</text:p>
          </table:table-cell>
          <table:table-cell office:value-type="float" office:value="0.350280672311783" calcext:value-type="float">
            <text:p>0.350280672311783</text:p>
          </table:table-cell>
          <table:table-cell office:value-type="float" office:value="1.30255091190338" calcext:value-type="float">
            <text:p>1.30255091190338</text:p>
          </table:table-cell>
          <table:table-cell office:value-type="float" office:value="-0.048476617783308" calcext:value-type="float">
            <text:p>-0.048476617783308</text:p>
          </table:table-cell>
          <table:table-cell office:value-type="float" office:value="0.0647027865052223" calcext:value-type="float">
            <text:p>0.06470278650522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SQRT(([.J312]-[.F312])^2+([.K312]-[.G312])^2)" office:value-type="float" office:value="0.5821520230753" calcext:value-type="float">
            <text:p>0.5821520230753</text:p>
          </table:table-cell>
          <table:table-cell table:formula="of:=SQRT(([.R312]-[.N312])^2+([.S312]-[.O312])^2)" office:value-type="float" office:value="0.381100326273284" calcext:value-type="float">
            <text:p>0.381100326273284</text:p>
          </table:table-cell>
          <table:table-cell table:formula="of:=SQRT(([.R312]-[.F312])^2+([.S312]-[.G312])^2)" office:value-type="float" office:value="1.14523348202543" calcext:value-type="float">
            <text:p>1.14523348202543</text:p>
          </table:table-cell>
          <table:table-cell table:formula="of:=SQRT(([.N312]-[.J312])^2+([.O312]-[.K312])^2)" office:value-type="float" office:value="1.20374687987123" calcext:value-type="float">
            <text:p>1.20374687987123</text:p>
          </table:table-cell>
          <table:table-cell office:value-type="float" office:value="0.80038845539093" calcext:value-type="float">
            <text:p>0.80038845539093</text:p>
          </table:table-cell>
          <table:table-cell office:value-type="float" office:value="0.245200455188751" calcext:value-type="float">
            <text:p>0.245200455188751</text:p>
          </table:table-cell>
          <table:table-cell office:value-type="float" office:value="-0.447175204753876" calcext:value-type="float">
            <text:p>-0.447175204753876</text:p>
          </table:table-cell>
          <table:table-cell office:value-type="float" office:value="0.999220252037048" calcext:value-type="float">
            <text:p>0.999220252037048</text:p>
          </table:table-cell>
          <table:table-cell office:value-type="float" office:value="0.218466728925705" calcext:value-type="float">
            <text:p>0.218466728925705</text:p>
          </table:table-cell>
          <table:table-cell office:value-type="float" office:value="0.228827238082886" calcext:value-type="float">
            <text:p>0.228827238082886</text:p>
          </table:table-cell>
          <table:table-cell office:value-type="float" office:value="-0.495047092437744" calcext:value-type="float">
            <text:p>-0.495047092437744</text:p>
          </table:table-cell>
          <table:table-cell office:value-type="float" office:value="0.999686896800995" calcext:value-type="float">
            <text:p>0.999686896800995</text:p>
          </table:table-cell>
          <table:table-cell office:value-type="float" office:value="0.731681942939758" calcext:value-type="float">
            <text:p>0.731681942939758</text:p>
          </table:table-cell>
          <table:table-cell office:value-type="float" office:value="1.31768751144409" calcext:value-type="float">
            <text:p>1.31768751144409</text:p>
          </table:table-cell>
          <table:table-cell office:value-type="float" office:value="0.0587130673229694" calcext:value-type="float">
            <text:p>0.0587130673229694</text:p>
          </table:table-cell>
          <table:table-cell office:value-type="float" office:value="0.0488709211349487" calcext:value-type="float">
            <text:p>0.0488709211349487</text:p>
          </table:table-cell>
          <table:table-cell office:value-type="float" office:value="0.35105961561203" calcext:value-type="float">
            <text:p>0.35105961561203</text:p>
          </table:table-cell>
          <table:table-cell office:value-type="float" office:value="1.29860603809357" calcext:value-type="float">
            <text:p>1.29860603809357</text:p>
          </table:table-cell>
          <table:table-cell office:value-type="float" office:value="-0.0450621619820595" calcext:value-type="float">
            <text:p>-0.0450621619820595</text:p>
          </table:table-cell>
          <table:table-cell office:value-type="float" office:value="0.0616520121693611" calcext:value-type="float">
            <text:p>0.06165201216936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SQRT(([.J313]-[.F313])^2+([.K313]-[.G313])^2)" office:value-type="float" office:value="0.584599934457694" calcext:value-type="float">
            <text:p>0.584599934457694</text:p>
          </table:table-cell>
          <table:table-cell table:formula="of:=SQRT(([.R313]-[.N313])^2+([.S313]-[.O313])^2)" office:value-type="float" office:value="0.380087384991406" calcext:value-type="float">
            <text:p>0.380087384991406</text:p>
          </table:table-cell>
          <table:table-cell table:formula="of:=SQRT(([.R313]-[.F313])^2+([.S313]-[.G313])^2)" office:value-type="float" office:value="1.14311435988071" calcext:value-type="float">
            <text:p>1.14311435988071</text:p>
          </table:table-cell>
          <table:table-cell table:formula="of:=SQRT(([.N313]-[.J313])^2+([.O313]-[.K313])^2)" office:value-type="float" office:value="1.20092410339653" calcext:value-type="float">
            <text:p>1.20092410339653</text:p>
          </table:table-cell>
          <table:table-cell office:value-type="float" office:value="0.800243258476257" calcext:value-type="float">
            <text:p>0.800243258476257</text:p>
          </table:table-cell>
          <table:table-cell office:value-type="float" office:value="0.241840839385986" calcext:value-type="float">
            <text:p>0.241840839385986</text:p>
          </table:table-cell>
          <table:table-cell office:value-type="float" office:value="-0.465914577245712" calcext:value-type="float">
            <text:p>-0.465914577245712</text:p>
          </table:table-cell>
          <table:table-cell office:value-type="float" office:value="0.99924099445343" calcext:value-type="float">
            <text:p>0.99924099445343</text:p>
          </table:table-cell>
          <table:table-cell office:value-type="float" office:value="0.215813517570496" calcext:value-type="float">
            <text:p>0.215813517570496</text:p>
          </table:table-cell>
          <table:table-cell office:value-type="float" office:value="0.227735474705696" calcext:value-type="float">
            <text:p>0.227735474705696</text:p>
          </table:table-cell>
          <table:table-cell office:value-type="float" office:value="-0.535403609275818" calcext:value-type="float">
            <text:p>-0.535403609275818</text:p>
          </table:table-cell>
          <table:table-cell office:value-type="float" office:value="0.999692142009735" calcext:value-type="float">
            <text:p>0.999692142009735</text:p>
          </table:table-cell>
          <table:table-cell office:value-type="float" office:value="0.730160117149353" calcext:value-type="float">
            <text:p>0.730160117149353</text:p>
          </table:table-cell>
          <table:table-cell office:value-type="float" office:value="1.31293880939484" calcext:value-type="float">
            <text:p>1.31293880939484</text:p>
          </table:table-cell>
          <table:table-cell office:value-type="float" office:value="0.0583871975541115" calcext:value-type="float">
            <text:p>0.0583871975541115</text:p>
          </table:table-cell>
          <table:table-cell office:value-type="float" office:value="0.0461816154420376" calcext:value-type="float">
            <text:p>0.0461816154420376</text:p>
          </table:table-cell>
          <table:table-cell office:value-type="float" office:value="0.350606083869934" calcext:value-type="float">
            <text:p>0.350606083869934</text:p>
          </table:table-cell>
          <table:table-cell office:value-type="float" office:value="1.29281032085419" calcext:value-type="float">
            <text:p>1.29281032085419</text:p>
          </table:table-cell>
          <table:table-cell office:value-type="float" office:value="-0.0448320992290974" calcext:value-type="float">
            <text:p>-0.0448320992290974</text:p>
          </table:table-cell>
          <table:table-cell office:value-type="float" office:value="0.0585332848131657" calcext:value-type="float">
            <text:p>0.05853328481316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SQRT(([.J314]-[.F314])^2+([.K314]-[.G314])^2)" office:value-type="float" office:value="0.584360810068882" calcext:value-type="float">
            <text:p>0.584360810068882</text:p>
          </table:table-cell>
          <table:table-cell table:formula="of:=SQRT(([.R314]-[.N314])^2+([.S314]-[.O314])^2)" office:value-type="float" office:value="0.38187212607617" calcext:value-type="float">
            <text:p>0.38187212607617</text:p>
          </table:table-cell>
          <table:table-cell table:formula="of:=SQRT(([.R314]-[.F314])^2+([.S314]-[.G314])^2)" office:value-type="float" office:value="1.13558757097136" calcext:value-type="float">
            <text:p>1.13558757097136</text:p>
          </table:table-cell>
          <table:table-cell table:formula="of:=SQRT(([.N314]-[.J314])^2+([.O314]-[.K314])^2)" office:value-type="float" office:value="1.19225491020506" calcext:value-type="float">
            <text:p>1.19225491020506</text:p>
          </table:table-cell>
          <table:table-cell office:value-type="float" office:value="0.80023467540741" calcext:value-type="float">
            <text:p>0.80023467540741</text:p>
          </table:table-cell>
          <table:table-cell office:value-type="float" office:value="0.237583085894585" calcext:value-type="float">
            <text:p>0.237583085894585</text:p>
          </table:table-cell>
          <table:table-cell office:value-type="float" office:value="-0.389036506414413" calcext:value-type="float">
            <text:p>-0.389036506414413</text:p>
          </table:table-cell>
          <table:table-cell office:value-type="float" office:value="0.999265730381012" calcext:value-type="float">
            <text:p>0.999265730381012</text:p>
          </table:table-cell>
          <table:table-cell office:value-type="float" office:value="0.215957790613174" calcext:value-type="float">
            <text:p>0.215957790613174</text:p>
          </table:table-cell>
          <table:table-cell office:value-type="float" office:value="0.227679640054703" calcext:value-type="float">
            <text:p>0.227679640054703</text:p>
          </table:table-cell>
          <table:table-cell office:value-type="float" office:value="-0.505815207958221" calcext:value-type="float">
            <text:p>-0.505815207958221</text:p>
          </table:table-cell>
          <table:table-cell office:value-type="float" office:value="0.999709486961365" calcext:value-type="float">
            <text:p>0.999709486961365</text:p>
          </table:table-cell>
          <table:table-cell office:value-type="float" office:value="0.730360865592957" calcext:value-type="float">
            <text:p>0.730360865592957</text:p>
          </table:table-cell>
          <table:table-cell office:value-type="float" office:value="1.30325448513031" calcext:value-type="float">
            <text:p>1.30325448513031</text:p>
          </table:table-cell>
          <table:table-cell office:value-type="float" office:value="0.0769987851381302" calcext:value-type="float">
            <text:p>0.0769987851381302</text:p>
          </table:table-cell>
          <table:table-cell office:value-type="float" office:value="0.0454474687576294" calcext:value-type="float">
            <text:p>0.0454474687576294</text:p>
          </table:table-cell>
          <table:table-cell office:value-type="float" office:value="0.349212020635605" calcext:value-type="float">
            <text:p>0.349212020635605</text:p>
          </table:table-cell>
          <table:table-cell office:value-type="float" office:value="1.2797623872757" calcext:value-type="float">
            <text:p>1.2797623872757</text:p>
          </table:table-cell>
          <table:table-cell office:value-type="float" office:value="-0.063536062836647" calcext:value-type="float">
            <text:p>-0.063536062836647</text:p>
          </table:table-cell>
          <table:table-cell office:value-type="float" office:value="0.058368694037199" calcext:value-type="float">
            <text:p>0.0583686940371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SQRT(([.J315]-[.F315])^2+([.K315]-[.G315])^2)" office:value-type="float" office:value="0.589267533860769" calcext:value-type="float">
            <text:p>0.589267533860769</text:p>
          </table:table-cell>
          <table:table-cell table:formula="of:=SQRT(([.R315]-[.N315])^2+([.S315]-[.O315])^2)" office:value-type="float" office:value="0.383493797424574" calcext:value-type="float">
            <text:p>0.383493797424574</text:p>
          </table:table-cell>
          <table:table-cell table:formula="of:=SQRT(([.R315]-[.F315])^2+([.S315]-[.G315])^2)" office:value-type="float" office:value="1.14427284331556" calcext:value-type="float">
            <text:p>1.14427284331556</text:p>
          </table:table-cell>
          <table:table-cell table:formula="of:=SQRT(([.N315]-[.J315])^2+([.O315]-[.K315])^2)" office:value-type="float" office:value="1.19693358965627" calcext:value-type="float">
            <text:p>1.19693358965627</text:p>
          </table:table-cell>
          <table:table-cell office:value-type="float" office:value="0.800418734550476" calcext:value-type="float">
            <text:p>0.800418734550476</text:p>
          </table:table-cell>
          <table:table-cell office:value-type="float" office:value="0.238195791840553" calcext:value-type="float">
            <text:p>0.238195791840553</text:p>
          </table:table-cell>
          <table:table-cell office:value-type="float" office:value="-0.40481448173523" calcext:value-type="float">
            <text:p>-0.40481448173523</text:p>
          </table:table-cell>
          <table:table-cell office:value-type="float" office:value="0.999258875846863" calcext:value-type="float">
            <text:p>0.999258875846863</text:p>
          </table:table-cell>
          <table:table-cell office:value-type="float" office:value="0.211236715316772" calcext:value-type="float">
            <text:p>0.211236715316772</text:p>
          </table:table-cell>
          <table:table-cell office:value-type="float" office:value="0.228157132863998" calcext:value-type="float">
            <text:p>0.228157132863998</text:p>
          </table:table-cell>
          <table:table-cell office:value-type="float" office:value="-0.50518411397934" calcext:value-type="float">
            <text:p>-0.50518411397934</text:p>
          </table:table-cell>
          <table:table-cell office:value-type="float" office:value="0.999694466590881" calcext:value-type="float">
            <text:p>0.999694466590881</text:p>
          </table:table-cell>
          <table:table-cell office:value-type="float" office:value="0.730407238006592" calcext:value-type="float">
            <text:p>0.730407238006592</text:p>
          </table:table-cell>
          <table:table-cell office:value-type="float" office:value="1.3066338300705" calcext:value-type="float">
            <text:p>1.3066338300705</text:p>
          </table:table-cell>
          <table:table-cell office:value-type="float" office:value="0.0773899778723717" calcext:value-type="float">
            <text:p>0.0773899778723717</text:p>
          </table:table-cell>
          <table:table-cell office:value-type="float" office:value="0.0426036939024925" calcext:value-type="float">
            <text:p>0.0426036939024925</text:p>
          </table:table-cell>
          <table:table-cell office:value-type="float" office:value="0.347321838140488" calcext:value-type="float">
            <text:p>0.347321838140488</text:p>
          </table:table-cell>
          <table:table-cell office:value-type="float" office:value="1.28894007205963" calcext:value-type="float">
            <text:p>1.28894007205963</text:p>
          </table:table-cell>
          <table:table-cell office:value-type="float" office:value="-0.0639003291726112" calcext:value-type="float">
            <text:p>-0.0639003291726112</text:p>
          </table:table-cell>
          <table:table-cell office:value-type="float" office:value="0.0546074993908405" calcext:value-type="float">
            <text:p>0.05460749939084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SQRT(([.J316]-[.F316])^2+([.K316]-[.G316])^2)" office:value-type="float" office:value="0.592042995861866" calcext:value-type="float">
            <text:p>0.592042995861866</text:p>
          </table:table-cell>
          <table:table-cell table:formula="of:=SQRT(([.R316]-[.N316])^2+([.S316]-[.O316])^2)" office:value-type="float" office:value="0.384348104450258" calcext:value-type="float">
            <text:p>0.384348104450258</text:p>
          </table:table-cell>
          <table:table-cell table:formula="of:=SQRT(([.R316]-[.F316])^2+([.S316]-[.G316])^2)" office:value-type="float" office:value="1.15736532613707" calcext:value-type="float">
            <text:p>1.15736532613707</text:p>
          </table:table-cell>
          <table:table-cell table:formula="of:=SQRT(([.N316]-[.J316])^2+([.O316]-[.K316])^2)" office:value-type="float" office:value="1.20126635204778" calcext:value-type="float">
            <text:p>1.20126635204778</text:p>
          </table:table-cell>
          <table:table-cell office:value-type="float" office:value="0.798532962799072" calcext:value-type="float">
            <text:p>0.798532962799072</text:p>
          </table:table-cell>
          <table:table-cell office:value-type="float" office:value="0.230611547827721" calcext:value-type="float">
            <text:p>0.230611547827721</text:p>
          </table:table-cell>
          <table:table-cell office:value-type="float" office:value="-0.392142802476883" calcext:value-type="float">
            <text:p>-0.392142802476883</text:p>
          </table:table-cell>
          <table:table-cell office:value-type="float" office:value="0.99929291009903" calcext:value-type="float">
            <text:p>0.99929291009903</text:p>
          </table:table-cell>
          <table:table-cell office:value-type="float" office:value="0.206494376063347" calcext:value-type="float">
            <text:p>0.206494376063347</text:p>
          </table:table-cell>
          <table:table-cell office:value-type="float" office:value="0.22832664847374" calcext:value-type="float">
            <text:p>0.22832664847374</text:p>
          </table:table-cell>
          <table:table-cell office:value-type="float" office:value="-0.51098895072937" calcext:value-type="float">
            <text:p>-0.51098895072937</text:p>
          </table:table-cell>
          <table:table-cell office:value-type="float" office:value="0.999713778495789" calcext:value-type="float">
            <text:p>0.999713778495789</text:p>
          </table:table-cell>
          <table:table-cell office:value-type="float" office:value="0.730382204055786" calcext:value-type="float">
            <text:p>0.730382204055786</text:p>
          </table:table-cell>
          <table:table-cell office:value-type="float" office:value="1.30933654308319" calcext:value-type="float">
            <text:p>1.30933654308319</text:p>
          </table:table-cell>
          <table:table-cell office:value-type="float" office:value="0.0873829200863838" calcext:value-type="float">
            <text:p>0.0873829200863838</text:p>
          </table:table-cell>
          <table:table-cell office:value-type="float" office:value="0.0404791384935379" calcext:value-type="float">
            <text:p>0.0404791384935379</text:p>
          </table:table-cell>
          <table:table-cell office:value-type="float" office:value="0.346267223358154" calcext:value-type="float">
            <text:p>0.346267223358154</text:p>
          </table:table-cell>
          <table:table-cell office:value-type="float" office:value="1.29595196247101" calcext:value-type="float">
            <text:p>1.29595196247101</text:p>
          </table:table-cell>
          <table:table-cell office:value-type="float" office:value="-0.0737606137990952" calcext:value-type="float">
            <text:p>-0.0737606137990952</text:p>
          </table:table-cell>
          <table:table-cell office:value-type="float" office:value="0.0520644150674343" calcext:value-type="float">
            <text:p>0.05206441506743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SQRT(([.J317]-[.F317])^2+([.K317]-[.G317])^2)" office:value-type="float" office:value="0.590686728582031" calcext:value-type="float">
            <text:p>0.590686728582031</text:p>
          </table:table-cell>
          <table:table-cell table:formula="of:=SQRT(([.R317]-[.N317])^2+([.S317]-[.O317])^2)" office:value-type="float" office:value="0.385111184126355" calcext:value-type="float">
            <text:p>0.385111184126355</text:p>
          </table:table-cell>
          <table:table-cell table:formula="of:=SQRT(([.R317]-[.F317])^2+([.S317]-[.G317])^2)" office:value-type="float" office:value="1.16790555236459" calcext:value-type="float">
            <text:p>1.16790555236459</text:p>
          </table:table-cell>
          <table:table-cell table:formula="of:=SQRT(([.N317]-[.J317])^2+([.O317]-[.K317])^2)" office:value-type="float" office:value="1.20281548391962" calcext:value-type="float">
            <text:p>1.20281548391962</text:p>
          </table:table-cell>
          <table:table-cell office:value-type="float" office:value="0.798056185245514" calcext:value-type="float">
            <text:p>0.798056185245514</text:p>
          </table:table-cell>
          <table:table-cell office:value-type="float" office:value="0.224178776144981" calcext:value-type="float">
            <text:p>0.224178776144981</text:p>
          </table:table-cell>
          <table:table-cell office:value-type="float" office:value="-0.390666097402573" calcext:value-type="float">
            <text:p>-0.390666097402573</text:p>
          </table:table-cell>
          <table:table-cell office:value-type="float" office:value="0.999256551265717" calcext:value-type="float">
            <text:p>0.999256551265717</text:p>
          </table:table-cell>
          <table:table-cell office:value-type="float" office:value="0.207379460334778" calcext:value-type="float">
            <text:p>0.207379460334778</text:p>
          </table:table-cell>
          <table:table-cell office:value-type="float" office:value="0.227616503834724" calcext:value-type="float">
            <text:p>0.227616503834724</text:p>
          </table:table-cell>
          <table:table-cell office:value-type="float" office:value="-0.513514041900635" calcext:value-type="float">
            <text:p>-0.513514041900635</text:p>
          </table:table-cell>
          <table:table-cell office:value-type="float" office:value="0.999717235565186" calcext:value-type="float">
            <text:p>0.999717235565186</text:p>
          </table:table-cell>
          <table:table-cell office:value-type="float" office:value="0.731386363506317" calcext:value-type="float">
            <text:p>0.731386363506317</text:p>
          </table:table-cell>
          <table:table-cell office:value-type="float" office:value="1.31028997898102" calcext:value-type="float">
            <text:p>1.31028997898102</text:p>
          </table:table-cell>
          <table:table-cell office:value-type="float" office:value="0.0859237760305405" calcext:value-type="float">
            <text:p>0.0859237760305405</text:p>
          </table:table-cell>
          <table:table-cell office:value-type="float" office:value="0.0382351502776146" calcext:value-type="float">
            <text:p>0.0382351502776146</text:p>
          </table:table-cell>
          <table:table-cell office:value-type="float" office:value="0.346382260322571" calcext:value-type="float">
            <text:p>0.346382260322571</text:p>
          </table:table-cell>
          <table:table-cell office:value-type="float" office:value="1.30120897293091" calcext:value-type="float">
            <text:p>1.30120897293091</text:p>
          </table:table-cell>
          <table:table-cell office:value-type="float" office:value="-0.0724500566720963" calcext:value-type="float">
            <text:p>-0.0724500566720963</text:p>
          </table:table-cell>
          <table:table-cell office:value-type="float" office:value="0.0494883619248867" calcext:value-type="float">
            <text:p>0.04948836192488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SQRT(([.J318]-[.F318])^2+([.K318]-[.G318])^2)" office:value-type="float" office:value="0.593575163702208" calcext:value-type="float">
            <text:p>0.593575163702208</text:p>
          </table:table-cell>
          <table:table-cell table:formula="of:=SQRT(([.R318]-[.N318])^2+([.S318]-[.O318])^2)" office:value-type="float" office:value="0.387471337746572" calcext:value-type="float">
            <text:p>0.387471337746572</text:p>
          </table:table-cell>
          <table:table-cell table:formula="of:=SQRT(([.R318]-[.F318])^2+([.S318]-[.G318])^2)" office:value-type="float" office:value="1.16275291183258" calcext:value-type="float">
            <text:p>1.16275291183258</text:p>
          </table:table-cell>
          <table:table-cell table:formula="of:=SQRT(([.N318]-[.J318])^2+([.O318]-[.K318])^2)" office:value-type="float" office:value="1.20883211731799" calcext:value-type="float">
            <text:p>1.20883211731799</text:p>
          </table:table-cell>
          <table:table-cell office:value-type="float" office:value="0.796137511730194" calcext:value-type="float">
            <text:p>0.796137511730194</text:p>
          </table:table-cell>
          <table:table-cell office:value-type="float" office:value="0.228918150067329" calcext:value-type="float">
            <text:p>0.228918150067329</text:p>
          </table:table-cell>
          <table:table-cell office:value-type="float" office:value="-0.492685735225678" calcext:value-type="float">
            <text:p>-0.492685735225678</text:p>
          </table:table-cell>
          <table:table-cell office:value-type="float" office:value="0.999195575714111" calcext:value-type="float">
            <text:p>0.999195575714111</text:p>
          </table:table-cell>
          <table:table-cell office:value-type="float" office:value="0.202592492103577" calcext:value-type="float">
            <text:p>0.202592492103577</text:p>
          </table:table-cell>
          <table:table-cell office:value-type="float" office:value="0.222936123609543" calcext:value-type="float">
            <text:p>0.222936123609543</text:p>
          </table:table-cell>
          <table:table-cell office:value-type="float" office:value="-0.589385330677033" calcext:value-type="float">
            <text:p>-0.589385330677033</text:p>
          </table:table-cell>
          <table:table-cell office:value-type="float" office:value="0.999717712402344" calcext:value-type="float">
            <text:p>0.999717712402344</text:p>
          </table:table-cell>
          <table:table-cell office:value-type="float" office:value="0.731214642524719" calcext:value-type="float">
            <text:p>0.731214642524719</text:p>
          </table:table-cell>
          <table:table-cell office:value-type="float" office:value="1.31005787849426" calcext:value-type="float">
            <text:p>1.31005787849426</text:p>
          </table:table-cell>
          <table:table-cell office:value-type="float" office:value="0.0862178504467011" calcext:value-type="float">
            <text:p>0.0862178504467011</text:p>
          </table:table-cell>
          <table:table-cell office:value-type="float" office:value="0.0375283025205135" calcext:value-type="float">
            <text:p>0.0375283025205135</text:p>
          </table:table-cell>
          <table:table-cell office:value-type="float" office:value="0.343871057033539" calcext:value-type="float">
            <text:p>0.343871057033539</text:p>
          </table:table-cell>
          <table:table-cell office:value-type="float" office:value="1.30010879039764" calcext:value-type="float">
            <text:p>1.30010879039764</text:p>
          </table:table-cell>
          <table:table-cell office:value-type="float" office:value="-0.0726349577307701" calcext:value-type="float">
            <text:p>-0.0726349577307701</text:p>
          </table:table-cell>
          <table:table-cell office:value-type="float" office:value="0.0488061085343361" calcext:value-type="float">
            <text:p>0.048806108534336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SQRT(([.J319]-[.F319])^2+([.K319]-[.G319])^2)" office:value-type="float" office:value="0.597158946995984" calcext:value-type="float">
            <text:p>0.597158946995984</text:p>
          </table:table-cell>
          <table:table-cell table:formula="of:=SQRT(([.R319]-[.N319])^2+([.S319]-[.O319])^2)" office:value-type="float" office:value="0.396862448802626" calcext:value-type="float">
            <text:p>0.396862448802626</text:p>
          </table:table-cell>
          <table:table-cell table:formula="of:=SQRT(([.R319]-[.F319])^2+([.S319]-[.G319])^2)" office:value-type="float" office:value="1.16573363909956" calcext:value-type="float">
            <text:p>1.16573363909956</text:p>
          </table:table-cell>
          <table:table-cell table:formula="of:=SQRT(([.N319]-[.J319])^2+([.O319]-[.K319])^2)" office:value-type="float" office:value="1.22219272021211" calcext:value-type="float">
            <text:p>1.22219272021211</text:p>
          </table:table-cell>
          <table:table-cell office:value-type="float" office:value="0.786017060279846" calcext:value-type="float">
            <text:p>0.786017060279846</text:p>
          </table:table-cell>
          <table:table-cell office:value-type="float" office:value="0.236046060919762" calcext:value-type="float">
            <text:p>0.236046060919762</text:p>
          </table:table-cell>
          <table:table-cell office:value-type="float" office:value="-0.548695504665375" calcext:value-type="float">
            <text:p>-0.548695504665375</text:p>
          </table:table-cell>
          <table:table-cell office:value-type="float" office:value="0.999222457408905" calcext:value-type="float">
            <text:p>0.999222457408905</text:p>
          </table:table-cell>
          <table:table-cell office:value-type="float" office:value="0.189166158437729" calcext:value-type="float">
            <text:p>0.189166158437729</text:p>
          </table:table-cell>
          <table:table-cell office:value-type="float" office:value="0.216867715120316" calcext:value-type="float">
            <text:p>0.216867715120316</text:p>
          </table:table-cell>
          <table:table-cell office:value-type="float" office:value="-0.737802147865295" calcext:value-type="float">
            <text:p>-0.737802147865295</text:p>
          </table:table-cell>
          <table:table-cell office:value-type="float" office:value="0.999723255634308" calcext:value-type="float">
            <text:p>0.999723255634308</text:p>
          </table:table-cell>
          <table:table-cell office:value-type="float" office:value="0.716813683509827" calcext:value-type="float">
            <text:p>0.716813683509827</text:p>
          </table:table-cell>
          <table:table-cell office:value-type="float" office:value="1.3192937374115" calcext:value-type="float">
            <text:p>1.3192937374115</text:p>
          </table:table-cell>
          <table:table-cell office:value-type="float" office:value="0.096550889313221" calcext:value-type="float">
            <text:p>0.096550889313221</text:p>
          </table:table-cell>
          <table:table-cell office:value-type="float" office:value="0.03648916259408" calcext:value-type="float">
            <text:p>0.03648916259408</text:p>
          </table:table-cell>
          <table:table-cell office:value-type="float" office:value="0.320220559835434" calcext:value-type="float">
            <text:p>0.320220559835434</text:p>
          </table:table-cell>
          <table:table-cell office:value-type="float" office:value="1.30467534065247" calcext:value-type="float">
            <text:p>1.30467534065247</text:p>
          </table:table-cell>
          <table:table-cell office:value-type="float" office:value="-0.0826036110520363" calcext:value-type="float">
            <text:p>-0.0826036110520363</text:p>
          </table:table-cell>
          <table:table-cell office:value-type="float" office:value="0.0468583516776562" calcext:value-type="float">
            <text:p>0.04685835167765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SQRT(([.J320]-[.F320])^2+([.K320]-[.G320])^2)" office:value-type="float" office:value="0.596056577770545" calcext:value-type="float">
            <text:p>0.596056577770545</text:p>
          </table:table-cell>
          <table:table-cell table:formula="of:=SQRT(([.R320]-[.N320])^2+([.S320]-[.O320])^2)" office:value-type="float" office:value="0.39426021635676" calcext:value-type="float">
            <text:p>0.39426021635676</text:p>
          </table:table-cell>
          <table:table-cell table:formula="of:=SQRT(([.R320]-[.F320])^2+([.S320]-[.G320])^2)" office:value-type="float" office:value="1.16571933991009" calcext:value-type="float">
            <text:p>1.16571933991009</text:p>
          </table:table-cell>
          <table:table-cell table:formula="of:=SQRT(([.N320]-[.J320])^2+([.O320]-[.K320])^2)" office:value-type="float" office:value="1.22887424528041" calcext:value-type="float">
            <text:p>1.22887424528041</text:p>
          </table:table-cell>
          <table:table-cell office:value-type="float" office:value="0.7821244597435" calcext:value-type="float">
            <text:p>0.7821244597435</text:p>
          </table:table-cell>
          <table:table-cell office:value-type="float" office:value="0.237684562802315" calcext:value-type="float">
            <text:p>0.237684562802315</text:p>
          </table:table-cell>
          <table:table-cell office:value-type="float" office:value="-0.535800695419312" calcext:value-type="float">
            <text:p>-0.535800695419312</text:p>
          </table:table-cell>
          <table:table-cell office:value-type="float" office:value="0.999217987060547" calcext:value-type="float">
            <text:p>0.999217987060547</text:p>
          </table:table-cell>
          <table:table-cell office:value-type="float" office:value="0.186633914709091" calcext:value-type="float">
            <text:p>0.186633914709091</text:p>
          </table:table-cell>
          <table:table-cell office:value-type="float" office:value="0.211714297533035" calcext:value-type="float">
            <text:p>0.211714297533035</text:p>
          </table:table-cell>
          <table:table-cell office:value-type="float" office:value="-0.630377411842346" calcext:value-type="float">
            <text:p>-0.630377411842346</text:p>
          </table:table-cell>
          <table:table-cell office:value-type="float" office:value="0.999718248844147" calcext:value-type="float">
            <text:p>0.999718248844147</text:p>
          </table:table-cell>
          <table:table-cell office:value-type="float" office:value="0.709918856620789" calcext:value-type="float">
            <text:p>0.709918856620789</text:p>
          </table:table-cell>
          <table:table-cell office:value-type="float" office:value="1.32360672950745" calcext:value-type="float">
            <text:p>1.32360672950745</text:p>
          </table:table-cell>
          <table:table-cell office:value-type="float" office:value="0.0915647298097611" calcext:value-type="float">
            <text:p>0.0915647298097611</text:p>
          </table:table-cell>
          <table:table-cell office:value-type="float" office:value="0.0366815365850925" calcext:value-type="float">
            <text:p>0.0366815365850925</text:p>
          </table:table-cell>
          <table:table-cell office:value-type="float" office:value="0.316044211387634" calcext:value-type="float">
            <text:p>0.316044211387634</text:p>
          </table:table-cell>
          <table:table-cell office:value-type="float" office:value="1.30617451667786" calcext:value-type="float">
            <text:p>1.30617451667786</text:p>
          </table:table-cell>
          <table:table-cell office:value-type="float" office:value="-0.0777505487203598" calcext:value-type="float">
            <text:p>-0.0777505487203598</text:p>
          </table:table-cell>
          <table:table-cell office:value-type="float" office:value="0.0471900068223476" calcext:value-type="float">
            <text:p>0.04719000682234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QRT(([.J321]-[.F321])^2+([.K321]-[.G321])^2)" office:value-type="float" office:value="0.600013559550163" calcext:value-type="float">
            <text:p>0.600013559550163</text:p>
          </table:table-cell>
          <table:table-cell table:formula="of:=SQRT(([.R321]-[.N321])^2+([.S321]-[.O321])^2)" office:value-type="float" office:value="0.390461479735402" calcext:value-type="float">
            <text:p>0.390461479735402</text:p>
          </table:table-cell>
          <table:table-cell table:formula="of:=SQRT(([.R321]-[.F321])^2+([.S321]-[.G321])^2)" office:value-type="float" office:value="1.16034190891749" calcext:value-type="float">
            <text:p>1.16034190891749</text:p>
          </table:table-cell>
          <table:table-cell table:formula="of:=SQRT(([.N321]-[.J321])^2+([.O321]-[.K321])^2)" office:value-type="float" office:value="1.24052058675447" calcext:value-type="float">
            <text:p>1.24052058675447</text:p>
          </table:table-cell>
          <table:table-cell office:value-type="float" office:value="0.769136071205139" calcext:value-type="float">
            <text:p>0.769136071205139</text:p>
          </table:table-cell>
          <table:table-cell office:value-type="float" office:value="0.236851051449776" calcext:value-type="float">
            <text:p>0.236851051449776</text:p>
          </table:table-cell>
          <table:table-cell office:value-type="float" office:value="-0.531268358230591" calcext:value-type="float">
            <text:p>-0.531268358230591</text:p>
          </table:table-cell>
          <table:table-cell office:value-type="float" office:value="0.999179899692535" calcext:value-type="float">
            <text:p>0.999179899692535</text:p>
          </table:table-cell>
          <table:table-cell office:value-type="float" office:value="0.170064583420753" calcext:value-type="float">
            <text:p>0.170064583420753</text:p>
          </table:table-cell>
          <table:table-cell office:value-type="float" office:value="0.203241169452667" calcext:value-type="float">
            <text:p>0.203241169452667</text:p>
          </table:table-cell>
          <table:table-cell office:value-type="float" office:value="-0.627435684204102" calcext:value-type="float">
            <text:p>-0.627435684204102</text:p>
          </table:table-cell>
          <table:table-cell office:value-type="float" office:value="0.999696254730225" calcext:value-type="float">
            <text:p>0.999696254730225</text:p>
          </table:table-cell>
          <table:table-cell office:value-type="float" office:value="0.704254508018494" calcext:value-type="float">
            <text:p>0.704254508018494</text:p>
          </table:table-cell>
          <table:table-cell office:value-type="float" office:value="1.32285380363464" calcext:value-type="float">
            <text:p>1.32285380363464</text:p>
          </table:table-cell>
          <table:table-cell office:value-type="float" office:value="0.0867654755711556" calcext:value-type="float">
            <text:p>0.0867654755711556</text:p>
          </table:table-cell>
          <table:table-cell office:value-type="float" office:value="0.0377718135714531" calcext:value-type="float">
            <text:p>0.0377718135714531</text:p>
          </table:table-cell>
          <table:table-cell office:value-type="float" office:value="0.314233869314194" calcext:value-type="float">
            <text:p>0.314233869314194</text:p>
          </table:table-cell>
          <table:table-cell office:value-type="float" office:value="1.30430471897125" calcext:value-type="float">
            <text:p>1.30430471897125</text:p>
          </table:table-cell>
          <table:table-cell office:value-type="float" office:value="-0.0731911510229111" calcext:value-type="float">
            <text:p>-0.0731911510229111</text:p>
          </table:table-cell>
          <table:table-cell office:value-type="float" office:value="0.0486567951738834" calcext:value-type="float">
            <text:p>0.04865679517388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SQRT(([.J322]-[.F322])^2+([.K322]-[.G322])^2)" office:value-type="float" office:value="0.583370361141209" calcext:value-type="float">
            <text:p>0.583370361141209</text:p>
          </table:table-cell>
          <table:table-cell table:formula="of:=SQRT(([.R322]-[.N322])^2+([.S322]-[.O322])^2)" office:value-type="float" office:value="0.388278169365924" calcext:value-type="float">
            <text:p>0.388278169365924</text:p>
          </table:table-cell>
          <table:table-cell table:formula="of:=SQRT(([.R322]-[.F322])^2+([.S322]-[.G322])^2)" office:value-type="float" office:value="1.14192731197923" calcext:value-type="float">
            <text:p>1.14192731197923</text:p>
          </table:table-cell>
          <table:table-cell table:formula="of:=SQRT(([.N322]-[.J322])^2+([.O322]-[.K322])^2)" office:value-type="float" office:value="1.22923440005503" calcext:value-type="float">
            <text:p>1.22923440005503</text:p>
          </table:table-cell>
          <table:table-cell office:value-type="float" office:value="0.746464133262634" calcext:value-type="float">
            <text:p>0.746464133262634</text:p>
          </table:table-cell>
          <table:table-cell office:value-type="float" office:value="0.229343980550766" calcext:value-type="float">
            <text:p>0.229343980550766</text:p>
          </table:table-cell>
          <table:table-cell office:value-type="float" office:value="-0.122201718389988" calcext:value-type="float">
            <text:p>-0.122201718389988</text:p>
          </table:table-cell>
          <table:table-cell office:value-type="float" office:value="0.999143481254578" calcext:value-type="float">
            <text:p>0.999143481254578</text:p>
          </table:table-cell>
          <table:table-cell office:value-type="float" office:value="0.163965940475464" calcext:value-type="float">
            <text:p>0.163965940475464</text:p>
          </table:table-cell>
          <table:table-cell office:value-type="float" office:value="0.197456151247025" calcext:value-type="float">
            <text:p>0.197456151247025</text:p>
          </table:table-cell>
          <table:table-cell office:value-type="float" office:value="-0.255771309137344" calcext:value-type="float">
            <text:p>-0.255771309137344</text:p>
          </table:table-cell>
          <table:table-cell office:value-type="float" office:value="0.999698758125305" calcext:value-type="float">
            <text:p>0.999698758125305</text:p>
          </table:table-cell>
          <table:table-cell office:value-type="float" office:value="0.702654719352722" calcext:value-type="float">
            <text:p>0.702654719352722</text:p>
          </table:table-cell>
          <table:table-cell office:value-type="float" office:value="1.30236864089966" calcext:value-type="float">
            <text:p>1.30236864089966</text:p>
          </table:table-cell>
          <table:table-cell office:value-type="float" office:value="0.0872863456606865" calcext:value-type="float">
            <text:p>0.0872863456606865</text:p>
          </table:table-cell>
          <table:table-cell office:value-type="float" office:value="0.0499445423483849" calcext:value-type="float">
            <text:p>0.0499445423483849</text:p>
          </table:table-cell>
          <table:table-cell office:value-type="float" office:value="0.314700961112976" calcext:value-type="float">
            <text:p>0.314700961112976</text:p>
          </table:table-cell>
          <table:table-cell office:value-type="float" office:value="1.28649985790253" calcext:value-type="float">
            <text:p>1.28649985790253</text:p>
          </table:table-cell>
          <table:table-cell office:value-type="float" office:value="-0.0742983743548393" calcext:value-type="float">
            <text:p>-0.0742983743548393</text:p>
          </table:table-cell>
          <table:table-cell office:value-type="float" office:value="0.064889706671238" calcext:value-type="float">
            <text:p>0.0648897066712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SQRT(([.J323]-[.F323])^2+([.K323]-[.G323])^2)" office:value-type="float" office:value="0.582500613614253" calcext:value-type="float">
            <text:p>0.582500613614253</text:p>
          </table:table-cell>
          <table:table-cell table:formula="of:=SQRT(([.R323]-[.N323])^2+([.S323]-[.O323])^2)" office:value-type="float" office:value="0.39645740945652" calcext:value-type="float">
            <text:p>0.39645740945652</text:p>
          </table:table-cell>
          <table:table-cell table:formula="of:=SQRT(([.R323]-[.F323])^2+([.S323]-[.G323])^2)" office:value-type="float" office:value="1.16342863614238" calcext:value-type="float">
            <text:p>1.16342863614238</text:p>
          </table:table-cell>
          <table:table-cell table:formula="of:=SQRT(([.N323]-[.J323])^2+([.O323]-[.K323])^2)" office:value-type="float" office:value="1.25550929374927" calcext:value-type="float">
            <text:p>1.25550929374927</text:p>
          </table:table-cell>
          <table:table-cell office:value-type="float" office:value="0.745820701122284" calcext:value-type="float">
            <text:p>0.745820701122284</text:p>
          </table:table-cell>
          <table:table-cell office:value-type="float" office:value="0.23835363984108" calcext:value-type="float">
            <text:p>0.23835363984108</text:p>
          </table:table-cell>
          <table:table-cell office:value-type="float" office:value="-0.259889304637909" calcext:value-type="float">
            <text:p>-0.259889304637909</text:p>
          </table:table-cell>
          <table:table-cell office:value-type="float" office:value="0.999180197715759" calcext:value-type="float">
            <text:p>0.999180197715759</text:p>
          </table:table-cell>
          <table:table-cell office:value-type="float" office:value="0.164851233363152" calcext:value-type="float">
            <text:p>0.164851233363152</text:p>
          </table:table-cell>
          <table:table-cell office:value-type="float" office:value="0.196146503090858" calcext:value-type="float">
            <text:p>0.196146503090858</text:p>
          </table:table-cell>
          <table:table-cell office:value-type="float" office:value="-0.350170135498047" calcext:value-type="float">
            <text:p>-0.350170135498047</text:p>
          </table:table-cell>
          <table:table-cell office:value-type="float" office:value="0.999709367752075" calcext:value-type="float">
            <text:p>0.999709367752075</text:p>
          </table:table-cell>
          <table:table-cell office:value-type="float" office:value="0.696349382400513" calcext:value-type="float">
            <text:p>0.696349382400513</text:p>
          </table:table-cell>
          <table:table-cell office:value-type="float" office:value="1.3336056470871" calcext:value-type="float">
            <text:p>1.3336056470871</text:p>
          </table:table-cell>
          <table:table-cell office:value-type="float" office:value="0.104994870722294" calcext:value-type="float">
            <text:p>0.104994870722294</text:p>
          </table:table-cell>
          <table:table-cell office:value-type="float" office:value="0.0485566928982735" calcext:value-type="float">
            <text:p>0.0485566928982735</text:p>
          </table:table-cell>
          <table:table-cell office:value-type="float" office:value="0.300420105457306" calcext:value-type="float">
            <text:p>0.300420105457306</text:p>
          </table:table-cell>
          <table:table-cell office:value-type="float" office:value="1.31314873695374" calcext:value-type="float">
            <text:p>1.31314873695374</text:p>
          </table:table-cell>
          <table:table-cell office:value-type="float" office:value="-0.091937318444252" calcext:value-type="float">
            <text:p>-0.091937318444252</text:p>
          </table:table-cell>
          <table:table-cell office:value-type="float" office:value="0.0631204172968864" calcext:value-type="float">
            <text:p>0.06312041729688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SQRT(([.J324]-[.F324])^2+([.K324]-[.G324])^2)" office:value-type="float" office:value="0.577098075887117" calcext:value-type="float">
            <text:p>0.577098075887117</text:p>
          </table:table-cell>
          <table:table-cell table:formula="of:=SQRT(([.R324]-[.N324])^2+([.S324]-[.O324])^2)" office:value-type="float" office:value="0.387078737585893" calcext:value-type="float">
            <text:p>0.387078737585893</text:p>
          </table:table-cell>
          <table:table-cell table:formula="of:=SQRT(([.R324]-[.F324])^2+([.S324]-[.G324])^2)" office:value-type="float" office:value="1.15661846978765" calcext:value-type="float">
            <text:p>1.15661846978765</text:p>
          </table:table-cell>
          <table:table-cell table:formula="of:=SQRT(([.N324]-[.J324])^2+([.O324]-[.K324])^2)" office:value-type="float" office:value="1.26466627050062" calcext:value-type="float">
            <text:p>1.26466627050062</text:p>
          </table:table-cell>
          <table:table-cell office:value-type="float" office:value="0.740294277667999" calcext:value-type="float">
            <text:p>0.740294277667999</text:p>
          </table:table-cell>
          <table:table-cell office:value-type="float" office:value="0.238320618867874" calcext:value-type="float">
            <text:p>0.238320618867874</text:p>
          </table:table-cell>
          <table:table-cell office:value-type="float" office:value="-0.260749012231827" calcext:value-type="float">
            <text:p>-0.260749012231827</text:p>
          </table:table-cell>
          <table:table-cell office:value-type="float" office:value="0.999049186706543" calcext:value-type="float">
            <text:p>0.999049186706543</text:p>
          </table:table-cell>
          <table:table-cell office:value-type="float" office:value="0.166125908493996" calcext:value-type="float">
            <text:p>0.166125908493996</text:p>
          </table:table-cell>
          <table:table-cell office:value-type="float" office:value="0.18024417757988" calcext:value-type="float">
            <text:p>0.18024417757988</text:p>
          </table:table-cell>
          <table:table-cell office:value-type="float" office:value="-0.282726764678955" calcext:value-type="float">
            <text:p>-0.282726764678955</text:p>
          </table:table-cell>
          <table:table-cell office:value-type="float" office:value="0.999679386615753" calcext:value-type="float">
            <text:p>0.999679386615753</text:p>
          </table:table-cell>
          <table:table-cell office:value-type="float" office:value="0.687650203704834" calcext:value-type="float">
            <text:p>0.687650203704834</text:p>
          </table:table-cell>
          <table:table-cell office:value-type="float" office:value="1.33236968517303" calcext:value-type="float">
            <text:p>1.33236968517303</text:p>
          </table:table-cell>
          <table:table-cell office:value-type="float" office:value="0.0782580524682999" calcext:value-type="float">
            <text:p>0.0782580524682999</text:p>
          </table:table-cell>
          <table:table-cell office:value-type="float" office:value="0.0572102479636669" calcext:value-type="float">
            <text:p>0.0572102479636669</text:p>
          </table:table-cell>
          <table:table-cell office:value-type="float" office:value="0.301314532756805" calcext:value-type="float">
            <text:p>0.301314532756805</text:p>
          </table:table-cell>
          <table:table-cell office:value-type="float" office:value="1.30839681625366" calcext:value-type="float">
            <text:p>1.30839681625366</text:p>
          </table:table-cell>
          <table:table-cell office:value-type="float" office:value="-0.0659830868244171" calcext:value-type="float">
            <text:p>-0.0659830868244171</text:p>
          </table:table-cell>
          <table:table-cell office:value-type="float" office:value="0.0737606659531593" calcext:value-type="float">
            <text:p>0.0737606659531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1T20:50:46.347638294</dc:date>
    <meta:editing-duration>PT16M16S</meta:editing-duration>
    <meta:editing-cycles>2</meta:editing-cycles>
    <meta:generator>LibreOffice/25.2.7.2$Linux_X86_64 LibreOffice_project/520$Build-2</meta:generator>
    <meta:document-statistic meta:table-count="1" meta:cell-count="6804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914cm" svg:height="14.331cm" xlink:href=".." xlink:type="simple" chart:class="chart:scatter" chart:style-name="ch1">
        <chart:legend chart:legend-position="end" svg:x="47.663cm" svg:y="6.119cm" style:legend-expansion="high" chart:style-name="ch2"/>
        <chart:plot-area chart:style-name="ch3" svg:x="0.978cm" svg:y="0.286cm" svg:width="45.707cm" svg:height="13.759cm">
          <chart:coordinate-region svg:x="1.726cm" svg:y="0.485cm" svg:width="44.659cm" svg:height="12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py.B2:copy.B324" chart:label-cell-address="copy.B1:copy.B1" chart:class="chart:scatter">
            <chart:domain table:cell-range-address="copy.A2:copy.A324"/>
            <chart:data-point chart:repeated="323"/>
          </chart:series>
          <chart:series chart:style-name="ch8" chart:values-cell-range-address="copy.C2:copy.C324" chart:label-cell-address="copy.C1:copy.C1" chart:class="chart:scatter">
            <chart:data-point chart:repeated="323"/>
          </chart:series>
          <chart:series chart:style-name="ch9" chart:values-cell-range-address="copy.D2:copy.D324" chart:label-cell-address="copy.D1:copy.D1" chart:class="chart:scatter">
            <chart:data-point chart:repeated="323"/>
          </chart:series>
          <chart:series chart:style-name="ch10" chart:values-cell-range-address="copy.E2:copy.E324" chart:label-cell-address="copy.E1:copy.E1" chart:class="chart:scatter">
            <chart:data-point chart:repeated="3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1</text:p>
                <draw:g>
                  <svg:desc>copy.B1:copy.B1</svg:desc>
                </draw:g>
              </table:table-cell>
              <table:table-cell office:value-type="string">
                <text:p>m2</text:p>
                <draw:g>
                  <svg:desc>copy.C1:copy.C1</svg:desc>
                </draw:g>
              </table:table-cell>
              <table:table-cell office:value-type="string">
                <text:p>m3</text:p>
                <draw:g>
                  <svg:desc>copy.D1:copy.D1</svg:desc>
                </draw:g>
              </table:table-cell>
              <table:table-cell office:value-type="string">
                <text:p>m4</text:p>
                <draw:g>
                  <svg:desc>copy.E1:cop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py.A2:copy.A324</svg:desc>
                </draw:g>
              </table:table-cell>
              <table:table-cell office:value-type="float" office:value="0.503051073243394">
                <text:p>0.503051073243394</text:p>
                <draw:g>
                  <svg:desc>copy.B2:copy.B324</svg:desc>
                </draw:g>
              </table:table-cell>
              <table:table-cell office:value-type="float" office:value="0.299123326528294">
                <text:p>0.299123326528294</text:p>
                <draw:g>
                  <svg:desc>copy.C2:copy.C324</svg:desc>
                </draw:g>
              </table:table-cell>
              <table:table-cell office:value-type="float" office:value="0.93880539886549">
                <text:p>0.93880539886549</text:p>
                <draw:g>
                  <svg:desc>copy.D2:copy.D324</svg:desc>
                </draw:g>
              </table:table-cell>
              <table:table-cell office:value-type="float" office:value="0.933709336199209">
                <text:p>0.933709336199209</text:p>
                <draw:g>
                  <svg:desc>copy.E2:copy.E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99395413592392">
                <text:p>0.499395413592392</text:p>
              </table:table-cell>
              <table:table-cell office:value-type="float" office:value="0.299266408221725">
                <text:p>0.299266408221725</text:p>
              </table:table-cell>
              <table:table-cell office:value-type="float" office:value="0.952250318501852">
                <text:p>0.952250318501852</text:p>
              </table:table-cell>
              <table:table-cell office:value-type="float" office:value="0.944825492626517">
                <text:p>0.944825492626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4460191803665">
                <text:p>0.494460191803665</text:p>
              </table:table-cell>
              <table:table-cell office:value-type="float" office:value="0.305591035146584">
                <text:p>0.305591035146584</text:p>
              </table:table-cell>
              <table:table-cell office:value-type="float" office:value="0.966601028818153">
                <text:p>0.966601028818153</text:p>
              </table:table-cell>
              <table:table-cell office:value-type="float" office:value="0.962686939354287">
                <text:p>0.962686939354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1815502096662">
                <text:p>0.491815502096662</text:p>
              </table:table-cell>
              <table:table-cell office:value-type="float" office:value="0.30533957783167">
                <text:p>0.30533957783167</text:p>
              </table:table-cell>
              <table:table-cell office:value-type="float" office:value="0.966553747907598">
                <text:p>0.966553747907598</text:p>
              </table:table-cell>
              <table:table-cell office:value-type="float" office:value="0.965009544855415">
                <text:p>0.965009544855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8980878621565">
                <text:p>0.48980878621565</text:p>
              </table:table-cell>
              <table:table-cell office:value-type="float" office:value="0.308666365600617">
                <text:p>0.308666365600617</text:p>
              </table:table-cell>
              <table:table-cell office:value-type="float" office:value="0.969052123792164">
                <text:p>0.969052123792164</text:p>
              </table:table-cell>
              <table:table-cell office:value-type="float" office:value="0.96649824292969">
                <text:p>0.96649824292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92654327223115">
                <text:p>0.492654327223115</text:p>
              </table:table-cell>
              <table:table-cell office:value-type="float" office:value="0.309365894090145">
                <text:p>0.309365894090145</text:p>
              </table:table-cell>
              <table:table-cell office:value-type="float" office:value="0.968463879097594">
                <text:p>0.968463879097594</text:p>
              </table:table-cell>
              <table:table-cell office:value-type="float" office:value="0.971154193242718">
                <text:p>0.971154193242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7509178007592">
                <text:p>0.497509178007592</text:p>
              </table:table-cell>
              <table:table-cell office:value-type="float" office:value="0.310393077891058">
                <text:p>0.310393077891058</text:p>
              </table:table-cell>
              <table:table-cell office:value-type="float" office:value="0.986989804752554">
                <text:p>0.986989804752554</text:p>
              </table:table-cell>
              <table:table-cell office:value-type="float" office:value="0.983562295588555">
                <text:p>0.983562295588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97899362242071">
                <text:p>0.497899362242071</text:p>
              </table:table-cell>
              <table:table-cell office:value-type="float" office:value="0.317191531342454">
                <text:p>0.317191531342454</text:p>
              </table:table-cell>
              <table:table-cell office:value-type="float" office:value="0.990919023375494">
                <text:p>0.990919023375494</text:p>
              </table:table-cell>
              <table:table-cell office:value-type="float" office:value="0.99080210543639">
                <text:p>0.99080210543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97379125824156">
                <text:p>0.497379125824156</text:p>
              </table:table-cell>
              <table:table-cell office:value-type="float" office:value="0.316765136284948">
                <text:p>0.316765136284948</text:p>
              </table:table-cell>
              <table:table-cell office:value-type="float" office:value="0.989249620920341">
                <text:p>0.989249620920341</text:p>
              </table:table-cell>
              <table:table-cell office:value-type="float" office:value="0.991589563716952">
                <text:p>0.991589563716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98134743976202">
                <text:p>0.498134743976202</text:p>
              </table:table-cell>
              <table:table-cell office:value-type="float" office:value="0.318297832112408">
                <text:p>0.318297832112408</text:p>
              </table:table-cell>
              <table:table-cell office:value-type="float" office:value="0.98928752632373">
                <text:p>0.98928752632373</text:p>
              </table:table-cell>
              <table:table-cell office:value-type="float" office:value="0.993505920081932">
                <text:p>0.993505920081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98068803317344">
                <text:p>0.498068803317344</text:p>
              </table:table-cell>
              <table:table-cell office:value-type="float" office:value="0.318728422849553">
                <text:p>0.318728422849553</text:p>
              </table:table-cell>
              <table:table-cell office:value-type="float" office:value="0.984066695460163">
                <text:p>0.984066695460163</text:p>
              </table:table-cell>
              <table:table-cell office:value-type="float" office:value="0.986205977196285">
                <text:p>0.986205977196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00229578444569">
                <text:p>0.500229578444569</text:p>
              </table:table-cell>
              <table:table-cell office:value-type="float" office:value="0.31803547710194">
                <text:p>0.31803547710194</text:p>
              </table:table-cell>
              <table:table-cell office:value-type="float" office:value="0.989412894605521">
                <text:p>0.989412894605521</text:p>
              </table:table-cell>
              <table:table-cell office:value-type="float" office:value="0.983436031916957">
                <text:p>0.983436031916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02102256914509">
                <text:p>0.502102256914509</text:p>
              </table:table-cell>
              <table:table-cell office:value-type="float" office:value="0.318217735566205">
                <text:p>0.318217735566205</text:p>
              </table:table-cell>
              <table:table-cell office:value-type="float" office:value="0.99259056642063">
                <text:p>0.99259056642063</text:p>
              </table:table-cell>
              <table:table-cell office:value-type="float" office:value="0.992562349617105">
                <text:p>0.992562349617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03920833408037">
                <text:p>0.503920833408037</text:p>
              </table:table-cell>
              <table:table-cell office:value-type="float" office:value="0.319941179117033">
                <text:p>0.319941179117033</text:p>
              </table:table-cell>
              <table:table-cell office:value-type="float" office:value="0.993413576804541">
                <text:p>0.993413576804541</text:p>
              </table:table-cell>
              <table:table-cell office:value-type="float" office:value="0.994785792695582">
                <text:p>0.994785792695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07741418370162">
                <text:p>0.507741418370162</text:p>
              </table:table-cell>
              <table:table-cell office:value-type="float" office:value="0.321316782433347">
                <text:p>0.321316782433347</text:p>
              </table:table-cell>
              <table:table-cell office:value-type="float" office:value="0.996170967856658">
                <text:p>0.996170967856658</text:p>
              </table:table-cell>
              <table:table-cell office:value-type="float" office:value="0.995711316956033">
                <text:p>0.995711316956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08516025145293">
                <text:p>0.508516025145293</text:p>
              </table:table-cell>
              <table:table-cell office:value-type="float" office:value="0.32118652225779">
                <text:p>0.32118652225779</text:p>
              </table:table-cell>
              <table:table-cell office:value-type="float" office:value="0.999401120620469">
                <text:p>0.999401120620469</text:p>
              </table:table-cell>
              <table:table-cell office:value-type="float" office:value="0.997835312101214">
                <text:p>0.997835312101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1074105185916">
                <text:p>0.51074105185916</text:p>
              </table:table-cell>
              <table:table-cell office:value-type="float" office:value="0.326252462289436">
                <text:p>0.326252462289436</text:p>
              </table:table-cell>
              <table:table-cell office:value-type="float" office:value="1.00549234951755">
                <text:p>1.00549234951755</text:p>
              </table:table-cell>
              <table:table-cell office:value-type="float" office:value="1.0077628532328">
                <text:p>1.0077628532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1791878415793">
                <text:p>0.51791878415793</text:p>
              </table:table-cell>
              <table:table-cell office:value-type="float" office:value="0.328300716246232">
                <text:p>0.328300716246232</text:p>
              </table:table-cell>
              <table:table-cell office:value-type="float" office:value="1.01457395342617">
                <text:p>1.01457395342617</text:p>
              </table:table-cell>
              <table:table-cell office:value-type="float" office:value="1.02992185841135">
                <text:p>1.02992185841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20560788069154">
                <text:p>0.520560788069154</text:p>
              </table:table-cell>
              <table:table-cell office:value-type="float" office:value="0.329903052879029">
                <text:p>0.329903052879029</text:p>
              </table:table-cell>
              <table:table-cell office:value-type="float" office:value="1.01485525420071">
                <text:p>1.01485525420071</text:p>
              </table:table-cell>
              <table:table-cell office:value-type="float" office:value="1.03156488984647">
                <text:p>1.03156488984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20893210054544">
                <text:p>0.520893210054544</text:p>
              </table:table-cell>
              <table:table-cell office:value-type="float" office:value="0.32975077160846">
                <text:p>0.32975077160846</text:p>
              </table:table-cell>
              <table:table-cell office:value-type="float" office:value="1.01600876077913">
                <text:p>1.01600876077913</text:p>
              </table:table-cell>
              <table:table-cell office:value-type="float" office:value="1.02569346968162">
                <text:p>1.02569346968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22074125557114">
                <text:p>0.522074125557114</text:p>
              </table:table-cell>
              <table:table-cell office:value-type="float" office:value="0.332944891437065">
                <text:p>0.332944891437065</text:p>
              </table:table-cell>
              <table:table-cell office:value-type="float" office:value="1.01552993829354">
                <text:p>1.01552993829354</text:p>
              </table:table-cell>
              <table:table-cell office:value-type="float" office:value="1.02701677098693">
                <text:p>1.02701677098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21998585716661">
                <text:p>0.521998585716661</text:p>
              </table:table-cell>
              <table:table-cell office:value-type="float" office:value="0.332022788073569">
                <text:p>0.332022788073569</text:p>
              </table:table-cell>
              <table:table-cell office:value-type="float" office:value="1.01773817257858">
                <text:p>1.01773817257858</text:p>
              </table:table-cell>
              <table:table-cell office:value-type="float" office:value="1.02628823947017">
                <text:p>1.02628823947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21067510126772">
                <text:p>0.521067510126772</text:p>
              </table:table-cell>
              <table:table-cell office:value-type="float" office:value="0.331663501943401">
                <text:p>0.331663501943401</text:p>
              </table:table-cell>
              <table:table-cell office:value-type="float" office:value="1.01558354699111">
                <text:p>1.01558354699111</text:p>
              </table:table-cell>
              <table:table-cell office:value-type="float" office:value="1.02171232188827">
                <text:p>1.02171232188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21263885528841">
                <text:p>0.521263885528841</text:p>
              </table:table-cell>
              <table:table-cell office:value-type="float" office:value="0.329978200654671">
                <text:p>0.329978200654671</text:p>
              </table:table-cell>
              <table:table-cell office:value-type="float" office:value="1.00835915382772">
                <text:p>1.00835915382772</text:p>
              </table:table-cell>
              <table:table-cell office:value-type="float" office:value="1.00972963384578">
                <text:p>1.00972963384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23521138436143">
                <text:p>0.523521138436143</text:p>
              </table:table-cell>
              <table:table-cell office:value-type="float" office:value="0.330357810035927">
                <text:p>0.330357810035927</text:p>
              </table:table-cell>
              <table:table-cell office:value-type="float" office:value="1.00939328482228">
                <text:p>1.00939328482228</text:p>
              </table:table-cell>
              <table:table-cell office:value-type="float" office:value="1.00988659164153">
                <text:p>1.00988659164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22577103630053">
                <text:p>0.522577103630053</text:p>
              </table:table-cell>
              <table:table-cell office:value-type="float" office:value="0.329861724238378">
                <text:p>0.329861724238378</text:p>
              </table:table-cell>
              <table:table-cell office:value-type="float" office:value="1.01151587188828">
                <text:p>1.01151587188828</text:p>
              </table:table-cell>
              <table:table-cell office:value-type="float" office:value="1.0116559856465">
                <text:p>1.0116559856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2122929863135">
                <text:p>0.52122929863135</text:p>
              </table:table-cell>
              <table:table-cell office:value-type="float" office:value="0.328984459988995">
                <text:p>0.328984459988995</text:p>
              </table:table-cell>
              <table:table-cell office:value-type="float" office:value="1.01721691980135">
                <text:p>1.01721691980135</text:p>
              </table:table-cell>
              <table:table-cell office:value-type="float" office:value="1.01106343998626">
                <text:p>1.01106343998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22680159721845">
                <text:p>0.522680159721845</text:p>
              </table:table-cell>
              <table:table-cell office:value-type="float" office:value="0.319878015170885">
                <text:p>0.319878015170885</text:p>
              </table:table-cell>
              <table:table-cell office:value-type="float" office:value="0.995857827120923">
                <text:p>0.995857827120923</text:p>
              </table:table-cell>
              <table:table-cell office:value-type="float" office:value="1.01307964933634">
                <text:p>1.01307964933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26188016326328">
                <text:p>0.526188016326328</text:p>
              </table:table-cell>
              <table:table-cell office:value-type="float" office:value="0.321106932080122">
                <text:p>0.321106932080122</text:p>
              </table:table-cell>
              <table:table-cell office:value-type="float" office:value="0.997955589376117">
                <text:p>0.997955589376117</text:p>
              </table:table-cell>
              <table:table-cell office:value-type="float" office:value="1.02079084194564">
                <text:p>1.02079084194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7346762829819">
                <text:p>0.527346762829819</text:p>
              </table:table-cell>
              <table:table-cell office:value-type="float" office:value="0.321739015933998">
                <text:p>0.321739015933998</text:p>
              </table:table-cell>
              <table:table-cell office:value-type="float" office:value="1.0060140964799">
                <text:p>1.0060140964799</text:p>
              </table:table-cell>
              <table:table-cell office:value-type="float" office:value="1.02652032412315">
                <text:p>1.02652032412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24495170380728">
                <text:p>0.524495170380728</text:p>
              </table:table-cell>
              <table:table-cell office:value-type="float" office:value="0.322785829759752">
                <text:p>0.322785829759752</text:p>
              </table:table-cell>
              <table:table-cell office:value-type="float" office:value="1.01429401264241">
                <text:p>1.01429401264241</text:p>
              </table:table-cell>
              <table:table-cell office:value-type="float" office:value="1.02022361614655">
                <text:p>1.02022361614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7607309384628">
                <text:p>0.527607309384628</text:p>
              </table:table-cell>
              <table:table-cell office:value-type="float" office:value="0.325542390783247">
                <text:p>0.325542390783247</text:p>
              </table:table-cell>
              <table:table-cell office:value-type="float" office:value="1.01701674057894">
                <text:p>1.01701674057894</text:p>
              </table:table-cell>
              <table:table-cell office:value-type="float" office:value="1.02067519743918">
                <text:p>1.02067519743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2850772868449">
                <text:p>0.52850772868449</text:p>
              </table:table-cell>
              <table:table-cell office:value-type="float" office:value="0.327208193062355">
                <text:p>0.327208193062355</text:p>
              </table:table-cell>
              <table:table-cell office:value-type="float" office:value="1.02756956812473">
                <text:p>1.02756956812473</text:p>
              </table:table-cell>
              <table:table-cell office:value-type="float" office:value="1.0274536606149">
                <text:p>1.0274536606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27459234785159">
                <text:p>0.527459234785159</text:p>
              </table:table-cell>
              <table:table-cell office:value-type="float" office:value="0.324787148630545">
                <text:p>0.324787148630545</text:p>
              </table:table-cell>
              <table:table-cell office:value-type="float" office:value="1.03001349097215">
                <text:p>1.03001349097215</text:p>
              </table:table-cell>
              <table:table-cell office:value-type="float" office:value="1.02758539950426">
                <text:p>1.02758539950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25798936177295">
                <text:p>0.525798936177295</text:p>
              </table:table-cell>
              <table:table-cell office:value-type="float" office:value="0.324911123452003">
                <text:p>0.324911123452003</text:p>
              </table:table-cell>
              <table:table-cell office:value-type="float" office:value="1.02981165877934">
                <text:p>1.02981165877934</text:p>
              </table:table-cell>
              <table:table-cell office:value-type="float" office:value="1.02715342681177">
                <text:p>1.02715342681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27933503493621">
                <text:p>0.527933503493621</text:p>
              </table:table-cell>
              <table:table-cell office:value-type="float" office:value="0.325143330766378">
                <text:p>0.325143330766378</text:p>
              </table:table-cell>
              <table:table-cell office:value-type="float" office:value="1.03284559779127">
                <text:p>1.03284559779127</text:p>
              </table:table-cell>
              <table:table-cell office:value-type="float" office:value="1.03497716692423">
                <text:p>1.034977166924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29254140824619">
                <text:p>0.529254140824619</text:p>
              </table:table-cell>
              <table:table-cell office:value-type="float" office:value="0.323891256917364">
                <text:p>0.323891256917364</text:p>
              </table:table-cell>
              <table:table-cell office:value-type="float" office:value="1.03662592219458">
                <text:p>1.03662592219458</text:p>
              </table:table-cell>
              <table:table-cell office:value-type="float" office:value="1.030416946694">
                <text:p>1.030416946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29132414776999">
                <text:p>0.529132414776999</text:p>
              </table:table-cell>
              <table:table-cell office:value-type="float" office:value="0.323397794068073">
                <text:p>0.323397794068073</text:p>
              </table:table-cell>
              <table:table-cell office:value-type="float" office:value="1.03605864903103">
                <text:p>1.03605864903103</text:p>
              </table:table-cell>
              <table:table-cell office:value-type="float" office:value="1.03116665205059">
                <text:p>1.03116665205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31926774505224">
                <text:p>0.531926774505224</text:p>
              </table:table-cell>
              <table:table-cell office:value-type="float" office:value="0.325643378174687">
                <text:p>0.325643378174687</text:p>
              </table:table-cell>
              <table:table-cell office:value-type="float" office:value="1.04108023991967">
                <text:p>1.04108023991967</text:p>
              </table:table-cell>
              <table:table-cell office:value-type="float" office:value="1.03993368074197">
                <text:p>1.03993368074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4076408131928">
                <text:p>0.534076408131928</text:p>
              </table:table-cell>
              <table:table-cell office:value-type="float" office:value="0.330068107095954">
                <text:p>0.330068107095954</text:p>
              </table:table-cell>
              <table:table-cell office:value-type="float" office:value="1.04183915328583">
                <text:p>1.04183915328583</text:p>
              </table:table-cell>
              <table:table-cell office:value-type="float" office:value="1.04120209430088">
                <text:p>1.041202094300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33038750093456">
                <text:p>0.533038750093456</text:p>
              </table:table-cell>
              <table:table-cell office:value-type="float" office:value="0.332048397688448">
                <text:p>0.332048397688448</text:p>
              </table:table-cell>
              <table:table-cell office:value-type="float" office:value="1.04433051688602">
                <text:p>1.04433051688602</text:p>
              </table:table-cell>
              <table:table-cell office:value-type="float" office:value="1.04321078612614">
                <text:p>1.04321078612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32658852452766">
                <text:p>0.532658852452766</text:p>
              </table:table-cell>
              <table:table-cell office:value-type="float" office:value="0.330790191639869">
                <text:p>0.330790191639869</text:p>
              </table:table-cell>
              <table:table-cell office:value-type="float" office:value="1.04534118748289">
                <text:p>1.04534118748289</text:p>
              </table:table-cell>
              <table:table-cell office:value-type="float" office:value="1.04333835723642">
                <text:p>1.04333835723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32913996128049">
                <text:p>0.532913996128049</text:p>
              </table:table-cell>
              <table:table-cell office:value-type="float" office:value="0.331050876802187">
                <text:p>0.331050876802187</text:p>
              </table:table-cell>
              <table:table-cell office:value-type="float" office:value="1.04662883499666">
                <text:p>1.04662883499666</text:p>
              </table:table-cell>
              <table:table-cell office:value-type="float" office:value="1.04471324423197">
                <text:p>1.04471324423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33163909406232">
                <text:p>0.533163909406232</text:p>
              </table:table-cell>
              <table:table-cell office:value-type="float" office:value="0.332471629239313">
                <text:p>0.332471629239313</text:p>
              </table:table-cell>
              <table:table-cell office:value-type="float" office:value="1.04815600283357">
                <text:p>1.04815600283357</text:p>
              </table:table-cell>
              <table:table-cell office:value-type="float" office:value="1.04266395462436">
                <text:p>1.04266395462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3461002345805">
                <text:p>0.53461002345805</text:p>
              </table:table-cell>
              <table:table-cell office:value-type="float" office:value="0.331574767196154">
                <text:p>0.331574767196154</text:p>
              </table:table-cell>
              <table:table-cell office:value-type="float" office:value="1.0486589009432">
                <text:p>1.0486589009432</text:p>
              </table:table-cell>
              <table:table-cell office:value-type="float" office:value="1.04274979977017">
                <text:p>1.04274979977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32584410979124">
                <text:p>0.532584410979124</text:p>
              </table:table-cell>
              <table:table-cell office:value-type="float" office:value="0.327686291801978">
                <text:p>0.327686291801978</text:p>
              </table:table-cell>
              <table:table-cell office:value-type="float" office:value="1.04860546617565">
                <text:p>1.04860546617565</text:p>
              </table:table-cell>
              <table:table-cell office:value-type="float" office:value="1.0371921021826">
                <text:p>1.0371921021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33271310313781">
                <text:p>0.533271310313781</text:p>
              </table:table-cell>
              <table:table-cell office:value-type="float" office:value="0.334045334360424">
                <text:p>0.334045334360424</text:p>
              </table:table-cell>
              <table:table-cell office:value-type="float" office:value="1.04959741486055">
                <text:p>1.04959741486055</text:p>
              </table:table-cell>
              <table:table-cell office:value-type="float" office:value="1.04274375407451">
                <text:p>1.04274375407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33459246127312">
                <text:p>0.533459246127312</text:p>
              </table:table-cell>
              <table:table-cell office:value-type="float" office:value="0.335777398323235">
                <text:p>0.335777398323235</text:p>
              </table:table-cell>
              <table:table-cell office:value-type="float" office:value="1.05332189560389">
                <text:p>1.05332189560389</text:p>
              </table:table-cell>
              <table:table-cell office:value-type="float" office:value="1.04688586557299">
                <text:p>1.04688586557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361811397884">
                <text:p>0.5361811397884</text:p>
              </table:table-cell>
              <table:table-cell office:value-type="float" office:value="0.335872605548912">
                <text:p>0.335872605548912</text:p>
              </table:table-cell>
              <table:table-cell office:value-type="float" office:value="1.06280022551006">
                <text:p>1.06280022551006</text:p>
              </table:table-cell>
              <table:table-cell office:value-type="float" office:value="1.06002704388069">
                <text:p>1.06002704388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33227599668967">
                <text:p>0.533227599668967</text:p>
              </table:table-cell>
              <table:table-cell office:value-type="float" office:value="0.335413487878273">
                <text:p>0.335413487878273</text:p>
              </table:table-cell>
              <table:table-cell office:value-type="float" office:value="1.06224111077456">
                <text:p>1.06224111077456</text:p>
              </table:table-cell>
              <table:table-cell office:value-type="float" office:value="1.06379305668941">
                <text:p>1.06379305668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33373695639823">
                <text:p>0.533373695639823</text:p>
              </table:table-cell>
              <table:table-cell office:value-type="float" office:value="0.329825939430671">
                <text:p>0.329825939430671</text:p>
              </table:table-cell>
              <table:table-cell office:value-type="float" office:value="1.05889125423991">
                <text:p>1.05889125423991</text:p>
              </table:table-cell>
              <table:table-cell office:value-type="float" office:value="1.05403222144199">
                <text:p>1.05403222144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29729102159068">
                <text:p>0.529729102159068</text:p>
              </table:table-cell>
              <table:table-cell office:value-type="float" office:value="0.333388977355342">
                <text:p>0.333388977355342</text:p>
              </table:table-cell>
              <table:table-cell office:value-type="float" office:value="1.04874882796031">
                <text:p>1.04874882796031</text:p>
              </table:table-cell>
              <table:table-cell office:value-type="float" office:value="1.05006223044708">
                <text:p>1.05006223044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27529343561196">
                <text:p>0.527529343561196</text:p>
              </table:table-cell>
              <table:table-cell office:value-type="float" office:value="0.332593873218206">
                <text:p>0.332593873218206</text:p>
              </table:table-cell>
              <table:table-cell office:value-type="float" office:value="1.04543705742353">
                <text:p>1.04543705742353</text:p>
              </table:table-cell>
              <table:table-cell office:value-type="float" office:value="1.04416963777775">
                <text:p>1.04416963777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26799919208863">
                <text:p>0.526799919208863</text:p>
              </table:table-cell>
              <table:table-cell office:value-type="float" office:value="0.333379017376644">
                <text:p>0.333379017376644</text:p>
              </table:table-cell>
              <table:table-cell office:value-type="float" office:value="1.05007046878787">
                <text:p>1.05007046878787</text:p>
              </table:table-cell>
              <table:table-cell office:value-type="float" office:value="1.04958655391747">
                <text:p>1.04958655391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25797545291157">
                <text:p>0.525797545291157</text:p>
              </table:table-cell>
              <table:table-cell office:value-type="float" office:value="0.334310189576193">
                <text:p>0.334310189576193</text:p>
              </table:table-cell>
              <table:table-cell office:value-type="float" office:value="1.04430344842882">
                <text:p>1.04430344842882</text:p>
              </table:table-cell>
              <table:table-cell office:value-type="float" office:value="1.06350033667606">
                <text:p>1.063500336676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28877411458949">
                <text:p>0.528877411458949</text:p>
              </table:table-cell>
              <table:table-cell office:value-type="float" office:value="0.332482225953655">
                <text:p>0.332482225953655</text:p>
              </table:table-cell>
              <table:table-cell office:value-type="float" office:value="1.04381513333313">
                <text:p>1.04381513333313</text:p>
              </table:table-cell>
              <table:table-cell office:value-type="float" office:value="1.05897904870918">
                <text:p>1.05897904870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30067553493">
                <text:p>0.530067553493</text:p>
              </table:table-cell>
              <table:table-cell office:value-type="float" office:value="0.332983981307919">
                <text:p>0.332983981307919</text:p>
              </table:table-cell>
              <table:table-cell office:value-type="float" office:value="1.04259764966762">
                <text:p>1.04259764966762</text:p>
              </table:table-cell>
              <table:table-cell office:value-type="float" office:value="1.05834555490886">
                <text:p>1.05834555490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29675484350728">
                <text:p>0.529675484350728</text:p>
              </table:table-cell>
              <table:table-cell office:value-type="float" office:value="0.332114709896841">
                <text:p>0.332114709896841</text:p>
              </table:table-cell>
              <table:table-cell office:value-type="float" office:value="1.04264636762392">
                <text:p>1.04264636762392</text:p>
              </table:table-cell>
              <table:table-cell office:value-type="float" office:value="1.05888126526248">
                <text:p>1.05888126526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25297126195176">
                <text:p>0.525297126195176</text:p>
              </table:table-cell>
              <table:table-cell office:value-type="float" office:value="0.32884528920826">
                <text:p>0.32884528920826</text:p>
              </table:table-cell>
              <table:table-cell office:value-type="float" office:value="1.03982235184876">
                <text:p>1.03982235184876</text:p>
              </table:table-cell>
              <table:table-cell office:value-type="float" office:value="1.05124282630206">
                <text:p>1.05124282630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4709158681358">
                <text:p>0.524709158681358</text:p>
              </table:table-cell>
              <table:table-cell office:value-type="float" office:value="0.329929333900038">
                <text:p>0.329929333900038</text:p>
              </table:table-cell>
              <table:table-cell office:value-type="float" office:value="1.03997464070266">
                <text:p>1.03997464070266</text:p>
              </table:table-cell>
              <table:table-cell office:value-type="float" office:value="1.05152064408444">
                <text:p>1.05152064408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4006505005981">
                <text:p>0.524006505005981</text:p>
              </table:table-cell>
              <table:table-cell office:value-type="float" office:value="0.328213948197592">
                <text:p>0.328213948197592</text:p>
              </table:table-cell>
              <table:table-cell office:value-type="float" office:value="1.03970146817801">
                <text:p>1.03970146817801</text:p>
              </table:table-cell>
              <table:table-cell office:value-type="float" office:value="1.05262499710678">
                <text:p>1.05262499710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7224486176418">
                <text:p>0.527224486176418</text:p>
              </table:table-cell>
              <table:table-cell office:value-type="float" office:value="0.329371294637406">
                <text:p>0.329371294637406</text:p>
              </table:table-cell>
              <table:table-cell office:value-type="float" office:value="1.04190484518209">
                <text:p>1.04190484518209</text:p>
              </table:table-cell>
              <table:table-cell office:value-type="float" office:value="1.04786338831814">
                <text:p>1.04786338831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15194630714765">
                <text:p>0.515194630714765</text:p>
              </table:table-cell>
              <table:table-cell office:value-type="float" office:value="0.329829629387044">
                <text:p>0.329829629387044</text:p>
              </table:table-cell>
              <table:table-cell office:value-type="float" office:value="1.03652740467216">
                <text:p>1.03652740467216</text:p>
              </table:table-cell>
              <table:table-cell office:value-type="float" office:value="1.05214095160678">
                <text:p>1.05214095160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14222170627212">
                <text:p>0.514222170627212</text:p>
              </table:table-cell>
              <table:table-cell office:value-type="float" office:value="0.325900222227901">
                <text:p>0.325900222227901</text:p>
              </table:table-cell>
              <table:table-cell office:value-type="float" office:value="1.02993605285771">
                <text:p>1.02993605285771</text:p>
              </table:table-cell>
              <table:table-cell office:value-type="float" office:value="1.03586856682995">
                <text:p>1.03586856682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15569056303079">
                <text:p>0.515569056303079</text:p>
              </table:table-cell>
              <table:table-cell office:value-type="float" office:value="0.327727441871556">
                <text:p>0.327727441871556</text:p>
              </table:table-cell>
              <table:table-cell office:value-type="float" office:value="1.02502600340167">
                <text:p>1.02502600340167</text:p>
              </table:table-cell>
              <table:table-cell office:value-type="float" office:value="1.03511283973651">
                <text:p>1.03511283973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13522005087363">
                <text:p>0.513522005087363</text:p>
              </table:table-cell>
              <table:table-cell office:value-type="float" office:value="0.324277552991814">
                <text:p>0.324277552991814</text:p>
              </table:table-cell>
              <table:table-cell office:value-type="float" office:value="1.00130661130885">
                <text:p>1.00130661130885</text:p>
              </table:table-cell>
              <table:table-cell office:value-type="float" office:value="1.00136899164801">
                <text:p>1.00136899164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13595449082899">
                <text:p>0.513595449082899</text:p>
              </table:table-cell>
              <table:table-cell office:value-type="float" office:value="0.323451147198822">
                <text:p>0.323451147198822</text:p>
              </table:table-cell>
              <table:table-cell office:value-type="float" office:value="1.00051805602495">
                <text:p>1.00051805602495</text:p>
              </table:table-cell>
              <table:table-cell office:value-type="float" office:value="1.00095836742886">
                <text:p>1.00095836742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13668047329197">
                <text:p>0.513668047329197</text:p>
              </table:table-cell>
              <table:table-cell office:value-type="float" office:value="0.320534858822103">
                <text:p>0.320534858822103</text:p>
              </table:table-cell>
              <table:table-cell office:value-type="float" office:value="1.00019434739362">
                <text:p>1.00019434739362</text:p>
              </table:table-cell>
              <table:table-cell office:value-type="float" office:value="1.00029817934554">
                <text:p>1.00029817934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11113577843179">
                <text:p>0.511113577843179</text:p>
              </table:table-cell>
              <table:table-cell office:value-type="float" office:value="0.31869058519737">
                <text:p>0.31869058519737</text:p>
              </table:table-cell>
              <table:table-cell office:value-type="float" office:value="1.00170706966225">
                <text:p>1.00170706966225</text:p>
              </table:table-cell>
              <table:table-cell office:value-type="float" office:value="0.997566458893108">
                <text:p>0.997566458893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11693994401141">
                <text:p>0.511693994401141</text:p>
              </table:table-cell>
              <table:table-cell office:value-type="float" office:value="0.320221184681446">
                <text:p>0.320221184681446</text:p>
              </table:table-cell>
              <table:table-cell office:value-type="float" office:value="1.0044024912369">
                <text:p>1.0044024912369</text:p>
              </table:table-cell>
              <table:table-cell office:value-type="float" office:value="0.997038220847418">
                <text:p>0.997038220847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09461830028611">
                <text:p>0.509461830028611</text:p>
              </table:table-cell>
              <table:table-cell office:value-type="float" office:value="0.321516769203266">
                <text:p>0.321516769203266</text:p>
              </table:table-cell>
              <table:table-cell office:value-type="float" office:value="1.00446796568058">
                <text:p>1.00446796568058</text:p>
              </table:table-cell>
              <table:table-cell office:value-type="float" office:value="1.00040752758103">
                <text:p>1.00040752758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10275251229573">
                <text:p>0.510275251229573</text:p>
              </table:table-cell>
              <table:table-cell office:value-type="float" office:value="0.321706406743152">
                <text:p>0.321706406743152</text:p>
              </table:table-cell>
              <table:table-cell office:value-type="float" office:value="1.00243610314973">
                <text:p>1.00243610314973</text:p>
              </table:table-cell>
              <table:table-cell office:value-type="float" office:value="1.00311690065192">
                <text:p>1.00311690065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10569646507372">
                <text:p>0.510569646507372</text:p>
              </table:table-cell>
              <table:table-cell office:value-type="float" office:value="0.321525991824249">
                <text:p>0.321525991824249</text:p>
              </table:table-cell>
              <table:table-cell office:value-type="float" office:value="1.00244306523469">
                <text:p>1.00244306523469</text:p>
              </table:table-cell>
              <table:table-cell office:value-type="float" office:value="1.00166717422979">
                <text:p>1.00166717422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10473697528276">
                <text:p>0.510473697528276</text:p>
              </table:table-cell>
              <table:table-cell office:value-type="float" office:value="0.320517047707274">
                <text:p>0.320517047707274</text:p>
              </table:table-cell>
              <table:table-cell office:value-type="float" office:value="1.00037462562931">
                <text:p>1.00037462562931</text:p>
              </table:table-cell>
              <table:table-cell office:value-type="float" office:value="0.998028281464906">
                <text:p>0.998028281464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07084609345516">
                <text:p>0.507084609345516</text:p>
              </table:table-cell>
              <table:table-cell office:value-type="float" office:value="0.315022282455475">
                <text:p>0.315022282455475</text:p>
              </table:table-cell>
              <table:table-cell office:value-type="float" office:value="0.991940687358679">
                <text:p>0.991940687358679</text:p>
              </table:table-cell>
              <table:table-cell office:value-type="float" office:value="0.985504704378563">
                <text:p>0.985504704378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08269370224708">
                <text:p>0.508269370224708</text:p>
              </table:table-cell>
              <table:table-cell office:value-type="float" office:value="0.315222020540096">
                <text:p>0.315222020540096</text:p>
              </table:table-cell>
              <table:table-cell office:value-type="float" office:value="0.989966920880117">
                <text:p>0.989966920880117</text:p>
              </table:table-cell>
              <table:table-cell office:value-type="float" office:value="0.986658020869747">
                <text:p>0.986658020869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08037255624292">
                <text:p>0.508037255624292</text:p>
              </table:table-cell>
              <table:table-cell office:value-type="float" office:value="0.315087357606964">
                <text:p>0.315087357606964</text:p>
              </table:table-cell>
              <table:table-cell office:value-type="float" office:value="0.991657150827602">
                <text:p>0.991657150827602</text:p>
              </table:table-cell>
              <table:table-cell office:value-type="float" office:value="0.987080531731173">
                <text:p>0.987080531731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07484319794013">
                <text:p>0.507484319794013</text:p>
              </table:table-cell>
              <table:table-cell office:value-type="float" office:value="0.315954073677779">
                <text:p>0.315954073677779</text:p>
              </table:table-cell>
              <table:table-cell office:value-type="float" office:value="0.991741751942983">
                <text:p>0.991741751942983</text:p>
              </table:table-cell>
              <table:table-cell office:value-type="float" office:value="0.984553137095375">
                <text:p>0.984553137095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07561607054675">
                <text:p>0.507561607054675</text:p>
              </table:table-cell>
              <table:table-cell office:value-type="float" office:value="0.314278928203454">
                <text:p>0.314278928203454</text:p>
              </table:table-cell>
              <table:table-cell office:value-type="float" office:value="0.991646283389961">
                <text:p>0.991646283389961</text:p>
              </table:table-cell>
              <table:table-cell office:value-type="float" office:value="0.984465469875387">
                <text:p>0.984465469875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09216181228301">
                <text:p>0.509216181228301</text:p>
              </table:table-cell>
              <table:table-cell office:value-type="float" office:value="0.314739820425467">
                <text:p>0.314739820425467</text:p>
              </table:table-cell>
              <table:table-cell office:value-type="float" office:value="0.990733054919261">
                <text:p>0.990733054919261</text:p>
              </table:table-cell>
              <table:table-cell office:value-type="float" office:value="0.98513857303917">
                <text:p>0.985138573039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07495897775813">
                <text:p>0.507495897775813</text:p>
              </table:table-cell>
              <table:table-cell office:value-type="float" office:value="0.314128491441419">
                <text:p>0.314128491441419</text:p>
              </table:table-cell>
              <table:table-cell office:value-type="float" office:value="0.989932710810838">
                <text:p>0.989932710810838</text:p>
              </table:table-cell>
              <table:table-cell office:value-type="float" office:value="0.986056075205743">
                <text:p>0.9860560752057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06590990429234">
                <text:p>0.506590990429234</text:p>
              </table:table-cell>
              <table:table-cell office:value-type="float" office:value="0.311674304748115">
                <text:p>0.311674304748115</text:p>
              </table:table-cell>
              <table:table-cell office:value-type="float" office:value="0.988523649404395">
                <text:p>0.988523649404395</text:p>
              </table:table-cell>
              <table:table-cell office:value-type="float" office:value="0.988386253928848">
                <text:p>0.988386253928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06117235709047">
                <text:p>0.506117235709047</text:p>
              </table:table-cell>
              <table:table-cell office:value-type="float" office:value="0.3126254748488">
                <text:p>0.3126254748488</text:p>
              </table:table-cell>
              <table:table-cell office:value-type="float" office:value="0.986331318862803">
                <text:p>0.986331318862803</text:p>
              </table:table-cell>
              <table:table-cell office:value-type="float" office:value="0.98809557844147">
                <text:p>0.98809557844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06485916988233">
                <text:p>0.506485916988233</text:p>
              </table:table-cell>
              <table:table-cell office:value-type="float" office:value="0.311948914082451">
                <text:p>0.311948914082451</text:p>
              </table:table-cell>
              <table:table-cell office:value-type="float" office:value="0.978443046762018">
                <text:p>0.978443046762018</text:p>
              </table:table-cell>
              <table:table-cell office:value-type="float" office:value="0.974912167364629">
                <text:p>0.9749121673646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08863323815872">
                <text:p>0.508863323815872</text:p>
              </table:table-cell>
              <table:table-cell office:value-type="float" office:value="0.312420550059434">
                <text:p>0.312420550059434</text:p>
              </table:table-cell>
              <table:table-cell office:value-type="float" office:value="0.979506331735372">
                <text:p>0.979506331735372</text:p>
              </table:table-cell>
              <table:table-cell office:value-type="float" office:value="0.974426135933131">
                <text:p>0.974426135933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0846729443219">
                <text:p>0.50846729443219</text:p>
              </table:table-cell>
              <table:table-cell office:value-type="float" office:value="0.310965785799481">
                <text:p>0.310965785799481</text:p>
              </table:table-cell>
              <table:table-cell office:value-type="float" office:value="0.980821654870317">
                <text:p>0.980821654870317</text:p>
              </table:table-cell>
              <table:table-cell office:value-type="float" office:value="0.975049897258201">
                <text:p>0.975049897258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07711722488519">
                <text:p>0.507711722488519</text:p>
              </table:table-cell>
              <table:table-cell office:value-type="float" office:value="0.310836523425634">
                <text:p>0.310836523425634</text:p>
              </table:table-cell>
              <table:table-cell office:value-type="float" office:value="0.985384570918311">
                <text:p>0.985384570918311</text:p>
              </table:table-cell>
              <table:table-cell office:value-type="float" office:value="0.978213660553709">
                <text:p>0.978213660553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07869649904168">
                <text:p>0.507869649904168</text:p>
              </table:table-cell>
              <table:table-cell office:value-type="float" office:value="0.309768377915747">
                <text:p>0.309768377915747</text:p>
              </table:table-cell>
              <table:table-cell office:value-type="float" office:value="0.984477143754138">
                <text:p>0.984477143754138</text:p>
              </table:table-cell>
              <table:table-cell office:value-type="float" office:value="0.975360622346724">
                <text:p>0.975360622346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06613669944221">
                <text:p>0.506613669944221</text:p>
              </table:table-cell>
              <table:table-cell office:value-type="float" office:value="0.310893185491849">
                <text:p>0.310893185491849</text:p>
              </table:table-cell>
              <table:table-cell office:value-type="float" office:value="0.985183073652128">
                <text:p>0.985183073652128</text:p>
              </table:table-cell>
              <table:table-cell office:value-type="float" office:value="0.97550787874268">
                <text:p>0.97550787874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07766766459034">
                <text:p>0.507766766459034</text:p>
              </table:table-cell>
              <table:table-cell office:value-type="float" office:value="0.310565585608968">
                <text:p>0.310565585608968</text:p>
              </table:table-cell>
              <table:table-cell office:value-type="float" office:value="0.99136300239518">
                <text:p>0.99136300239518</text:p>
              </table:table-cell>
              <table:table-cell office:value-type="float" office:value="0.976153692027361">
                <text:p>0.9761536920273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0857084168208">
                <text:p>0.50857084168208</text:p>
              </table:table-cell>
              <table:table-cell office:value-type="float" office:value="0.314174226032552">
                <text:p>0.314174226032552</text:p>
              </table:table-cell>
              <table:table-cell office:value-type="float" office:value="0.996377978073576">
                <text:p>0.996377978073576</text:p>
              </table:table-cell>
              <table:table-cell office:value-type="float" office:value="0.986106866759248">
                <text:p>0.986106866759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08756964112842">
                <text:p>0.508756964112842</text:p>
              </table:table-cell>
              <table:table-cell office:value-type="float" office:value="0.314236985991038">
                <text:p>0.314236985991038</text:p>
              </table:table-cell>
              <table:table-cell office:value-type="float" office:value="0.998580159283607">
                <text:p>0.998580159283607</text:p>
              </table:table-cell>
              <table:table-cell office:value-type="float" office:value="0.987939054920038">
                <text:p>0.9879390549200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07995132029663">
                <text:p>0.507995132029663</text:p>
              </table:table-cell>
              <table:table-cell office:value-type="float" office:value="0.314060898359941">
                <text:p>0.314060898359941</text:p>
              </table:table-cell>
              <table:table-cell office:value-type="float" office:value="0.998816028480283">
                <text:p>0.998816028480283</text:p>
              </table:table-cell>
              <table:table-cell office:value-type="float" office:value="0.987090877801201">
                <text:p>0.987090877801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07474218412097">
                <text:p>0.507474218412097</text:p>
              </table:table-cell>
              <table:table-cell office:value-type="float" office:value="0.314335251407481">
                <text:p>0.314335251407481</text:p>
              </table:table-cell>
              <table:table-cell office:value-type="float" office:value="0.995173028525568">
                <text:p>0.995173028525568</text:p>
              </table:table-cell>
              <table:table-cell office:value-type="float" office:value="0.986229564216785">
                <text:p>0.986229564216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08150262309804">
                <text:p>0.508150262309804</text:p>
              </table:table-cell>
              <table:table-cell office:value-type="float" office:value="0.314475478015394">
                <text:p>0.314475478015394</text:p>
              </table:table-cell>
              <table:table-cell office:value-type="float" office:value="0.997211027098945">
                <text:p>0.997211027098945</text:p>
              </table:table-cell>
              <table:table-cell office:value-type="float" office:value="0.989180245067468">
                <text:p>0.989180245067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10070749010988">
                <text:p>0.510070749010988</text:p>
              </table:table-cell>
              <table:table-cell office:value-type="float" office:value="0.316299423762979">
                <text:p>0.316299423762979</text:p>
              </table:table-cell>
              <table:table-cell office:value-type="float" office:value="1.00111556320395">
                <text:p>1.00111556320395</text:p>
              </table:table-cell>
              <table:table-cell office:value-type="float" office:value="0.995264353057615">
                <text:p>0.995264353057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10618462378817">
                <text:p>0.510618462378817</text:p>
              </table:table-cell>
              <table:table-cell office:value-type="float" office:value="0.319659121407781">
                <text:p>0.319659121407781</text:p>
              </table:table-cell>
              <table:table-cell office:value-type="float" office:value="1.0009331110796">
                <text:p>1.0009331110796</text:p>
              </table:table-cell>
              <table:table-cell office:value-type="float" office:value="0.998651868787267">
                <text:p>0.998651868787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10404836622885">
                <text:p>0.510404836622885</text:p>
              </table:table-cell>
              <table:table-cell office:value-type="float" office:value="0.319583532176726">
                <text:p>0.319583532176726</text:p>
              </table:table-cell>
              <table:table-cell office:value-type="float" office:value="0.994989693324455">
                <text:p>0.994989693324455</text:p>
              </table:table-cell>
              <table:table-cell office:value-type="float" office:value="0.99273913994791">
                <text:p>0.99273913994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10872830696441">
                <text:p>0.510872830696441</text:p>
              </table:table-cell>
              <table:table-cell office:value-type="float" office:value="0.318431709845734">
                <text:p>0.318431709845734</text:p>
              </table:table-cell>
              <table:table-cell office:value-type="float" office:value="0.994392761869004">
                <text:p>0.994392761869004</text:p>
              </table:table-cell>
              <table:table-cell office:value-type="float" office:value="0.990653603949075">
                <text:p>0.990653603949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11266488035408">
                <text:p>0.511266488035408</text:p>
              </table:table-cell>
              <table:table-cell office:value-type="float" office:value="0.318602956052587">
                <text:p>0.318602956052587</text:p>
              </table:table-cell>
              <table:table-cell office:value-type="float" office:value="0.995122871264381">
                <text:p>0.995122871264381</text:p>
              </table:table-cell>
              <table:table-cell office:value-type="float" office:value="0.993518150943332">
                <text:p>0.993518150943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10898357689613">
                <text:p>0.510898357689613</text:p>
              </table:table-cell>
              <table:table-cell office:value-type="float" office:value="0.317786004694473">
                <text:p>0.317786004694473</text:p>
              </table:table-cell>
              <table:table-cell office:value-type="float" office:value="0.994110092596894">
                <text:p>0.994110092596894</text:p>
              </table:table-cell>
              <table:table-cell office:value-type="float" office:value="0.992145118282981">
                <text:p>0.992145118282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10799411763314">
                <text:p>0.510799411763314</text:p>
              </table:table-cell>
              <table:table-cell office:value-type="float" office:value="0.317568350239713">
                <text:p>0.317568350239713</text:p>
              </table:table-cell>
              <table:table-cell office:value-type="float" office:value="0.994352699410813">
                <text:p>0.994352699410813</text:p>
              </table:table-cell>
              <table:table-cell office:value-type="float" office:value="0.991722809591917">
                <text:p>0.991722809591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1170730909562">
                <text:p>0.51170730909562</text:p>
              </table:table-cell>
              <table:table-cell office:value-type="float" office:value="0.317863954926078">
                <text:p>0.317863954926078</text:p>
              </table:table-cell>
              <table:table-cell office:value-type="float" office:value="1.00007314413621">
                <text:p>1.00007314413621</text:p>
              </table:table-cell>
              <table:table-cell office:value-type="float" office:value="0.994487164739478">
                <text:p>0.994487164739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13474257342168">
                <text:p>0.513474257342168</text:p>
              </table:table-cell>
              <table:table-cell office:value-type="float" office:value="0.320035728200869">
                <text:p>0.320035728200869</text:p>
              </table:table-cell>
              <table:table-cell office:value-type="float" office:value="1.00662952132783">
                <text:p>1.00662952132783</text:p>
              </table:table-cell>
              <table:table-cell office:value-type="float" office:value="1.00283134506414">
                <text:p>1.00283134506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12988618085317">
                <text:p>0.512988618085317</text:p>
              </table:table-cell>
              <table:table-cell office:value-type="float" office:value="0.318953377465223">
                <text:p>0.318953377465223</text:p>
              </table:table-cell>
              <table:table-cell office:value-type="float" office:value="1.02039796475896">
                <text:p>1.02039796475896</text:p>
              </table:table-cell>
              <table:table-cell office:value-type="float" office:value="1.0032633817986">
                <text:p>1.00326338179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13685482585459">
                <text:p>0.513685482585459</text:p>
              </table:table-cell>
              <table:table-cell office:value-type="float" office:value="0.320940529779123">
                <text:p>0.320940529779123</text:p>
              </table:table-cell>
              <table:table-cell office:value-type="float" office:value="1.02367835779396">
                <text:p>1.02367835779396</text:p>
              </table:table-cell>
              <table:table-cell office:value-type="float" office:value="1.00978255512701">
                <text:p>1.009782555127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17575426120118">
                <text:p>0.517575426120118</text:p>
              </table:table-cell>
              <table:table-cell office:value-type="float" office:value="0.321722097150655">
                <text:p>0.321722097150655</text:p>
              </table:table-cell>
              <table:table-cell office:value-type="float" office:value="1.0271134993872">
                <text:p>1.0271134993872</text:p>
              </table:table-cell>
              <table:table-cell office:value-type="float" office:value="1.01233547589068">
                <text:p>1.012335475890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19543417074407">
                <text:p>0.519543417074407</text:p>
              </table:table-cell>
              <table:table-cell office:value-type="float" office:value="0.321193590204621">
                <text:p>0.321193590204621</text:p>
              </table:table-cell>
              <table:table-cell office:value-type="float" office:value="1.0306347286286">
                <text:p>1.0306347286286</text:p>
              </table:table-cell>
              <table:table-cell office:value-type="float" office:value="1.01570374302916">
                <text:p>1.015703743029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21830345522769">
                <text:p>0.521830345522769</text:p>
              </table:table-cell>
              <table:table-cell office:value-type="float" office:value="0.324316765007724">
                <text:p>0.324316765007724</text:p>
              </table:table-cell>
              <table:table-cell office:value-type="float" office:value="1.03821977904826">
                <text:p>1.03821977904826</text:p>
              </table:table-cell>
              <table:table-cell office:value-type="float" office:value="1.01911124142048">
                <text:p>1.01911124142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22616814942631">
                <text:p>0.522616814942631</text:p>
              </table:table-cell>
              <table:table-cell office:value-type="float" office:value="0.32483288638377">
                <text:p>0.32483288638377</text:p>
              </table:table-cell>
              <table:table-cell office:value-type="float" office:value="1.03818796321035">
                <text:p>1.03818796321035</text:p>
              </table:table-cell>
              <table:table-cell office:value-type="float" office:value="1.02495912844368">
                <text:p>1.02495912844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18181890146671">
                <text:p>0.518181890146671</text:p>
              </table:table-cell>
              <table:table-cell office:value-type="float" office:value="0.325885321442332">
                <text:p>0.325885321442332</text:p>
              </table:table-cell>
              <table:table-cell office:value-type="float" office:value="1.04195534519396">
                <text:p>1.04195534519396</text:p>
              </table:table-cell>
              <table:table-cell office:value-type="float" office:value="1.02666001483477">
                <text:p>1.026660014834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21393298316401">
                <text:p>0.521393298316401</text:p>
              </table:table-cell>
              <table:table-cell office:value-type="float" office:value="0.326510255649227">
                <text:p>0.326510255649227</text:p>
              </table:table-cell>
              <table:table-cell office:value-type="float" office:value="1.04600145820358">
                <text:p>1.04600145820358</text:p>
              </table:table-cell>
              <table:table-cell office:value-type="float" office:value="1.02868633223707">
                <text:p>1.02868633223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23106467360515">
                <text:p>0.523106467360515</text:p>
              </table:table-cell>
              <table:table-cell office:value-type="float" office:value="0.329248361065401">
                <text:p>0.329248361065401</text:p>
              </table:table-cell>
              <table:table-cell office:value-type="float" office:value="1.05405337429809">
                <text:p>1.05405337429809</text:p>
              </table:table-cell>
              <table:table-cell office:value-type="float" office:value="1.04051233627162">
                <text:p>1.04051233627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25066676603828">
                <text:p>0.525066676603828</text:p>
              </table:table-cell>
              <table:table-cell office:value-type="float" office:value="0.325656501052187">
                <text:p>0.325656501052187</text:p>
              </table:table-cell>
              <table:table-cell office:value-type="float" office:value="1.05570122009431">
                <text:p>1.05570122009431</text:p>
              </table:table-cell>
              <table:table-cell office:value-type="float" office:value="1.03927890494057">
                <text:p>1.03927890494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3371669581561">
                <text:p>0.523371669581561</text:p>
              </table:table-cell>
              <table:table-cell office:value-type="float" office:value="0.325167227114651">
                <text:p>0.325167227114651</text:p>
              </table:table-cell>
              <table:table-cell office:value-type="float" office:value="1.06404682890289">
                <text:p>1.06404682890289</text:p>
              </table:table-cell>
              <table:table-cell office:value-type="float" office:value="1.04318676197544">
                <text:p>1.043186761975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25465049167089">
                <text:p>0.525465049167089</text:p>
              </table:table-cell>
              <table:table-cell office:value-type="float" office:value="0.319222995350294">
                <text:p>0.319222995350294</text:p>
              </table:table-cell>
              <table:table-cell office:value-type="float" office:value="1.06878100673383">
                <text:p>1.06878100673383</text:p>
              </table:table-cell>
              <table:table-cell office:value-type="float" office:value="1.04549706337302">
                <text:p>1.04549706337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25757824927207">
                <text:p>0.525757824927207</text:p>
              </table:table-cell>
              <table:table-cell office:value-type="float" office:value="0.323942407691603">
                <text:p>0.323942407691603</text:p>
              </table:table-cell>
              <table:table-cell office:value-type="float" office:value="1.07439135449229">
                <text:p>1.07439135449229</text:p>
              </table:table-cell>
              <table:table-cell office:value-type="float" office:value="1.055492687216">
                <text:p>1.0554926872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25781493032874">
                <text:p>0.525781493032874</text:p>
              </table:table-cell>
              <table:table-cell office:value-type="float" office:value="0.321680298227425">
                <text:p>0.321680298227425</text:p>
              </table:table-cell>
              <table:table-cell office:value-type="float" office:value="1.07712248096973">
                <text:p>1.07712248096973</text:p>
              </table:table-cell>
              <table:table-cell office:value-type="float" office:value="1.05849256759222">
                <text:p>1.05849256759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28447266248572">
                <text:p>0.528447266248572</text:p>
              </table:table-cell>
              <table:table-cell office:value-type="float" office:value="0.320106145232651">
                <text:p>0.320106145232651</text:p>
              </table:table-cell>
              <table:table-cell office:value-type="float" office:value="1.07901247728192">
                <text:p>1.07901247728192</text:p>
              </table:table-cell>
              <table:table-cell office:value-type="float" office:value="1.05995991818115">
                <text:p>1.05995991818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28398246775457">
                <text:p>0.528398246775457</text:p>
              </table:table-cell>
              <table:table-cell office:value-type="float" office:value="0.321462591376483">
                <text:p>0.321462591376483</text:p>
              </table:table-cell>
              <table:table-cell office:value-type="float" office:value="1.0789853208709">
                <text:p>1.0789853208709</text:p>
              </table:table-cell>
              <table:table-cell office:value-type="float" office:value="1.06031904045005">
                <text:p>1.06031904045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29350723594546">
                <text:p>0.529350723594546</text:p>
              </table:table-cell>
              <table:table-cell office:value-type="float" office:value="0.324521096829919">
                <text:p>0.324521096829919</text:p>
              </table:table-cell>
              <table:table-cell office:value-type="float" office:value="1.07472520224228">
                <text:p>1.07472520224228</text:p>
              </table:table-cell>
              <table:table-cell office:value-type="float" office:value="1.06058730847444">
                <text:p>1.060587308474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30217042455078">
                <text:p>0.530217042455078</text:p>
              </table:table-cell>
              <table:table-cell office:value-type="float" office:value="0.326270469450728">
                <text:p>0.326270469450728</text:p>
              </table:table-cell>
              <table:table-cell office:value-type="float" office:value="1.06384331699952">
                <text:p>1.06384331699952</text:p>
              </table:table-cell>
              <table:table-cell office:value-type="float" office:value="1.04993748567618">
                <text:p>1.049937485676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32364673231876">
                <text:p>0.532364673231876</text:p>
              </table:table-cell>
              <table:table-cell office:value-type="float" office:value="0.331257744119308">
                <text:p>0.331257744119308</text:p>
              </table:table-cell>
              <table:table-cell office:value-type="float" office:value="1.05861532886405">
                <text:p>1.05861532886405</text:p>
              </table:table-cell>
              <table:table-cell office:value-type="float" office:value="1.05074434099271">
                <text:p>1.05074434099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33560902958893">
                <text:p>0.533560902958893</text:p>
              </table:table-cell>
              <table:table-cell office:value-type="float" office:value="0.328828424846031">
                <text:p>0.328828424846031</text:p>
              </table:table-cell>
              <table:table-cell office:value-type="float" office:value="1.06154473328896">
                <text:p>1.06154473328896</text:p>
              </table:table-cell>
              <table:table-cell office:value-type="float" office:value="1.04474698046619">
                <text:p>1.044746980466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29273533919267">
                <text:p>0.529273533919267</text:p>
              </table:table-cell>
              <table:table-cell office:value-type="float" office:value="0.327927604942432">
                <text:p>0.327927604942432</text:p>
              </table:table-cell>
              <table:table-cell office:value-type="float" office:value="1.05444207223164">
                <text:p>1.05444207223164</text:p>
              </table:table-cell>
              <table:table-cell office:value-type="float" office:value="1.04081415738702">
                <text:p>1.04081415738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24664963494854">
                <text:p>0.524664963494854</text:p>
              </table:table-cell>
              <table:table-cell office:value-type="float" office:value="0.326064643328939">
                <text:p>0.326064643328939</text:p>
              </table:table-cell>
              <table:table-cell office:value-type="float" office:value="1.03904086682894">
                <text:p>1.03904086682894</text:p>
              </table:table-cell>
              <table:table-cell office:value-type="float" office:value="1.0197503295314">
                <text:p>1.0197503295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213174746154">
                <text:p>0.5213174746154</text:p>
              </table:table-cell>
              <table:table-cell office:value-type="float" office:value="0.324856345373705">
                <text:p>0.324856345373705</text:p>
              </table:table-cell>
              <table:table-cell office:value-type="float" office:value="1.03050707663179">
                <text:p>1.03050707663179</text:p>
              </table:table-cell>
              <table:table-cell office:value-type="float" office:value="1.01244640019511">
                <text:p>1.01244640019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854573104015">
                <text:p>0.521854573104015</text:p>
              </table:table-cell>
              <table:table-cell office:value-type="float" office:value="0.324145383632503">
                <text:p>0.324145383632503</text:p>
              </table:table-cell>
              <table:table-cell office:value-type="float" office:value="1.02408209048722">
                <text:p>1.02408209048722</text:p>
              </table:table-cell>
              <table:table-cell office:value-type="float" office:value="1.00352443392326">
                <text:p>1.00352443392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26106078125974">
                <text:p>0.526106078125974</text:p>
              </table:table-cell>
              <table:table-cell office:value-type="float" office:value="0.325006479965762">
                <text:p>0.325006479965762</text:p>
              </table:table-cell>
              <table:table-cell office:value-type="float" office:value="1.01521343501848">
                <text:p>1.01521343501848</text:p>
              </table:table-cell>
              <table:table-cell office:value-type="float" office:value="0.996025043564465">
                <text:p>0.996025043564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27059284217285">
                <text:p>0.527059284217285</text:p>
              </table:table-cell>
              <table:table-cell office:value-type="float" office:value="0.324594321328867">
                <text:p>0.324594321328867</text:p>
              </table:table-cell>
              <table:table-cell office:value-type="float" office:value="1.01559048769056">
                <text:p>1.01559048769056</text:p>
              </table:table-cell>
              <table:table-cell office:value-type="float" office:value="0.996656751556689">
                <text:p>0.9966567515566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523121055061269">
                <text:p>0.523121055061269</text:p>
              </table:table-cell>
              <table:table-cell office:value-type="float" office:value="0.324179603998313">
                <text:p>0.324179603998313</text:p>
              </table:table-cell>
              <table:table-cell office:value-type="float" office:value="1.01382342189672">
                <text:p>1.01382342189672</text:p>
              </table:table-cell>
              <table:table-cell office:value-type="float" office:value="0.996680611722756">
                <text:p>0.9966806117227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52437196651742">
                <text:p>0.52437196651742</text:p>
              </table:table-cell>
              <table:table-cell office:value-type="float" office:value="0.32415559498645">
                <text:p>0.32415559498645</text:p>
              </table:table-cell>
              <table:table-cell office:value-type="float" office:value="1.01637075171901">
                <text:p>1.01637075171901</text:p>
              </table:table-cell>
              <table:table-cell office:value-type="float" office:value="1.00638022142528">
                <text:p>1.006380221425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524325681272375">
                <text:p>0.524325681272375</text:p>
              </table:table-cell>
              <table:table-cell office:value-type="float" office:value="0.328042855048641">
                <text:p>0.328042855048641</text:p>
              </table:table-cell>
              <table:table-cell office:value-type="float" office:value="1.00160930282236">
                <text:p>1.00160930282236</text:p>
              </table:table-cell>
              <table:table-cell office:value-type="float" office:value="0.997478289722113">
                <text:p>0.9974782897221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528747227100124">
                <text:p>0.528747227100124</text:p>
              </table:table-cell>
              <table:table-cell office:value-type="float" office:value="0.328353749270319">
                <text:p>0.328353749270319</text:p>
              </table:table-cell>
              <table:table-cell office:value-type="float" office:value="1.00297292594874">
                <text:p>1.00297292594874</text:p>
              </table:table-cell>
              <table:table-cell office:value-type="float" office:value="0.998023427248063">
                <text:p>0.9980234272480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28552315193178">
                <text:p>0.528552315193178</text:p>
              </table:table-cell>
              <table:table-cell office:value-type="float" office:value="0.328266231679615">
                <text:p>0.328266231679615</text:p>
              </table:table-cell>
              <table:table-cell office:value-type="float" office:value="0.999455096380375">
                <text:p>0.999455096380375</text:p>
              </table:table-cell>
              <table:table-cell office:value-type="float" office:value="0.993816092785166">
                <text:p>0.993816092785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528648926641006">
                <text:p>0.528648926641006</text:p>
              </table:table-cell>
              <table:table-cell office:value-type="float" office:value="0.326163811673105">
                <text:p>0.326163811673105</text:p>
              </table:table-cell>
              <table:table-cell office:value-type="float" office:value="0.999128819910408">
                <text:p>0.999128819910408</text:p>
              </table:table-cell>
              <table:table-cell office:value-type="float" office:value="0.992891022982093">
                <text:p>0.992891022982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528259299301789">
                <text:p>0.528259299301789</text:p>
              </table:table-cell>
              <table:table-cell office:value-type="float" office:value="0.324460012243888">
                <text:p>0.324460012243888</text:p>
              </table:table-cell>
              <table:table-cell office:value-type="float" office:value="0.998128512413267">
                <text:p>0.998128512413267</text:p>
              </table:table-cell>
              <table:table-cell office:value-type="float" office:value="0.992714999887065">
                <text:p>0.992714999887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524026275088313">
                <text:p>0.524026275088313</text:p>
              </table:table-cell>
              <table:table-cell office:value-type="float" office:value="0.323124407500173">
                <text:p>0.323124407500173</text:p>
              </table:table-cell>
              <table:table-cell office:value-type="float" office:value="0.997979494004194">
                <text:p>0.997979494004194</text:p>
              </table:table-cell>
              <table:table-cell office:value-type="float" office:value="0.991252332002527">
                <text:p>0.99125233200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521424363108826">
                <text:p>0.521424363108826</text:p>
              </table:table-cell>
              <table:table-cell office:value-type="float" office:value="0.321700671528673">
                <text:p>0.321700671528673</text:p>
              </table:table-cell>
              <table:table-cell office:value-type="float" office:value="0.998668018571971">
                <text:p>0.998668018571971</text:p>
              </table:table-cell>
              <table:table-cell office:value-type="float" office:value="0.987244417803671">
                <text:p>0.9872444178036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20936018323625">
                <text:p>0.520936018323625</text:p>
              </table:table-cell>
              <table:table-cell office:value-type="float" office:value="0.320656378384255">
                <text:p>0.320656378384255</text:p>
              </table:table-cell>
              <table:table-cell office:value-type="float" office:value="0.994135656836831">
                <text:p>0.994135656836831</text:p>
              </table:table-cell>
              <table:table-cell office:value-type="float" office:value="0.979877469037755">
                <text:p>0.9798774690377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521038288347239">
                <text:p>0.521038288347239</text:p>
              </table:table-cell>
              <table:table-cell office:value-type="float" office:value="0.320117032911844">
                <text:p>0.320117032911844</text:p>
              </table:table-cell>
              <table:table-cell office:value-type="float" office:value="0.993223267485357">
                <text:p>0.993223267485357</text:p>
              </table:table-cell>
              <table:table-cell office:value-type="float" office:value="0.980334729477996">
                <text:p>0.980334729477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522606429427726">
                <text:p>0.522606429427726</text:p>
              </table:table-cell>
              <table:table-cell office:value-type="float" office:value="0.320082258919054">
                <text:p>0.320082258919054</text:p>
              </table:table-cell>
              <table:table-cell office:value-type="float" office:value="0.993362528775869">
                <text:p>0.993362528775869</text:p>
              </table:table-cell>
              <table:table-cell office:value-type="float" office:value="0.980444141926936">
                <text:p>0.980444141926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523021772484785">
                <text:p>0.523021772484785</text:p>
              </table:table-cell>
              <table:table-cell office:value-type="float" office:value="0.31983293066282">
                <text:p>0.31983293066282</text:p>
              </table:table-cell>
              <table:table-cell office:value-type="float" office:value="0.990419409926814">
                <text:p>0.990419409926814</text:p>
              </table:table-cell>
              <table:table-cell office:value-type="float" office:value="0.978986819798031">
                <text:p>0.9789868197980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519728115017">
                <text:p>0.519728115017</text:p>
              </table:table-cell>
              <table:table-cell office:value-type="float" office:value="0.320119990086549">
                <text:p>0.320119990086549</text:p>
              </table:table-cell>
              <table:table-cell office:value-type="float" office:value="0.977185176308474">
                <text:p>0.977185176308474</text:p>
              </table:table-cell>
              <table:table-cell office:value-type="float" office:value="0.973787704687076">
                <text:p>0.973787704687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21244871655052">
                <text:p>0.521244871655052</text:p>
              </table:table-cell>
              <table:table-cell office:value-type="float" office:value="0.32006305824749">
                <text:p>0.32006305824749</text:p>
              </table:table-cell>
              <table:table-cell office:value-type="float" office:value="0.976096793122867">
                <text:p>0.976096793122867</text:p>
              </table:table-cell>
              <table:table-cell office:value-type="float" office:value="0.966395086972533">
                <text:p>0.96639508697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520526729339706">
                <text:p>0.520526729339706</text:p>
              </table:table-cell>
              <table:table-cell office:value-type="float" office:value="0.318639258244951">
                <text:p>0.318639258244951</text:p>
              </table:table-cell>
              <table:table-cell office:value-type="float" office:value="0.977019692090477">
                <text:p>0.977019692090477</text:p>
              </table:table-cell>
              <table:table-cell office:value-type="float" office:value="0.965205318068922">
                <text:p>0.9652053180689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51853194347902">
                <text:p>0.51853194347902</text:p>
              </table:table-cell>
              <table:table-cell office:value-type="float" office:value="0.318116339925148">
                <text:p>0.318116339925148</text:p>
              </table:table-cell>
              <table:table-cell office:value-type="float" office:value="0.976352984498061">
                <text:p>0.976352984498061</text:p>
              </table:table-cell>
              <table:table-cell office:value-type="float" office:value="0.962421094335963">
                <text:p>0.962421094335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524352908631297">
                <text:p>0.524352908631297</text:p>
              </table:table-cell>
              <table:table-cell office:value-type="float" office:value="0.317898360867522">
                <text:p>0.317898360867522</text:p>
              </table:table-cell>
              <table:table-cell office:value-type="float" office:value="0.976761220835116">
                <text:p>0.976761220835116</text:p>
              </table:table-cell>
              <table:table-cell office:value-type="float" office:value="0.962691800994345">
                <text:p>0.962691800994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524334459612691">
                <text:p>0.524334459612691</text:p>
              </table:table-cell>
              <table:table-cell office:value-type="float" office:value="0.317959624606991">
                <text:p>0.317959624606991</text:p>
              </table:table-cell>
              <table:table-cell office:value-type="float" office:value="0.975013819629231">
                <text:p>0.975013819629231</text:p>
              </table:table-cell>
              <table:table-cell office:value-type="float" office:value="0.961515229096861">
                <text:p>0.961515229096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26937756329297">
                <text:p>0.526937756329297</text:p>
              </table:table-cell>
              <table:table-cell office:value-type="float" office:value="0.317432953125981">
                <text:p>0.317432953125981</text:p>
              </table:table-cell>
              <table:table-cell office:value-type="float" office:value="0.975825667023647">
                <text:p>0.975825667023647</text:p>
              </table:table-cell>
              <table:table-cell office:value-type="float" office:value="0.960558169952045">
                <text:p>0.960558169952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528010370262696">
                <text:p>0.528010370262696</text:p>
              </table:table-cell>
              <table:table-cell office:value-type="float" office:value="0.318599190348616">
                <text:p>0.318599190348616</text:p>
              </table:table-cell>
              <table:table-cell office:value-type="float" office:value="0.981457059673836">
                <text:p>0.981457059673836</text:p>
              </table:table-cell>
              <table:table-cell office:value-type="float" office:value="0.963520007230623">
                <text:p>0.963520007230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523785841467349">
                <text:p>0.523785841467349</text:p>
              </table:table-cell>
              <table:table-cell office:value-type="float" office:value="0.319956891011645">
                <text:p>0.319956891011645</text:p>
              </table:table-cell>
              <table:table-cell office:value-type="float" office:value="0.977022421278771">
                <text:p>0.977022421278771</text:p>
              </table:table-cell>
              <table:table-cell office:value-type="float" office:value="0.969893345429245">
                <text:p>0.969893345429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525798140287369">
                <text:p>0.525798140287369</text:p>
              </table:table-cell>
              <table:table-cell office:value-type="float" office:value="0.318905612793268">
                <text:p>0.318905612793268</text:p>
              </table:table-cell>
              <table:table-cell office:value-type="float" office:value="0.976805795181313">
                <text:p>0.976805795181313</text:p>
              </table:table-cell>
              <table:table-cell office:value-type="float" office:value="0.967682350085443">
                <text:p>0.9676823500854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524649894188753">
                <text:p>0.524649894188753</text:p>
              </table:table-cell>
              <table:table-cell office:value-type="float" office:value="0.319006485248478">
                <text:p>0.319006485248478</text:p>
              </table:table-cell>
              <table:table-cell office:value-type="float" office:value="0.97776559060727">
                <text:p>0.97776559060727</text:p>
              </table:table-cell>
              <table:table-cell office:value-type="float" office:value="0.969141232301769">
                <text:p>0.9691412323017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22895232426131">
                <text:p>0.522895232426131</text:p>
              </table:table-cell>
              <table:table-cell office:value-type="float" office:value="0.31747216512715">
                <text:p>0.31747216512715</text:p>
              </table:table-cell>
              <table:table-cell office:value-type="float" office:value="0.979413202111575">
                <text:p>0.979413202111575</text:p>
              </table:table-cell>
              <table:table-cell office:value-type="float" office:value="0.970542664450221">
                <text:p>0.970542664450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523875929467944">
                <text:p>0.523875929467944</text:p>
              </table:table-cell>
              <table:table-cell office:value-type="float" office:value="0.318977674754594">
                <text:p>0.318977674754594</text:p>
              </table:table-cell>
              <table:table-cell office:value-type="float" office:value="0.979710999617397">
                <text:p>0.979710999617397</text:p>
              </table:table-cell>
              <table:table-cell office:value-type="float" office:value="0.96832904437468">
                <text:p>0.968329044374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528629556926917">
                <text:p>0.528629556926917</text:p>
              </table:table-cell>
              <table:table-cell office:value-type="float" office:value="0.31998411454166">
                <text:p>0.31998411454166</text:p>
              </table:table-cell>
              <table:table-cell office:value-type="float" office:value="0.982527232530638">
                <text:p>0.982527232530638</text:p>
              </table:table-cell>
              <table:table-cell office:value-type="float" office:value="0.965386635571793">
                <text:p>0.9653866355717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528168380985101">
                <text:p>0.528168380985101</text:p>
              </table:table-cell>
              <table:table-cell office:value-type="float" office:value="0.321128723716112">
                <text:p>0.321128723716112</text:p>
              </table:table-cell>
              <table:table-cell office:value-type="float" office:value="0.984574332573792">
                <text:p>0.984574332573792</text:p>
              </table:table-cell>
              <table:table-cell office:value-type="float" office:value="0.972728546418603">
                <text:p>0.972728546418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529985303265719">
                <text:p>0.529985303265719</text:p>
              </table:table-cell>
              <table:table-cell office:value-type="float" office:value="0.322629887991635">
                <text:p>0.322629887991635</text:p>
              </table:table-cell>
              <table:table-cell office:value-type="float" office:value="0.988906823167145">
                <text:p>0.988906823167145</text:p>
              </table:table-cell>
              <table:table-cell office:value-type="float" office:value="0.977673744423892">
                <text:p>0.9776737444238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34795195727478">
                <text:p>0.534795195727478</text:p>
              </table:table-cell>
              <table:table-cell office:value-type="float" office:value="0.326808213831512">
                <text:p>0.326808213831512</text:p>
              </table:table-cell>
              <table:table-cell office:value-type="float" office:value="0.998252851809835">
                <text:p>0.998252851809835</text:p>
              </table:table-cell>
              <table:table-cell office:value-type="float" office:value="0.982522288916038">
                <text:p>0.982522288916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536814933922913">
                <text:p>0.536814933922913</text:p>
              </table:table-cell>
              <table:table-cell office:value-type="float" office:value="0.332983809337292">
                <text:p>0.332983809337292</text:p>
              </table:table-cell>
              <table:table-cell office:value-type="float" office:value="1.00640732102081">
                <text:p>1.00640732102081</text:p>
              </table:table-cell>
              <table:table-cell office:value-type="float" office:value="0.993665368127541">
                <text:p>0.9936653681275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536691761727634">
                <text:p>0.536691761727634</text:p>
              </table:table-cell>
              <table:table-cell office:value-type="float" office:value="0.332672216667839">
                <text:p>0.332672216667839</text:p>
              </table:table-cell>
              <table:table-cell office:value-type="float" office:value="1.02843286808135">
                <text:p>1.02843286808135</text:p>
              </table:table-cell>
              <table:table-cell office:value-type="float" office:value="1.00604953355343">
                <text:p>1.006049533553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536592455379304">
                <text:p>0.536592455379304</text:p>
              </table:table-cell>
              <table:table-cell office:value-type="float" office:value="0.332106332113383">
                <text:p>0.332106332113383</text:p>
              </table:table-cell>
              <table:table-cell office:value-type="float" office:value="1.03947153663003">
                <text:p>1.03947153663003</text:p>
              </table:table-cell>
              <table:table-cell office:value-type="float" office:value="1.02088939981847">
                <text:p>1.020889399818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536274609950847">
                <text:p>0.536274609950847</text:p>
              </table:table-cell>
              <table:table-cell office:value-type="float" office:value="0.331399856445506">
                <text:p>0.331399856445506</text:p>
              </table:table-cell>
              <table:table-cell office:value-type="float" office:value="1.03654393665015">
                <text:p>1.03654393665015</text:p>
              </table:table-cell>
              <table:table-cell office:value-type="float" office:value="1.02440166969149">
                <text:p>1.024401669691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534363328300138">
                <text:p>0.534363328300138</text:p>
              </table:table-cell>
              <table:table-cell office:value-type="float" office:value="0.330795754781527">
                <text:p>0.330795754781527</text:p>
              </table:table-cell>
              <table:table-cell office:value-type="float" office:value="1.0402430978879">
                <text:p>1.0402430978879</text:p>
              </table:table-cell>
              <table:table-cell office:value-type="float" office:value="1.02006627377191">
                <text:p>1.02006627377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534927793925187">
                <text:p>0.534927793925187</text:p>
              </table:table-cell>
              <table:table-cell office:value-type="float" office:value="0.323998535558081">
                <text:p>0.323998535558081</text:p>
              </table:table-cell>
              <table:table-cell office:value-type="float" office:value="1.01008791737607">
                <text:p>1.01008791737607</text:p>
              </table:table-cell>
              <table:table-cell office:value-type="float" office:value="1.01848314196496">
                <text:p>1.01848314196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536977898591181">
                <text:p>0.536977898591181</text:p>
              </table:table-cell>
              <table:table-cell office:value-type="float" office:value="0.325809426149628">
                <text:p>0.325809426149628</text:p>
              </table:table-cell>
              <table:table-cell office:value-type="float" office:value="1.01142604284438">
                <text:p>1.01142604284438</text:p>
              </table:table-cell>
              <table:table-cell office:value-type="float" office:value="1.00556834505651">
                <text:p>1.005568345056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54515682716402">
                <text:p>0.54515682716402</text:p>
              </table:table-cell>
              <table:table-cell office:value-type="float" office:value="0.325220339574409">
                <text:p>0.325220339574409</text:p>
              </table:table-cell>
              <table:table-cell office:value-type="float" office:value="1.01367963536978">
                <text:p>1.01367963536978</text:p>
              </table:table-cell>
              <table:table-cell office:value-type="float" office:value="0.99985292658832">
                <text:p>0.99985292658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546236544164453">
                <text:p>0.546236544164453</text:p>
              </table:table-cell>
              <table:table-cell office:value-type="float" office:value="0.327698455769918">
                <text:p>0.327698455769918</text:p>
              </table:table-cell>
              <table:table-cell office:value-type="float" office:value="1.01887940277555">
                <text:p>1.01887940277555</text:p>
              </table:table-cell>
              <table:table-cell office:value-type="float" office:value="1.00479695415665">
                <text:p>1.004796954156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545370912190026">
                <text:p>0.545370912190026</text:p>
              </table:table-cell>
              <table:table-cell office:value-type="float" office:value="0.327423473352415">
                <text:p>0.327423473352415</text:p>
              </table:table-cell>
              <table:table-cell office:value-type="float" office:value="1.02008498388545">
                <text:p>1.02008498388545</text:p>
              </table:table-cell>
              <table:table-cell office:value-type="float" office:value="1.00285563982258">
                <text:p>1.00285563982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552976809924371">
                <text:p>0.552976809924371</text:p>
              </table:table-cell>
              <table:table-cell office:value-type="float" office:value="0.331691606010364">
                <text:p>0.331691606010364</text:p>
              </table:table-cell>
              <table:table-cell office:value-type="float" office:value="1.02247857773584">
                <text:p>1.02247857773584</text:p>
              </table:table-cell>
              <table:table-cell office:value-type="float" office:value="1.00313106571794">
                <text:p>1.003131065717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551033017184768">
                <text:p>0.551033017184768</text:p>
              </table:table-cell>
              <table:table-cell office:value-type="float" office:value="0.330184852178199">
                <text:p>0.330184852178199</text:p>
              </table:table-cell>
              <table:table-cell office:value-type="float" office:value="1.02789496354282">
                <text:p>1.02789496354282</text:p>
              </table:table-cell>
              <table:table-cell office:value-type="float" office:value="1.00447334720812">
                <text:p>1.004473347208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549806816002605">
                <text:p>0.549806816002605</text:p>
              </table:table-cell>
              <table:table-cell office:value-type="float" office:value="0.331810987488837">
                <text:p>0.331810987488837</text:p>
              </table:table-cell>
              <table:table-cell office:value-type="float" office:value="1.03289472234042">
                <text:p>1.03289472234042</text:p>
              </table:table-cell>
              <table:table-cell office:value-type="float" office:value="1.00993336886837">
                <text:p>1.009933368868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549590769728862">
                <text:p>0.549590769728862</text:p>
              </table:table-cell>
              <table:table-cell office:value-type="float" office:value="0.331746896925637">
                <text:p>0.331746896925637</text:p>
              </table:table-cell>
              <table:table-cell office:value-type="float" office:value="1.03633079329196">
                <text:p>1.03633079329196</text:p>
              </table:table-cell>
              <table:table-cell office:value-type="float" office:value="1.00977603826202">
                <text:p>1.009776038262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546891543622772">
                <text:p>0.546891543622772</text:p>
              </table:table-cell>
              <table:table-cell office:value-type="float" office:value="0.331962573636955">
                <text:p>0.331962573636955</text:p>
              </table:table-cell>
              <table:table-cell office:value-type="float" office:value="1.03726167654004">
                <text:p>1.03726167654004</text:p>
              </table:table-cell>
              <table:table-cell office:value-type="float" office:value="1.0164795208343">
                <text:p>1.0164795208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544056539246776">
                <text:p>0.544056539246776</text:p>
              </table:table-cell>
              <table:table-cell office:value-type="float" office:value="0.328712081606011">
                <text:p>0.328712081606011</text:p>
              </table:table-cell>
              <table:table-cell office:value-type="float" office:value="1.03825331572061">
                <text:p>1.03825331572061</text:p>
              </table:table-cell>
              <table:table-cell office:value-type="float" office:value="1.01857642517745">
                <text:p>1.01857642517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540762004739733">
                <text:p>0.540762004739733</text:p>
              </table:table-cell>
              <table:table-cell office:value-type="float" office:value="0.328460273845199">
                <text:p>0.328460273845199</text:p>
              </table:table-cell>
              <table:table-cell office:value-type="float" office:value="1.04916087562756">
                <text:p>1.04916087562756</text:p>
              </table:table-cell>
              <table:table-cell office:value-type="float" office:value="1.03575460637158">
                <text:p>1.03575460637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538583674233623">
                <text:p>0.538583674233623</text:p>
              </table:table-cell>
              <table:table-cell office:value-type="float" office:value="0.326107030162866">
                <text:p>0.326107030162866</text:p>
              </table:table-cell>
              <table:table-cell office:value-type="float" office:value="1.05633153112302">
                <text:p>1.05633153112302</text:p>
              </table:table-cell>
              <table:table-cell office:value-type="float" office:value="1.04606870352352">
                <text:p>1.046068703523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53917433167468">
                <text:p>0.53917433167468</text:p>
              </table:table-cell>
              <table:table-cell office:value-type="float" office:value="0.327311244348781">
                <text:p>0.327311244348781</text:p>
              </table:table-cell>
              <table:table-cell office:value-type="float" office:value="1.05919598113366">
                <text:p>1.05919598113366</text:p>
              </table:table-cell>
              <table:table-cell office:value-type="float" office:value="1.0495996599255">
                <text:p>1.0495996599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540862315703978">
                <text:p>0.540862315703978</text:p>
              </table:table-cell>
              <table:table-cell office:value-type="float" office:value="0.325000345276019">
                <text:p>0.325000345276019</text:p>
              </table:table-cell>
              <table:table-cell office:value-type="float" office:value="1.06556186286913">
                <text:p>1.06556186286913</text:p>
              </table:table-cell>
              <table:table-cell office:value-type="float" office:value="1.05394895804626">
                <text:p>1.05394895804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539615154128928">
                <text:p>0.539615154128928</text:p>
              </table:table-cell>
              <table:table-cell office:value-type="float" office:value="0.321113686603478">
                <text:p>0.321113686603478</text:p>
              </table:table-cell>
              <table:table-cell office:value-type="float" office:value="1.07001198442994">
                <text:p>1.07001198442994</text:p>
              </table:table-cell>
              <table:table-cell office:value-type="float" office:value="1.05317041538095">
                <text:p>1.053170415380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538569362574689">
                <text:p>0.538569362574689</text:p>
              </table:table-cell>
              <table:table-cell office:value-type="float" office:value="0.319559865184867">
                <text:p>0.319559865184867</text:p>
              </table:table-cell>
              <table:table-cell office:value-type="float" office:value="1.05573958573574">
                <text:p>1.05573958573574</text:p>
              </table:table-cell>
              <table:table-cell office:value-type="float" office:value="1.05384446353884">
                <text:p>1.05384446353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537739134902262">
                <text:p>0.537739134902262</text:p>
              </table:table-cell>
              <table:table-cell office:value-type="float" office:value="0.320495821675154">
                <text:p>0.320495821675154</text:p>
              </table:table-cell>
              <table:table-cell office:value-type="float" office:value="1.05776318294472">
                <text:p>1.05776318294472</text:p>
              </table:table-cell>
              <table:table-cell office:value-type="float" office:value="1.05670404674843">
                <text:p>1.056704046748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535981525525633">
                <text:p>0.535981525525633</text:p>
              </table:table-cell>
              <table:table-cell office:value-type="float" office:value="0.319377552149731">
                <text:p>0.319377552149731</text:p>
              </table:table-cell>
              <table:table-cell office:value-type="float" office:value="1.07082547101812">
                <text:p>1.07082547101812</text:p>
              </table:table-cell>
              <table:table-cell office:value-type="float" office:value="1.0658319611388">
                <text:p>1.06583196113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536202939287506">
                <text:p>0.536202939287506</text:p>
              </table:table-cell>
              <table:table-cell office:value-type="float" office:value="0.319158250415821">
                <text:p>0.319158250415821</text:p>
              </table:table-cell>
              <table:table-cell office:value-type="float" office:value="1.07326047649335">
                <text:p>1.07326047649335</text:p>
              </table:table-cell>
              <table:table-cell office:value-type="float" office:value="1.06545192341452">
                <text:p>1.065451923414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534986570632108">
                <text:p>0.534986570632108</text:p>
              </table:table-cell>
              <table:table-cell office:value-type="float" office:value="0.317457733882479">
                <text:p>0.317457733882479</text:p>
              </table:table-cell>
              <table:table-cell office:value-type="float" office:value="1.07172135045643">
                <text:p>1.07172135045643</text:p>
              </table:table-cell>
              <table:table-cell office:value-type="float" office:value="1.06116435244806">
                <text:p>1.061164352448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532518676721541">
                <text:p>0.532518676721541</text:p>
              </table:table-cell>
              <table:table-cell office:value-type="float" office:value="0.323707775109338">
                <text:p>0.323707775109338</text:p>
              </table:table-cell>
              <table:table-cell office:value-type="float" office:value="1.06242094397879">
                <text:p>1.06242094397879</text:p>
              </table:table-cell>
              <table:table-cell office:value-type="float" office:value="1.06078138011371">
                <text:p>1.060781380113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531543985302367">
                <text:p>0.531543985302367</text:p>
              </table:table-cell>
              <table:table-cell office:value-type="float" office:value="0.323296579146954">
                <text:p>0.323296579146954</text:p>
              </table:table-cell>
              <table:table-cell office:value-type="float" office:value="1.06215789074205">
                <text:p>1.06215789074205</text:p>
              </table:table-cell>
              <table:table-cell office:value-type="float" office:value="1.05197149488717">
                <text:p>1.05197149488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534261561638479">
                <text:p>0.534261561638479</text:p>
              </table:table-cell>
              <table:table-cell office:value-type="float" office:value="0.327882909888077">
                <text:p>0.327882909888077</text:p>
              </table:table-cell>
              <table:table-cell office:value-type="float" office:value="1.06167818266374">
                <text:p>1.06167818266374</text:p>
              </table:table-cell>
              <table:table-cell office:value-type="float" office:value="1.05364722057341">
                <text:p>1.053647220573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53378277917145">
                <text:p>0.53378277917145</text:p>
              </table:table-cell>
              <table:table-cell office:value-type="float" office:value="0.321578158372463">
                <text:p>0.321578158372463</text:p>
              </table:table-cell>
              <table:table-cell office:value-type="float" office:value="1.05885557889228">
                <text:p>1.05885557889228</text:p>
              </table:table-cell>
              <table:table-cell office:value-type="float" office:value="1.05261594176062">
                <text:p>1.052615941760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533862647937778">
                <text:p>0.533862647937778</text:p>
              </table:table-cell>
              <table:table-cell office:value-type="float" office:value="0.326391942199453">
                <text:p>0.326391942199453</text:p>
              </table:table-cell>
              <table:table-cell office:value-type="float" office:value="1.06143763987672">
                <text:p>1.06143763987672</text:p>
              </table:table-cell>
              <table:table-cell office:value-type="float" office:value="1.06737204685169">
                <text:p>1.06737204685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532835011223684">
                <text:p>0.532835011223684</text:p>
              </table:table-cell>
              <table:table-cell office:value-type="float" office:value="0.327232477652706">
                <text:p>0.327232477652706</text:p>
              </table:table-cell>
              <table:table-cell office:value-type="float" office:value="1.05941894090164">
                <text:p>1.05941894090164</text:p>
              </table:table-cell>
              <table:table-cell office:value-type="float" office:value="1.06863081661208">
                <text:p>1.068630816612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535993817701256">
                <text:p>0.535993817701256</text:p>
              </table:table-cell>
              <table:table-cell office:value-type="float" office:value="0.324082058439835">
                <text:p>0.324082058439835</text:p>
              </table:table-cell>
              <table:table-cell office:value-type="float" office:value="1.05846280690005">
                <text:p>1.05846280690005</text:p>
              </table:table-cell>
              <table:table-cell office:value-type="float" office:value="1.05303668488772">
                <text:p>1.053036684887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534740469243468">
                <text:p>0.534740469243468</text:p>
              </table:table-cell>
              <table:table-cell office:value-type="float" office:value="0.324605091883614">
                <text:p>0.324605091883614</text:p>
              </table:table-cell>
              <table:table-cell office:value-type="float" office:value="1.06425706697178">
                <text:p>1.06425706697178</text:p>
              </table:table-cell>
              <table:table-cell office:value-type="float" office:value="1.06233536315099">
                <text:p>1.06233536315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534088874419855">
                <text:p>0.534088874419855</text:p>
              </table:table-cell>
              <table:table-cell office:value-type="float" office:value="0.325215750910293">
                <text:p>0.325215750910293</text:p>
              </table:table-cell>
              <table:table-cell office:value-type="float" office:value="1.06264614435427">
                <text:p>1.06264614435427</text:p>
              </table:table-cell>
              <table:table-cell office:value-type="float" office:value="1.06109948166954">
                <text:p>1.061099481669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532737158017882">
                <text:p>0.532737158017882</text:p>
              </table:table-cell>
              <table:table-cell office:value-type="float" office:value="0.325454573789376">
                <text:p>0.325454573789376</text:p>
              </table:table-cell>
              <table:table-cell office:value-type="float" office:value="1.06240835385508">
                <text:p>1.06240835385508</text:p>
              </table:table-cell>
              <table:table-cell office:value-type="float" office:value="1.05621040860488">
                <text:p>1.056210408604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5316004769806">
                <text:p>0.5316004769806</text:p>
              </table:table-cell>
              <table:table-cell office:value-type="float" office:value="0.325048040942557">
                <text:p>0.325048040942557</text:p>
              </table:table-cell>
              <table:table-cell office:value-type="float" office:value="1.05891620694524">
                <text:p>1.05891620694524</text:p>
              </table:table-cell>
              <table:table-cell office:value-type="float" office:value="1.04881383739081">
                <text:p>1.048813837390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531763018219871">
                <text:p>0.531763018219871</text:p>
              </table:table-cell>
              <table:table-cell office:value-type="float" office:value="0.326642400452713">
                <text:p>0.326642400452713</text:p>
              </table:table-cell>
              <table:table-cell office:value-type="float" office:value="1.05429081398103">
                <text:p>1.05429081398103</text:p>
              </table:table-cell>
              <table:table-cell office:value-type="float" office:value="1.04689522600938">
                <text:p>1.04689522600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534845054667549">
                <text:p>0.534845054667549</text:p>
              </table:table-cell>
              <table:table-cell office:value-type="float" office:value="0.322222200817852">
                <text:p>0.322222200817852</text:p>
              </table:table-cell>
              <table:table-cell office:value-type="float" office:value="1.04706162593846">
                <text:p>1.04706162593846</text:p>
              </table:table-cell>
              <table:table-cell office:value-type="float" office:value="1.04070403317703">
                <text:p>1.040704033177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34850269453722">
                <text:p>0.534850269453722</text:p>
              </table:table-cell>
              <table:table-cell office:value-type="float" office:value="0.324949751383904">
                <text:p>0.324949751383904</text:p>
              </table:table-cell>
              <table:table-cell office:value-type="float" office:value="1.04759578668582">
                <text:p>1.04759578668582</text:p>
              </table:table-cell>
              <table:table-cell office:value-type="float" office:value="1.04401905678938">
                <text:p>1.044019056789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534956751723397">
                <text:p>0.534956751723397</text:p>
              </table:table-cell>
              <table:table-cell office:value-type="float" office:value="0.326441549523159">
                <text:p>0.326441549523159</text:p>
              </table:table-cell>
              <table:table-cell office:value-type="float" office:value="1.04125888465851">
                <text:p>1.04125888465851</text:p>
              </table:table-cell>
              <table:table-cell office:value-type="float" office:value="1.0429220329609">
                <text:p>1.04292203296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534483797470538">
                <text:p>0.534483797470538</text:p>
              </table:table-cell>
              <table:table-cell office:value-type="float" office:value="0.32474063669918">
                <text:p>0.32474063669918</text:p>
              </table:table-cell>
              <table:table-cell office:value-type="float" office:value="1.04141199267523">
                <text:p>1.04141199267523</text:p>
              </table:table-cell>
              <table:table-cell office:value-type="float" office:value="1.03952484742673">
                <text:p>1.039524847426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533421150923546">
                <text:p>0.533421150923546</text:p>
              </table:table-cell>
              <table:table-cell office:value-type="float" office:value="0.323901100123307">
                <text:p>0.323901100123307</text:p>
              </table:table-cell>
              <table:table-cell office:value-type="float" office:value="1.04017433429157">
                <text:p>1.04017433429157</text:p>
              </table:table-cell>
              <table:table-cell office:value-type="float" office:value="1.04052051955482">
                <text:p>1.040520519554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536356986901316">
                <text:p>0.536356986901316</text:p>
              </table:table-cell>
              <table:table-cell office:value-type="float" office:value="0.326622201835365">
                <text:p>0.326622201835365</text:p>
              </table:table-cell>
              <table:table-cell office:value-type="float" office:value="1.03849902385852">
                <text:p>1.03849902385852</text:p>
              </table:table-cell>
              <table:table-cell office:value-type="float" office:value="1.03454403477999">
                <text:p>1.03454403477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533522999176678">
                <text:p>0.533522999176678</text:p>
              </table:table-cell>
              <table:table-cell office:value-type="float" office:value="0.326842790525558">
                <text:p>0.326842790525558</text:p>
              </table:table-cell>
              <table:table-cell office:value-type="float" office:value="1.03095586889303">
                <text:p>1.03095586889303</text:p>
              </table:table-cell>
              <table:table-cell office:value-type="float" office:value="1.02306501427053">
                <text:p>1.02306501427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534113698667079">
                <text:p>0.534113698667079</text:p>
              </table:table-cell>
              <table:table-cell office:value-type="float" office:value="0.325060137658758">
                <text:p>0.325060137658758</text:p>
              </table:table-cell>
              <table:table-cell office:value-type="float" office:value="1.02924306685385">
                <text:p>1.02924306685385</text:p>
              </table:table-cell>
              <table:table-cell office:value-type="float" office:value="1.0129854136112">
                <text:p>1.0129854136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536479037734756">
                <text:p>0.536479037734756</text:p>
              </table:table-cell>
              <table:table-cell office:value-type="float" office:value="0.329372242075465">
                <text:p>0.329372242075465</text:p>
              </table:table-cell>
              <table:table-cell office:value-type="float" office:value="1.03172694835049">
                <text:p>1.03172694835049</text:p>
              </table:table-cell>
              <table:table-cell office:value-type="float" office:value="1.01801315301567">
                <text:p>1.01801315301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531835052192051">
                <text:p>0.531835052192051</text:p>
              </table:table-cell>
              <table:table-cell office:value-type="float" office:value="0.33008034020533">
                <text:p>0.33008034020533</text:p>
              </table:table-cell>
              <table:table-cell office:value-type="float" office:value="1.02655218860698">
                <text:p>1.02655218860698</text:p>
              </table:table-cell>
              <table:table-cell office:value-type="float" office:value="1.01842978742566">
                <text:p>1.018429787425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534777437407153">
                <text:p>0.534777437407153</text:p>
              </table:table-cell>
              <table:table-cell office:value-type="float" office:value="0.329200033637559">
                <text:p>0.329200033637559</text:p>
              </table:table-cell>
              <table:table-cell office:value-type="float" office:value="1.03120306468356">
                <text:p>1.03120306468356</text:p>
              </table:table-cell>
              <table:table-cell office:value-type="float" office:value="1.01695643456232">
                <text:p>1.016956434562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534155685519462">
                <text:p>0.534155685519462</text:p>
              </table:table-cell>
              <table:table-cell office:value-type="float" office:value="0.332631044798598">
                <text:p>0.332631044798598</text:p>
              </table:table-cell>
              <table:table-cell office:value-type="float" office:value="1.02881667703217">
                <text:p>1.02881667703217</text:p>
              </table:table-cell>
              <table:table-cell office:value-type="float" office:value="1.02333098629015">
                <text:p>1.023330986290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528219933849358">
                <text:p>0.528219933849358</text:p>
              </table:table-cell>
              <table:table-cell office:value-type="float" office:value="0.331504883429452">
                <text:p>0.331504883429452</text:p>
              </table:table-cell>
              <table:table-cell office:value-type="float" office:value="1.00622594122492">
                <text:p>1.00622594122492</text:p>
              </table:table-cell>
              <table:table-cell office:value-type="float" office:value="1.01085151584333">
                <text:p>1.01085151584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533787776420426">
                <text:p>0.533787776420426</text:p>
              </table:table-cell>
              <table:table-cell office:value-type="float" office:value="0.331084257214982">
                <text:p>0.331084257214982</text:p>
              </table:table-cell>
              <table:table-cell office:value-type="float" office:value="0.998963576523881">
                <text:p>0.998963576523881</text:p>
              </table:table-cell>
              <table:table-cell office:value-type="float" office:value="0.998689647524667">
                <text:p>0.998689647524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531900825258013">
                <text:p>0.531900825258013</text:p>
              </table:table-cell>
              <table:table-cell office:value-type="float" office:value="0.329923289175953">
                <text:p>0.329923289175953</text:p>
              </table:table-cell>
              <table:table-cell office:value-type="float" office:value="0.994902338101314">
                <text:p>0.994902338101314</text:p>
              </table:table-cell>
              <table:table-cell office:value-type="float" office:value="0.988198468126615">
                <text:p>0.988198468126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532720354352132">
                <text:p>0.532720354352132</text:p>
              </table:table-cell>
              <table:table-cell office:value-type="float" office:value="0.329404949143824">
                <text:p>0.329404949143824</text:p>
              </table:table-cell>
              <table:table-cell office:value-type="float" office:value="0.995456208873382">
                <text:p>0.995456208873382</text:p>
              </table:table-cell>
              <table:table-cell office:value-type="float" office:value="0.986824806823086">
                <text:p>0.986824806823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52975095101116">
                <text:p>0.52975095101116</text:p>
              </table:table-cell>
              <table:table-cell office:value-type="float" office:value="0.328218503386119">
                <text:p>0.328218503386119</text:p>
              </table:table-cell>
              <table:table-cell office:value-type="float" office:value="1.00511898871644">
                <text:p>1.00511898871644</text:p>
              </table:table-cell>
              <table:table-cell office:value-type="float" office:value="0.988943719106119">
                <text:p>0.9889437191061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529595953529494">
                <text:p>0.529595953529494</text:p>
              </table:table-cell>
              <table:table-cell office:value-type="float" office:value="0.327098542192163">
                <text:p>0.327098542192163</text:p>
              </table:table-cell>
              <table:table-cell office:value-type="float" office:value="1.00101096503533">
                <text:p>1.00101096503533</text:p>
              </table:table-cell>
              <table:table-cell office:value-type="float" office:value="0.986771946630282">
                <text:p>0.986771946630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531384377864517">
                <text:p>0.531384377864517</text:p>
              </table:table-cell>
              <table:table-cell office:value-type="float" office:value="0.32481224846201">
                <text:p>0.32481224846201</text:p>
              </table:table-cell>
              <table:table-cell office:value-type="float" office:value="0.996987194511681">
                <text:p>0.996987194511681</text:p>
              </table:table-cell>
              <table:table-cell office:value-type="float" office:value="0.980055478922478">
                <text:p>0.980055478922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529982598445875">
                <text:p>0.529982598445875</text:p>
              </table:table-cell>
              <table:table-cell office:value-type="float" office:value="0.325326672472385">
                <text:p>0.325326672472385</text:p>
              </table:table-cell>
              <table:table-cell office:value-type="float" office:value="0.996860742904878">
                <text:p>0.996860742904878</text:p>
              </table:table-cell>
              <table:table-cell office:value-type="float" office:value="0.978769731841609">
                <text:p>0.9787697318416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528548375220477">
                <text:p>0.528548375220477</text:p>
              </table:table-cell>
              <table:table-cell office:value-type="float" office:value="0.321985406406266">
                <text:p>0.321985406406266</text:p>
              </table:table-cell>
              <table:table-cell office:value-type="float" office:value="0.991225024662565">
                <text:p>0.991225024662565</text:p>
              </table:table-cell>
              <table:table-cell office:value-type="float" office:value="0.966779488490163">
                <text:p>0.9667794884901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5274190027268">
                <text:p>0.5274190027268</text:p>
              </table:table-cell>
              <table:table-cell office:value-type="float" office:value="0.321292246101044">
                <text:p>0.321292246101044</text:p>
              </table:table-cell>
              <table:table-cell office:value-type="float" office:value="0.986287969142471">
                <text:p>0.986287969142471</text:p>
              </table:table-cell>
              <table:table-cell office:value-type="float" office:value="0.969007745558845">
                <text:p>0.9690077455588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527308254314498">
                <text:p>0.527308254314498</text:p>
              </table:table-cell>
              <table:table-cell office:value-type="float" office:value="0.322267251834422">
                <text:p>0.322267251834422</text:p>
              </table:table-cell>
              <table:table-cell office:value-type="float" office:value="0.984897335609117">
                <text:p>0.984897335609117</text:p>
              </table:table-cell>
              <table:table-cell office:value-type="float" office:value="0.966156755671917">
                <text:p>0.9661567556719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526252923947645">
                <text:p>0.526252923947645</text:p>
              </table:table-cell>
              <table:table-cell office:value-type="float" office:value="0.322741202009427">
                <text:p>0.322741202009427</text:p>
              </table:table-cell>
              <table:table-cell office:value-type="float" office:value="0.984213899730471">
                <text:p>0.984213899730471</text:p>
              </table:table-cell>
              <table:table-cell office:value-type="float" office:value="0.968649426427108">
                <text:p>0.9686494264271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527055336414963">
                <text:p>0.527055336414963</text:p>
              </table:table-cell>
              <table:table-cell office:value-type="float" office:value="0.322105423351137">
                <text:p>0.322105423351137</text:p>
              </table:table-cell>
              <table:table-cell office:value-type="float" office:value="0.985108747563222">
                <text:p>0.985108747563222</text:p>
              </table:table-cell>
              <table:table-cell office:value-type="float" office:value="0.967028040739552">
                <text:p>0.9670280407395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52599669436081">
                <text:p>0.52599669436081</text:p>
              </table:table-cell>
              <table:table-cell office:value-type="float" office:value="0.3226879173898">
                <text:p>0.3226879173898</text:p>
              </table:table-cell>
              <table:table-cell office:value-type="float" office:value="0.980903593513428">
                <text:p>0.980903593513428</text:p>
              </table:table-cell>
              <table:table-cell office:value-type="float" office:value="0.963194663198958">
                <text:p>0.9631946631989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527844928823925">
                <text:p>0.527844928823925</text:p>
              </table:table-cell>
              <table:table-cell office:value-type="float" office:value="0.321855611225533">
                <text:p>0.321855611225533</text:p>
              </table:table-cell>
              <table:table-cell office:value-type="float" office:value="0.98140340921068">
                <text:p>0.98140340921068</text:p>
              </table:table-cell>
              <table:table-cell office:value-type="float" office:value="0.962388096256813">
                <text:p>0.9623880962568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530859032162099">
                <text:p>0.530859032162099</text:p>
              </table:table-cell>
              <table:table-cell office:value-type="float" office:value="0.32190611683157">
                <text:p>0.32190611683157</text:p>
              </table:table-cell>
              <table:table-cell office:value-type="float" office:value="0.982707133819446">
                <text:p>0.982707133819446</text:p>
              </table:table-cell>
              <table:table-cell office:value-type="float" office:value="0.961805446970954">
                <text:p>0.9618054469709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530789850763178">
                <text:p>0.530789850763178</text:p>
              </table:table-cell>
              <table:table-cell office:value-type="float" office:value="0.321502389365341">
                <text:p>0.321502389365341</text:p>
              </table:table-cell>
              <table:table-cell office:value-type="float" office:value="0.983287895833601">
                <text:p>0.983287895833601</text:p>
              </table:table-cell>
              <table:table-cell office:value-type="float" office:value="0.963058491233265">
                <text:p>0.963058491233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53076157289574">
                <text:p>0.53076157289574</text:p>
              </table:table-cell>
              <table:table-cell office:value-type="float" office:value="0.322945901609557">
                <text:p>0.322945901609557</text:p>
              </table:table-cell>
              <table:table-cell office:value-type="float" office:value="0.985055992447701">
                <text:p>0.985055992447701</text:p>
              </table:table-cell>
              <table:table-cell office:value-type="float" office:value="0.964929813931149">
                <text:p>0.9649298139311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532493567048295">
                <text:p>0.532493567048295</text:p>
              </table:table-cell>
              <table:table-cell office:value-type="float" office:value="0.322746547712661">
                <text:p>0.322746547712661</text:p>
              </table:table-cell>
              <table:table-cell office:value-type="float" office:value="0.985637400983958">
                <text:p>0.985637400983958</text:p>
              </table:table-cell>
              <table:table-cell office:value-type="float" office:value="0.964370947726516">
                <text:p>0.9643709477265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532594617562978">
                <text:p>0.532594617562978</text:p>
              </table:table-cell>
              <table:table-cell office:value-type="float" office:value="0.324575196337164">
                <text:p>0.324575196337164</text:p>
              </table:table-cell>
              <table:table-cell office:value-type="float" office:value="0.987486100919266">
                <text:p>0.987486100919266</text:p>
              </table:table-cell>
              <table:table-cell office:value-type="float" office:value="0.966892059360379">
                <text:p>0.9668920593603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536020385237682">
                <text:p>0.536020385237682</text:p>
              </table:table-cell>
              <table:table-cell office:value-type="float" office:value="0.32503049751208">
                <text:p>0.32503049751208</text:p>
              </table:table-cell>
              <table:table-cell office:value-type="float" office:value="0.98982906783654">
                <text:p>0.98982906783654</text:p>
              </table:table-cell>
              <table:table-cell office:value-type="float" office:value="0.972713729405138">
                <text:p>0.972713729405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532342481258286">
                <text:p>0.532342481258286</text:p>
              </table:table-cell>
              <table:table-cell office:value-type="float" office:value="0.325016506624745">
                <text:p>0.325016506624745</text:p>
              </table:table-cell>
              <table:table-cell office:value-type="float" office:value="0.989785202122981">
                <text:p>0.989785202122981</text:p>
              </table:table-cell>
              <table:table-cell office:value-type="float" office:value="0.971622770035189">
                <text:p>0.9716227700351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534381538773782">
                <text:p>0.534381538773782</text:p>
              </table:table-cell>
              <table:table-cell office:value-type="float" office:value="0.325302265096585">
                <text:p>0.325302265096585</text:p>
              </table:table-cell>
              <table:table-cell office:value-type="float" office:value="0.989991559486251">
                <text:p>0.989991559486251</text:p>
              </table:table-cell>
              <table:table-cell office:value-type="float" office:value="0.971911167965929">
                <text:p>0.9719111679659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533237159270134">
                <text:p>0.533237159270134</text:p>
              </table:table-cell>
              <table:table-cell office:value-type="float" office:value="0.327769015513037">
                <text:p>0.327769015513037</text:p>
              </table:table-cell>
              <table:table-cell office:value-type="float" office:value="0.988873052310019">
                <text:p>0.988873052310019</text:p>
              </table:table-cell>
              <table:table-cell office:value-type="float" office:value="0.973170459367511">
                <text:p>0.9731704593675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533862574962436">
                <text:p>0.533862574962436</text:p>
              </table:table-cell>
              <table:table-cell office:value-type="float" office:value="0.326931404891094">
                <text:p>0.326931404891094</text:p>
              </table:table-cell>
              <table:table-cell office:value-type="float" office:value="0.986853010039544">
                <text:p>0.986853010039544</text:p>
              </table:table-cell>
              <table:table-cell office:value-type="float" office:value="0.972915374887339">
                <text:p>0.9729153748873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533839868714987">
                <text:p>0.533839868714987</text:p>
              </table:table-cell>
              <table:table-cell office:value-type="float" office:value="0.326604977880527">
                <text:p>0.326604977880527</text:p>
              </table:table-cell>
              <table:table-cell office:value-type="float" office:value="0.98792906266549">
                <text:p>0.98792906266549</text:p>
              </table:table-cell>
              <table:table-cell office:value-type="float" office:value="0.97404599553739">
                <text:p>0.974045995537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533825903048602">
                <text:p>0.533825903048602</text:p>
              </table:table-cell>
              <table:table-cell office:value-type="float" office:value="0.323912861999821">
                <text:p>0.323912861999821</text:p>
              </table:table-cell>
              <table:table-cell office:value-type="float" office:value="0.99386844753369">
                <text:p>0.99386844753369</text:p>
              </table:table-cell>
              <table:table-cell office:value-type="float" office:value="0.97639141177029">
                <text:p>0.976391411770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53366270510155">
                <text:p>0.53366270510155</text:p>
              </table:table-cell>
              <table:table-cell office:value-type="float" office:value="0.323785502964131">
                <text:p>0.323785502964131</text:p>
              </table:table-cell>
              <table:table-cell office:value-type="float" office:value="0.997172112772569">
                <text:p>0.997172112772569</text:p>
              </table:table-cell>
              <table:table-cell office:value-type="float" office:value="0.978438842404172">
                <text:p>0.9784388424041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53542854769055">
                <text:p>0.53542854769055</text:p>
              </table:table-cell>
              <table:table-cell office:value-type="float" office:value="0.325716516869008">
                <text:p>0.325716516869008</text:p>
              </table:table-cell>
              <table:table-cell office:value-type="float" office:value="1.00333559025393">
                <text:p>1.00333559025393</text:p>
              </table:table-cell>
              <table:table-cell office:value-type="float" office:value="0.988738992159384">
                <text:p>0.9887389921593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531920877074351">
                <text:p>0.531920877074351</text:p>
              </table:table-cell>
              <table:table-cell office:value-type="float" office:value="0.325399348375585">
                <text:p>0.325399348375585</text:p>
              </table:table-cell>
              <table:table-cell office:value-type="float" office:value="1.00417464577808">
                <text:p>1.00417464577808</text:p>
              </table:table-cell>
              <table:table-cell office:value-type="float" office:value="0.987853459046065">
                <text:p>0.9878534590460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531585937259893">
                <text:p>0.531585937259893</text:p>
              </table:table-cell>
              <table:table-cell office:value-type="float" office:value="0.323360140861651">
                <text:p>0.323360140861651</text:p>
              </table:table-cell>
              <table:table-cell office:value-type="float" office:value="1.00343645995638">
                <text:p>1.00343645995638</text:p>
              </table:table-cell>
              <table:table-cell office:value-type="float" office:value="0.986017653074279">
                <text:p>0.9860176530742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53150972462685">
                <text:p>0.53150972462685</text:p>
              </table:table-cell>
              <table:table-cell office:value-type="float" office:value="0.325505366665536">
                <text:p>0.325505366665536</text:p>
              </table:table-cell>
              <table:table-cell office:value-type="float" office:value="1.004109709692">
                <text:p>1.004109709692</text:p>
              </table:table-cell>
              <table:table-cell office:value-type="float" office:value="0.985755484489338">
                <text:p>0.9857554844893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532102895083918">
                <text:p>0.532102895083918</text:p>
              </table:table-cell>
              <table:table-cell office:value-type="float" office:value="0.32732553070967">
                <text:p>0.32732553070967</text:p>
              </table:table-cell>
              <table:table-cell office:value-type="float" office:value="1.00266218836797">
                <text:p>1.00266218836797</text:p>
              </table:table-cell>
              <table:table-cell office:value-type="float" office:value="0.986646126667406">
                <text:p>0.986646126667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532996772180621">
                <text:p>0.532996772180621</text:p>
              </table:table-cell>
              <table:table-cell office:value-type="float" office:value="0.327826786268013">
                <text:p>0.327826786268013</text:p>
              </table:table-cell>
              <table:table-cell office:value-type="float" office:value="1.01065002886317">
                <text:p>1.01065002886317</text:p>
              </table:table-cell>
              <table:table-cell office:value-type="float" office:value="0.99090340464453">
                <text:p>0.990903404644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529816085428133">
                <text:p>0.529816085428133</text:p>
              </table:table-cell>
              <table:table-cell office:value-type="float" office:value="0.327845633772236">
                <text:p>0.327845633772236</text:p>
              </table:table-cell>
              <table:table-cell office:value-type="float" office:value="1.00948565130137">
                <text:p>1.00948565130137</text:p>
              </table:table-cell>
              <table:table-cell office:value-type="float" office:value="0.996064821964364">
                <text:p>0.9960648219643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534256186699763">
                <text:p>0.534256186699763</text:p>
              </table:table-cell>
              <table:table-cell office:value-type="float" office:value="0.32719399325129">
                <text:p>0.32719399325129</text:p>
              </table:table-cell>
              <table:table-cell office:value-type="float" office:value="1.00496863486598">
                <text:p>1.00496863486598</text:p>
              </table:table-cell>
              <table:table-cell office:value-type="float" office:value="0.988982817344221">
                <text:p>0.988982817344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535946886066787">
                <text:p>0.535946886066787</text:p>
              </table:table-cell>
              <table:table-cell office:value-type="float" office:value="0.327544444680056">
                <text:p>0.327544444680056</text:p>
              </table:table-cell>
              <table:table-cell office:value-type="float" office:value="1.00652452722026">
                <text:p>1.00652452722026</text:p>
              </table:table-cell>
              <table:table-cell office:value-type="float" office:value="0.99168634139795">
                <text:p>0.991686341397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537659087210928">
                <text:p>0.537659087210928</text:p>
              </table:table-cell>
              <table:table-cell office:value-type="float" office:value="0.329007440469872">
                <text:p>0.329007440469872</text:p>
              </table:table-cell>
              <table:table-cell office:value-type="float" office:value="1.00968481662353">
                <text:p>1.00968481662353</text:p>
              </table:table-cell>
              <table:table-cell office:value-type="float" office:value="0.994510329566455">
                <text:p>0.994510329566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537807250622957">
                <text:p>0.537807250622957</text:p>
              </table:table-cell>
              <table:table-cell office:value-type="float" office:value="0.329833466342078">
                <text:p>0.329833466342078</text:p>
              </table:table-cell>
              <table:table-cell office:value-type="float" office:value="1.01144839753608">
                <text:p>1.01144839753608</text:p>
              </table:table-cell>
              <table:table-cell office:value-type="float" office:value="0.996652742554186">
                <text:p>0.9966527425541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537847768592013">
                <text:p>0.537847768592013</text:p>
              </table:table-cell>
              <table:table-cell office:value-type="float" office:value="0.329962759004007">
                <text:p>0.329962759004007</text:p>
              </table:table-cell>
              <table:table-cell office:value-type="float" office:value="1.02365537072814">
                <text:p>1.02365537072814</text:p>
              </table:table-cell>
              <table:table-cell office:value-type="float" office:value="1.0064189185112">
                <text:p>1.0064189185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536774460738274">
                <text:p>0.536774460738274</text:p>
              </table:table-cell>
              <table:table-cell office:value-type="float" office:value="0.330982306461549">
                <text:p>0.330982306461549</text:p>
              </table:table-cell>
              <table:table-cell office:value-type="float" office:value="1.0239937977316">
                <text:p>1.0239937977316</text:p>
              </table:table-cell>
              <table:table-cell office:value-type="float" office:value="1.00989518032882">
                <text:p>1.009895180328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539323704035301">
                <text:p>0.539323704035301</text:p>
              </table:table-cell>
              <table:table-cell office:value-type="float" office:value="0.33106560702821">
                <text:p>0.33106560702821</text:p>
              </table:table-cell>
              <table:table-cell office:value-type="float" office:value="1.0250198013867">
                <text:p>1.0250198013867</text:p>
              </table:table-cell>
              <table:table-cell office:value-type="float" office:value="1.00870081988137">
                <text:p>1.00870081988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54084935196494">
                <text:p>0.54084935196494</text:p>
              </table:table-cell>
              <table:table-cell office:value-type="float" office:value="0.332872793107894">
                <text:p>0.332872793107894</text:p>
              </table:table-cell>
              <table:table-cell office:value-type="float" office:value="1.02527416877329">
                <text:p>1.02527416877329</text:p>
              </table:table-cell>
              <table:table-cell office:value-type="float" office:value="1.01174057623939">
                <text:p>1.011740576239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537711315817581">
                <text:p>0.537711315817581</text:p>
              </table:table-cell>
              <table:table-cell office:value-type="float" office:value="0.332441012817813">
                <text:p>0.332441012817813</text:p>
              </table:table-cell>
              <table:table-cell office:value-type="float" office:value="1.02437918435643">
                <text:p>1.02437918435643</text:p>
              </table:table-cell>
              <table:table-cell office:value-type="float" office:value="1.01043672486705">
                <text:p>1.010436724867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544357967758513">
                <text:p>0.544357967758513</text:p>
              </table:table-cell>
              <table:table-cell office:value-type="float" office:value="0.333164614867626">
                <text:p>0.333164614867626</text:p>
              </table:table-cell>
              <table:table-cell office:value-type="float" office:value="1.03637512229408">
                <text:p>1.03637512229408</text:p>
              </table:table-cell>
              <table:table-cell office:value-type="float" office:value="1.0201289452604">
                <text:p>1.02012894526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542523665531195">
                <text:p>0.542523665531195</text:p>
              </table:table-cell>
              <table:table-cell office:value-type="float" office:value="0.332377524964584">
                <text:p>0.332377524964584</text:p>
              </table:table-cell>
              <table:table-cell office:value-type="float" office:value="1.03931875610621">
                <text:p>1.03931875610621</text:p>
              </table:table-cell>
              <table:table-cell office:value-type="float" office:value="1.01826211844952">
                <text:p>1.018262118449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540167855491486">
                <text:p>0.540167855491486</text:p>
              </table:table-cell>
              <table:table-cell office:value-type="float" office:value="0.332263083273523">
                <text:p>0.332263083273523</text:p>
              </table:table-cell>
              <table:table-cell office:value-type="float" office:value="1.04451688671552">
                <text:p>1.04451688671552</text:p>
              </table:table-cell>
              <table:table-cell office:value-type="float" office:value="1.01916893418202">
                <text:p>1.01916893418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541312202239683">
                <text:p>0.541312202239683</text:p>
              </table:table-cell>
              <table:table-cell office:value-type="float" office:value="0.332240246244658">
                <text:p>0.332240246244658</text:p>
              </table:table-cell>
              <table:table-cell office:value-type="float" office:value="1.04379106027955">
                <text:p>1.04379106027955</text:p>
              </table:table-cell>
              <table:table-cell office:value-type="float" office:value="1.01670495376758">
                <text:p>1.016704953767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540981042632483">
                <text:p>0.540981042632483</text:p>
              </table:table-cell>
              <table:table-cell office:value-type="float" office:value="0.332438545214242">
                <text:p>0.332438545214242</text:p>
              </table:table-cell>
              <table:table-cell office:value-type="float" office:value="1.03867950876224">
                <text:p>1.03867950876224</text:p>
              </table:table-cell>
              <table:table-cell office:value-type="float" office:value="1.01398598004045">
                <text:p>1.013985980040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54456888342743">
                <text:p>0.54456888342743</text:p>
              </table:table-cell>
              <table:table-cell office:value-type="float" office:value="0.333019184381592">
                <text:p>0.333019184381592</text:p>
              </table:table-cell>
              <table:table-cell office:value-type="float" office:value="1.02942290341162">
                <text:p>1.02942290341162</text:p>
              </table:table-cell>
              <table:table-cell office:value-type="float" office:value="1.01019510391809">
                <text:p>1.010195103918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544861528031682">
                <text:p>0.544861528031682</text:p>
              </table:table-cell>
              <table:table-cell office:value-type="float" office:value="0.33294189443397">
                <text:p>0.33294189443397</text:p>
              </table:table-cell>
              <table:table-cell office:value-type="float" office:value="1.02989035662139">
                <text:p>1.02989035662139</text:p>
              </table:table-cell>
              <table:table-cell office:value-type="float" office:value="1.01615167790706">
                <text:p>1.016151677907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545541236108399">
                <text:p>0.545541236108399</text:p>
              </table:table-cell>
              <table:table-cell office:value-type="float" office:value="0.332880105872801">
                <text:p>0.332880105872801</text:p>
              </table:table-cell>
              <table:table-cell office:value-type="float" office:value="1.02960546297071">
                <text:p>1.02960546297071</text:p>
              </table:table-cell>
              <table:table-cell office:value-type="float" office:value="1.00978142626777">
                <text:p>1.009781426267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546425621999184">
                <text:p>0.546425621999184</text:p>
              </table:table-cell>
              <table:table-cell office:value-type="float" office:value="0.329412969953578">
                <text:p>0.329412969953578</text:p>
              </table:table-cell>
              <table:table-cell office:value-type="float" office:value="1.02318591685279">
                <text:p>1.02318591685279</text:p>
              </table:table-cell>
              <table:table-cell office:value-type="float" office:value="1.00788485235213">
                <text:p>1.007884852352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549312402994176">
                <text:p>0.549312402994176</text:p>
              </table:table-cell>
              <table:table-cell office:value-type="float" office:value="0.331455632124007">
                <text:p>0.331455632124007</text:p>
              </table:table-cell>
              <table:table-cell office:value-type="float" office:value="1.02330247259969">
                <text:p>1.02330247259969</text:p>
              </table:table-cell>
              <table:table-cell office:value-type="float" office:value="1.00794995930257">
                <text:p>1.007949959302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548531246280125">
                <text:p>0.548531246280125</text:p>
              </table:table-cell>
              <table:table-cell office:value-type="float" office:value="0.331996819574822">
                <text:p>0.331996819574822</text:p>
              </table:table-cell>
              <table:table-cell office:value-type="float" office:value="1.02247353431546">
                <text:p>1.02247353431546</text:p>
              </table:table-cell>
              <table:table-cell office:value-type="float" office:value="1.0038036915834">
                <text:p>1.00380369158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54745634552288">
                <text:p>0.54745634552288</text:p>
              </table:table-cell>
              <table:table-cell office:value-type="float" office:value="0.331519796949585">
                <text:p>0.331519796949585</text:p>
              </table:table-cell>
              <table:table-cell office:value-type="float" office:value="1.02278759797133">
                <text:p>1.02278759797133</text:p>
              </table:table-cell>
              <table:table-cell office:value-type="float" office:value="1.00292570303322">
                <text:p>1.00292570303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547796159251109">
                <text:p>0.547796159251109</text:p>
              </table:table-cell>
              <table:table-cell office:value-type="float" office:value="0.331487508792583">
                <text:p>0.331487508792583</text:p>
              </table:table-cell>
              <table:table-cell office:value-type="float" office:value="1.02322048971945">
                <text:p>1.02322048971945</text:p>
              </table:table-cell>
              <table:table-cell office:value-type="float" office:value="1.00296952888808">
                <text:p>1.002969528888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549951863513712">
                <text:p>0.549951863513712</text:p>
              </table:table-cell>
              <table:table-cell office:value-type="float" office:value="0.330120175304282">
                <text:p>0.330120175304282</text:p>
              </table:table-cell>
              <table:table-cell office:value-type="float" office:value="1.02204844179937">
                <text:p>1.02204844179937</text:p>
              </table:table-cell>
              <table:table-cell office:value-type="float" office:value="1.00248293321329">
                <text:p>1.002482933213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547546539624519">
                <text:p>0.547546539624519</text:p>
              </table:table-cell>
              <table:table-cell office:value-type="float" office:value="0.329574984113337">
                <text:p>0.329574984113337</text:p>
              </table:table-cell>
              <table:table-cell office:value-type="float" office:value="1.02190526787685">
                <text:p>1.02190526787685</text:p>
              </table:table-cell>
              <table:table-cell office:value-type="float" office:value="1.0015024275064">
                <text:p>1.0015024275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549578333684228">
                <text:p>0.549578333684228</text:p>
              </table:table-cell>
              <table:table-cell office:value-type="float" office:value="0.329457031590472">
                <text:p>0.329457031590472</text:p>
              </table:table-cell>
              <table:table-cell office:value-type="float" office:value="1.01695323054105">
                <text:p>1.01695323054105</text:p>
              </table:table-cell>
              <table:table-cell office:value-type="float" office:value="0.991540467832617">
                <text:p>0.991540467832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550305240671636">
                <text:p>0.550305240671636</text:p>
              </table:table-cell>
              <table:table-cell office:value-type="float" office:value="0.330475361555913">
                <text:p>0.330475361555913</text:p>
              </table:table-cell>
              <table:table-cell office:value-type="float" office:value="1.01400974726988">
                <text:p>1.01400974726988</text:p>
              </table:table-cell>
              <table:table-cell office:value-type="float" office:value="0.991805418092536">
                <text:p>0.9918054180925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550776071400336">
                <text:p>0.550776071400336</text:p>
              </table:table-cell>
              <table:table-cell office:value-type="float" office:value="0.330811545395336">
                <text:p>0.330811545395336</text:p>
              </table:table-cell>
              <table:table-cell office:value-type="float" office:value="1.01339741275201">
                <text:p>1.01339741275201</text:p>
              </table:table-cell>
              <table:table-cell office:value-type="float" office:value="0.990991533095387">
                <text:p>0.9909915330953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550992541743617">
                <text:p>0.550992541743617</text:p>
              </table:table-cell>
              <table:table-cell office:value-type="float" office:value="0.330118311686906">
                <text:p>0.330118311686906</text:p>
              </table:table-cell>
              <table:table-cell office:value-type="float" office:value="1.01436232403428">
                <text:p>1.01436232403428</text:p>
              </table:table-cell>
              <table:table-cell office:value-type="float" office:value="0.992181190637697">
                <text:p>0.9921811906376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551990997934944">
                <text:p>0.551990997934944</text:p>
              </table:table-cell>
              <table:table-cell office:value-type="float" office:value="0.330239291984629">
                <text:p>0.330239291984629</text:p>
              </table:table-cell>
              <table:table-cell office:value-type="float" office:value="1.01253468983879">
                <text:p>1.01253468983879</text:p>
              </table:table-cell>
              <table:table-cell office:value-type="float" office:value="0.985872740007899">
                <text:p>0.9858727400078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553973456186444">
                <text:p>0.553973456186444</text:p>
              </table:table-cell>
              <table:table-cell office:value-type="float" office:value="0.331003019447479">
                <text:p>0.331003019447479</text:p>
              </table:table-cell>
              <table:table-cell office:value-type="float" office:value="1.0245601603298">
                <text:p>1.0245601603298</text:p>
              </table:table-cell>
              <table:table-cell office:value-type="float" office:value="0.996622541839446">
                <text:p>0.9966225418394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547739067368747">
                <text:p>0.547739067368747</text:p>
              </table:table-cell>
              <table:table-cell office:value-type="float" office:value="0.330825919760686">
                <text:p>0.330825919760686</text:p>
              </table:table-cell>
              <table:table-cell office:value-type="float" office:value="1.02542456445297">
                <text:p>1.02542456445297</text:p>
              </table:table-cell>
              <table:table-cell office:value-type="float" office:value="0.996037997191509">
                <text:p>0.9960379971915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54725814463992">
                <text:p>0.54725814463992</text:p>
              </table:table-cell>
              <table:table-cell office:value-type="float" office:value="0.331002953328102">
                <text:p>0.331002953328102</text:p>
              </table:table-cell>
              <table:table-cell office:value-type="float" office:value="1.02551887170248">
                <text:p>1.02551887170248</text:p>
              </table:table-cell>
              <table:table-cell office:value-type="float" office:value="0.994122204267795">
                <text:p>0.9941222042677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549613634292598">
                <text:p>0.549613634292598</text:p>
              </table:table-cell>
              <table:table-cell office:value-type="float" office:value="0.331275719030662">
                <text:p>0.331275719030662</text:p>
              </table:table-cell>
              <table:table-cell office:value-type="float" office:value="1.02224876466851">
                <text:p>1.02224876466851</text:p>
              </table:table-cell>
              <table:table-cell office:value-type="float" office:value="0.992845388752518">
                <text:p>0.9928453887525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49255308340561">
                <text:p>0.549255308340561</text:p>
              </table:table-cell>
              <table:table-cell office:value-type="float" office:value="0.331281052650868">
                <text:p>0.331281052650868</text:p>
              </table:table-cell>
              <table:table-cell office:value-type="float" office:value="1.02186156394106">
                <text:p>1.02186156394106</text:p>
              </table:table-cell>
              <table:table-cell office:value-type="float" office:value="0.996334511695925">
                <text:p>0.9963345116959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54905815548814">
                <text:p>0.54905815548814</text:p>
              </table:table-cell>
              <table:table-cell office:value-type="float" office:value="0.333345520769569">
                <text:p>0.333345520769569</text:p>
              </table:table-cell>
              <table:table-cell office:value-type="float" office:value="1.01178312640924">
                <text:p>1.01178312640924</text:p>
              </table:table-cell>
              <table:table-cell office:value-type="float" office:value="0.993101645944917">
                <text:p>0.9931016459449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551222587009993">
                <text:p>0.551222587009993</text:p>
              </table:table-cell>
              <table:table-cell office:value-type="float" office:value="0.329082254351478">
                <text:p>0.329082254351478</text:p>
              </table:table-cell>
              <table:table-cell office:value-type="float" office:value="1.01030526483893">
                <text:p>1.01030526483893</text:p>
              </table:table-cell>
              <table:table-cell office:value-type="float" office:value="0.993447617515105">
                <text:p>0.9934476175151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546664906804225">
                <text:p>0.546664906804225</text:p>
              </table:table-cell>
              <table:table-cell office:value-type="float" office:value="0.327506052803935">
                <text:p>0.327506052803935</text:p>
              </table:table-cell>
              <table:table-cell office:value-type="float" office:value="1.01258343105914">
                <text:p>1.01258343105914</text:p>
              </table:table-cell>
              <table:table-cell office:value-type="float" office:value="0.993449717862414">
                <text:p>0.993449717862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545126537607992">
                <text:p>0.545126537607992</text:p>
              </table:table-cell>
              <table:table-cell office:value-type="float" office:value="0.327607759217591">
                <text:p>0.327607759217591</text:p>
              </table:table-cell>
              <table:table-cell office:value-type="float" office:value="1.01595318932124">
                <text:p>1.01595318932124</text:p>
              </table:table-cell>
              <table:table-cell office:value-type="float" office:value="0.998889218582453">
                <text:p>0.9988892185824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542945544960224">
                <text:p>0.542945544960224</text:p>
              </table:table-cell>
              <table:table-cell office:value-type="float" office:value="0.32874229927655">
                <text:p>0.32874229927655</text:p>
              </table:table-cell>
              <table:table-cell office:value-type="float" office:value="1.01965798883488">
                <text:p>1.01965798883488</text:p>
              </table:table-cell>
              <table:table-cell office:value-type="float" office:value="1.00139772739952">
                <text:p>1.00139772739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542775983837579">
                <text:p>0.542775983837579</text:p>
              </table:table-cell>
              <table:table-cell office:value-type="float" office:value="0.329233733794836">
                <text:p>0.329233733794836</text:p>
              </table:table-cell>
              <table:table-cell office:value-type="float" office:value="1.02378339458951">
                <text:p>1.02378339458951</text:p>
              </table:table-cell>
              <table:table-cell office:value-type="float" office:value="1.00862361322134">
                <text:p>1.008623613221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542788678155086">
                <text:p>0.542788678155086</text:p>
              </table:table-cell>
              <table:table-cell office:value-type="float" office:value="0.329366607392847">
                <text:p>0.329366607392847</text:p>
              </table:table-cell>
              <table:table-cell office:value-type="float" office:value="1.02980684390384">
                <text:p>1.02980684390384</text:p>
              </table:table-cell>
              <table:table-cell office:value-type="float" office:value="1.01357834922115">
                <text:p>1.013578349221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53892911762133">
                <text:p>0.53892911762133</text:p>
              </table:table-cell>
              <table:table-cell office:value-type="float" office:value="0.329386882568567">
                <text:p>0.329386882568567</text:p>
              </table:table-cell>
              <table:table-cell office:value-type="float" office:value="1.02998465117911">
                <text:p>1.02998465117911</text:p>
              </table:table-cell>
              <table:table-cell office:value-type="float" office:value="1.01442107298947">
                <text:p>1.014421072989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538222144993832">
                <text:p>0.538222144993832</text:p>
              </table:table-cell>
              <table:table-cell office:value-type="float" office:value="0.329945950005104">
                <text:p>0.329945950005104</text:p>
              </table:table-cell>
              <table:table-cell office:value-type="float" office:value="1.03618544336361">
                <text:p>1.03618544336361</text:p>
              </table:table-cell>
              <table:table-cell office:value-type="float" office:value="1.01537125387846">
                <text:p>1.015371253878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535988302521959">
                <text:p>0.535988302521959</text:p>
              </table:table-cell>
              <table:table-cell office:value-type="float" office:value="0.327194022284511">
                <text:p>0.327194022284511</text:p>
              </table:table-cell>
              <table:table-cell office:value-type="float" office:value="1.03529174613433">
                <text:p>1.03529174613433</text:p>
              </table:table-cell>
              <table:table-cell office:value-type="float" office:value="1.01372635651568">
                <text:p>1.013726356515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534313774156509">
                <text:p>0.534313774156509</text:p>
              </table:table-cell>
              <table:table-cell office:value-type="float" office:value="0.330111856698897">
                <text:p>0.330111856698897</text:p>
              </table:table-cell>
              <table:table-cell office:value-type="float" office:value="1.03542249789957">
                <text:p>1.03542249789957</text:p>
              </table:table-cell>
              <table:table-cell office:value-type="float" office:value="1.01787647722522">
                <text:p>1.017876477225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532481769975891">
                <text:p>0.532481769975891</text:p>
              </table:table-cell>
              <table:table-cell office:value-type="float" office:value="0.325541480376053">
                <text:p>0.325541480376053</text:p>
              </table:table-cell>
              <table:table-cell office:value-type="float" office:value="1.03495757366673">
                <text:p>1.03495757366673</text:p>
              </table:table-cell>
              <table:table-cell office:value-type="float" office:value="1.01742049562705">
                <text:p>1.017420495627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533049707223339">
                <text:p>0.533049707223339</text:p>
              </table:table-cell>
              <table:table-cell office:value-type="float" office:value="0.326181198518297">
                <text:p>0.326181198518297</text:p>
              </table:table-cell>
              <table:table-cell office:value-type="float" office:value="1.03621630074771">
                <text:p>1.03621630074771</text:p>
              </table:table-cell>
              <table:table-cell office:value-type="float" office:value="1.02224507323004">
                <text:p>1.022245073230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532676628682758">
                <text:p>0.532676628682758</text:p>
              </table:table-cell>
              <table:table-cell office:value-type="float" office:value="0.32857140438995">
                <text:p>0.32857140438995</text:p>
              </table:table-cell>
              <table:table-cell office:value-type="float" office:value="1.03527769026925">
                <text:p>1.03527769026925</text:p>
              </table:table-cell>
              <table:table-cell office:value-type="float" office:value="1.0220572403869">
                <text:p>1.02205724038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531859756041402">
                <text:p>0.531859756041402</text:p>
              </table:table-cell>
              <table:table-cell office:value-type="float" office:value="0.326741198555876">
                <text:p>0.326741198555876</text:p>
              </table:table-cell>
              <table:table-cell office:value-type="float" office:value="1.03080078774672">
                <text:p>1.03080078774672</text:p>
              </table:table-cell>
              <table:table-cell office:value-type="float" office:value="1.01613640310924">
                <text:p>1.016136403109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533762790874155">
                <text:p>0.533762790874155</text:p>
              </table:table-cell>
              <table:table-cell office:value-type="float" office:value="0.327077680880924">
                <text:p>0.327077680880924</text:p>
              </table:table-cell>
              <table:table-cell office:value-type="float" office:value="1.02322829457641">
                <text:p>1.02322829457641</text:p>
              </table:table-cell>
              <table:table-cell office:value-type="float" office:value="1.01453018804693">
                <text:p>1.014530188046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536026022193772">
                <text:p>0.536026022193772</text:p>
              </table:table-cell>
              <table:table-cell office:value-type="float" office:value="0.331220226776661">
                <text:p>0.331220226776661</text:p>
              </table:table-cell>
              <table:table-cell office:value-type="float" office:value="1.01772283393033">
                <text:p>1.01772283393033</text:p>
              </table:table-cell>
              <table:table-cell office:value-type="float" office:value="1.00998312719968">
                <text:p>1.009983127199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536022922542026">
                <text:p>0.536022922542026</text:p>
              </table:table-cell>
              <table:table-cell office:value-type="float" office:value="0.311219076340599">
                <text:p>0.311219076340599</text:p>
              </table:table-cell>
              <table:table-cell office:value-type="float" office:value="1.00855099799663">
                <text:p>1.00855099799663</text:p>
              </table:table-cell>
              <table:table-cell office:value-type="float" office:value="0.989839206360602">
                <text:p>0.9898392063606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534579274167255">
                <text:p>0.534579274167255</text:p>
              </table:table-cell>
              <table:table-cell office:value-type="float" office:value="0.304283337777531">
                <text:p>0.304283337777531</text:p>
              </table:table-cell>
              <table:table-cell office:value-type="float" office:value="1.01395612834764">
                <text:p>1.01395612834764</text:p>
              </table:table-cell>
              <table:table-cell office:value-type="float" office:value="0.979058853269609">
                <text:p>0.9790588532696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533963653963226">
                <text:p>0.533963653963226</text:p>
              </table:table-cell>
              <table:table-cell office:value-type="float" office:value="0.320029097389143">
                <text:p>0.320029097389143</text:p>
              </table:table-cell>
              <table:table-cell office:value-type="float" office:value="1.01796096498608">
                <text:p>1.01796096498608</text:p>
              </table:table-cell>
              <table:table-cell office:value-type="float" office:value="0.986562750164562">
                <text:p>0.9865627501645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35459004134044">
                <text:p>0.535459004134044</text:p>
              </table:table-cell>
              <table:table-cell office:value-type="float" office:value="0.338695102340895">
                <text:p>0.338695102340895</text:p>
              </table:table-cell>
              <table:table-cell office:value-type="float" office:value="1.046370358255">
                <text:p>1.046370358255</text:p>
              </table:table-cell>
              <table:table-cell office:value-type="float" office:value="1.02888348326286">
                <text:p>1.028883483262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540703156153639">
                <text:p>0.540703156153639</text:p>
              </table:table-cell>
              <table:table-cell office:value-type="float" office:value="0.349386201044325">
                <text:p>0.349386201044325</text:p>
              </table:table-cell>
              <table:table-cell office:value-type="float" office:value="1.06393761070655">
                <text:p>1.06393761070655</text:p>
              </table:table-cell>
              <table:table-cell office:value-type="float" office:value="1.04373409566577">
                <text:p>1.043734095665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551428886625126">
                <text:p>0.551428886625126</text:p>
              </table:table-cell>
              <table:table-cell office:value-type="float" office:value="0.358446636377245">
                <text:p>0.358446636377245</text:p>
              </table:table-cell>
              <table:table-cell office:value-type="float" office:value="1.08173011889895">
                <text:p>1.08173011889895</text:p>
              </table:table-cell>
              <table:table-cell office:value-type="float" office:value="1.06647585907548">
                <text:p>1.066475859075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552780926268855">
                <text:p>0.552780926268855</text:p>
              </table:table-cell>
              <table:table-cell office:value-type="float" office:value="0.360918358533668">
                <text:p>0.360918358533668</text:p>
              </table:table-cell>
              <table:table-cell office:value-type="float" office:value="1.09746271539807">
                <text:p>1.09746271539807</text:p>
              </table:table-cell>
              <table:table-cell office:value-type="float" office:value="1.10866017008936">
                <text:p>1.108660170089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554427660260962">
                <text:p>0.554427660260962</text:p>
              </table:table-cell>
              <table:table-cell office:value-type="float" office:value="0.361783569981054">
                <text:p>0.361783569981054</text:p>
              </table:table-cell>
              <table:table-cell office:value-type="float" office:value="1.13076147020702">
                <text:p>1.13076147020702</text:p>
              </table:table-cell>
              <table:table-cell office:value-type="float" office:value="1.16200588622584">
                <text:p>1.162005886225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561671153827781">
                <text:p>0.561671153827781</text:p>
              </table:table-cell>
              <table:table-cell office:value-type="float" office:value="0.366751932437208">
                <text:p>0.366751932437208</text:p>
              </table:table-cell>
              <table:table-cell office:value-type="float" office:value="1.14625695469934">
                <text:p>1.14625695469934</text:p>
              </table:table-cell>
              <table:table-cell office:value-type="float" office:value="1.1821136379347">
                <text:p>1.18211363793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567718027692881">
                <text:p>0.567718027692881</text:p>
              </table:table-cell>
              <table:table-cell office:value-type="float" office:value="0.367926793479898">
                <text:p>0.367926793479898</text:p>
              </table:table-cell>
              <table:table-cell office:value-type="float" office:value="1.17612394132069">
                <text:p>1.17612394132069</text:p>
              </table:table-cell>
              <table:table-cell office:value-type="float" office:value="1.19899031203339">
                <text:p>1.198990312033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568362069157015">
                <text:p>0.568362069157015</text:p>
              </table:table-cell>
              <table:table-cell office:value-type="float" office:value="0.37032744922308">
                <text:p>0.37032744922308</text:p>
              </table:table-cell>
              <table:table-cell office:value-type="float" office:value="1.17131108447858">
                <text:p>1.17131108447858</text:p>
              </table:table-cell>
              <table:table-cell office:value-type="float" office:value="1.19542153666986">
                <text:p>1.195421536669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57379615597884">
                <text:p>0.57379615597884</text:p>
              </table:table-cell>
              <table:table-cell office:value-type="float" office:value="0.378214125951034">
                <text:p>0.378214125951034</text:p>
              </table:table-cell>
              <table:table-cell office:value-type="float" office:value="1.18922841943036">
                <text:p>1.18922841943036</text:p>
              </table:table-cell>
              <table:table-cell office:value-type="float" office:value="1.24085205894841">
                <text:p>1.24085205894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581412401318866">
                <text:p>0.581412401318866</text:p>
              </table:table-cell>
              <table:table-cell office:value-type="float" office:value="0.375423297437421">
                <text:p>0.375423297437421</text:p>
              </table:table-cell>
              <table:table-cell office:value-type="float" office:value="1.18568731678005">
                <text:p>1.18568731678005</text:p>
              </table:table-cell>
              <table:table-cell office:value-type="float" office:value="1.23157889649045">
                <text:p>1.231578896490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579830636541793">
                <text:p>0.579830636541793</text:p>
              </table:table-cell>
              <table:table-cell office:value-type="float" office:value="0.37869798587247">
                <text:p>0.37869798587247</text:p>
              </table:table-cell>
              <table:table-cell office:value-type="float" office:value="1.1498931540783">
                <text:p>1.1498931540783</text:p>
              </table:table-cell>
              <table:table-cell office:value-type="float" office:value="1.19852124053049">
                <text:p>1.198521240530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5821520230753">
                <text:p>0.5821520230753</text:p>
              </table:table-cell>
              <table:table-cell office:value-type="float" office:value="0.381100326273284">
                <text:p>0.381100326273284</text:p>
              </table:table-cell>
              <table:table-cell office:value-type="float" office:value="1.14523348202543">
                <text:p>1.14523348202543</text:p>
              </table:table-cell>
              <table:table-cell office:value-type="float" office:value="1.20374687987123">
                <text:p>1.203746879871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584599934457694">
                <text:p>0.584599934457694</text:p>
              </table:table-cell>
              <table:table-cell office:value-type="float" office:value="0.380087384991406">
                <text:p>0.380087384991406</text:p>
              </table:table-cell>
              <table:table-cell office:value-type="float" office:value="1.14311435988071">
                <text:p>1.14311435988071</text:p>
              </table:table-cell>
              <table:table-cell office:value-type="float" office:value="1.20092410339653">
                <text:p>1.200924103396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584360810068882">
                <text:p>0.584360810068882</text:p>
              </table:table-cell>
              <table:table-cell office:value-type="float" office:value="0.38187212607617">
                <text:p>0.38187212607617</text:p>
              </table:table-cell>
              <table:table-cell office:value-type="float" office:value="1.13558757097136">
                <text:p>1.13558757097136</text:p>
              </table:table-cell>
              <table:table-cell office:value-type="float" office:value="1.19225491020506">
                <text:p>1.192254910205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589267533860769">
                <text:p>0.589267533860769</text:p>
              </table:table-cell>
              <table:table-cell office:value-type="float" office:value="0.383493797424574">
                <text:p>0.383493797424574</text:p>
              </table:table-cell>
              <table:table-cell office:value-type="float" office:value="1.14427284331556">
                <text:p>1.14427284331556</text:p>
              </table:table-cell>
              <table:table-cell office:value-type="float" office:value="1.19693358965627">
                <text:p>1.196933589656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592042995861866">
                <text:p>0.592042995861866</text:p>
              </table:table-cell>
              <table:table-cell office:value-type="float" office:value="0.384348104450258">
                <text:p>0.384348104450258</text:p>
              </table:table-cell>
              <table:table-cell office:value-type="float" office:value="1.15736532613707">
                <text:p>1.15736532613707</text:p>
              </table:table-cell>
              <table:table-cell office:value-type="float" office:value="1.20126635204778">
                <text:p>1.20126635204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590686728582031">
                <text:p>0.590686728582031</text:p>
              </table:table-cell>
              <table:table-cell office:value-type="float" office:value="0.385111184126355">
                <text:p>0.385111184126355</text:p>
              </table:table-cell>
              <table:table-cell office:value-type="float" office:value="1.16790555236459">
                <text:p>1.16790555236459</text:p>
              </table:table-cell>
              <table:table-cell office:value-type="float" office:value="1.20281548391962">
                <text:p>1.20281548391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593575163702208">
                <text:p>0.593575163702208</text:p>
              </table:table-cell>
              <table:table-cell office:value-type="float" office:value="0.387471337746572">
                <text:p>0.387471337746572</text:p>
              </table:table-cell>
              <table:table-cell office:value-type="float" office:value="1.16275291183258">
                <text:p>1.16275291183258</text:p>
              </table:table-cell>
              <table:table-cell office:value-type="float" office:value="1.20883211731799">
                <text:p>1.208832117317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597158946995984">
                <text:p>0.597158946995984</text:p>
              </table:table-cell>
              <table:table-cell office:value-type="float" office:value="0.396862448802626">
                <text:p>0.396862448802626</text:p>
              </table:table-cell>
              <table:table-cell office:value-type="float" office:value="1.16573363909956">
                <text:p>1.16573363909956</text:p>
              </table:table-cell>
              <table:table-cell office:value-type="float" office:value="1.22219272021211">
                <text:p>1.22219272021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596056577770545">
                <text:p>0.596056577770545</text:p>
              </table:table-cell>
              <table:table-cell office:value-type="float" office:value="0.39426021635676">
                <text:p>0.39426021635676</text:p>
              </table:table-cell>
              <table:table-cell office:value-type="float" office:value="1.16571933991009">
                <text:p>1.16571933991009</text:p>
              </table:table-cell>
              <table:table-cell office:value-type="float" office:value="1.22887424528041">
                <text:p>1.228874245280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00013559550163">
                <text:p>0.600013559550163</text:p>
              </table:table-cell>
              <table:table-cell office:value-type="float" office:value="0.390461479735402">
                <text:p>0.390461479735402</text:p>
              </table:table-cell>
              <table:table-cell office:value-type="float" office:value="1.16034190891749">
                <text:p>1.16034190891749</text:p>
              </table:table-cell>
              <table:table-cell office:value-type="float" office:value="1.24052058675447">
                <text:p>1.240520586754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583370361141209">
                <text:p>0.583370361141209</text:p>
              </table:table-cell>
              <table:table-cell office:value-type="float" office:value="0.388278169365924">
                <text:p>0.388278169365924</text:p>
              </table:table-cell>
              <table:table-cell office:value-type="float" office:value="1.14192731197923">
                <text:p>1.14192731197923</text:p>
              </table:table-cell>
              <table:table-cell office:value-type="float" office:value="1.22923440005503">
                <text:p>1.229234400055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582500613614253">
                <text:p>0.582500613614253</text:p>
              </table:table-cell>
              <table:table-cell office:value-type="float" office:value="0.39645740945652">
                <text:p>0.39645740945652</text:p>
              </table:table-cell>
              <table:table-cell office:value-type="float" office:value="1.16342863614238">
                <text:p>1.16342863614238</text:p>
              </table:table-cell>
              <table:table-cell office:value-type="float" office:value="1.25550929374927">
                <text:p>1.255509293749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577098075887117">
                <text:p>0.577098075887117</text:p>
              </table:table-cell>
              <table:table-cell office:value-type="float" office:value="0.387078737585893">
                <text:p>0.387078737585893</text:p>
              </table:table-cell>
              <table:table-cell office:value-type="float" office:value="1.15661846978765">
                <text:p>1.15661846978765</text:p>
              </table:table-cell>
              <table:table-cell office:value-type="float" office:value="1.26466627050062">
                <text:p>1.26466627050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